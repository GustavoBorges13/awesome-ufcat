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 Neue" svg:font-family="'Helvetica Neue', Helvetica, Roboto, Arial, sans-serif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">
      <style:text-properties officeooo:rsid="001ca83f" officeooo:paragraph-rsid="001ca83f"/>
    </style:style>
    <style:style style:name="P2" style:family="paragraph" style:parent-style-name="SBC_3a_paragraph">
      <style:text-properties officeooo:rsid="001ca83f" officeooo:paragraph-rsid="002016bc"/>
    </style:style>
    <style:style style:name="P3" style:family="paragraph" style:parent-style-name="SBC_3a_paragraph">
      <style:text-properties officeooo:rsid="001ca83f" officeooo:paragraph-rsid="00215b05"/>
    </style:style>
    <style:style style:name="P4" style:family="paragraph" style:parent-style-name="SBC_3a_paragraph">
      <style:text-properties officeooo:rsid="00278fc7" officeooo:paragraph-rsid="00278fc7"/>
    </style:style>
    <style:style style:name="P5" style:family="paragraph" style:parent-style-name="SBC_3a_paragraph">
      <style:text-properties officeooo:rsid="0027e2d4" officeooo:paragraph-rsid="0027e2d4"/>
    </style:style>
    <style:style style:name="P6" style:family="paragraph" style:parent-style-name="SBC_3a_paragraph">
      <style:text-properties officeooo:paragraph-rsid="001b1e7a"/>
    </style:style>
    <style:style style:name="P7" style:family="paragraph" style:parent-style-name="SBC_3a_paragraph">
      <style:text-properties officeooo:rsid="002016bc" officeooo:paragraph-rsid="002016bc"/>
    </style:style>
    <style:style style:name="P8" style:family="paragraph" style:parent-style-name="SBC_3a_paragraph">
      <style:text-properties style:text-position="0% 100%" fo:font-style="normal" officeooo:rsid="00215b05" officeooo:paragraph-rsid="00215b05" style:font-style-asian="normal" style:font-style-complex="normal"/>
    </style:style>
    <style:style style:name="P9" style:family="paragraph" style:parent-style-name="SBC_3a_paragraph">
      <style:text-properties fo:font-style="normal" officeooo:rsid="002e1c0c" officeooo:paragraph-rsid="002e1c0c" style:font-style-asian="normal" style:font-style-complex="normal"/>
    </style:style>
    <style:style style:name="P10" style:family="paragraph" style:parent-style-name="SBC_3a_paragraph">
      <style:text-properties officeooo:rsid="0023a107" officeooo:paragraph-rsid="0034abc1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officeooo:rsid="001ca83f" officeooo:paragraph-rsid="001ca83f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officeooo:rsid="001ca83f" officeooo:paragraph-rsid="001ff3ad"/>
    </style:style>
    <style:style style:name="P13" style:family="paragraph" style:parent-style-name="SBC_3a_paragraph">
      <style:paragraph-properties fo:margin-left="0cm" fo:margin-right="0cm" fo:text-indent="0cm" style:auto-text-indent="false"/>
      <style:text-properties officeooo:rsid="00215b05" officeooo:paragraph-rsid="00215b05"/>
    </style:style>
    <style:style style:name="P14" style:family="paragraph" style:parent-style-name="SBC_3a_paragraph">
      <style:paragraph-properties fo:margin-left="0cm" fo:margin-right="0cm" fo:text-indent="0cm" style:auto-text-indent="false"/>
      <style:text-properties officeooo:rsid="00278fc7" officeooo:paragraph-rsid="00278fc7"/>
    </style:style>
    <style:style style:name="P15" style:family="paragraph" style:parent-style-name="SBC_3a_paragraph">
      <style:paragraph-properties fo:margin-left="0cm" fo:margin-right="0cm" fo:text-indent="0cm" style:auto-text-indent="false"/>
      <style:text-properties officeooo:rsid="0027e2d4" officeooo:paragraph-rsid="0027e2d4"/>
    </style:style>
    <style:style style:name="P16" style:family="paragraph" style:parent-style-name="SBC_3a_paragraph">
      <style:paragraph-properties fo:margin-left="0cm" fo:margin-right="0cm" fo:text-indent="0cm" style:auto-text-indent="false"/>
      <style:text-properties officeooo:paragraph-rsid="0027e2d4"/>
    </style:style>
    <style:style style:name="P17" style:family="paragraph" style:parent-style-name="SBC_3a_paragraph">
      <style:paragraph-properties fo:margin-left="0cm" fo:margin-right="0cm" fo:text-indent="0cm" style:auto-text-indent="false"/>
      <style:text-properties officeooo:paragraph-rsid="001b1e7a"/>
    </style:style>
    <style:style style:name="P18" style:family="paragraph" style:parent-style-name="SBC_3a_paragraph">
      <style:paragraph-properties fo:margin-left="0cm" fo:margin-right="0cm" fo:text-indent="0cm" style:auto-text-indent="false"/>
      <style:text-properties officeooo:paragraph-rsid="002e1c0c"/>
    </style:style>
    <style:style style:name="P19" style:family="paragraph" style:parent-style-name="SBC_3a_paragraph">
      <style:paragraph-properties fo:margin-left="0cm" fo:margin-right="0cm" fo:text-indent="0cm" style:auto-text-indent="false"/>
      <style:text-properties fo:font-size="12pt" fo:font-style="normal" officeooo:rsid="00259997" officeooo:paragraph-rsid="0023a107" style:font-size-asian="12pt" style:font-style-asian="normal" style:font-size-complex="12pt" style:font-style-complex="normal"/>
    </style:style>
    <style:style style:name="P20" style:family="paragraph" style:parent-style-name="SBC_3a_paragraph">
      <style:paragraph-properties fo:margin-left="0cm" fo:margin-right="0cm" fo:text-indent="0cm" style:auto-text-indent="false"/>
      <style:text-properties fo:font-size="12pt" fo:font-style="normal" officeooo:rsid="00259997" officeooo:paragraph-rsid="00259997" style:font-size-asian="12pt" style:font-style-asian="normal" style:font-size-complex="12pt" style:font-style-complex="normal"/>
    </style:style>
    <style:style style:name="P21" style:family="paragraph" style:parent-style-name="SBC_3a_paragraph">
      <style:paragraph-properties fo:margin-left="0cm" fo:margin-right="0cm" fo:text-indent="0cm" style:auto-text-indent="false"/>
      <style:text-properties fo:font-style="normal" officeooo:rsid="002e1c0c" officeooo:paragraph-rsid="002e1c0c" style:font-style-asian="normal" style:font-style-complex="normal"/>
    </style:style>
    <style:style style:name="P22" style:family="paragraph" style:parent-style-name="SBC_3a_paragraph">
      <style:paragraph-properties fo:margin-left="0cm" fo:margin-right="0cm" fo:text-indent="0cm" style:auto-text-indent="false"/>
      <style:text-properties fo:font-style="normal" officeooo:rsid="002e1c0c" officeooo:paragraph-rsid="002ef74a" style:font-style-asian="normal" style:font-style-complex="normal"/>
    </style:style>
    <style:style style:name="P23" style:family="paragraph" style:parent-style-name="SBC_3a_paragraph_3a_first">
      <style:text-properties officeooo:paragraph-rsid="001b1e7a"/>
    </style:style>
    <style:style style:name="P24" style:family="paragraph" style:parent-style-name="SBC_3a_paragraph_3a_first">
      <style:text-properties officeooo:rsid="001ca83f" officeooo:paragraph-rsid="001ca83f"/>
    </style:style>
    <style:style style:name="P25" style:family="paragraph" style:parent-style-name="SBC_3a_paragraph_3a_first">
      <style:text-properties officeooo:paragraph-rsid="002e1c0c"/>
    </style:style>
    <style:style style:name="P26" style:family="paragraph" style:parent-style-name="SBC_3a_reference">
      <style:paragraph-properties fo:text-align="start" style:justify-single-word="false"/>
      <style:text-properties officeooo:paragraph-rsid="002ef74a"/>
    </style:style>
    <style:style style:name="P27" style:family="paragraph" style:parent-style-name="SBC_3a_reference">
      <style:paragraph-properties fo:text-align="start" style:justify-single-word="false"/>
      <style:text-properties officeooo:paragraph-rsid="00371332"/>
    </style:style>
    <style:style style:name="P28" style:family="paragraph" style:parent-style-name="SBC_3a_title" style:master-page-name="Standard">
      <style:paragraph-properties style:page-number="auto"/>
      <style:text-properties officeooo:rsid="00195d0b" officeooo:paragraph-rsid="00195d0b"/>
    </style:style>
    <style:style style:name="P29" style:family="paragraph" style:parent-style-name="SBC_3a_title_3a_1">
      <style:text-properties officeooo:rsid="00195d0b" officeooo:paragraph-rsid="001b1e7a"/>
    </style:style>
    <style:style style:name="P30" style:family="paragraph" style:parent-style-name="SBC_3a_title_3a_1">
      <style:text-properties officeooo:rsid="002e1c0c" officeooo:paragraph-rsid="002e1c0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5d0b"/>
    </style:style>
    <style:style style:name="T3" style:family="text">
      <style:text-properties style:text-position="super 58%" officeooo:rsid="0031877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15b05" style:font-style-asian="italic" style:font-style-complex="italic"/>
    </style:style>
    <style:style style:name="T6" style:family="text">
      <style:text-properties fo:font-style="italic" officeooo:rsid="00259997" style:font-style-asian="italic" style:font-style-complex="italic"/>
    </style:style>
    <style:style style:name="T7" style:family="text">
      <style:text-properties fo:font-style="italic" officeooo:rsid="002e1c0c" style:font-style-asian="italic" style:font-style-complex="italic"/>
    </style:style>
    <style:style style:name="T8" style:family="text">
      <style:text-properties fo:font-style="italic" officeooo:rsid="00363174" style:font-style-asian="italic" style:font-style-complex="italic"/>
    </style:style>
    <style:style style:name="T9" style:family="text">
      <style:text-properties officeooo:rsid="00195d0b"/>
    </style:style>
    <style:style style:name="T10" style:family="text">
      <style:text-properties officeooo:rsid="001ff3ad"/>
    </style:style>
    <style:style style:name="T11" style:family="text">
      <style:text-properties officeooo:rsid="002016bc"/>
    </style:style>
    <style:style style:name="T12" style:family="text">
      <style:text-properties officeooo:rsid="00215b05"/>
    </style:style>
    <style:style style:name="T13" style:family="text">
      <style:text-properties fo:font-style="normal" officeooo:rsid="00215b05" style:font-style-asian="normal" style:font-style-complex="normal"/>
    </style:style>
    <style:style style:name="T14" style:family="text">
      <style:text-properties fo:font-style="normal" officeooo:rsid="00259997" style:font-style-asian="normal" style:font-style-complex="normal"/>
    </style:style>
    <style:style style:name="T15" style:family="text">
      <style:text-properties fo:font-style="normal" officeooo:rsid="002e1c0c" style:font-style-asian="normal" style:font-style-complex="normal"/>
    </style:style>
    <style:style style:name="T16" style:family="text">
      <style:text-properties fo:font-style="normal" officeooo:rsid="002ef74a" style:font-style-asian="normal" style:font-style-complex="normal"/>
    </style:style>
    <style:style style:name="T17" style:family="text">
      <style:text-properties fo:font-style="normal" officeooo:rsid="00363174" style:font-style-asian="normal" style:font-style-complex="normal"/>
    </style:style>
    <style:style style:name="T18" style:family="text">
      <style:text-properties style:text-position="sub 58%" fo:font-style="normal" officeooo:rsid="00215b05" style:font-style-asian="normal" style:font-style-complex="normal"/>
    </style:style>
    <style:style style:name="T19" style:family="text">
      <style:text-properties style:text-position="sub 58%" officeooo:rsid="002b7b7a"/>
    </style:style>
    <style:style style:name="T20" style:family="text">
      <style:text-properties style:text-position="sub 58%" officeooo:rsid="002c9823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font-style="normal" officeooo:rsid="00215b05" style:font-style-asian="normal" style:font-style-complex="normal"/>
    </style:style>
    <style:style style:name="T23" style:family="text">
      <style:text-properties style:text-position="0% 100%" fo:font-style="normal" officeooo:rsid="0022078b" style:font-style-asian="normal" style:font-style-complex="normal"/>
    </style:style>
    <style:style style:name="T24" style:family="text">
      <style:text-properties style:text-position="0% 100%" fo:font-style="normal" officeooo:rsid="0023a107" style:font-style-asian="normal" style:font-style-complex="normal"/>
    </style:style>
    <style:style style:name="T25" style:family="text">
      <style:text-properties style:text-position="0% 100%" fo:font-style="italic" officeooo:rsid="00215b05" style:font-style-asian="italic" style:font-style-complex="italic"/>
    </style:style>
    <style:style style:name="T26" style:family="text">
      <style:text-properties style:text-position="0% 100%" fo:font-style="italic" officeooo:rsid="0023a107" style:font-style-asian="italic" style:font-style-complex="italic"/>
    </style:style>
    <style:style style:name="T27" style:family="text">
      <style:text-properties style:text-position="0% 100%" officeooo:rsid="002b7b7a"/>
    </style:style>
    <style:style style:name="T28" style:family="text">
      <style:text-properties style:text-position="0% 100%" officeooo:rsid="002c9823"/>
    </style:style>
    <style:style style:name="T29" style:family="text">
      <style:text-properties officeooo:rsid="0022078b"/>
    </style:style>
    <style:style style:name="T30" style:family="text">
      <style:text-properties officeooo:rsid="00259997"/>
    </style:style>
    <style:style style:name="T31" style:family="text">
      <style:text-properties fo:font-size="12pt" fo:font-style="normal" officeooo:rsid="001ca83f" style:font-size-asian="12pt" style:font-style-asian="normal" style:font-size-complex="12pt" style:font-style-complex="normal"/>
    </style:style>
    <style:style style:name="T32" style:family="text">
      <style:text-properties fo:font-size="12pt" fo:font-style="normal" officeooo:rsid="00259997" style:font-size-asian="12pt" style:font-style-asian="normal" style:font-size-complex="12pt" style:font-style-complex="normal"/>
    </style:style>
    <style:style style:name="T33" style:family="text">
      <style:text-properties fo:font-size="12pt" fo:font-style="normal" officeooo:rsid="0034abc1" style:font-size-asian="12pt" style:font-style-asian="normal" style:font-size-complex="12pt" style:font-style-complex="normal"/>
    </style:style>
    <style:style style:name="T34" style:family="text">
      <style:text-properties officeooo:rsid="00265fa9"/>
    </style:style>
    <style:style style:name="T35" style:family="text">
      <style:text-properties officeooo:rsid="0027e2d4"/>
    </style:style>
    <style:style style:name="T36" style:family="text">
      <style:text-properties officeooo:rsid="002b7b7a"/>
    </style:style>
    <style:style style:name="T37" style:family="text">
      <style:text-properties officeooo:rsid="002e1c0c"/>
    </style:style>
    <style:style style:name="T38" style:family="text">
      <style:text-properties officeooo:rsid="00318778"/>
    </style:style>
    <style:style style:name="T39" style:family="text">
      <style:text-properties officeooo:rsid="0032dcef"/>
    </style:style>
    <style:style style:name="T40" style:family="text">
      <style:text-properties officeooo:rsid="00354197"/>
    </style:style>
    <style:style style:name="T41" style:family="text">
      <style:text-properties fo:font-variant="normal" fo:text-transform="none" fo:color="#222222" style:font-name="Helvetica Neue" fo:font-size="12pt" fo:letter-spacing="normal" fo:font-style="normal" fo:font-weight="normal"/>
    </style:style>
    <style:style style:name="T42" style:family="text">
      <style:text-properties fo:font-variant="normal" fo:text-transform="none" fo:color="#222222" style:font-name="Helvetica Neue" fo:font-size="12pt" fo:letter-spacing="normal" fo:font-style="normal" fo:font-weight="bold"/>
    </style:style>
    <style:style style:name="T43" style:family="text">
      <style:text-properties fo:font-variant="normal" fo:text-transform="none" fo:color="#222222" fo:font-size="12pt" fo:letter-spacing="normal" fo:font-style="normal" fo:font-weight="normal"/>
    </style:style>
    <style:style style:name="T44" style:family="text">
      <style:text-properties fo:font-variant="normal" fo:text-transform="none" fo:color="#222222" fo:font-size="12pt" fo:letter-spacing="normal" fo:font-style="normal" fo:font-weight="bold"/>
    </style:style>
    <style:style style:name="T45" style:family="text">
      <style:text-properties fo:font-variant="normal" fo:text-transform="none" fo:color="#222222" style:font-name="Times2" fo:font-size="12pt" fo:letter-spacing="normal" fo:font-style="normal" fo:font-weight="normal"/>
    </style:style>
    <style:style style:name="T46" style:family="text">
      <style:text-properties fo:font-variant="normal" fo:text-transform="none" fo:color="#222222" style:font-name="Times2" fo:font-size="12pt" fo:letter-spacing="normal" fo:font-style="normal" fo:font-weight="bold"/>
    </style:style>
    <style:style style:name="T47" style:family="text">
      <style:text-properties officeooo:rsid="003713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ROJETO <text:span text:style-name="T38">1</text:span>: <text:span text:style-name="T38">FAMILIARIZAÇÃO COM MÁQUINA VIRTUAL E SINCRONIZAÇÃO DE PROCESSOS</text:span></text:p>
      <text:p text:style-name="SBC_3a_author_28_s_29_"><text:span text:style-name="T38">Izaque Vieira de Souza</text:span><text:span text:style-name="T3">1</text:span>, <text:span text:style-name="T38">Olávio Gonçalves de Almeida</text:span><text:span text:style-name="T2">1</text:span>, <text:span text:style-name="T38">Wisley Kilder da Silva Nogueira</text:span><text:span text:style-name="T1">1</text:span></text:p>
      <text:p text:style-name="SBC_3a_institution"><text:span text:style-name="T1">1</text:span><text:span text:style-name="T9">Departamento de Ciência da Computação</text:span> – Universidade Federal d<text:span text:style-name="T9">e Goiás</text:span> (UFG)</text:p>
      <text:p text:style-name="SBC_3a_email"><text:span text:style-name="T38">izaquevieira</text:span>@<text:span text:style-name="T38">outlook.com.br</text:span>, <text:span text:style-name="T38">olaviog.almeida@gmail.com</text:span>, <text:span text:style-name="T38">w.kilder</text:span>@<text:span text:style-name="T38">hotmail.com</text:span></text:p>
      <text:p text:style-name="SBC_3a_resumo"/>
      <text:h text:style-name="P29" text:outline-level="1">Tarefa 1</text:h>
      <text:p text:style-name="P24">1.1. Descrição</text:p>
      <text:p text:style-name="P1">Devido a questões de mobilidade e praticidade, a equipe de trabalho optou por utilizar um computador próprio para realizar as atividades propostas na disciplina. Na máquina utilizada para os trabalhos, o SO Ubuntu 16.04 LTS foi instalado de forma nativa, com o tamanho de disco destinado ao SO de 109 GB, e uma memória de 7,7 GB.</text:p>
      <text:p text:style-name="P1"/>
      <text:p text:style-name="P24">1.2. Instalação de Softwares</text:p>
      <text:p text:style-name="P1">Os softwares para essa distribuição Linux podem ser instalados através da loja Ubuntu Software, ou através da interface de linha de comando, utilizando comandos no terminal.</text:p>
      <text:p text:style-name="P1">Na máquina utilizada, a maioria dos softwares instalados foram através da interface de linha de comando. Em muitos dos casos foi necessário incluir o repositório do software para que a instalação fosse possível.</text:p>
      <text:p text:style-name="P1"/>
      <text:h text:style-name="P29" text:outline-level="1">Tarefa 2</text:h>
      <text:p text:style-name="P24">2.1. Sincronização de processos</text:p>
      <text:p text:style-name="P1">Essa tarefa tem como o objetivo recapitular conceitos fundamentais de sistemas operacionais, vistos em SO1. Nas seções a seguir serão apresentados os códigos desenvolvidos pelo grupo.</text:p>
      <text:p text:style-name="P1"/>
      <text:p text:style-name="P24">2.1.1. Solução de Peterson</text:p>
      <text:p text:style-name="P2">Para a resolução dessa atividade foram usadas como base os códigos apresentados pelo professor <text:span text:style-name="T10">nos slides.</text:span></text:p>
      <text:p text:style-name="P7">1) A seção crítica foi protegida de acordo com o que foi pedido no enunciado, utilizando a proposta apresentada.</text:p>
      <text:p text:style-name="P3"><text:span text:style-name="T11">2) A solução de Peterson protege a seção crítica da seguinte forma: o código fica preso em um laço de repetição enquanto um processo está na sua seção crítica (SC), e </text:span><text:soft-page-break/><text:span text:style-name="T11">quando ele libera a SC o laço de repetição é quebrado, liberando acesso à SC para outros processos que tenham interesse.</text:span></text:p>
      <text:p text:style-name="P3"><text:span text:style-name="T12">3) O tratamento de erros pode ser feito com um condicional </text:span><text:span text:style-name="T5">if</text:span><text:span text:style-name="T13">. Se a função utilizada para criar </text:span><text:span text:style-name="T5">threads</text:span><text:span text:style-name="T13"> retornar 0, a </text:span><text:span text:style-name="T5">thread </text:span><text:span text:style-name="T13">foi criada corretamente. Caso contrário, a </text:span><text:span text:style-name="T5">thread </text:span><text:span text:style-name="T13">não foi criada corretamente, e o programa encerra.</text:span></text:p>
      <text:p text:style-name="P3"><text:span text:style-name="T13">4) O código apresentado a seguir foi adaptado para criar duas </text:span><text:span text:style-name="T5">threads </text:span><text:span text:style-name="T13">p</text:span><text:span text:style-name="T18">i</text:span><text:span text:style-name="T22"> e p</text:span><text:span text:style-name="T18">j</text:span><text:span text:style-name="T22"> utilizando apenas a seção de código da função </text:span><text:span text:style-name="T25">void * cria(void *arg)</text:span><text:span text:style-name="T22">. </text:span><text:span text:style-name="T23">Para realizar essa adaptação foi utilizad</text:span><text:span text:style-name="T24">a a documentação da função </text:span><text:span text:style-name="T26">pthread_create()</text:span><text:span text:style-name="T24">, apresentada por Kerrisk (2018).</text:span></text:p>
      <text:p text:style-name="P8"/>
      <text:p text:style-name="P13"><text:span text:style-name="T22">C</text:span><text:span text:style-name="T21">ódigo:</text:span></text:p>
      <text:p text:style-name="P1"/>
      <text:p text:style-name="P11">#include &lt;stdio.h&gt;</text:p>
      <text:p text:style-name="P11">#include &lt;stdlib.h&gt;</text:p>
      <text:p text:style-name="P11">#include &lt;pthread.h&gt;</text:p>
      <text:p text:style-name="P11"/>
      <text:p text:style-name="P11">#define true 1</text:p>
      <text:p text:style-name="P11">#define false 0</text:p>
      <text:p text:style-name="P11"/>
      <text:p text:style-name="P11">pthread_t flag[2];</text:p>
      <text:p text:style-name="P11">int turn, <text:span text:style-name="T10">counter = 0;</text:span></text:p>
      <text:p text:style-name="P11"/>
      <text:p text:style-name="P11">void enterSC (int i){</text:p>
      <text:p text:style-name="P11"><text:s text:c="3"/>int j = 1 - i; <text:s/>//J sempre vai ser oposto de i: caso i == 0, j == 1 e vice-versa</text:p>
      <text:p text:style-name="P12"><text:s text:c="3"/>flag[i] = true; //<text:span text:style-name="T10">T</text:span>hread que solicita entrada na seção crítica</text:p>
      <text:p text:style-name="P12"><text:s text:c="3"/>turn = j;</text:p>
      <text:p text:style-name="P11"><text:s text:c="3"/>while(flag[j] &amp;&amp; turn == j); <text:s/>//Laço para segurar a seção crítica</text:p>
      <text:p text:style-name="P11"><text:s text:c="3"/>return;</text:p>
      <text:p text:style-name="P11">}</text:p>
      <text:p text:style-name="P11"/>
      <text:p text:style-name="P11">void leaveSC (int i){</text:p>
      <text:p text:style-name="P11"><text:s text:c="3"/>flag[i] = false; <text:s/>//<text:span text:style-name="T10">T</text:span>hread que solicita sair da seção crítica</text:p>
      <text:p text:style-name="P11"><text:s text:c="3"/>return;</text:p>
      <text:p text:style-name="P11">}</text:p>
      <text:p text:style-name="P11"/>
      <text:p text:style-name="P11">void * cria (void *arg)<text:span text:style-name="T40">{</text:span></text:p>
      <text:p text:style-name="P11"><text:soft-page-break/><text:s text:c="3"/>int aux = (int *)arg, i = 0; <text:s/>//Pegar o índice da thread</text:p>
      <text:p text:style-name="P11"><text:s text:c="3"/>enterSC(aux); <text:s/>//Chamada da função para entrar na seção crítica</text:p>
      <text:p text:style-name="P11"><text:s text:c="3"/>printf("\nP%d: A região crítica é minha!!!\n", aux);</text:p>
      <text:p text:style-name="P11"><text:s text:c="3"/>counter++;</text:p>
      <text:p text:style-name="P11"><text:s text:c="3"/>printf("\n\nP%d: counter = %d\n\n", aux, counter);</text:p>
      <text:p text:style-name="P11"><text:s text:c="3"/>leaveSC(aux); <text:s/>//Função para sair da seção crítica</text:p>
      <text:p text:style-name="P11"><text:s text:c="3"/>return NULL;</text:p>
      <text:p text:style-name="P11">}</text:p>
      <text:p text:style-name="P11"/>
      <text:p text:style-name="P11">int main (void){</text:p>
      <text:p text:style-name="P11"><text:s text:c="3"/>pthread_t thi, thj; //Duas variáveis para a criação das threads</text:p>
      <text:p text:style-name="P11"/>
      <text:p text:style-name="P11"><text:s text:c="3"/>//Verifica se a<text:span text:style-name="T10">s</text:span> thread<text:span text:style-name="T10">s</text:span> fo<text:span text:style-name="T10">ram</text:span> criada<text:span text:style-name="T10">s</text:span> corretamente</text:p>
      <text:p text:style-name="P11"><text:s text:c="3"/>if(pthread_create (&amp;thi, NULL, cria, (int *)0) != 0){</text:p>
      <text:p text:style-name="P11"><text:s text:c="6"/>printf("Algum erro ocorreu na criação das threads!\n");</text:p>
      <text:p text:style-name="P11"><text:s text:c="6"/>exit(1);</text:p>
      <text:p text:style-name="P11"><text:s text:c="3"/>}</text:p>
      <text:p text:style-name="P11"><text:s text:c="3"/>if(pthread_create (&amp;thj, NULL, cria, (int* )1) != 0){</text:p>
      <text:p text:style-name="P11"><text:s text:c="6"/>printf("Algum erro ocorreu na criação das threads!\n");</text:p>
      <text:p text:style-name="P11"><text:s text:c="6"/>exit(1);</text:p>
      <text:p text:style-name="P11"><text:s text:c="3"/>}</text:p>
      <text:p text:style-name="P11"/>
      <text:p text:style-name="P11"><text:s text:c="3"/>//Inicia as threads</text:p>
      <text:p text:style-name="P11"><text:s text:c="3"/>pthread_join (thi, NULL);</text:p>
      <text:p text:style-name="P11"><text:s text:c="3"/>pthread_join (thj, NULL);</text:p>
      <text:p text:style-name="P11"/>
      <text:p text:style-name="P11"><text:s text:c="3"/>return 0;</text:p>
      <text:p text:style-name="P11">}</text:p>
      <text:p text:style-name="P11"/>
      <text:p text:style-name="P24">2.1.2. <text:span text:style-name="T29">Solução de hardware usando locks do tipo test and set</text:span></text:p>
      <text:p text:style-name="P10">Para realizar esta atividade foram usados como base o material disponibilizado pelo professor e também <text:span text:style-name="T30">uma breve descrição das funções </text:span><text:span text:style-name="T6">atomic_flag_test_and_set </text:span><text:span text:style-name="T14">e </text:span><text:span text:style-name="T6">atomic_flag_clear</text:span><text:span text:style-name="T14">, apresentadas em uma </text:span><text:span text:style-name="T6">homepage</text:span><text:span text:style-name="T31"> </text:span><text:span text:style-name="T32">(</text:span><text:span text:style-name="T33">atomic_flag_test_and_set, atomic_flag_clear – cppreference.com</text:span><text:span text:style-name="T32">).</text:span></text:p>
      <text:p text:style-name="P19"/>
      <text:p text:style-name="P20"><text:soft-page-break/>Código:</text:p>
      <text:p text:style-name="P20"/>
      <text:p text:style-name="P20">#include &lt;stdio.h&gt;</text:p>
      <text:p text:style-name="P20">#include &lt;stdlib.h&gt;</text:p>
      <text:p text:style-name="P20">#include &lt;pthread.h&gt;</text:p>
      <text:p text:style-name="P20">#include &lt;stdatomic.h&gt; <text:s/>//Biblioteca atomic</text:p>
      <text:p text:style-name="P20"/>
      <text:p text:style-name="P20">int counter;</text:p>
      <text:p text:style-name="P20">atomic_flag lock = ATOMIC_FLAG_INIT; <text:s/>//Variável atômica</text:p>
      <text:p text:style-name="P20"/>
      <text:p text:style-name="P20">void enterSC (int i){</text:p>
      <text:p text:style-name="P20"><text:span text:style-name="T39">while(</text:span>atomic_flag_test_and_set(&amp;lock)<text:span text:style-name="T39">)</text:span>; //Laço para travar a SC</text:p>
      <text:p text:style-name="P20"><text:s text:c="3"/>return;</text:p>
      <text:p text:style-name="P20">}</text:p>
      <text:p text:style-name="P20"/>
      <text:p text:style-name="P20">void leaveSC (int i){</text:p>
      <text:p text:style-name="P20"><text:s text:c="3"/>atomic_flag_clear(&amp;lock); //Libera a seção crítica</text:p>
      <text:p text:style-name="P20"><text:s text:c="3"/>return;</text:p>
      <text:p text:style-name="P20">}</text:p>
      <text:p text:style-name="P20"/>
      <text:p text:style-name="P20">void * cria (void *arg){</text:p>
      <text:p text:style-name="P20"><text:s text:c="3"/>int aux = (int *)arg, i = 0; <text:s/>//Pegar o índice da thread</text:p>
      <text:p text:style-name="P20"><text:s text:c="3"/>enterSC(aux); <text:s/>//Chamada da função para entrar na seção crítica</text:p>
      <text:p text:style-name="P20"><text:s text:c="3"/>printf("\nP%d: A região crítica é minha!!!\n", aux);</text:p>
      <text:p text:style-name="P20"><text:s text:c="3"/>counter++;</text:p>
      <text:p text:style-name="P20"><text:s text:c="3"/>printf("\n\nP%d: counter = %d\n\n", aux, counter);</text:p>
      <text:p text:style-name="P20"><text:s text:c="3"/>leaveSC(aux); <text:s/>//Função para sair da seção crítica</text:p>
      <text:p text:style-name="P20"><text:s text:c="3"/>return NULL;</text:p>
      <text:p text:style-name="P20">}</text:p>
      <text:p text:style-name="P20"/>
      <text:p text:style-name="P20">int main (void){</text:p>
      <text:p text:style-name="P20"><text:s text:c="3"/>pthread_t thi, thj; //Duas variáveis para a criação das threads</text:p>
      <text:p text:style-name="P20"/>
      <text:p text:style-name="P20"><text:s text:c="3"/>//Verifica se a thread foi criada corretamente</text:p>
      <text:p text:style-name="P20"><text:soft-page-break/><text:s text:c="3"/>if(pthread_create (&amp;thi, NULL, cria, (int *)0) != 0){</text:p>
      <text:p text:style-name="P20"><text:s text:c="6"/>printf("Algum erro ocorreu na criação das threads!\n");</text:p>
      <text:p text:style-name="P20"><text:s text:c="6"/>exit(1);</text:p>
      <text:p text:style-name="P20"><text:s text:c="3"/>}</text:p>
      <text:p text:style-name="P20"/>
      <text:p text:style-name="P20"><text:s text:c="3"/>//Verifica se a thread foi criada corretamente</text:p>
      <text:p text:style-name="P20"><text:s text:c="3"/>if(pthread_create (&amp;thj, NULL, cria, (int* )1) != 0){</text:p>
      <text:p text:style-name="P20"><text:s text:c="6"/>printf("Algum erro ocorreu na criação das threads!\n");</text:p>
      <text:p text:style-name="P20"><text:s text:c="6"/>exit(1);</text:p>
      <text:p text:style-name="P20"><text:s text:c="3"/>}</text:p>
      <text:p text:style-name="P20"/>
      <text:p text:style-name="P20"><text:s text:c="3"/>//Inicia as threads</text:p>
      <text:p text:style-name="P20"><text:s text:c="3"/>pthread_join (thi, NULL);</text:p>
      <text:p text:style-name="P20"><text:s text:c="3"/>pthread_join (thj, NULL);</text:p>
      <text:p text:style-name="P20"/>
      <text:p text:style-name="P20"><text:s text:c="3"/>return 0;</text:p>
      <text:p text:style-name="P20">}</text:p>
      <text:p text:style-name="P20"/>
      <text:p text:style-name="P24">2.1.3. <text:span text:style-name="T34">Solução de hardware usando locks do tipo mutex</text:span></text:p>
      <text:p text:style-name="P4">Para solucionar o problema proposto foi usado como base o material disponibilizado pelo professor <text:span text:style-name="T40">(slides)</text:span>.</text:p>
      <text:p text:style-name="P14"/>
      <text:p text:style-name="P15">Código:</text:p>
      <text:p text:style-name="P15"/>
      <text:p text:style-name="P15">#include &lt;stdio.h&gt;</text:p>
      <text:p text:style-name="P15">#include &lt;stdlib.h&gt;</text:p>
      <text:p text:style-name="P15">#include &lt;pthread.h&gt;</text:p>
      <text:p text:style-name="P15"/>
      <text:p text:style-name="P15">pthread_mutex_t lock; //Variável para travamento da SC</text:p>
      <text:p text:style-name="P15">int counter = 0; <text:s/>//Contador</text:p>
      <text:p text:style-name="P15"/>
      <text:p text:style-name="P15">void enterSC (){</text:p>
      <text:p text:style-name="P15"><text:s text:c="3"/>pthread_mutex_lock(&amp;lock); //Trava a seção crítica pela variável lock</text:p>
      <text:p text:style-name="P15"><text:s text:c="3"/>return;</text:p>
      <text:p text:style-name="P15">}</text:p>
      <text:p text:style-name="P15"><text:soft-page-break/></text:p>
      <text:p text:style-name="P15">void leaveSC (){</text:p>
      <text:p text:style-name="P15"><text:s text:c="3"/>pthread_mutex_unlock(&amp;lock); <text:s/>//Libera a SC pela variável lock</text:p>
      <text:p text:style-name="P15"><text:s text:c="3"/>return;</text:p>
      <text:p text:style-name="P15">}</text:p>
      <text:p text:style-name="P15"/>
      <text:p text:style-name="P15">void * cria (void *arg){</text:p>
      <text:p text:style-name="P15"><text:s text:c="3"/>int aux = (int *)arg, i = 0; <text:s/>//Pegar o índice da thread</text:p>
      <text:p text:style-name="P15"><text:s text:c="3"/>enterSC(); <text:s/>//Chamada da função para entrar na seção crítica</text:p>
      <text:p text:style-name="P15"><text:s text:c="3"/>printf("\nP%d: A região crítica é minha!!!\n", aux);</text:p>
      <text:p text:style-name="P15"><text:s text:c="3"/>counter++;</text:p>
      <text:p text:style-name="P15"><text:s text:c="3"/>printf("\n\nP%d: counter = %d\n\n", aux, counter);</text:p>
      <text:p text:style-name="P15"><text:s text:c="3"/>leaveSC(); <text:s/>//Função para sair da seção crítica</text:p>
      <text:p text:style-name="P15"><text:s text:c="3"/>return NULL;</text:p>
      <text:p text:style-name="P15">}</text:p>
      <text:p text:style-name="P15"/>
      <text:p text:style-name="P15">int main (void){</text:p>
      <text:p text:style-name="P15"><text:s text:c="3"/>pthread_t thi, thj; //Duas variáveis para a criação das threads</text:p>
      <text:p text:style-name="P15"/>
      <text:p text:style-name="P15"><text:s text:c="3"/>//Verifica se a thread foi criada corretamente</text:p>
      <text:p text:style-name="P15"><text:s text:c="3"/>if(pthread_create (&amp;thi, NULL, cria, (int *)0) != 0){</text:p>
      <text:p text:style-name="P15"><text:s text:c="6"/>printf("Algum erro ocorreu na criação das threads!\n");</text:p>
      <text:p text:style-name="P15"><text:s text:c="6"/>exit(1);</text:p>
      <text:p text:style-name="P15"><text:s text:c="3"/>}</text:p>
      <text:p text:style-name="P15"/>
      <text:p text:style-name="P15"><text:s text:c="3"/>if(pthread_create (&amp;thj, NULL, cria, (int* )1) != 0){</text:p>
      <text:p text:style-name="P15"><text:s text:c="6"/>printf("Algum erro ocorreu na criação das threads!\n");</text:p>
      <text:p text:style-name="P15"><text:s text:c="6"/>exit(1);</text:p>
      <text:p text:style-name="P15"><text:s text:c="3"/>}</text:p>
      <text:p text:style-name="P15"/>
      <text:p text:style-name="P15"><text:s text:c="3"/>//Inicia as threads</text:p>
      <text:p text:style-name="P15"><text:s text:c="3"/>pthread_join (thi, NULL);</text:p>
      <text:p text:style-name="P15"><text:s text:c="3"/>pthread_join (thj, NULL);</text:p>
      <text:p text:style-name="P15"/>
      <text:p text:style-name="P15"><text:soft-page-break/><text:s text:c="3"/>return 0;</text:p>
      <text:p text:style-name="P15">}</text:p>
      <text:p text:style-name="P15"/>
      <text:p text:style-name="P24">2.1.4. <text:span text:style-name="T35">Solução de hardware usando semáforo</text:span></text:p>
      <text:p text:style-name="P5">Para a resolução dessa atividade foram utilizado<text:span text:style-name="T40">s como referência o material disponibilizado pelo professor, com os slides da disciplina de SO1. Foi usada também </text:span>uma descrição das funções de semáforo disponíveis em uma <text:span text:style-name="T8">homepage</text:span><text:span text:style-name="T17"> (sem_wait, sem_post, sem_init, sem_destroy - man7.org)</text:span>.</text:p>
      <text:p text:style-name="P5"/>
      <text:p text:style-name="P15">Código:</text:p>
      <text:p text:style-name="P15"/>
      <text:p text:style-name="P15">#include &lt;stdio.h&gt;</text:p>
      <text:p text:style-name="P15">#include &lt;stdlib.h&gt;</text:p>
      <text:p text:style-name="P15">#include &lt;pthread.h&gt;</text:p>
      <text:p text:style-name="P15">#include &lt;semaphore.h&gt; <text:s/>//Bilbioteca para o uso de semáforos</text:p>
      <text:p text:style-name="P15"/>
      <text:p text:style-name="P15">sem_t semaphore; <text:s/>//Variável de semáforo</text:p>
      <text:p text:style-name="P15">int counter = 0;</text:p>
      <text:p text:style-name="P15"/>
      <text:p text:style-name="P15">void enterSC (){ <text:s/>//Função para controlar entrada na seção crítica</text:p>
      <text:p text:style-name="P15"><text:s text:c="3"/>sem_wait(&amp;semaphore); //Para fazer o lock do semáforo</text:p>
      <text:p text:style-name="P15"><text:s text:c="3"/>return;</text:p>
      <text:p text:style-name="P15">}</text:p>
      <text:p text:style-name="P15"/>
      <text:p text:style-name="P15">void leaveSC (){ <text:s/>//Função para sair da seção crítica</text:p>
      <text:p text:style-name="P15"><text:s text:c="3"/>sem_post(&amp;semaphore); //Função que libera o semáforo</text:p>
      <text:p text:style-name="P15"><text:s text:c="3"/>return;</text:p>
      <text:p text:style-name="P15">}</text:p>
      <text:p text:style-name="P15"/>
      <text:p text:style-name="P15">void * cria (void *arg){ <text:s/>//Função para a thread</text:p>
      <text:p text:style-name="P15"><text:s text:c="3"/>int aux = (int *)arg, i = 0; <text:s/>//Pegar o índice da thread</text:p>
      <text:p text:style-name="P15"><text:s text:c="3"/>enterSC(); <text:s/>//Chamada da função para entrar na seção crítica</text:p>
      <text:p text:style-name="P15"><text:s text:c="3"/>printf("\nP%d: A região crítica é minha!!!\n", aux);</text:p>
      <text:p text:style-name="P15"><text:s text:c="3"/>counter++;</text:p>
      <text:p text:style-name="P15"><text:s text:c="3"/>printf("\n\nP%d: counter = %d\n\n", aux, counter);</text:p>
      <text:p text:style-name="P15"><text:soft-page-break/><text:s text:c="3"/>leaveSC(); <text:s/>//Função para sair da seção crítica</text:p>
      <text:p text:style-name="P15"><text:s text:c="3"/>return NULL;</text:p>
      <text:p text:style-name="P15">}</text:p>
      <text:p text:style-name="P15"/>
      <text:p text:style-name="P15">int main (void){</text:p>
      <text:p text:style-name="P15"><text:s text:c="3"/>pthread_t thi, thj; //Duas variáveis para a criação das threads</text:p>
      <text:p text:style-name="P15"><text:s text:c="3"/>sem_init(&amp;semaphore, 0, 1); //Função para inicializar a variável de semáforo</text:p>
      <text:p text:style-name="P15"/>
      <text:p text:style-name="P15"><text:s text:c="3"/>//Verifica se a thread foi criada corretamente</text:p>
      <text:p text:style-name="P15"><text:s text:c="3"/>if(pthread_create (&amp;thi, NULL, cria, (int *)0) != 0){</text:p>
      <text:p text:style-name="P15"><text:s text:c="6"/>printf("Algum erro ocorreu na criação das threads!\n");</text:p>
      <text:p text:style-name="P15"><text:s text:c="6"/>exit(1);</text:p>
      <text:p text:style-name="P15"><text:s text:c="3"/>}</text:p>
      <text:p text:style-name="P15"/>
      <text:p text:style-name="P15"><text:s text:c="3"/>if(pthread_create (&amp;thj, NULL, cria, (int* )1) != 0){</text:p>
      <text:p text:style-name="P15"><text:s text:c="6"/>printf("Algum erro ocorreu na criação das threads!\n");</text:p>
      <text:p text:style-name="P15"><text:s text:c="6"/>exit(1);</text:p>
      <text:p text:style-name="P15"><text:s text:c="3"/>}</text:p>
      <text:p text:style-name="P15"/>
      <text:p text:style-name="P15"><text:s text:c="3"/>//Inicia as threads</text:p>
      <text:p text:style-name="P15"><text:s text:c="3"/>pthread_join (thi, NULL);</text:p>
      <text:p text:style-name="P15"><text:s text:c="3"/>pthread_join (thj, NULL);</text:p>
      <text:p text:style-name="P15"/>
      <text:p text:style-name="P15"><text:s text:c="3"/>//Destrói a variável do semáforo ao fim do programa</text:p>
      <text:p text:style-name="P15"><text:s text:c="3"/>sem_destroy(&amp;semaphore);</text:p>
      <text:p text:style-name="P15"><text:s text:c="3"/>return 0;</text:p>
      <text:p text:style-name="P15">}</text:p>
      <text:p text:style-name="P16"/>
      <text:h text:style-name="P29" text:outline-level="1">Tarefa 3</text:h>
      <text:p text:style-name="P23"><text:tab/><text:span text:style-name="T36">Para a resolução desta atividade foi usado o código de semáforos apresentado na seção 2.1.4. Na prática, é feita uma simulação onde dois processos são executados simultaneamente. Um processo p</text:span><text:span text:style-name="T19">i</text:span><text:span text:style-name="T36"> solicita um recurso Q, e ao mesmo tempo um outro processo p</text:span><text:span text:style-name="T19">j</text:span><text:span text:style-name="T27"> solicita um recurso S. Após isto, ambos os processos</text:span><text:span text:style-name="T36"> dormem por 1 segundo e posteriormente p</text:span><text:span text:style-name="T20">i</text:span><text:span text:style-name="T36"> solicita o recurso S e p</text:span><text:span text:style-name="T20">j</text:span><text:span text:style-name="T28"> solicita o recurso Q</text:span><text:span text:style-name="T36">. Como ambos os recursos já estavam alocados, o programa entra em um deadlock. O código feito é apresentado em seguida.</text:span></text:p>
      <text:p text:style-name="P6"><text:soft-page-break/></text:p>
      <text:p text:style-name="P17">#include &lt;stdio.h&gt;</text:p>
      <text:p text:style-name="P17">#include &lt;stdlib.h&gt;</text:p>
      <text:p text:style-name="P17">#include &lt;pthread.h&gt;</text:p>
      <text:p text:style-name="P17">#include &lt;semaphore.h&gt;</text:p>
      <text:p text:style-name="P17">#include &lt;time.h&gt;</text:p>
      <text:p text:style-name="P17"/>
      <text:p text:style-name="P17">sem_t semaphore, semaphore2; <text:s/>//Variáveis do tipo semáforo</text:p>
      <text:p text:style-name="P17">int counter = 0; <text:s/>//Variável contadora</text:p>
      <text:p text:style-name="P17"/>
      <text:p text:style-name="P17">void enterSCQ(int i){ //Função para pegar o recurso Q</text:p>
      <text:p text:style-name="P17"><text:s text:c="3"/>sem_wait(&amp;semaphore);</text:p>
      <text:p text:style-name="P17"><text:s text:c="3"/>printf("O processo %d pegou o recurso Q e aguarda pelo recurso S!!\n", i);</text:p>
      <text:p text:style-name="P17"><text:s text:c="3"/>return;</text:p>
      <text:p text:style-name="P17">}</text:p>
      <text:p text:style-name="P17"/>
      <text:p text:style-name="P17">void leaveSCQ (){</text:p>
      <text:p text:style-name="P17"><text:s text:c="3"/>sem_post(&amp;semaphore);</text:p>
      <text:p text:style-name="P17"><text:s text:c="3"/>return;</text:p>
      <text:p text:style-name="P17">}</text:p>
      <text:p text:style-name="P17"/>
      <text:p text:style-name="P17">void enterSCS(int i){ //Função para pegar o recurso S</text:p>
      <text:p text:style-name="P17"><text:s text:c="3"/>sem_wait(&amp;semaphore2);</text:p>
      <text:p text:style-name="P17"><text:s text:c="3"/>printf("O processo %d pegou o recurso S e aguarda pelo recurso Q!!\n", i);</text:p>
      <text:p text:style-name="P17"><text:s text:c="3"/>return;</text:p>
      <text:p text:style-name="P17">}</text:p>
      <text:p text:style-name="P17"/>
      <text:p text:style-name="P17">void leaveSCS (){</text:p>
      <text:p text:style-name="P17"><text:s text:c="3"/>sem_post(&amp;semaphore2);</text:p>
      <text:p text:style-name="P17"><text:s text:c="3"/>return;</text:p>
      <text:p text:style-name="P17">}</text:p>
      <text:p text:style-name="P17"/>
      <text:p text:style-name="P17">void * pi (void *arg){</text:p>
      <text:p text:style-name="P17"><text:s text:c="3"/>int aux = (int *)arg; //Índice</text:p>
      <text:p text:style-name="P17"><text:soft-page-break/><text:s text:c="3"/>enterSCS(aux); <text:s/>//Tenta alocar o recruso S</text:p>
      <text:p text:style-name="P17"><text:s text:c="3"/>sleep(1);</text:p>
      <text:p text:style-name="P17"><text:s text:c="3"/>enterSCQ(aux); <text:s/>//Tenta alocar o recurso Q</text:p>
      <text:p text:style-name="P17"><text:s text:c="3"/>printf("\nPi: A região crítica é minha!!!\n");</text:p>
      <text:p text:style-name="P17"><text:s text:c="3"/>counter++;</text:p>
      <text:p text:style-name="P17"><text:s text:c="3"/>printf("\n\nPi: counter = %d\n\n", counter);</text:p>
      <text:p text:style-name="P17"><text:s text:c="3"/>leaveSCS();</text:p>
      <text:p text:style-name="P17"><text:s text:c="3"/>leaveSCQ();</text:p>
      <text:p text:style-name="P17"><text:s text:c="3"/>return NULL;</text:p>
      <text:p text:style-name="P17">}</text:p>
      <text:p text:style-name="P17"/>
      <text:p text:style-name="P17">void * pj (void *arg){</text:p>
      <text:p text:style-name="P17"><text:s text:c="3"/>int aux = (int *)arg; //Índice</text:p>
      <text:p text:style-name="P17"><text:s text:c="3"/>enterSCQ(aux); <text:s/>//Tenta alocar o recruso Q</text:p>
      <text:p text:style-name="P17"><text:s text:c="3"/>sleep(1);</text:p>
      <text:p text:style-name="P17"><text:s text:c="3"/>enterSCS(aux); <text:s/>//Tenta alocar o recruso S</text:p>
      <text:p text:style-name="P17"><text:s text:c="3"/>printf("\nPj: A região crítica é minha!!!\n");</text:p>
      <text:p text:style-name="P17"><text:s text:c="3"/>counter++;</text:p>
      <text:p text:style-name="P17"><text:s text:c="3"/>printf("\n\nPj: counter = %d\n\n", counter);</text:p>
      <text:p text:style-name="P17"><text:s text:c="3"/>leaveSCQ();</text:p>
      <text:p text:style-name="P17"><text:s text:c="3"/>leaveSCS();</text:p>
      <text:p text:style-name="P17"><text:s text:c="3"/>return NULL;</text:p>
      <text:p text:style-name="P17">}</text:p>
      <text:p text:style-name="P17"/>
      <text:p text:style-name="P17">int main (void){</text:p>
      <text:p text:style-name="P17"><text:s text:c="3"/>pthread_t thi, thj; //Variáveis para a criação de threads</text:p>
      <text:p text:style-name="P17"/>
      <text:p text:style-name="P17"><text:s text:c="3"/>//Iniciação de semáforos</text:p>
      <text:p text:style-name="P17"><text:s text:c="3"/>sem_init(&amp;semaphore, 0, 1);</text:p>
      <text:p text:style-name="P17"><text:s text:c="3"/>sem_init(&amp;semaphore2, 0, 1);</text:p>
      <text:p text:style-name="P17"/>
      <text:p text:style-name="P17"><text:s text:c="3"/>//Verificação se as threads foram criadas corretamente</text:p>
      <text:p text:style-name="P17"><text:s text:c="3"/>if(pthread_create (&amp;thi, NULL, pi, (int *)0) != 0){</text:p>
      <text:p text:style-name="P17"><text:s text:c="6"/>printf("Algum erro ocorreu na criação das threads!\n");</text:p>
      <text:p text:style-name="P17"><text:soft-page-break/><text:s text:c="6"/>exit(1);</text:p>
      <text:p text:style-name="P17"><text:s text:c="3"/>}</text:p>
      <text:p text:style-name="P17"><text:s text:c="3"/>if(pthread_create (&amp;thj, NULL, pj, (int* )1) != 0){</text:p>
      <text:p text:style-name="P17"><text:s text:c="6"/>printf("Algum erro ocorreu na criação das threads!\n");</text:p>
      <text:p text:style-name="P17"><text:s text:c="6"/>exit(1);</text:p>
      <text:p text:style-name="P17"><text:s text:c="3"/>}</text:p>
      <text:p text:style-name="P17"/>
      <text:p text:style-name="P17"><text:s text:c="3"/>//Iniciando as threads</text:p>
      <text:p text:style-name="P17"><text:s text:c="3"/>pthread_join (thi, NULL);</text:p>
      <text:p text:style-name="P17"><text:s text:c="3"/>pthread_join (thj, NULL);</text:p>
      <text:p text:style-name="P17"/>
      <text:p text:style-name="P17"><text:s text:c="3"/>//Destruindo os semáforos</text:p>
      <text:p text:style-name="P17"><text:s text:c="3"/>sem_destroy(&amp;semaphore);</text:p>
      <text:p text:style-name="P17"><text:s text:c="3"/>sem_destroy(&amp;semaphore2);</text:p>
      <text:p text:style-name="P17"/>
      <text:p text:style-name="P17"><text:s text:c="3"/>return 0;</text:p>
      <text:p text:style-name="P17">}</text:p>
      <text:p text:style-name="P17"/>
      <text:h text:style-name="P30" text:outline-level="1">Tarefa 4</text:h>
      <text:p text:style-name="P25"><text:tab/><text:span text:style-name="T37">A tarefa proposta é apresentar uma implementação do algoritmo do jantar dos filósofos, utilizando </text:span><text:span text:style-name="T7">threads </text:span><text:span text:style-name="T15">e semáforos. A implementação feita utiliza um semáforo para cada filósofo, e também um vetor indicando o status de cada filósofo (Pensando, Faminto, Comendo). Sempre que um filósofo está no estado “Faminto” ele verifica se o garfo à sua esquerda e direita estão disponíveis. Caso sim, ele tem condições de comer, e caso contrário ele aguarda até que os garfos estejam disponíveis. O código será apresentado em seguida, e quando executado apresenta detalhadamente a situação de cada filósofo e de cada garfo.</text:span></text:p>
      <text:p text:style-name="P9"/>
      <text:p text:style-name="P21">#include &lt;stdio.h&gt;</text:p>
      <text:p text:style-name="P21">#include &lt;stdlib.h&gt;</text:p>
      <text:p text:style-name="P21">#include &lt;pthread.h&gt;</text:p>
      <text:p text:style-name="P21">#include &lt;semaphore.h&gt;</text:p>
      <text:p text:style-name="P21">#include &lt;time.h&gt;</text:p>
      <text:p text:style-name="P21"/>
      <text:p text:style-name="P21">#define N 5<text:tab/>//Número de filósofos</text:p>
      <text:p text:style-name="P21">#define LEFT (i+N-1)%N<text:tab/>//Filosofo à esquerda de i</text:p>
      <text:p text:style-name="P21"><text:soft-page-break/>#define RIGHT (i+1)%N<text:tab/>//Filosofo à direita de i</text:p>
      <text:p text:style-name="P21">#define THINKING 0</text:p>
      <text:p text:style-name="P21">#define HUNGRY 1</text:p>
      <text:p text:style-name="P21">#define EATING 2</text:p>
      <text:p text:style-name="P21"/>
      <text:p text:style-name="P21">pthread_t tid[N];<text:tab/>//Uma thread para cada filósofo</text:p>
      <text:p text:style-name="P21">int state[N];<text:tab/>//Estado de cada filósofo</text:p>
      <text:p text:style-name="P21">sem_t mutex;</text:p>
      <text:p text:style-name="P18"><text:span text:style-name="T15">sem_t s[N];<text:tab/>//</text:span><text:span text:style-name="T16">Um semáforo para cada filósofo</text:span></text:p>
      <text:p text:style-name="P21"/>
      <text:p text:style-name="P21">void test(int i){</text:p>
      <text:p text:style-name="P21"><text:s text:c="3"/>if(state[LEFT] == 0)</text:p>
      <text:p text:style-name="P21"><text:s text:c="6"/>printf("O filosofo a esquerda de %d está pensando!!\n", i+1);</text:p>
      <text:p text:style-name="P21"><text:s text:c="3"/>else if (state[LEFT] == 1)</text:p>
      <text:p text:style-name="P21"><text:s text:c="6"/>printf("O filosofo a esquerda de %d está com fome!!\n", i+1);</text:p>
      <text:p text:style-name="P21"><text:s text:c="3"/>else if (state[LEFT] == 2)</text:p>
      <text:p text:style-name="P21"><text:s text:c="6"/>printf("O filosofo a esquerda de %d está comendo!!\n", i+1);</text:p>
      <text:p text:style-name="P21"/>
      <text:p text:style-name="P21"><text:s text:c="3"/>if(state[RIGHT] == 0)</text:p>
      <text:p text:style-name="P18"><text:span text:style-name="T15"><text:s text:c="6"/></text:span><text:span text:style-name="T16">p</text:span><text:span text:style-name="T15">rintf("O filosofo a direita de %d está pensando!!\n", i+1);</text:span></text:p>
      <text:p text:style-name="P18"><text:span text:style-name="T16"><text:s text:c="3"/>e</text:span><text:span text:style-name="T15">lse if (state[RIGHT] == 1)</text:span></text:p>
      <text:p text:style-name="P21"><text:s text:c="6"/>printf("O filosofo a direita de %d está com fome!!\n", i+1);</text:p>
      <text:p text:style-name="P21"><text:s text:c="3"/>else if (state[RIGHT] == 2)</text:p>
      <text:p text:style-name="P21"><text:s text:c="6"/>printf("O filosofo a direita de %d está comendo!!\n", i+1);</text:p>
      <text:p text:style-name="P21"/>
      <text:p text:style-name="P21">//Testa se o filósofo pode pegar os garfos</text:p>
      <text:p text:style-name="P21"><text:s text:c="3"/>if(state[i]==HUNGRY &amp;&amp; state[LEFT]!=EATING &amp;&amp; state[RIGHT]!=EATING){</text:p>
      <text:p text:style-name="P21"><text:s text:c="6"/>state[i] = EATING;</text:p>
      <text:p text:style-name="P21"><text:s text:c="6"/>printf("O filosofo %d pegou os garfos %d e %d\n", i+1, LEFT+1, i+1);</text:p>
      <text:p text:style-name="P21"><text:s text:c="6"/>sem_post(&amp;s[i]);</text:p>
      <text:p text:style-name="P21"><text:s text:c="3"/>}</text:p>
      <text:p text:style-name="P21">}</text:p>
      <text:p text:style-name="P21"/>
      <text:p text:style-name="P21">void take_forks(int i){<text:tab/>//Função para pegar os garfos</text:p>
      <text:p text:style-name="P21"><text:soft-page-break/><text:s text:c="3"/>sem_wait(&amp;mutex);<text:tab/><text:tab/>//Trava o semáforo mutex</text:p>
      <text:p text:style-name="P21"><text:s text:c="3"/>state[i] = HUNGRY;<text:tab/>//Muda o estado do filósofo para "Faminto"</text:p>
      <text:p text:style-name="P21"><text:s text:c="3"/>printf("O filosofo %d está com fome!!\n", i+1);</text:p>
      <text:p text:style-name="P22"><text:s text:c="3"/>test(i);<text:tab/>//Chama a função para testar a situação dos garfos à direita e esquerda</text:p>
      <text:p text:style-name="P22"><text:s text:c="3"/>sem_post(&amp;mutex);<text:tab/><text:tab/>//Libera o semáforo mutex</text:p>
      <text:p text:style-name="P21"><text:s text:c="3"/>sem_wait(&amp;s[i]);<text:tab/>//Trava o semáforo do filósofo i</text:p>
      <text:p text:style-name="P21">}</text:p>
      <text:p text:style-name="P21"/>
      <text:p text:style-name="P21">void put_forks(int i){<text:tab/>//Função para devolver os garfos</text:p>
      <text:p text:style-name="P21"><text:s text:c="3"/>sem_wait(&amp;mutex);<text:tab/>//Trava o semáforo mutex</text:p>
      <text:p text:style-name="P21"><text:s text:c="3"/>state[i] = THINKING;<text:tab/>//Altera o estado do filósofo i para "Pensando"</text:p>
      <text:p text:style-name="P21"><text:s text:c="3"/>printf("O filosofo %d devolveu os garfos %d e %d!!\n", i+1, LEFT+1, i+1);</text:p>
      <text:p text:style-name="P18"><text:span text:style-name="T15"><text:s text:c="3"/></text:span><text:span text:style-name="T16">printf(“O filósofo %d está pensando!!\n”, i+1);</text:span></text:p>
      <text:p text:style-name="P21"><text:s text:c="3"/>test(LEFT);<text:tab/>//Verifica a situação do filósofo à esquerda</text:p>
      <text:p text:style-name="P21"><text:s text:c="3"/>test(RIGHT);<text:tab/>//Verifica a situação do filósofo à direita</text:p>
      <text:p text:style-name="P21"><text:s text:c="3"/>sem_post(&amp;mutex);<text:tab/>//Libera o semárofo mutex</text:p>
      <text:p text:style-name="P21">}</text:p>
      <text:p text:style-name="P21"/>
      <text:p text:style-name="P21">void *philosopher(void *arg){<text:tab/>//Função do filósofo</text:p>
      <text:p text:style-name="P21"><text:s text:c="3"/>int i = (int *) arg;<text:tab/>//Índice do filósofo</text:p>
      <text:p text:style-name="P21"><text:s text:c="3"/>while(1){</text:p>
      <text:p text:style-name="P21"><text:s text:c="6"/>sleep(2);</text:p>
      <text:p text:style-name="P21"><text:s text:c="6"/>take_forks(i);<text:tab/>//O filósofo tenta pegar os garfos</text:p>
      <text:p text:style-name="P21"><text:s text:c="6"/>printf("O filosofo %d comeu.\n", i+1);<text:tab/>//O filósofo conseguiu os garfos para comer</text:p>
      <text:p text:style-name="P21"><text:s text:c="6"/>put_forks(i);<text:tab/>//O filósofo i devolve os garfos</text:p>
      <text:p text:style-name="P21"><text:s text:c="3"/>}</text:p>
      <text:p text:style-name="P21">}</text:p>
      <text:p text:style-name="P21"/>
      <text:p text:style-name="P21">int main (void){</text:p>
      <text:p text:style-name="P21"><text:s text:c="3"/>int i;</text:p>
      <text:p text:style-name="P21"><text:s text:c="3"/>sem_init(&amp;mutex, 0, 1);<text:tab/>//Iniciando a variável de semáforo mutex</text:p>
      <text:p text:style-name="P18"/>
      <text:p text:style-name="P21"><text:s text:c="3"/>//Iniciando as variáveis de semáforo para cada filósofo</text:p>
      <text:p text:style-name="P22"><text:s text:c="3"/>for(i = 0; i &lt; N; i++)</text:p>
      <text:p text:style-name="P22"><text:soft-page-break/><text:s text:c="6"/>sem_init(&amp;s[i], 0, 0);</text:p>
      <text:p text:style-name="P21"/>
      <text:p text:style-name="P21"/>
      <text:p text:style-name="P21"/>
      <text:p text:style-name="P21"><text:s text:c="3"/>//Criando uma thread para cada filósofo</text:p>
      <text:p text:style-name="P21"><text:s text:c="3"/>for(i=0;i&lt;N;i++)</text:p>
      <text:p text:style-name="P21"><text:s text:c="6"/>pthread_create (&amp;(tid[i]), NULL, philosopher, (int *)i);</text:p>
      <text:p text:style-name="P21"/>
      <text:p text:style-name="P21"><text:s text:c="3"/>//Iniciando cada thread criada</text:p>
      <text:p text:style-name="P21"><text:s text:c="3"/>for(i=0;i&lt;N;i++)</text:p>
      <text:p text:style-name="P21"><text:s text:c="6"/>pthread_join (tid[i], NULL);</text:p>
      <text:p text:style-name="P21"/>
      <text:p text:style-name="P21"><text:s text:c="3"/>//Ao final, destruindo os semáforos criados anteriormente</text:p>
      <text:p text:style-name="P21"><text:s text:c="3"/>for(i=0;i&lt;N;i++)</text:p>
      <text:p text:style-name="P21"><text:s text:c="6"/>sem_destroy(&amp;s[i]);</text:p>
      <text:p text:style-name="P21"><text:s text:c="6"/>sem_destroy(&amp;mutex);</text:p>
      <text:p text:style-name="P21"><text:tab/></text:p>
      <text:p text:style-name="P21"><text:s text:c="3"/>return 0;</text:p>
      <text:p text:style-name="P21">}</text:p>
      <text:p text:style-name="P21"/>
      <text:p text:style-name="SBC_3a_references">Refer<text:span text:style-name="T47">ê</text:span>nc<text:span text:style-name="T47">ias</text:span></text:p>
      <text:p text:style-name="P26">ATOMIC_FLAG_CLEAR, atomic_flag_clear_explicit. Disponível em: &lt;<text:a xlink:type="simple" xlink:href="https://en.cppreference.com/w/c/atomic/atomic_flag_clear" text:style-name="Internet_20_link" text:visited-style-name="Visited_20_Internet_20_Link">https://en.cppreference.com/w/c/atomic/atomic_flag_clear</text:a>&gt;. Acesso em: 28 ago. 2018.</text:p>
      <text:p text:style-name="P26">ATOMIC_FLAG_TEST_AND_SET, atomic_flag_test_and_set_explicit. Disponível em: &lt;<text:a xlink:type="simple" xlink:href="https://en.cppreference.com/w/c/atomic/atomic_flag_test_and_set" text:style-name="Internet_20_link" text:visited-style-name="Visited_20_Internet_20_Link">https://en.cppreference.com/w/c/atomic/atomic_flag_test_and_set</text:a>&gt;. Acesso em: 28 ago. 2018.</text:p>
      <text:p text:style-name="P26">KERRISK, Michael. PTHREAD_CREATE. Disponível em: &lt;<text:a xlink:type="simple" xlink:href="http://man7.org/linux/man-pages/man3/pthread_create.3.html" text:style-name="Internet_20_link" text:visited-style-name="Visited_20_Internet_20_Link">http://man7.org/linux/man-pages/man3/pthread_create.3.html</text:a>&gt;. Acesso em: 28 ago. 2018.</text:p>
      <text:p text:style-name="P26">SEM_DESTROY. Disponível em: &lt;<text:a xlink:type="simple" xlink:href="http://man7.org/linux/man-pages/man3/sem_destroy.3.html" text:style-name="Internet_20_link" text:visited-style-name="Visited_20_Internet_20_Link">http://man7.org/linux/man-pages/man3/sem_destroy.3.html</text:a>&gt;. Acesso em: 28 ago. 2018.</text:p>
      <text:p text:style-name="P26">SEM_INIT. Disponível em: &lt;<text:a xlink:type="simple" xlink:href="http://man7.org/linux/man-pages/man3/sem_init.3.html" text:style-name="Internet_20_link" text:visited-style-name="Visited_20_Internet_20_Link">http://man7.org/linux/man-pages/man3/sem_init.3.html</text:a>&gt;. Acesso em: 28 ago. 2018.</text:p>
      <text:p text:style-name="P26">SEM_POST. Disponível em: &lt;<text:a xlink:type="simple" xlink:href="http://man7.org/linux/man-pages/man3/sem_post.3.html" text:style-name="Internet_20_link" text:visited-style-name="Visited_20_Internet_20_Link">http://man7.org/linux/man-pages/man3/sem_post.3.html</text:a>&gt;. Acesso em: 28 ago. <text:soft-page-break/>2018.</text:p>
      <text:p text:style-name="P26">SEM_WAIT. Disponível em: &lt;<text:a xlink:type="simple" xlink:href="http://man7.org/linux/man-pages/man3/sem_wait.3.html" text:style-name="Internet_20_link" text:visited-style-name="Visited_20_Internet_20_Link">http://man7.org/linux/man-pages/man3/sem_wait.3.html</text:a>&gt;. Acesso em: 28 ago. 2018.</text:p>
      <text:p text:style-name="P27"><text:span text:style-name="T45">TAVARES, Dalton Matsuo. </text:span><text:span text:style-name="Strong_20_Emphasis"><text:span text:style-name="T46">Sistemas Operacionais 1: </text:span></text:span><text:span text:style-name="T45">Catalão: 2018. 79 slides, col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 Neue" svg:font-family="'Helvetica Neue', Helvetica, Roboto, Arial, sans-serif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meta:creation-date>2010-08-03T10:11:27.48</meta:creation-date>
    <dc:language>pt-BR</dc:language>
    <meta:editing-cycles>14</meta:editing-cycles>
    <meta:editing-duration>PT49M27S</meta:editing-duration>
    <dc:date>2018-08-29T19:59:18.588766975</dc:date>
    <meta:document-statistic meta:table-count="0" meta:image-count="0" meta:object-count="0" meta:page-count="15" meta:paragraph-count="356" meta:word-count="2136" meta:character-count="15304" meta:non-whitespace-character-count="12749"/>
    <meta:user-defined meta:name="Info 1"/>
    <meta:user-defined meta:name="Info 2"/>
    <meta:user-defined meta:name="Info 3"/>
    <meta:user-defined meta:name="Info 4"/>
  </office:meta>
</office:document-meta>
</file>