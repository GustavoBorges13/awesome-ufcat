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3A00000286AA30352C5BCBFC83.png" manifest:media-type="image/png"/>
  <manifest:file-entry manifest:full-path="Pictures/10000000000002340000025C244FB4BD30866156.png" manifest:media-type="image/png"/>
  <manifest:file-entry manifest:full-path="Pictures/10000000000002C80000025ABF181DE8F572A7D5.png" manifest:media-type="image/png"/>
  <manifest:file-entry manifest:full-path="Pictures/10000000000002270000013EB09F03FCFFBAE8D1.png" manifest:media-type="image/png"/>
  <manifest:file-entry manifest:full-path="Pictures/100000000000023200000079B2FE63358B091337.png" manifest:media-type="image/png"/>
  <manifest:file-entry manifest:full-path="Pictures/10000000000001A2000000F492D35FE7E731FFD0.png" manifest:media-type="image/png"/>
  <manifest:file-entry manifest:full-path="Pictures/1000000000000260000000A51C4C14DF8E6C9CB2.png" manifest:media-type="image/png"/>
  <manifest:file-entry manifest:full-path="Pictures/10000000000002530000016A0171DBD1E64ADB29.png" manifest:media-type="image/png"/>
  <manifest:file-entry manifest:full-path="Pictures/10000000000002370000007888729F0EB9CC37C7.png" manifest:media-type="image/png"/>
  <manifest:file-entry manifest:full-path="Pictures/10000000000001640000008DCE2C85D5AE033737.png" manifest:media-type="image/png"/>
  <manifest:file-entry manifest:full-path="Pictures/100000000000022C0000020D33A271802EAF6C72.png" manifest:media-type="image/png"/>
  <manifest:file-entry manifest:full-path="Pictures/100002010000018900000114382B65B0A0EEE7CB.png" manifest:media-type="image/png"/>
  <manifest:file-entry manifest:full-path="Pictures/1000000000000179000001CEAB8A43B2194DAB3C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ucidasans1" svg:font-family="Lucidasans"/>
    <style:font-face style:name="Times2" svg:font-family="Times" style:font-family-generic="roman"/>
    <style:font-face style:name="TimesNewRoman,Bold" svg:font-family="'TimesNewRoman,Bold'" style:font-family-generic="roman"/>
    <style:font-face style:name="Helvetica1" svg:font-family="Helvetica" style:font-family-generic="swiss"/>
    <style:font-face style:name="Courier" svg:font-family="Courier" style:font-adornments="Regular" style:font-family-generic="modern" style:font-pitch="fixed"/>
    <style:font-face style:name="Bitstream Vera Sans" svg:font-family="'Bitstream Vera Sans'" style:font-pitch="variable"/>
    <style:font-face style:name="Lucidasans" svg:font-family="Lucidasans" style:font-pitch="variable"/>
    <style:font-face style:name="Bitstream Vera Serif" svg:font-family="'Bitstream Vera Serif'" style:font-family-generic="roman" style:font-pitch="variable"/>
    <style:font-face style:name="Times1" svg:font-family="Times" style:font-adornments="Bold" style:font-family-generic="roman" style:font-pitch="variable"/>
    <style:font-face style:name="Times" svg:font-family="Times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adornments="Bold" style:font-family-generic="swiss" style:font-pitch="variable"/>
    <style:font-face style:name="Liberation Sans" svg:font-family="'Liberation Sans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BC_3a_reference">
      <style:text-properties officeooo:paragraph-rsid="0048cf83"/>
    </style:style>
    <style:style style:name="P2" style:family="paragraph" style:parent-style-name="SBC_3a_paragraph">
      <style:text-properties officeooo:rsid="001ca83f" officeooo:paragraph-rsid="001ca83f"/>
    </style:style>
    <style:style style:name="P3" style:family="paragraph" style:parent-style-name="SBC_3a_paragraph">
      <style:text-properties officeooo:rsid="0023a107" officeooo:paragraph-rsid="003b2982"/>
    </style:style>
    <style:style style:name="P4" style:family="paragraph" style:parent-style-name="SBC_3a_paragraph">
      <style:text-properties officeooo:rsid="00278fc7" officeooo:paragraph-rsid="00278fc7"/>
    </style:style>
    <style:style style:name="P5" style:family="paragraph" style:parent-style-name="SBC_3a_paragraph">
      <style:text-properties officeooo:rsid="0027e2d4" officeooo:paragraph-rsid="0027e2d4"/>
    </style:style>
    <style:style style:name="P6" style:family="paragraph" style:parent-style-name="SBC_3a_paragraph">
      <style:text-properties officeooo:rsid="00409f03" officeooo:paragraph-rsid="00409f03"/>
    </style:style>
    <style:style style:name="P7" style:family="paragraph" style:parent-style-name="SBC_3a_paragraph">
      <style:paragraph-properties fo:margin-left="0cm" fo:margin-right="0cm" fo:text-indent="0cm" style:auto-text-indent="false"/>
      <style:text-properties officeooo:rsid="001ca83f" officeooo:paragraph-rsid="001ca83f"/>
    </style:style>
    <style:style style:name="P8" style:family="paragraph" style:parent-style-name="SBC_3a_paragraph">
      <style:paragraph-properties fo:margin-left="0cm" fo:margin-right="0cm" fo:text-indent="0cm" style:auto-text-indent="false"/>
      <style:text-properties fo:font-size="12pt" fo:font-style="normal" officeooo:rsid="00259997" officeooo:paragraph-rsid="0023a107" style:font-size-asian="12pt" style:font-style-asian="normal" style:font-size-complex="12pt" style:font-style-complex="normal"/>
    </style:style>
    <style:style style:name="P9" style:family="paragraph" style:parent-style-name="SBC_3a_paragraph">
      <style:paragraph-properties fo:margin-left="0cm" fo:margin-right="0cm" fo:text-indent="0cm" style:auto-text-indent="false"/>
      <style:text-properties fo:font-size="12pt" fo:font-style="normal" officeooo:rsid="00259997" officeooo:paragraph-rsid="00259997" style:font-size-asian="12pt" style:font-style-asian="normal" style:font-size-complex="12pt" style:font-style-complex="normal"/>
    </style:style>
    <style:style style:name="P10" style:family="paragraph" style:parent-style-name="SBC_3a_paragraph">
      <style:paragraph-properties fo:margin-left="0cm" fo:margin-right="0cm" fo:text-indent="0cm" style:auto-text-indent="false"/>
      <style:text-properties officeooo:paragraph-rsid="0027e2d4"/>
    </style:style>
    <style:style style:name="P11" style:family="paragraph" style:parent-style-name="SBC_3a_paragraph">
      <style:paragraph-properties fo:margin-left="0cm" fo:margin-right="0cm" fo:text-indent="0cm" style:auto-text-indent="false"/>
      <style:text-properties officeooo:paragraph-rsid="003d4120"/>
    </style:style>
    <style:style style:name="P12" style:family="paragraph" style:parent-style-name="SBC_3a_paragraph">
      <style:paragraph-properties fo:margin-left="0cm" fo:margin-right="0cm" fo:text-indent="0cm" style:auto-text-indent="false"/>
      <style:text-properties officeooo:rsid="003f849e" officeooo:paragraph-rsid="003f849e"/>
    </style:style>
    <style:style style:name="P13" style:family="paragraph" style:parent-style-name="SBC_3a_paragraph">
      <style:paragraph-properties fo:margin-left="0cm" fo:margin-right="0cm" fo:text-indent="0cm" style:auto-text-indent="false"/>
      <style:text-properties officeooo:rsid="00409f03" officeooo:paragraph-rsid="00409f03"/>
    </style:style>
    <style:style style:name="P14" style:family="paragraph" style:parent-style-name="SBC_3a_paragraph">
      <style:paragraph-properties fo:margin-left="0cm" fo:margin-right="0cm" fo:text-indent="0cm" style:auto-text-indent="false"/>
      <style:text-properties officeooo:rsid="004155de" officeooo:paragraph-rsid="004155de"/>
    </style:style>
    <style:style style:name="P15" style:family="paragraph" style:parent-style-name="SBC_3a_paragraph">
      <style:paragraph-properties fo:margin-left="0cm" fo:margin-right="0cm" fo:text-align="center" style:justify-single-word="false" fo:text-indent="0cm" style:auto-text-indent="false"/>
      <style:text-properties style:font-name="Helvetica1" fo:font-size="10pt" fo:font-weight="bold" officeooo:rsid="004155de" officeooo:paragraph-rsid="004155de" style:font-size-asian="8.75pt" style:font-weight-asian="bold" style:font-size-complex="10pt" style:font-weight-complex="bold"/>
    </style:style>
    <style:style style:name="P16" style:family="paragraph" style:parent-style-name="SBC_3a_paragraph">
      <style:paragraph-properties fo:margin-left="0cm" fo:margin-right="0cm" fo:text-align="center" style:justify-single-word="false" fo:text-indent="0cm" style:auto-text-indent="false"/>
      <style:text-properties style:font-name="Helvetica1" fo:font-size="10pt" fo:font-weight="bold" officeooo:rsid="0045e376" officeooo:paragraph-rsid="0045e376" style:font-size-asian="10pt" style:font-weight-asian="bold" style:font-size-complex="10pt" style:font-weight-complex="bold"/>
    </style:style>
    <style:style style:name="P17" style:family="paragraph" style:parent-style-name="SBC_3a_paragraph">
      <style:paragraph-properties fo:margin-left="0cm" fo:margin-right="0cm" fo:text-align="center" style:justify-single-word="false" fo:text-indent="0cm" style:auto-text-indent="false"/>
      <style:text-properties style:font-name="Helvetica1" fo:font-size="10pt" fo:font-weight="bold" officeooo:rsid="0048c391" officeooo:paragraph-rsid="0048c391" style:font-size-asian="10pt" style:font-weight-asian="bold" style:font-size-complex="10pt" style:font-weight-complex="bold"/>
    </style:style>
    <style:style style:name="P18" style:family="paragraph" style:parent-style-name="SBC_3a_paragraph">
      <style:paragraph-properties fo:margin-left="0cm" fo:margin-right="0cm" fo:text-align="center" style:justify-single-word="false" fo:text-indent="0cm" style:auto-text-indent="false"/>
      <style:text-properties style:font-name="Helvetica1" fo:font-size="10pt" fo:font-style="normal" fo:font-weight="bold" officeooo:rsid="00435c8e" officeooo:paragraph-rsid="00435c8e" style:font-size-asian="10pt" style:font-style-asian="normal" style:font-weight-asian="bold" style:font-size-complex="10pt" style:font-style-complex="normal" style:font-weight-complex="bold"/>
    </style:style>
    <style:style style:name="P19" style:family="paragraph" style:parent-style-name="SBC_3a_paragraph">
      <style:paragraph-properties fo:margin-left="0cm" fo:margin-right="0cm" fo:text-align="center" style:justify-single-word="false" fo:text-indent="0cm" style:auto-text-indent="false"/>
      <style:text-properties style:font-name="Helvetica1" fo:font-size="10pt" fo:font-style="normal" fo:font-weight="bold" officeooo:rsid="004440ea" officeooo:paragraph-rsid="004440ea" style:font-size-asian="10pt" style:font-style-asian="normal" style:font-weight-asian="bold" style:font-size-complex="10pt" style:font-style-complex="normal" style:font-weight-complex="bold"/>
    </style:style>
    <style:style style:name="P20" style:family="paragraph" style:parent-style-name="SBC_3a_paragraph">
      <style:paragraph-properties fo:margin-left="0cm" fo:margin-right="0cm" fo:text-align="center" style:justify-single-word="false" fo:text-indent="0cm" style:auto-text-indent="false"/>
      <style:text-properties style:font-name="Helvetica1" fo:font-size="10pt" fo:font-style="normal" fo:font-weight="bold" officeooo:rsid="00457306" officeooo:paragraph-rsid="00457306" style:font-size-asian="10pt" style:font-style-asian="normal" style:font-weight-asian="bold" style:font-size-complex="10pt" style:font-style-complex="normal" style:font-weight-complex="bold"/>
    </style:style>
    <style:style style:name="P21" style:family="paragraph" style:parent-style-name="SBC_3a_paragraph">
      <style:paragraph-properties fo:margin-left="0cm" fo:margin-right="0cm" fo:text-align="center" style:justify-single-word="false" fo:text-indent="0cm" style:auto-text-indent="false"/>
      <style:text-properties style:font-name="Helvetica1" fo:font-size="10pt" fo:font-style="normal" fo:font-weight="bold" officeooo:rsid="0045b656" officeooo:paragraph-rsid="0045b656" style:font-size-asian="10pt" style:font-style-asian="normal" style:font-weight-asian="bold" style:font-size-complex="10pt" style:font-style-complex="normal" style:font-weight-complex="bold"/>
    </style:style>
    <style:style style:name="P22" style:family="paragraph" style:parent-style-name="SBC_3a_paragraph">
      <style:paragraph-properties fo:margin-left="0cm" fo:margin-right="0cm" fo:text-align="center" style:justify-single-word="false" fo:text-indent="0cm" style:auto-text-indent="false"/>
      <style:text-properties style:font-name="Helvetica1" fo:font-size="10pt" fo:font-style="normal" fo:font-weight="bold" officeooo:rsid="0045e376" officeooo:paragraph-rsid="0045e376" style:font-size-asian="10pt" style:font-style-asian="normal" style:font-weight-asian="bold" style:font-size-complex="10pt" style:font-style-complex="normal" style:font-weight-complex="bold"/>
    </style:style>
    <style:style style:name="P23" style:family="paragraph" style:parent-style-name="SBC_3a_paragraph">
      <style:paragraph-properties fo:margin-left="0cm" fo:margin-right="0cm" fo:text-align="center" style:justify-single-word="false" fo:text-indent="0cm" style:auto-text-indent="false"/>
      <style:text-properties style:font-name="Helvetica1" fo:font-size="10pt" fo:font-style="normal" fo:font-weight="bold" officeooo:rsid="0049b87c" officeooo:paragraph-rsid="0049b87c" style:font-size-asian="10pt" style:font-style-asian="normal" style:font-weight-asian="bold" style:font-size-complex="10pt" style:font-style-complex="normal" style:font-weight-complex="bold"/>
    </style:style>
    <style:style style:name="P24" style:family="paragraph" style:parent-style-name="SBC_3a_paragraph">
      <style:paragraph-properties fo:margin-left="0cm" fo:margin-right="0cm" fo:text-align="center" style:justify-single-word="false" fo:text-indent="0cm" style:auto-text-indent="false"/>
      <style:text-properties style:font-name="Helvetica1" fo:font-size="12pt" fo:font-style="normal" fo:font-weight="bold" officeooo:rsid="00435c8e" officeooo:paragraph-rsid="00435c8e" style:font-size-asian="10.5pt" style:font-style-asian="normal" style:font-weight-asian="bold" style:font-size-complex="12pt" style:font-style-complex="normal" style:font-weight-complex="bold"/>
    </style:style>
    <style:style style:name="P25" style:family="paragraph" style:parent-style-name="SBC_3a_paragraph">
      <style:paragraph-properties fo:margin-left="0cm" fo:margin-right="0cm" fo:text-align="center" style:justify-single-word="false" fo:text-indent="0cm" style:auto-text-indent="false"/>
      <style:text-properties officeooo:paragraph-rsid="0048c391"/>
    </style:style>
    <style:style style:name="P26" style:family="paragraph" style:parent-style-name="SBC_3a_paragraph">
      <style:paragraph-properties fo:margin-left="0cm" fo:margin-right="0cm" fo:text-align="justify" style:justify-single-word="false" fo:text-indent="0cm" style:auto-text-indent="false"/>
      <style:text-properties style:font-name="Times2" fo:font-size="12pt" fo:font-style="normal" fo:font-weight="normal" officeooo:rsid="004155de" officeooo:paragraph-rsid="004155de" style:font-size-asian="10.5pt" style:font-style-asian="normal" style:font-weight-asian="normal" style:font-size-complex="12pt" style:font-style-complex="normal" style:font-weight-complex="normal"/>
    </style:style>
    <style:style style:name="P27" style:family="paragraph" style:parent-style-name="SBC_3a_paragraph">
      <style:paragraph-properties fo:margin-left="0cm" fo:margin-right="0cm" fo:text-align="justify" style:justify-single-word="false" fo:text-indent="0cm" style:auto-text-indent="false"/>
      <style:text-properties style:font-name="Times2" fo:font-size="12pt" fo:font-style="normal" fo:font-weight="normal" officeooo:rsid="004155de" officeooo:paragraph-rsid="0042c20d" style:font-size-asian="10.5pt" style:font-style-asian="normal" style:font-weight-asian="normal" style:font-size-complex="12pt" style:font-style-complex="normal" style:font-weight-complex="normal"/>
    </style:style>
    <style:style style:name="P28" style:family="paragraph" style:parent-style-name="SBC_3a_paragraph">
      <style:paragraph-properties fo:margin-left="0cm" fo:margin-right="0cm" fo:text-align="justify" style:justify-single-word="false" fo:text-indent="0cm" style:auto-text-indent="false"/>
      <style:text-properties style:font-name="Times2" fo:font-size="12pt" fo:font-style="normal" fo:font-weight="normal" officeooo:rsid="00435c8e" officeooo:paragraph-rsid="00435c8e" style:font-size-asian="10.5pt" style:font-style-asian="normal" style:font-weight-asian="normal" style:font-size-complex="12pt" style:font-style-complex="normal" style:font-weight-complex="normal"/>
    </style:style>
    <style:style style:name="P29" style:family="paragraph" style:parent-style-name="SBC_3a_paragraph">
      <style:paragraph-properties fo:margin-left="0cm" fo:margin-right="0cm" fo:text-align="justify" style:justify-single-word="false" fo:text-indent="0cm" style:auto-text-indent="false"/>
      <style:text-properties style:font-name="Times2" fo:font-size="12pt" fo:font-style="normal" fo:font-weight="normal" officeooo:rsid="004440ea" officeooo:paragraph-rsid="004440ea" style:font-size-asian="10.5pt" style:font-style-asian="normal" style:font-weight-asian="normal" style:font-size-complex="12pt" style:font-style-complex="normal" style:font-weight-complex="normal"/>
    </style:style>
    <style:style style:name="P30" style:family="paragraph" style:parent-style-name="SBC_3a_paragraph">
      <style:paragraph-properties fo:margin-left="0cm" fo:margin-right="0cm" fo:text-align="center" style:justify-single-word="false" fo:text-indent="0cm" style:auto-text-indent="false"/>
      <style:text-properties style:font-name="Times2" fo:font-size="12pt" fo:font-style="normal" fo:font-weight="normal" officeooo:rsid="004440ea" officeooo:paragraph-rsid="004440ea" style:font-size-asian="10.5pt" style:font-style-asian="normal" style:font-weight-asian="normal" style:font-size-complex="12pt" style:font-style-complex="normal" style:font-weight-complex="normal"/>
    </style:style>
    <style:style style:name="P31" style:family="paragraph" style:parent-style-name="SBC_3a_paragraph">
      <style:paragraph-properties fo:margin-left="0cm" fo:margin-right="0cm" fo:text-align="center" style:justify-single-word="false" fo:text-indent="0cm" style:auto-text-indent="false"/>
      <style:text-properties style:font-name="Times2" fo:font-size="12pt" fo:font-style="normal" fo:font-weight="normal" officeooo:rsid="00457306" officeooo:paragraph-rsid="00457306" style:font-size-asian="10.5pt" style:font-style-asian="normal" style:font-weight-asian="normal" style:font-size-complex="12pt" style:font-style-complex="normal" style:font-weight-complex="normal"/>
    </style:style>
    <style:style style:name="P32" style:family="paragraph" style:parent-style-name="SBC_3a_paragraph">
      <style:paragraph-properties fo:margin-left="0cm" fo:margin-right="0cm" fo:text-align="justify" style:justify-single-word="false" fo:text-indent="0cm" style:auto-text-indent="false"/>
      <style:text-properties style:font-name="Times2" fo:font-size="12pt" fo:font-style="normal" fo:font-weight="normal" officeooo:rsid="00457306" officeooo:paragraph-rsid="00457306" style:font-size-asian="10.5pt" style:font-style-asian="normal" style:font-weight-asian="normal" style:font-size-complex="12pt" style:font-style-complex="normal" style:font-weight-complex="normal"/>
    </style:style>
    <style:style style:name="P33" style:family="paragraph" style:parent-style-name="SBC_3a_paragraph">
      <style:paragraph-properties fo:margin-left="0cm" fo:margin-right="0cm" fo:text-align="justify" style:justify-single-word="false" fo:text-indent="0cm" style:auto-text-indent="false"/>
      <style:text-properties style:font-name="Times2" fo:font-size="12pt" fo:font-style="normal" fo:font-weight="normal" officeooo:rsid="0045b656" officeooo:paragraph-rsid="0045b656" style:font-size-asian="10.5pt" style:font-style-asian="normal" style:font-weight-asian="normal" style:font-size-complex="12pt" style:font-style-complex="normal" style:font-weight-complex="normal"/>
    </style:style>
    <style:style style:name="P34" style:family="paragraph" style:parent-style-name="SBC_3a_paragraph">
      <style:paragraph-properties fo:margin-left="0cm" fo:margin-right="0cm" fo:text-align="center" style:justify-single-word="false" fo:text-indent="0cm" style:auto-text-indent="false"/>
      <style:text-properties style:font-name="Times2" fo:font-size="12pt" fo:font-style="normal" fo:font-weight="normal" officeooo:rsid="0045e376" officeooo:paragraph-rsid="0045e376" style:font-size-asian="10.5pt" style:font-style-asian="normal" style:font-weight-asian="normal" style:font-size-complex="12pt" style:font-style-complex="normal" style:font-weight-complex="normal"/>
    </style:style>
    <style:style style:name="P35" style:family="paragraph" style:parent-style-name="SBC_3a_paragraph">
      <style:paragraph-properties fo:margin-left="0cm" fo:margin-right="0cm" fo:text-align="justify" style:justify-single-word="false" fo:text-indent="0cm" style:auto-text-indent="false"/>
      <style:text-properties style:font-name="Times2" fo:font-size="12pt" fo:font-style="normal" fo:font-weight="normal" officeooo:rsid="0045e376" officeooo:paragraph-rsid="0045e376" style:font-size-asian="10.5pt" style:font-style-asian="normal" style:font-weight-asian="normal" style:font-size-complex="12pt" style:font-style-complex="normal" style:font-weight-complex="normal"/>
    </style:style>
    <style:style style:name="P36" style:family="paragraph" style:parent-style-name="SBC_3a_paragraph">
      <style:paragraph-properties fo:margin-left="0cm" fo:margin-right="0cm" fo:text-align="center" style:justify-single-word="false" fo:text-indent="0cm" style:auto-text-indent="false"/>
      <style:text-properties officeooo:rsid="004739b7" officeooo:paragraph-rsid="004739b7"/>
    </style:style>
    <style:style style:name="P37" style:family="paragraph" style:parent-style-name="SBC_3a_references">
      <style:text-properties officeooo:paragraph-rsid="0048cf83"/>
    </style:style>
    <style:style style:name="P38" style:family="paragraph" style:parent-style-name="SBC_3a_paragraph_3a_first">
      <style:text-properties officeooo:rsid="001ca83f" officeooo:paragraph-rsid="001ca83f"/>
    </style:style>
    <style:style style:name="P39" style:family="paragraph" style:parent-style-name="SBC_3a_paragraph_3a_first">
      <style:text-properties officeooo:rsid="00409f03" officeooo:paragraph-rsid="00409f03"/>
    </style:style>
    <style:style style:name="P40" style:family="paragraph" style:parent-style-name="SBC_3a_paragraph">
      <style:text-properties fo:font-style="normal" officeooo:rsid="00409f03" officeooo:paragraph-rsid="00409f03" style:font-style-asian="normal" style:font-style-complex="normal"/>
    </style:style>
    <style:style style:name="P41" style:family="paragraph" style:parent-style-name="SBC_3a_paragraph" style:list-style-name="L1">
      <style:text-properties fo:font-style="normal" officeooo:rsid="0040a465" officeooo:paragraph-rsid="0040a465" style:font-style-asian="normal" style:font-style-complex="normal"/>
    </style:style>
    <style:style style:name="P42" style:family="paragraph" style:parent-style-name="SBC_3a_paragraph" style:list-style-name="L1">
      <style:text-properties officeooo:rsid="0040a465" officeooo:paragraph-rsid="0040a465"/>
    </style:style>
    <style:style style:name="P43" style:family="paragraph" style:parent-style-name="SBC_3a_paragraph">
      <style:text-properties officeooo:rsid="0037c410" officeooo:paragraph-rsid="002016bc"/>
    </style:style>
    <style:style style:name="P44" style:family="paragraph" style:parent-style-name="SBC_3a_paragraph">
      <style:paragraph-properties fo:margin-left="0cm" fo:margin-right="0cm" fo:text-indent="0cm" style:auto-text-indent="false"/>
      <style:text-properties fo:font-style="normal" officeooo:rsid="00409f03" officeooo:paragraph-rsid="00409f03" style:font-style-asian="normal" style:font-style-complex="normal"/>
    </style:style>
    <style:style style:name="P45" style:family="paragraph" style:parent-style-name="SBC_3a_paragraph">
      <style:paragraph-properties fo:margin-left="0cm" fo:margin-right="0cm" fo:text-indent="0cm" style:auto-text-indent="false"/>
      <style:text-properties fo:font-style="normal" officeooo:rsid="004155de" officeooo:paragraph-rsid="004155de" style:font-style-asian="normal" style:font-style-complex="normal"/>
    </style:style>
    <style:style style:name="P46" style:family="paragraph" style:parent-style-name="SBC_3a_paragraph">
      <style:paragraph-properties fo:margin-left="0cm" fo:margin-right="0cm" fo:text-indent="0cm" style:auto-text-indent="false"/>
      <style:text-properties fo:font-style="normal" officeooo:rsid="003c89a3" officeooo:paragraph-rsid="00278fc7" style:font-style-asian="normal" style:font-style-complex="normal"/>
    </style:style>
    <style:style style:name="P47" style:family="paragraph" style:parent-style-name="SBC_3a_paragraph">
      <style:paragraph-properties fo:margin-left="0cm" fo:margin-right="0cm" fo:text-indent="0cm" style:auto-text-indent="false"/>
      <style:text-properties fo:font-style="normal" officeooo:rsid="0049b87c" officeooo:paragraph-rsid="003f849e" style:font-style-asian="normal" style:font-style-complex="normal"/>
    </style:style>
    <style:style style:name="P48" style:family="paragraph" style:parent-style-name="SBC_3a_paragraph">
      <style:paragraph-properties fo:margin-left="0cm" fo:margin-right="0cm" fo:text-align="center" style:justify-single-word="false" fo:text-indent="0cm" style:auto-text-indent="false"/>
      <style:text-properties style:font-name="Helvetica1" fo:font-size="10pt" fo:font-style="italic" fo:font-weight="bold" officeooo:rsid="004155de" officeooo:paragraph-rsid="004155de" style:font-size-asian="8.75pt" style:font-style-asian="italic" style:font-weight-asian="bold" style:font-size-complex="10pt" style:font-style-complex="italic" style:font-weight-complex="bold"/>
    </style:style>
    <style:style style:name="P49" style:family="paragraph" style:parent-style-name="SBC_3a_paragraph">
      <style:paragraph-properties fo:margin-left="0cm" fo:margin-right="0cm" fo:text-align="center" style:justify-single-word="false" fo:text-indent="0cm" style:auto-text-indent="false"/>
      <style:text-properties style:font-name="Helvetica1" fo:font-size="10pt" fo:font-style="italic" fo:font-weight="bold" officeooo:rsid="00435c8e" officeooo:paragraph-rsid="00435c8e" style:font-size-asian="10pt" style:font-style-asian="italic" style:font-weight-asian="bold" style:font-size-complex="10pt" style:font-style-complex="italic" style:font-weight-complex="bold"/>
    </style:style>
    <style:style style:name="P50" style:family="paragraph" style:parent-style-name="SBC_3a_paragraph">
      <style:paragraph-properties fo:margin-left="0cm" fo:margin-right="0cm" fo:text-align="center" style:justify-single-word="false" fo:text-indent="0cm" style:auto-text-indent="false"/>
      <style:text-properties style:font-name="Helvetica1" fo:font-size="10pt" fo:font-style="italic" fo:font-weight="bold" officeooo:rsid="0048c391" officeooo:paragraph-rsid="0048c391" style:font-size-asian="10pt" style:font-style-asian="italic" style:font-weight-asian="bold" style:font-size-complex="10pt" style:font-style-complex="italic" style:font-weight-complex="bold"/>
    </style:style>
    <style:style style:name="P51" style:family="paragraph" style:parent-style-name="SBC_3a_paragraph">
      <style:paragraph-properties fo:margin-left="0cm" fo:margin-right="0cm" fo:text-align="center" style:justify-single-word="false" fo:text-indent="0cm" style:auto-text-indent="false"/>
      <style:text-properties style:font-name="Helvetica1" fo:font-size="12pt" fo:font-style="italic" fo:font-weight="bold" officeooo:rsid="00435c8e" officeooo:paragraph-rsid="00435c8e" style:font-size-asian="10.5pt" style:font-style-asian="italic" style:font-weight-asian="bold" style:font-size-complex="12pt" style:font-style-complex="italic" style:font-weight-complex="bold"/>
    </style:style>
    <style:style style:name="P52" style:family="paragraph" style:parent-style-name="SBC_3a_paragraph">
      <style:paragraph-properties fo:margin-left="0cm" fo:margin-right="0cm" fo:text-align="center" style:justify-single-word="false" fo:text-indent="0cm" style:auto-text-indent="false"/>
      <style:text-properties style:text-position="0% 100%" style:font-name="Helvetica1" fo:font-size="10pt" fo:font-style="normal" officeooo:rsid="0045e376" officeooo:paragraph-rsid="0045e376" style:font-size-asian="10pt" style:font-style-asian="normal" style:font-size-complex="10pt" style:font-style-complex="normal"/>
    </style:style>
    <style:style style:name="P53" style:family="paragraph" style:parent-style-name="SBC_3a_title" style:master-page-name="Standard">
      <style:paragraph-properties style:page-number="auto"/>
      <style:text-properties officeooo:rsid="00195d0b" officeooo:paragraph-rsid="00195d0b"/>
    </style:style>
    <style:style style:name="P54" style:family="paragraph" style:parent-style-name="SBC_3a_title_3a_1">
      <style:text-properties officeooo:rsid="00195d0b" officeooo:paragraph-rsid="001b1e7a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195d0b"/>
    </style:style>
    <style:style style:name="T3" style:family="text">
      <style:text-properties style:text-position="super 58%" officeooo:rsid="00318778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37c410" style:font-style-asian="italic" style:font-style-complex="italic"/>
    </style:style>
    <style:style style:name="T6" style:family="text">
      <style:text-properties fo:font-style="italic" officeooo:rsid="0037f066" style:font-style-asian="italic" style:font-style-complex="italic"/>
    </style:style>
    <style:style style:name="T7" style:family="text">
      <style:text-properties fo:font-style="italic" officeooo:rsid="003b2982" style:font-style-asian="italic" style:font-style-complex="italic"/>
    </style:style>
    <style:style style:name="T8" style:family="text">
      <style:text-properties fo:font-style="italic" officeooo:rsid="00394bed" style:font-style-asian="italic" style:font-style-complex="italic"/>
    </style:style>
    <style:style style:name="T9" style:family="text">
      <style:text-properties fo:font-style="italic" officeooo:rsid="003c89a3" style:font-style-asian="italic" style:font-style-complex="italic"/>
    </style:style>
    <style:style style:name="T10" style:family="text">
      <style:text-properties fo:font-style="italic" officeooo:rsid="003cc9c1" style:font-style-asian="italic" style:font-style-complex="italic"/>
    </style:style>
    <style:style style:name="T11" style:family="text">
      <style:text-properties fo:font-style="italic" officeooo:rsid="003ce642" style:font-style-asian="italic" style:font-style-complex="italic"/>
    </style:style>
    <style:style style:name="T12" style:family="text">
      <style:text-properties fo:font-style="italic" officeooo:rsid="0040a465" style:font-style-asian="italic" style:font-style-complex="italic"/>
    </style:style>
    <style:style style:name="T13" style:family="text">
      <style:text-properties fo:font-style="italic" officeooo:rsid="0042c20d" style:font-style-asian="italic" style:font-style-complex="italic"/>
    </style:style>
    <style:style style:name="T14" style:family="text">
      <style:text-properties fo:font-style="italic" officeooo:rsid="0044cac1" style:font-style-asian="italic" style:font-style-complex="italic"/>
    </style:style>
    <style:style style:name="T15" style:family="text">
      <style:text-properties fo:font-style="italic" officeooo:rsid="00457306" style:font-style-asian="italic" style:font-style-complex="italic"/>
    </style:style>
    <style:style style:name="T16" style:family="text">
      <style:text-properties fo:font-style="italic" officeooo:rsid="0045b656" style:font-style-asian="italic" style:font-style-complex="italic"/>
    </style:style>
    <style:style style:name="T17" style:family="text">
      <style:text-properties fo:font-style="italic" officeooo:rsid="0048c391" style:font-style-asian="italic" style:font-style-complex="italic"/>
    </style:style>
    <style:style style:name="T18" style:family="text">
      <style:text-properties fo:font-style="italic" officeooo:rsid="0048cf83" style:font-style-asian="italic" style:font-style-complex="italic"/>
    </style:style>
    <style:style style:name="T19" style:family="text">
      <style:text-properties fo:font-style="italic" officeooo:rsid="0049b87c" style:font-style-asian="italic" style:font-style-complex="italic"/>
    </style:style>
    <style:style style:name="T20" style:family="text">
      <style:text-properties officeooo:rsid="00195d0b"/>
    </style:style>
    <style:style style:name="T21" style:family="text">
      <style:text-properties fo:font-style="normal" style:font-style-asian="normal" style:font-style-complex="normal"/>
    </style:style>
    <style:style style:name="T22" style:family="text">
      <style:text-properties fo:font-style="normal" officeooo:rsid="0037f066" style:font-style-asian="normal" style:font-style-complex="normal"/>
    </style:style>
    <style:style style:name="T23" style:family="text">
      <style:text-properties fo:font-style="normal" officeooo:rsid="00389eb0" style:font-style-asian="normal" style:font-style-complex="normal"/>
    </style:style>
    <style:style style:name="T24" style:family="text">
      <style:text-properties fo:font-style="normal" officeooo:rsid="003b2982" style:font-style-asian="normal" style:font-style-complex="normal"/>
    </style:style>
    <style:style style:name="T25" style:family="text">
      <style:text-properties fo:font-style="normal" officeooo:rsid="003c89a3" style:font-style-asian="normal" style:font-style-complex="normal"/>
    </style:style>
    <style:style style:name="T26" style:family="text">
      <style:text-properties fo:font-style="normal" officeooo:rsid="003ce642" style:font-style-asian="normal" style:font-style-complex="normal"/>
    </style:style>
    <style:style style:name="T27" style:family="text">
      <style:text-properties fo:font-style="normal" officeooo:rsid="0040a465" style:font-style-asian="normal" style:font-style-complex="normal"/>
    </style:style>
    <style:style style:name="T28" style:family="text">
      <style:text-properties fo:font-style="normal" officeooo:rsid="0045e376" style:font-style-asian="normal" style:font-style-complex="normal"/>
    </style:style>
    <style:style style:name="T29" style:family="text">
      <style:text-properties fo:font-style="normal" officeooo:rsid="004739b7" style:font-style-asian="normal" style:font-style-complex="normal"/>
    </style:style>
    <style:style style:name="T30" style:family="text">
      <style:text-properties fo:font-style="normal" officeooo:rsid="0048c391" style:font-style-asian="normal" style:font-style-complex="normal"/>
    </style:style>
    <style:style style:name="T31" style:family="text">
      <style:text-properties fo:font-style="normal" officeooo:rsid="0048cf83" style:font-style-asian="normal" style:font-style-complex="normal"/>
    </style:style>
    <style:style style:name="T32" style:family="text">
      <style:text-properties fo:font-style="normal" officeooo:rsid="0049b87c" style:font-style-asian="normal" style:font-style-complex="normal"/>
    </style:style>
    <style:style style:name="T33" style:family="text">
      <style:text-properties style:text-position="0% 100%" fo:font-style="normal" style:font-style-asian="normal" style:font-style-complex="normal"/>
    </style:style>
    <style:style style:name="T34" style:family="text">
      <style:text-properties style:text-position="0% 100%" fo:font-style="italic" style:font-style-asian="italic" style:font-style-complex="italic"/>
    </style:style>
    <style:style style:name="T35" style:family="text">
      <style:text-properties officeooo:rsid="00318778"/>
    </style:style>
    <style:style style:name="T36" style:family="text">
      <style:text-properties officeooo:rsid="0037c410"/>
    </style:style>
    <style:style style:name="T37" style:family="text">
      <style:text-properties officeooo:rsid="0037f066"/>
    </style:style>
    <style:style style:name="T38" style:family="text">
      <style:text-properties officeooo:rsid="00394bed"/>
    </style:style>
    <style:style style:name="T39" style:family="text">
      <style:text-properties officeooo:rsid="003b2982"/>
    </style:style>
    <style:style style:name="T40" style:family="text">
      <style:text-properties officeooo:rsid="003cc9c1"/>
    </style:style>
    <style:style style:name="T41" style:family="text">
      <style:text-properties officeooo:rsid="003ce642"/>
    </style:style>
    <style:style style:name="T42" style:family="text">
      <style:text-properties officeooo:rsid="003d4120"/>
    </style:style>
    <style:style style:name="T43" style:family="text">
      <style:text-properties officeooo:rsid="003ddecc"/>
    </style:style>
    <style:style style:name="T44" style:family="text">
      <style:text-properties officeooo:rsid="0042c20d"/>
    </style:style>
    <style:style style:name="T45" style:family="text">
      <style:text-properties officeooo:rsid="004440ea"/>
    </style:style>
    <style:style style:name="T46" style:family="text">
      <style:text-properties officeooo:rsid="0044cac1"/>
    </style:style>
    <style:style style:name="T47" style:family="text">
      <style:text-properties officeooo:rsid="00457306"/>
    </style:style>
    <style:style style:name="T48" style:family="text">
      <style:text-properties officeooo:rsid="0045b656"/>
    </style:style>
    <style:style style:name="T49" style:family="text">
      <style:text-properties style:font-name="Helvetica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50" style:family="text">
      <style:text-properties style:font-name="Helvetica1" fo:font-size="10pt" fo:font-style="normal" fo:font-weight="bold" officeooo:rsid="003c89a3" style:font-size-asian="10pt" style:font-style-asian="normal" style:font-weight-asian="bold" style:font-size-complex="10pt" style:font-style-complex="normal" style:font-weight-complex="bold"/>
    </style:style>
    <style:style style:name="T51" style:family="text">
      <style:text-properties style:font-name="Helvetica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52" style:family="text">
      <style:text-properties officeooo:rsid="0048c391"/>
    </style:style>
    <style:style style:name="T53" style:family="text">
      <style:text-properties officeooo:rsid="0048cf83"/>
    </style:style>
    <style:style style:name="T54" style:family="text">
      <style:text-properties officeooo:rsid="004b43d4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3">PROJETO <text:span text:style-name="T36">2</text:span>: <text:span text:style-name="T36">PRIMEIROS PASSOS PARA O PROJETO DE UM SO</text:span></text:p>
      <text:p text:style-name="SBC_3a_author_28_s_29_"><text:span text:style-name="T35">Izaque Vieira de Souza</text:span><text:span text:style-name="T3">1</text:span>, <text:span text:style-name="T35">Olávio Gonçalves de Almeida</text:span><text:span text:style-name="T2">1</text:span>, <text:span text:style-name="T35">Wisley Kilder da Silva Nogueira</text:span><text:span text:style-name="T1">1</text:span></text:p>
      <text:p text:style-name="SBC_3a_institution"><text:span text:style-name="T1">1</text:span><text:span text:style-name="T20">Departamento de Ciência da Computação</text:span> – Universidade Federal d<text:span text:style-name="T20">e Goiás</text:span> (UFG)</text:p>
      <text:p text:style-name="SBC_3a_email"><text:span text:style-name="T35">izaquevieira</text:span>@<text:span text:style-name="T35">outlook.com.br</text:span>, <text:span text:style-name="T35">olaviog.almeida@gmail.com</text:span>, <text:span text:style-name="T35">w.kilder</text:span>@<text:span text:style-name="T35">hotmail.com</text:span></text:p>
      <text:p text:style-name="SBC_3a_resumo"/>
      <text:h text:style-name="P54" text:outline-level="1">Tarefa 1</text:h>
      <text:p text:style-name="P39">1.1. Descrição</text:p>
      <text:p text:style-name="P6">A primeira tarefa consiste nos passos básicos para a criação de um SO. Nessa tarefa será feita a preparação do sistema, bem como instalação de alguns <text:span text:style-name="T4">softwares</text:span><text:span text:style-name="T21">. Serão apresentadas também algumas dificuldades encontradas no decorrer do Projeto 2.</text:span></text:p>
      <text:p text:style-name="P40"/>
      <text:p text:style-name="P13"><text:span text:style-name="T21">1.2. Instalação de </text:span><text:span text:style-name="T4">softwares</text:span><text:span text:style-name="T21"> necessários</text:span></text:p>
      <text:p text:style-name="P13"><text:span text:style-name="T21"><text:tab/>Foram usados comandos separados para a instalação de cada </text:span><text:span text:style-name="T4">softwares</text:span><text:span text:style-name="T21"> que foi pedido. Isso aconteceu porque alguns dos </text:span><text:span text:style-name="T4">softwares</text:span><text:span text:style-name="T21"> já estavam instalados na máquina, sendo assim seria desnecessário repetir o comando para a instalação do mesmo. Os comandos utilizados para a instalação dos </text:span><text:span text:style-name="T4">softwares</text:span><text:span text:style-name="T21"> foram:</text:span></text:p>
      <text:p text:style-name="P44"/>
      <text:p text:style-name="P44"><text:tab/><text:tab/><text:tab/><text:tab/>sudo apt-get update</text:p>
      <text:p text:style-name="P44"><text:tab/><text:tab/><text:tab/><text:tab/>sudo apt-get install xorriso</text:p>
      <text:p text:style-name="P44"><text:tab/><text:tab/><text:tab/><text:tab/>sudo apt-get install nasm</text:p>
      <text:p text:style-name="P44"><text:tab/><text:tab/><text:tab/><text:tab/>sudo apt-get install qemu</text:p>
      <text:p text:style-name="P44"/>
      <text:p text:style-name="P13"><text:span text:style-name="T21"><text:tab/></text:span><text:span text:style-name="T27">Alguns </text:span><text:span text:style-name="T12">softwares</text:span><text:span text:style-name="T27"> como o </text:span><text:span text:style-name="T12">grub</text:span><text:span text:style-name="T27"> e o </text:span><text:span text:style-name="T12">gcc</text:span><text:span text:style-name="T27"> já estavam instalados na máquina.</text:span></text:p>
      <text:p text:style-name="P13"><text:span text:style-name="T21"><text:tab/></text:span><text:span text:style-name="T27">A instalação do VirtualBox por meio dos repositórios padrões do sistema Linux não foi possível, sendo necessário buscar ajuda em um blog (CASTRO, 2018). Com essa ajuda foi possível utilizar a ferramenta VirtualBox.</text:span></text:p>
      <text:p text:style-name="P13"><text:span text:style-name="T27"><text:tab/>Cada </text:span><text:span text:style-name="T12">software</text:span><text:span text:style-name="T27"> instalado acima possui uma finalidade:</text:span></text:p>
      <text:list xml:id="list1421716633" text:style-name="L1">
        <text:list-item>
          <text:p text:style-name="P41">xorriso: gerar a imagem do sistema (arquivo .iso);</text:p>
        </text:list-item>
        <text:list-item>
          <text:p text:style-name="P42"><text:span text:style-name="T21">nasm: compilador Assembly, utilizado em para editar pontos de entrada do </text:span><text:span text:style-name="T4">kernel</text:span><text:span text:style-name="T21">;</text:span></text:p>
        </text:list-item>
        <text:list-item>
          <text:p text:style-name="P42"><text:span text:style-name="T21">grub: utilizado para criar o </text:span><text:span text:style-name="T4">bootloader</text:span><text:span text:style-name="T21">;</text:span></text:p>
        </text:list-item>
        <text:list-item>
          <text:p text:style-name="P41">gcc: utilizado para compilar os códigos C;</text:p>
        </text:list-item>
        <text:list-item>
          <text:p text:style-name="P41"><text:soft-page-break/>qemu: execução direta do arquivo .bin para testar o SO criado, evitando gerar uma imagem do sistema a cada alteração feita;</text:p>
        </text:list-item>
        <text:list-item>
          <text:p text:style-name="P41">VirtualBox: utilizado para testar a imagem ISO gerada do sistema.</text:p>
        </text:list-item>
      </text:list>
      <text:p text:style-name="P44"/>
      <text:p text:style-name="P45">1.3. Criação dos primeiros arquivos</text:p>
      <text:p text:style-name="P14"><text:span text:style-name="T21"><text:tab/>Para prosseguir, foi criado um diretório chamado “SO”, e dentro deste diretório foram criados os arquivos </text:span><text:span text:style-name="T4">kernel.asm</text:span><text:span text:style-name="T21">, </text:span><text:span text:style-name="T4">kernel.c</text:span><text:span text:style-name="T21">, </text:span><text:span text:style-name="T4">link.ld</text:span><text:span text:style-name="T21"> e </text:span><text:span text:style-name="T4">build.sh</text:span><text:span text:style-name="T21">. A implementação de cada código para os arquivos descritos acima foi feita com base no material disponibilizado pelo professor.</text:span></text:p>
      <text:p text:style-name="P14"><text:span text:style-name="T21"><text:tab/>O código presente no arquivo </text:span><text:span text:style-name="T4">kernel.asm</text:span><text:span text:style-name="T21"> é responsável por criar o ponto de entrada do </text:span><text:span text:style-name="T4">kernel</text:span><text:span text:style-name="T21">. A Imagem 1 representa o código presente em </text:span><text:span text:style-name="T4">kernel.asm</text:span><text:span text:style-name="T21">:</text:span></text:p>
      <text:p text:style-name="P45"/>
      <text:p text:style-name="P15"><draw:frame draw:style-name="fr1" draw:name="Image1" text:anchor-type="paragraph" svg:width="9.213cm" svg:height="5.129cm" draw:z-index="0"><draw:image xlink:href="Pictures/10000000000002270000013EB09F03FCFFBAE8D1.png" xlink:type="simple" xlink:show="embed" xlink:actuate="onLoad" loext:mime-type="image/png"/></draw:frame><text:span text:style-name="T21">Imagem 1: Código de </text:span><text:span text:style-name="T4">kernel.asm</text:span></text:p>
      <text:p text:style-name="P48"/>
      <text:p text:style-name="P26"><text:tab/>Na imagem, a linha 1 quer dizer ao <text:span text:style-name="T4">nasm</text:span> que ele deve gerar um código a ser executado em um processador de 32 bits. <text:span text:style-name="T44">Para as linhas de 2 até 6 são especificações para o </text:span><text:span text:style-name="T13">grub</text:span><text:span text:style-name="T44"> e </text:span><text:span text:style-name="T13">bootloader</text:span><text:span text:style-name="T44">. Na linha 7, é criada uma função </text:span><text:span text:style-name="T13">start</text:span><text:span text:style-name="T44">, de modo global, para que a mesma seja chamada no arquivo </text:span><text:span text:style-name="T13">link.ld</text:span><text:span text:style-name="T44">. A função </text:span><text:span text:style-name="T13">kmain</text:span><text:span text:style-name="T44"> faz referência à função que deve ser criada no arquivo </text:span><text:span text:style-name="T13">kernel.c</text:span><text:span text:style-name="T44">.</text:span></text:p>
      <text:p text:style-name="P27"><text:tab/><text:span text:style-name="T44">O código inserido no arquivo </text:span><text:span text:style-name="T13">link.ld</text:span><text:span text:style-name="T44"> foi fornecido no material, contendo o seguinte conteúdo:</text:span></text:p>
      <text:p text:style-name="P27"/>
      <text:p text:style-name="P24"><draw:frame draw:style-name="fr2" draw:name="Image2" text:anchor-type="paragraph" svg:width="8.534cm" svg:height="4.828cm" draw:z-index="1"><draw:image xlink:href="Pictures/10000000000001A2000000F492D35FE7E731FFD0.png" xlink:type="simple" xlink:show="embed" xlink:actuate="onLoad" loext:mime-type="image/png"/></draw:frame>Imagem 2: Código de <text:span text:style-name="T4">link.ld</text:span></text:p>
      <text:p text:style-name="P51"/>
      <text:p text:style-name="P28"><text:soft-page-break/><text:tab/>O arquivo <text:span text:style-name="T4">link.ld</text:span> será utilizado para juntar os arquivos gerados ao compilar o arquivo <text:span text:style-name="T4">Assembly</text:span> e ao compilar o código <text:span text:style-name="T4">kernel.c</text:span>, gerando assim um arquivo com extensão <text:span text:style-name="T4">.bin</text:span>.</text:p>
      <text:p text:style-name="P28"><text:tab/>O documento <text:span text:style-name="T4">kernel.c</text:span> possui o código apresentado abaixo na Imagem 3. Este por sua vez, possui a função <text:span text:style-name="T4">kmain()</text:span>, onde o objetivo dela <text:span text:style-name="T45">até o presente momento </text:span>é mostrar um caractere da cor verde na tela.</text:p>
      <text:p text:style-name="P28"/>
      <text:p text:style-name="P18"><draw:frame draw:style-name="fr1" draw:name="Image3" text:anchor-type="paragraph" svg:width="13.358cm" svg:height="2.877cm" draw:z-index="2"><draw:image xlink:href="Pictures/100000000000023200000079B2FE63358B091337.png" xlink:type="simple" xlink:show="embed" xlink:actuate="onLoad" loext:mime-type="image/png"/></draw:frame>Imagem 3: Código de <text:span text:style-name="T4">kernel.c</text:span></text:p>
      <text:p text:style-name="P49"/>
      <text:p text:style-name="P29"><text:tab/>Para compilar os arquivos criados até o presente momento, foi organizado um arquivo <text:span text:style-name="T4">shell script</text:span>, contendo os comandos para compilar os arquivos <text:span text:style-name="T4">kernel.asm</text:span>, <text:span text:style-name="T4">kernel.c</text:span>, e posteriormente, contém o comando para fazer a junção através do <text:span text:style-name="T4">link.ld</text:span> dos arquivos gerados pela compilação dos códigos anteriores. Quando essa junção é feita, um arquivo <text:span text:style-name="T4">kernel.bin</text:span> é gerado, e a partir dele, podemos usar o <text:span text:style-name="T4">qemu</text:span> para fazer um rápido teste do sistema criado até o momento, sem precisar gerar uma imagem do sistema. Segue abaixo na Imagem 4 o código do <text:span text:style-name="T4">shell script</text:span> <text:span text:style-name="T4">build.sh</text:span>:</text:p>
      <text:p text:style-name="P29"/>
      <text:p text:style-name="P19"><draw:frame draw:style-name="fr1" draw:name="Image4" text:anchor-type="paragraph" svg:width="10.971cm" svg:height="2.321cm" draw:z-index="3"><draw:image xlink:href="Pictures/10000000000002370000007888729F0EB9CC37C7.png" xlink:type="simple" xlink:show="embed" xlink:actuate="onLoad" loext:mime-type="image/png"/></draw:frame>Imagem 4: Código de <text:span text:style-name="T4">build.sh</text:span></text:p>
      <text:p text:style-name="P30"/>
      <text:p text:style-name="P29"><text:tab/>Nota-se que foram adicionados os comandos da linha 5 e 6 no arquivo <text:span text:style-name="T4">build.sh</text:span>. O comando apresentado na linha 5 é usado para que o <text:span text:style-name="T4">qemu</text:span> já execute o arquivo <text:span text:style-name="T4">kernel.bin</text:span> assim que o arquivo <text:span text:style-name="T4">build.sh</text:span> for executado, e o comando da linha 6 moverá o arquivo <text:span text:style-name="T4">kernel.bin</text:span> gerado para o diretório indicado, facilitando ao gerar a imagem do sistema posteriormente. Por fim, para <text:span text:style-name="T46">dar permissão de execução ao </text:span><text:span text:style-name="T14">shell script</text:span><text:span text:style-name="T46"> criado, o seguinte comando foi utilizado:</text:span></text:p>
      <text:p text:style-name="P29"><text:tab/><text:tab/><text:tab/><text:tab/><text:span text:style-name="T46">sudo chmod +777 build.sh</text:span></text:p>
      <text:p text:style-name="P29"><text:tab/><text:span text:style-name="T47">Ao executar o arquivo </text:span><text:span text:style-name="T15">shell scritp</text:span><text:span text:style-name="T47"> criado, o resultado é apresentado na Imagem 5.</text:span></text:p>
      <text:p text:style-name="P29"/>
      <text:p text:style-name="P29"><draw:frame draw:style-name="fr1" draw:name="Image5" text:anchor-type="paragraph" svg:width="12.58cm" svg:height="3.413cm" draw:z-index="4"><draw:image xlink:href="Pictures/1000000000000260000000A51C4C14DF8E6C9CB2.png" xlink:type="simple" xlink:show="embed" xlink:actuate="onLoad" loext:mime-type="image/png"/></draw:frame></text:p>
      <text:p text:style-name="P20"><text:soft-page-break/>Imagem 5: Resultado da primeira execução</text:p>
      <text:p text:style-name="P31"/>
      <text:p text:style-name="P32"><text:tab/>Para a criar uma ISO do sistema feito até então, foi necessário criar alguns diretórios dentro do diretório SO, resultando na seguinte ordem: <text:span text:style-name="T4">SO/simple/boot/grub/</text:span>. Dentro do diretório <text:span text:style-name="T4">boot</text:span> está localizado o arquivo <text:span text:style-name="T4">kernel.bin</text:span>, e dentro do diretório <text:span text:style-name="T4">grub</text:span>, será criado um arquivo que fará <text:span text:style-name="T48">a configuração do </text:span><text:span text:style-name="T16">grub</text:span><text:span text:style-name="T48">. No código apresentado abaixo na Imagem 6, as configurações são feitas de modo que o tempo aguardando a inicialização do sistema seja 0 segundos (set timeout = 0), para que seu </text:span><text:span text:style-name="T16">boot</text:span><text:span text:style-name="T48"> seja feito através do disco óptico (set root = ‘(hd96)’ e também, <text:s/>para que seu nome seja “simpleOS”.</text:span></text:p>
      <text:p text:style-name="P32"/>
      <text:p text:style-name="P21"><draw:frame draw:style-name="fr1" draw:name="Image6" text:anchor-type="paragraph" svg:width="7.179cm" svg:height="2.843cm" draw:z-index="5"><draw:image xlink:href="Pictures/10000000000001640000008DCE2C85D5AE033737.png" xlink:type="simple" xlink:show="embed" xlink:actuate="onLoad" loext:mime-type="image/png"/></draw:frame>Imagem 6: Código do arquivo <text:span text:style-name="T4">grub.cfg</text:span></text:p>
      <text:p text:style-name="P32"/>
      <text:p text:style-name="P32"><text:tab/><text:span text:style-name="T48">Para gerar a ISO do sistema criado, o seguinte comando foi utilizado:</text:span></text:p>
      <text:p text:style-name="P32"><text:tab/><text:tab/><text:tab/><text:tab/>grub-mkrescue -o simple.iso simple</text:p>
      <text:p text:style-name="P33"><text:tab/>Ao testar a nova ISO criada no VirtualBox, escrevendo uma palavra na tela, o resultado foi o seguinte (Imagem 7):</text:p>
      <text:p text:style-name="P33"/>
      <text:p text:style-name="P22"><draw:frame draw:style-name="fr1" draw:name="Image7" text:anchor-type="paragraph" svg:width="7.251cm" svg:height="5.092cm" draw:z-index="6"><draw:image xlink:href="Pictures/100002010000018900000114382B65B0A0EEE7CB.png" xlink:type="simple" xlink:show="embed" xlink:actuate="onLoad" loext:mime-type="image/png"/></draw:frame>Imagem 7: Execução da ISO criada através do VirtualBox</text:p>
      <text:p text:style-name="P34"/>
      <text:p text:style-name="P35">Para escrever a frase da imagem acima (Imagem 7), o código do arquivo <text:span text:style-name="T4">kernel.c</text:span> foi alterado. O mesmo é apresentado na Imagem 8:</text:p>
      <text:p text:style-name="P22"><draw:frame draw:style-name="fr1" draw:name="Image8" text:anchor-type="paragraph" svg:width="9.156cm" svg:height="8.146cm" draw:z-index="7"><draw:image xlink:href="Pictures/100000000000022C0000020D33A271802EAF6C72.png" xlink:type="simple" xlink:show="embed" xlink:actuate="onLoad" loext:mime-type="image/png"/></draw:frame><text:soft-page-break/>Imagem 8: Código de <text:span text:style-name="T4">kernel.c</text:span> para escrever “simpleOS”</text:p>
      <text:h text:style-name="P54" text:outline-level="1">Tarefa 2</text:h>
      <text:p text:style-name="P38">2.1. <text:span text:style-name="T36">Criando os arquivos</text:span></text:p>
      <text:p text:style-name="P2"><text:span text:style-name="T36">Os arquivos </text:span><text:span text:style-name="T5">types.h</text:span><text:span text:style-name="T36">, </text:span><text:span text:style-name="T5">system.h</text:span><text:span text:style-name="T36">, </text:span><text:span text:style-name="T5">string.h</text:span><text:span text:style-name="T36"> e </text:span><text:span text:style-name="T5">screen.h</text:span><text:span text:style-name="T36"> foram criados dentro do novo diretório chamado </text:span><text:span text:style-name="T5">include</text:span><text:span text:style-name="T36">, conforme dito no documento de orientação. </text:span></text:p>
      <text:p text:style-name="P7"/>
      <text:p text:style-name="P38">2.<text:span text:style-name="T36">1.1. Arquivo </text:span><text:span text:style-name="T5">types.h</text:span></text:p>
      <text:p text:style-name="P43">Neste arquivo foram inseridos os códigos necessários para a criação dos tipos primitivos de dados que serão usados pelas funções do SO. O código é apresentado na Imagem 9:</text:p>
      <text:p text:style-name="P52"><draw:frame draw:style-name="fr3" draw:name="Image9" text:anchor-type="paragraph" svg:y="0.64cm" svg:width="6.627cm" svg:height="8.121cm" draw:z-index="8"><draw:image xlink:href="Pictures/1000000000000179000001CEAB8A43B2194DAB3C.png" xlink:type="simple" xlink:show="embed" xlink:actuate="onLoad" loext:mime-type="image/png"/></draw:frame></text:p>
      <text:p text:style-name="P16"><text:span text:style-name="T33">Imagem 9: Código do arquivo </text:span><text:span text:style-name="T34">types.h</text:span></text:p>
      <text:p text:style-name="P38"><text:soft-page-break/>2.1.2. <text:span text:style-name="T37">Arquivo </text:span><text:span text:style-name="T6">string.h</text:span></text:p>
      <text:p text:style-name="P3"><text:span text:style-name="T24">1) O que a função realiza é a contagem de quantos caracteres possui na </text:span><text:span text:style-name="T7">string</text:span><text:span text:style-name="T24">, ou seja, o tamanho da </text:span><text:span text:style-name="T7">string</text:span><text:span text:style-name="T24"> que foi passada para a função como parâmetro. Todos esses procedimentos são feitos utilizando os </text:span><text:span text:style-name="T22">tipo</text:span><text:span text:style-name="T23">s</text:span><text:span text:style-name="T22"> </text:span><text:span text:style-name="T24">de dados </text:span><text:span text:style-name="T22">primitivo</text:span><text:span text:style-name="T23">s</text:span><text:span text:style-name="T22"> definido</text:span><text:span text:style-name="T23">s</text:span><text:span text:style-name="T22"> no arquivo </text:span><text:span text:style-name="T6">types.h</text:span><text:span text:style-name="T22">. </text:span><text:span text:style-name="T28">Em seguida, o código é apresentado na Imagem 10</text:span><text:span text:style-name="T23">:</text:span></text:p>
      <text:p text:style-name="P8"/>
      <text:p text:style-name="P22"><draw:frame draw:style-name="fr1" draw:name="Image10" text:anchor-type="paragraph" svg:width="10.811cm" svg:height="6.576cm" draw:z-index="9"><draw:image xlink:href="Pictures/10000000000002530000016A0171DBD1E64ADB29.png" xlink:type="simple" xlink:show="embed" xlink:actuate="onLoad" loext:mime-type="image/png"/></draw:frame>Imagem 10: Código do arquivo <text:span text:style-name="T4">string.h</text:span></text:p>
      <text:p text:style-name="P9"/>
      <text:p text:style-name="P38">2.1.3. <text:span text:style-name="T38">Arquivo </text:span><text:span text:style-name="T8">system.h</text:span></text:p>
      <text:p text:style-name="P4"><text:span text:style-name="T39">As funções descritas no arquivo </text:span><text:span text:style-name="T7">system.h</text:span><text:span text:style-name="T24"> são usadas para fazer acesso direto às portas, para que seja possível manipular o cursor na tela.</text:span><text:span text:style-name="T7"> </text:span><text:span text:style-name="T25">Neste arquivo também foi usado como biblioteca o arquivo </text:span><text:span text:style-name="T9">types.h</text:span><text:span text:style-name="T25">, para que fosse possível utilizar os tipos primitivos de dados. </text:span><text:span text:style-name="T29">O código é apresentado em Imagem 11:</text:span></text:p>
      <text:p text:style-name="P46"/>
      <text:p text:style-name="P36"><draw:frame draw:style-name="fr2" draw:name="Image11" text:anchor-type="paragraph" svg:width="11.023cm" svg:height="8.574cm" draw:z-index="10"><draw:image xlink:href="Pictures/10000000000002C80000025ABF181DE8F572A7D5.png" xlink:type="simple" xlink:show="embed" xlink:actuate="onLoad" loext:mime-type="image/png"/></draw:frame><text:span text:style-name="T50">I</text:span><text:span text:style-name="T49">magem 11: Código do arquivo </text:span><text:span text:style-name="T51">system.h</text:span></text:p>
      <text:p text:style-name="P38"><text:soft-page-break/>2.1.4. <text:span text:style-name="T40">Arquivo </text:span><text:span text:style-name="T10">screen.h</text:span></text:p>
      <text:p text:style-name="P5"><text:span text:style-name="T41">As funções utilizadas no arquivo </text:span><text:span text:style-name="T11">screen.h</text:span><text:span text:style-name="T26"> são funções previstas monitores VGA, que é o padrão utilizado para a tela de </text:span><text:span text:style-name="T11">boot</text:span><text:span text:style-name="T26"> de qualquer sistema operacional. Nesse arquivo são adicionadas funções para limpar linhas, atualizar a localização do cursor na tela, fazer </text:span><text:span text:style-name="T11">scrollUp</text:span><text:span text:style-name="T26"> da tela, limpar a tela, entre outras.</text:span><text:span text:style-name="T41"> Todas as funções foram feitas de acordo com o documento disponibilizado pelo professor para a orientação. Para o caso específico da função </text:span><text:span text:style-name="T18">printch(char)</text:span><text:span text:style-name="T31"> foi utilizado a Tabela ACII.</text:span><text:span text:style-name="T41"> As funções presentes no arquivo serão explicadas por meio dos comentários presentes no código abaixo (devido ao tamanho do código, não foi possível gerar uma imagem do mesmo):</text:span></text:p>
      <text:p text:style-name="P10"/>
      <text:p text:style-name="P10">#ifndef SCREEN_H</text:p>
      <text:p text:style-name="P10">#define SCREEN_H</text:p>
      <text:p text:style-name="P10"/>
      <text:p text:style-name="P10">#include "types.h"</text:p>
      <text:p text:style-name="P10">#include "system.h"</text:p>
      <text:p text:style-name="P10">#include "string.h"</text:p>
      <text:p text:style-name="P10"/>
      <text:p text:style-name="P10">int32 cursorX = 0, cursorY = 2;</text:p>
      <text:p text:style-name="P10">const uint8 sw = 80, sh = 25, sd = 2;</text:p>
      <text:p text:style-name="P10"/>
      <text:p text:style-name="P10">void clearLine(uint8 from, uint8 to){</text:p>
      <text:p text:style-name="P10"/>
      <text:p text:style-name="P10"><text:tab/>/*A variável i é um auxiliar que define o ponto inicial em função da largura e <text:tab/>profundidade (linha x coluna) de onde a função começará apagar a tela. Por <text:tab/>exemplo, caso deseja-se apagar da linha 2 até a 4: A primeira posição no <text:tab/>vetor <text:tab/>vidmem a se pagar será a <text:span text:style-name="T54">320</text:span>, e a posição final será a <text:span text:style-name="T54">800</text:span>*/</text:p>
      <text:p text:style-name="P11"><text:tab/></text:p>
      <text:p text:style-name="P11"><text:tab/>uint16 i = sw * from * sd;</text:p>
      <text:p text:style-name="P10"/>
      <text:p text:style-name="P10"><text:tab/>/*A linha abaixo inicializa a string vidmem, com a primeira posição de memória <text:tab/>válida na tela*/</text:p>
      <text:p text:style-name="P10"/>
      <text:p text:style-name="P10"><text:tab/>string vidmem = (string)0xb8000;</text:p>
      <text:p text:style-name="P10"/>
      <text:p text:style-name="P10"><text:tab/>/*O loop abaixo percorre o vetor vidmem, onde a todas as posições acessadas <text:tab/>pelo loop são limpas*/</text:p>
      <text:p text:style-name="P10"/>
      <text:p text:style-name="P10"><text:tab/>for(i; i &lt; (sw * (to + 1) * sd); i++)</text:p>
      <text:p text:style-name="P10"><text:soft-page-break/><text:tab/><text:tab/>vidmem[i] = 0x0;</text:p>
      <text:p text:style-name="P10">}</text:p>
      <text:p text:style-name="P10"/>
      <text:p text:style-name="P10"/>
      <text:p text:style-name="P10"/>
      <text:p text:style-name="P10"/>
      <text:p text:style-name="P10">void updateCursor(){</text:p>
      <text:p text:style-name="P10"><text:tab/>unsigned temp;</text:p>
      <text:p text:style-name="P10"/>
      <text:p text:style-name="P10"><text:tab/>/*Nessa variável será atribu<text:span text:style-name="T42">í</text:span>do o valor da posição, em função dos eixos x e y*/</text:p>
      <text:p text:style-name="P10"/>
      <text:p text:style-name="P10"><text:tab/>temp = cursorY * sw + cursorX;</text:p>
      <text:p text:style-name="P10"/>
      <text:p text:style-name="P10"><text:tab/>/*Para a função outportb(), o primeiro parâmetro significa a porta onde se deseja <text:tab/>escrever o dado, e o segundo parâmetro significa qual dado se deseja escrever na <text:tab/>porta em questão*/</text:p>
      <text:p text:style-name="P10"/>
      <text:p text:style-name="P10"><text:tab/>/*Na linha abaixo, a posição é selecionada no registrador de controle*/</text:p>
      <text:p text:style-name="P10"/>
      <text:p text:style-name="P10"><text:tab/>outportb(0x3D4, 14);</text:p>
      <text:p text:style-name="P10"/>
      <text:p text:style-name="P10"><text:tab/>/*O byte de alta é enviado no barramento através da função abaixo*/</text:p>
      <text:p text:style-name="P10"/>
      <text:p text:style-name="P10"><text:tab/>outportb(0x3D5, temp &gt;&gt; 8);</text:p>
      <text:p text:style-name="P10"/>
      <text:p text:style-name="P10"><text:tab/>/*O byte de baixa é selecionado no registrador de controle*/</text:p>
      <text:p text:style-name="P10"/>
      <text:p text:style-name="P10"><text:tab/>outportb(0x3D4, 15);</text:p>
      <text:p text:style-name="P10"/>
      <text:p text:style-name="P10"><text:tab/>/*O byte de baixa da posição do cursor é enviado no barramento*/</text:p>
      <text:p text:style-name="P10"/>
      <text:p text:style-name="P10"><text:tab/>outportb(0x3D5, temp);</text:p>
      <text:p text:style-name="P10">}</text:p>
      <text:p text:style-name="P10"/>
      <text:p text:style-name="P10">void clearScreen(){</text:p>
      <text:p text:style-name="P10"><text:soft-page-break/></text:p>
      <text:p text:style-name="P10"><text:tab/>/*A presente função limpa todas as linhas da tela, da primeira até a última. Ela <text:tab/>faz esta limpeza através da função clearLine(), passando como parâmetro a <text:tab/>primeira linha e a linha sh-1 (última). Depois desta limpeza, a função <text:tab/>reposiciona o cursor do mouse para a primeira posição (0,0)*/</text:p>
      <text:p text:style-name="P10"/>
      <text:p text:style-name="P10"><text:tab/>clearLine(0,sh-1);</text:p>
      <text:p text:style-name="P10"><text:tab/>cursorX = 0;</text:p>
      <text:p text:style-name="P10"><text:tab/>cursorY = 0;</text:p>
      <text:p text:style-name="P10"><text:tab/>updateCursor();</text:p>
      <text:p text:style-name="P10">}</text:p>
      <text:p text:style-name="P10"/>
      <text:p text:style-name="P10">void scrollUp(uint8 lineNumber){</text:p>
      <text:p text:style-name="P10"/>
      <text:p text:style-name="P10"><text:tab/>/*A linha abaixo inicializa a string vidmem, com a<text:tab/>primeira posição de memória <text:tab/>válida na tela*/</text:p>
      <text:p text:style-name="P10"/>
      <text:p text:style-name="P10"><text:tab/>string vidmem = (string)0xb8000;</text:p>
      <text:p text:style-name="P10"/>
      <text:p text:style-name="P10"><text:tab/>uint16 i = 0;</text:p>
      <text:p text:style-name="P10"/>
      <text:p text:style-name="P10"><text:tab/>/*É copiado para a primeira linha o conteúdo da lineNumber+1 linha abaixo da <text:tab/>primeira linha. Ou seja, caso a função seja chamada como srollUp(5), o <text:tab/>conteúdo da linha 6 será copiado para a primeira linha*/</text:p>
      <text:p text:style-name="P10"/>
      <text:p text:style-name="P10"><text:tab/>for(i; i &lt; sw * (sh - 1) * sd; i++)</text:p>
      <text:p text:style-name="P10"><text:tab/><text:tab/>vidmem[i] = vidmem[i + sw * sd * lineNumber];</text:p>
      <text:p text:style-name="P10"/>
      <text:p text:style-name="P10"><text:tab/>/*as que foram copiadas são limpadas de sua posição antiga (original)*/</text:p>
      <text:p text:style-name="P10"/>
      <text:p text:style-name="P10"><text:tab/>clearLine(sh - 1 - lineNumber, sh - 1);</text:p>
      <text:p text:style-name="P10"/>
      <text:p text:style-name="P10"><text:tab/>/*O cursor é posicionado no ponto (0,0) caso deseja-se deslocar mais texto que <text:tab/>existe na tela*/</text:p>
      <text:p text:style-name="P10"/>
      <text:p text:style-name="P10"><text:tab/>if((cursorY - lineNumber) &lt; 0){</text:p>
      <text:p text:style-name="P10"><text:tab/><text:tab/>cursorY = 0;</text:p>
      <text:p text:style-name="P10"><text:soft-page-break/><text:tab/><text:tab/>cursorX = 0;</text:p>
      <text:p text:style-name="P10"><text:tab/>}</text:p>
      <text:p text:style-name="P10"><text:tab/>else</text:p>
      <text:p text:style-name="P10"><text:tab/><text:tab/>cursorY -= lineNumber;</text:p>
      <text:p text:style-name="P10"/>
      <text:p text:style-name="P10"><text:tab/>/*Atualiza o cursor na tela*/</text:p>
      <text:p text:style-name="P10"><text:tab/>updateCursor();</text:p>
      <text:p text:style-name="P10">}</text:p>
      <text:p text:style-name="P10"/>
      <text:p text:style-name="P10">void newLineCheck(){</text:p>
      <text:p text:style-name="P10"/>
      <text:p text:style-name="P10"><text:tab/>/*A presente função faz um scrollUp() de uma linha, caso a <text:span text:style-name="T43">ú</text:span>ltima linha da tela <text:tab/>seja preenchida, liberando uma nova linha*/</text:p>
      <text:p text:style-name="P10"/>
      <text:p text:style-name="P10"><text:tab/>if(cursorY &gt;= sh - 1)</text:p>
      <text:p text:style-name="P10"><text:tab/><text:tab/>scrollUp(1);</text:p>
      <text:p text:style-name="P10">}</text:p>
      <text:p text:style-name="P10"/>
      <text:p text:style-name="P10">void printch(char c){</text:p>
      <text:p text:style-name="P10"/>
      <text:p text:style-name="P10"><text:tab/>/*A linha abaixo inicializa a string vidmem, com a<text:tab/>primeira posição de memória <text:tab/>válida na tela*/</text:p>
      <text:p text:style-name="P10"/>
      <text:p text:style-name="P10"><text:tab/>string vidmem = (string)0xb8000;</text:p>
      <text:p text:style-name="P10"/>
      <text:p text:style-name="P10"><text:tab/>switch(c){</text:p>
      <text:p text:style-name="P10"/>
      <text:p text:style-name="P10"><text:tab/><text:tab/>/*O caracter<text:span text:style-name="T43">e </text:span>0x08 corresponde ao Backspace, ou seja, para apagar um</text:p>
      <text:p text:style-name="P10"><text:tab/><text:tab/>caracter<text:span text:style-name="T43">e</text:span>. Caso seja a opção desejada, primeiro é feita uma verificação</text:p>
      <text:p text:style-name="P10"><text:tab/><text:tab/>se existe caracter<text:span text:style-name="T43">e</text:span> a ser apagado, e caso sim, o cursor volta uma</text:p>
      <text:p text:style-name="P10"><text:tab/><text:tab/>posição no eixo x, e a string vidmem limpa o caracter<text:span text:style-name="T43">e</text:span> onde estava</text:p>
      <text:p text:style-name="P10"><text:tab/><text:tab/>o cursor no eixo x, antes de decrementar*/</text:p>
      <text:p text:style-name="P10"/>
      <text:p text:style-name="P10"><text:tab/><text:tab/>case (0x08):</text:p>
      <text:p text:style-name="P10"><text:tab/><text:tab/><text:tab/>if(cursorX &gt; 0){</text:p>
      <text:p text:style-name="P10"><text:soft-page-break/><text:tab/><text:tab/><text:tab/><text:tab/>cursorX--;</text:p>
      <text:p text:style-name="P10"><text:tab/><text:tab/><text:tab/><text:tab/>vidmem[(cursorY * sw + cursorX) * sd] = 0x00;</text:p>
      <text:p text:style-name="P10"><text:tab/><text:tab/><text:tab/>}</text:p>
      <text:p text:style-name="P10"/>
      <text:p text:style-name="P10"><text:tab/><text:tab/>/*O caracter<text:span text:style-name="T43">e</text:span> 0x09 corresponde ao TAB. Sendo assim, quando entra-se</text:p>
      <text:p text:style-name="P10"><text:tab/><text:tab/>no case em questão, o cursor se movimenta no eixo x em 8 posições*/</text:p>
      <text:p text:style-name="P10"><text:tab/><text:tab/>case (0x09):</text:p>
      <text:p text:style-name="P10"><text:tab/><text:tab/><text:tab/>cursorX = (cursorX + 8) &amp; ~(8 - 1);</text:p>
      <text:p text:style-name="P10"><text:tab/><text:tab/><text:tab/>break;</text:p>
      <text:p text:style-name="P10"/>
      <text:p text:style-name="P10"><text:tab/><text:tab/>/*O caracter<text:span text:style-name="T43">e</text:span> em questão se trata do "carriage return", que reposiciona</text:p>
      <text:p text:style-name="P10"><text:tab/><text:tab/>o cursor para o in<text:span text:style-name="T43">í</text:span>cio da linha*/</text:p>
      <text:p text:style-name="P10"/>
      <text:p text:style-name="P10"><text:tab/><text:tab/>case ('\r'):</text:p>
      <text:p text:style-name="P10"><text:tab/><text:tab/><text:tab/>cursorX = 0;</text:p>
      <text:p text:style-name="P10"><text:tab/><text:tab/><text:tab/>break;</text:p>
      <text:p text:style-name="P10"/>
      <text:p text:style-name="P10"><text:tab/><text:tab/>/*O caracter<text:span text:style-name="T43">e</text:span> em questão se trata do "new line", sendo assim, o cursor</text:p>
      <text:p text:style-name="P10"><text:tab/><text:tab/>no eixo y é incrementado em um, passando para a linha abaixo, e o no</text:p>
      <text:p text:style-name="P10"><text:tab/><text:tab/>eixo x, é reposicionado para o incio da linha*/</text:p>
      <text:p text:style-name="P10"/>
      <text:p text:style-name="P10"><text:tab/><text:tab/>case ('\n'):</text:p>
      <text:p text:style-name="P10"><text:tab/><text:tab/><text:tab/>cursorX = 0;</text:p>
      <text:p text:style-name="P10"><text:tab/><text:tab/><text:tab/>cursorY++;</text:p>
      <text:p text:style-name="P10"><text:tab/><text:tab/><text:tab/>break;</text:p>
      <text:p text:style-name="P10"/>
      <text:p text:style-name="P10"><text:tab/><text:tab/>/*Caso não seja nenhuma das opções anteriores, o caracter<text:span text:style-name="T43">e</text:span> digitado</text:p>
      <text:p text:style-name="P10"><text:tab/><text:tab/>é mostrado na tela com a cor branca, na posição atual do cursor.</text:p>
      <text:p text:style-name="P10"><text:tab/><text:tab/>Quando o caracter<text:span text:style-name="T43">e</text:span> é apresentado, o cursor no eixo x é incrementado em</text:p>
      <text:p text:style-name="P10"><text:tab/><text:tab/>uma posição*/</text:p>
      <text:p text:style-name="P10"/>
      <text:p text:style-name="P10"><text:tab/><text:tab/>default:</text:p>
      <text:p text:style-name="P10"><text:tab/><text:tab/><text:tab/>vidmem[((cursorY * sw + cursorX)) * sd] = c;</text:p>
      <text:p text:style-name="P10"><text:tab/><text:tab/><text:tab/>vidmem[((cursorY * sw + cursorX)) * sd + 1] = 0x0F;</text:p>
      <text:p text:style-name="P10"><text:soft-page-break/><text:tab/><text:tab/><text:tab/>cursorX++;</text:p>
      <text:p text:style-name="P10"><text:tab/><text:tab/><text:tab/>break;</text:p>
      <text:p text:style-name="P10"><text:tab/>}</text:p>
      <text:p text:style-name="P10"/>
      <text:p text:style-name="P10"><text:tab/>/*esse if faz verificação se a linha já está cheia, e caso sim, posiciona</text:p>
      <text:p text:style-name="P10"><text:tab/>o cursor na linha abaixo no eixo y, e na posição in<text:span text:style-name="T43">i</text:span>cial do eixo x*/</text:p>
      <text:p text:style-name="P10"><text:tab/>if (cursorX &gt;= sw){</text:p>
      <text:p text:style-name="P10"><text:tab/><text:tab/>cursorX = 0;</text:p>
      <text:p text:style-name="P10"><text:tab/><text:tab/>cursorY++;</text:p>
      <text:p text:style-name="P10"><text:tab/>}</text:p>
      <text:p text:style-name="P10"/>
      <text:p text:style-name="P10"><text:tab/>/*Com a função newLineCheck() verifica se a tela já está toda cheia*/</text:p>
      <text:p text:style-name="P10"><text:tab/>newLineCheck();</text:p>
      <text:p text:style-name="P10"/>
      <text:p text:style-name="P10"><text:tab/>/*Atualiza a posição do cursor na tela*/</text:p>
      <text:p text:style-name="P10"><text:tab/>updateCursor();</text:p>
      <text:p text:style-name="P10">}</text:p>
      <text:p text:style-name="P10"/>
      <text:p text:style-name="P10">void print(string ch){</text:p>
      <text:p text:style-name="P10"/>
      <text:p text:style-name="P10"><text:tab/>/*A função em questão é usada para mostrar na tela uma string, fazendo um</text:p>
      <text:p text:style-name="P10"><text:tab/>laço de repetição da posição 0 da string (primeiro caracter<text:span text:style-name="T43">e</text:span>) até o último*/</text:p>
      <text:p text:style-name="P10"><text:tab/>uint16 i = 0;</text:p>
      <text:p text:style-name="P10"/>
      <text:p text:style-name="P10"><text:tab/>for(i; i &lt; strlength(ch); i++)</text:p>
      <text:p text:style-name="P10"><text:tab/><text:tab/>printch(ch[i]);</text:p>
      <text:p text:style-name="P10">}</text:p>
      <text:p text:style-name="P10"/>
      <text:p text:style-name="P10">#endif</text:p>
      <text:p text:style-name="P10"/>
      <text:p text:style-name="P12">2.2. Utilizando as funções em <text:span text:style-name="T4">kernel.c</text:span></text:p>
      <text:p text:style-name="P12"><text:span text:style-name="T4"><text:tab/></text:span><text:span text:style-name="T30">Para fazer o uso das funções construídas em </text:span><text:span text:style-name="T17">screen.h</text:span><text:span text:style-name="T30"> no arquivo </text:span><text:span text:style-name="T17">kernel.c</text:span><text:span text:style-name="T30">, basta incluir a biblioteca no código C, e após isto, as funções estão prontas para serem chamadas. </text:span><text:span text:style-name="T32">Alguns</text:span><text:span text:style-name="T30"> exemplo</text:span><text:span text:style-name="T32">s</text:span><text:span text:style-name="T30"> pode</text:span><text:span text:style-name="T32">m</text:span><text:span text:style-name="T30"> ser visto</text:span><text:span text:style-name="T32">s</text:span><text:span text:style-name="T30"> na Imagem 12, </text:span><text:span text:style-name="T32">Imagem 13</text:span><text:span text:style-name="T30"> onde a função </text:span><text:span text:style-name="T17">clearScreen()</text:span><text:span text:style-name="T30"> </text:span><text:span text:style-name="T32">e </text:span><text:span text:style-name="T19">updateCursor()</text:span><text:span text:style-name="T32"> são</text:span><text:span text:style-name="T30"> usada</text:span><text:span text:style-name="T32">s respectivamente</text:span><text:span text:style-name="T30"> para limpar a tela logo após a frase “simpleOS” ser mostrada na tela </text:span><text:span text:style-name="T32">e para atualizar a posição do cursor para a </text:span><text:soft-page-break/><text:span text:style-name="T32">posição desejada.</text:span></text:p>
      <text:p text:style-name="P47"/>
      <text:p text:style-name="P17"><draw:frame draw:style-name="fr1" draw:name="Image12" text:anchor-type="paragraph" svg:width="9.186cm" svg:height="9.837cm" draw:z-index="11"><draw:image xlink:href="Pictures/10000000000002340000025C244FB4BD30866156.png" xlink:type="simple" xlink:show="embed" xlink:actuate="onLoad" loext:mime-type="image/png"/></draw:frame><text:span text:style-name="T21">Imagem 12: Código de </text:span><text:span text:style-name="T4">kernel.c</text:span><text:span text:style-name="T21"> utilizando </text:span><text:span text:style-name="T32">a</text:span><text:span text:style-name="T21"> função </text:span><text:span text:style-name="T4">c</text:span><text:span text:style-name="T19">learScreen()</text:span></text:p>
      <text:p text:style-name="P50"/>
      <text:p text:style-name="P23"><draw:frame draw:style-name="fr1" draw:name="Image13" text:anchor-type="paragraph" svg:width="9.724cm" svg:height="11.021cm" draw:z-index="12"><draw:image xlink:href="Pictures/100000000000023A00000286AA30352C5BCBFC83.png" xlink:type="simple" xlink:show="embed" xlink:actuate="onLoad" loext:mime-type="image/png"/></draw:frame>Imagem 13: <text:span text:style-name="T52">Código de </text:span><text:span text:style-name="T17">kernel.c</text:span><text:span text:style-name="T52"> utilizando </text:span>a<text:span text:style-name="T52"> função </text:span><text:span text:style-name="T4">updateCursor()</text:span></text:p>
      <text:p text:style-name="P25"><text:soft-page-break/></text:p>
      <text:p text:style-name="P37">References</text:p>
      <text:p text:style-name="P1"><text:span text:style-name="T53">Castro, S. de (2018) “Instalando o Oracle VirtualBox no Ubuntu 14.04, 16.04 e 18.04”. Disponível em: &lt;</text:span><text:a xlink:type="simple" xlink:href="https://www.blogopcaolinux.com.br/2016/05/instalando-virtualbox-no-ubuntu-lts.html" text:style-name="Internet_20_link" text:visited-style-name="Visited_20_Internet_20_Link"><text:span text:style-name="T53">https://www.blogopcaolinux.com.br/2016/05/instalando-virtualbox-no-ubuntu-lts.html</text:span></text:a><text:span text:style-name="T53">&gt;. Acesso em: 19 set. 2018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ucidasans1" svg:font-family="Lucidasans"/>
    <style:font-face style:name="Times2" svg:font-family="Times" style:font-family-generic="roman"/>
    <style:font-face style:name="TimesNewRoman,Bold" svg:font-family="'TimesNewRoman,Bold'" style:font-family-generic="roman"/>
    <style:font-face style:name="Helvetica1" svg:font-family="Helvetica" style:font-family-generic="swiss"/>
    <style:font-face style:name="Courier" svg:font-family="Courier" style:font-adornments="Regular" style:font-family-generic="modern" style:font-pitch="fixed"/>
    <style:font-face style:name="Bitstream Vera Sans" svg:font-family="'Bitstream Vera Sans'" style:font-pitch="variable"/>
    <style:font-face style:name="Lucidasans" svg:font-family="Lucidasans" style:font-pitch="variable"/>
    <style:font-face style:name="Bitstream Vera Serif" svg:font-family="'Bitstream Vera Serif'" style:font-family-generic="roman" style:font-pitch="variable"/>
    <style:font-face style:name="Times1" svg:font-family="Times" style:font-adornments="Bold" style:font-family-generic="roman" style:font-pitch="variable"/>
    <style:font-face style:name="Times" svg:font-family="Times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adornments="Bold" style:font-family-generic="swiss" style:font-pitch="variable"/>
    <style:font-face style:name="Liberation Sans" svg:font-family="'Liberation Sans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Bitstream Vera Serif" fo:font-size="12pt" fo:language="pt" fo:country="BR" style:font-name-asian="Bitstream Vera Sans" style:font-size-asian="12pt" style:language-asian="zxx" style:country-asian="none" style:font-name-complex="Lucida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Bitstream Vera Serif" fo:font-size="12pt" fo:language="pt" fo:country="BR" style:font-name-asian="Bitstream Vera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" fo:font-family="Times" style:font-style-name="Regular" style:font-family-generic="roman" style:font-pitch="variable" fo:font-size="12pt" fo:font-weight="normal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itle" style:family="paragraph" style:parent-style-name="Standard" style:next-style-name="SBC_3a_author_28_s_29_" style:class="chapter" style:master-page-name="">
      <style:paragraph-properties fo:margin-top="0cm" fo:margin-bottom="0.4cm" loext:contextual-spacing="false" fo:text-align="center" style:justify-single-word="false" style:page-number="auto"/>
      <style:text-properties fo:font-variant="small-caps" style:font-name="Times1" fo:font-family="Times" style:font-style-name="Bold" style:font-family-generic="roman" style:font-pitch="variable" fo:font-size="18pt" fo:font-weight="bold" style:letter-kerning="true" style:font-size-asian="18pt" style:font-weight-asian="bold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Standard" style:next-style-name="SBC_3a_paragraph" style:class="text">
      <style:paragraph-properties fo:margin-left="0cm" fo:margin-right="0cm" fo:margin-top="0.635cm" fo:margin-bottom="0cm" loext:contextual-spacing="false" fo:orphans="2" fo:widows="2" fo:text-indent="0cm" style:auto-text-indent="false" fo:keep-with-next="always">
        <style:tab-stops/>
      </style:paragraph-properties>
      <style:text-properties fo:font-variant="small-caps" style:use-window-font-color="true" style:font-name="Times1" fo:font-family="Times" style:font-style-name="Bold" style:font-family-generic="roman" style:font-pitch="variable" fo:font-size="14pt" fo:language="pt" fo:country="BR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Heading_20_2" style:display-name="Heading 2" style:family="paragraph" style:parent-style-name="Heading_20_1" style:next-style-name="SBC_3a_paragraph" style:class="text">
      <style:paragraph-properties fo:margin-left="0cm" fo:margin-right="0cm" fo:margin-top="0.423cm" fo:margin-bottom="0cm" loext:contextual-spacing="false" fo:text-indent="0cm" style:auto-text-indent="false"/>
      <style:text-properties fo:font-variant="normal" fo:text-transform="none" fo:font-size="13pt" style:font-size-asian="13pt"/>
    </style:style>
    <style:style style:name="Heading_20_3" style:display-name="Heading 3" style:family="paragraph" style:parent-style-name="Standard" style:next-style-name="SBC_3a_paragraph" style:class="text">
      <style:paragraph-properties fo:margin-left="0cm" fo:margin-right="0cm" fo:margin-top="0.423cm" fo:margin-bottom="0cm" loext:contextual-spacing="false" fo:text-indent="0cm" style:auto-text-indent="false" fo:keep-with-next="always"/>
      <style:text-properties fo:font-weight="bold" style:font-weight-asian="bold"/>
    </style:style>
    <style:style style:name="Heading_20_4" style:display-name="Heading 4" style:family="paragraph" style:parent-style-name="Standard" style:next-style-name="SBC_3a_paragraph" style:class="text">
      <style:paragraph-properties fo:margin-left="0cm" fo:margin-right="0cm" fo:text-align="justify" style:justify-single-word="false" fo:text-indent="0cm" style:auto-text-indent="false" fo:keep-with-next="always"/>
      <style:text-properties fo:font-style="italic" style:font-style-asian="italic"/>
    </style:style>
    <style:style style:name="Heading_20_5" style:display-name="Heading 5" style:family="paragraph" style:parent-style-name="Standard" style:next-style-name="SBC_3a_paragraph" style:class="text">
      <style:paragraph-properties fo:margin-left="0cm" fo:margin-right="0cm" fo:text-indent="0cm" style:auto-text-indent="false" fo:keep-with-next="always"/>
      <style:text-properties fo:color="#000000" style:font-name="TimesNewRoman,Bold" fo:font-family="'TimesNewRoman,Bold'" style:font-family-generic="roman" fo:language="pt" fo:country="BR" fo:font-weight="bold" style:language-asian="pt" style:country-asian="BR" style:font-weight-asian="bold"/>
    </style:style>
    <style:style style:name="Heading_20_6" style:display-name="Heading 6" style:family="paragraph" style:parent-style-name="Standard" style:next-style-name="SBC_3a_paragraph" style:class="text">
      <style:paragraph-properties fo:margin-left="0cm" fo:margin-right="0cm" fo:text-align="center" style:justify-single-word="false" fo:text-indent="0cm" style:auto-text-indent="false" fo:keep-with-next="always"/>
      <style:text-properties fo:color="#000000" fo:language="pt" fo:country="BR" fo:font-style="italic" fo:font-weight="bold" style:language-asian="pt" style:country-asian="BR" style:font-style-asian="italic" style:font-weight-asian="bold"/>
    </style:style>
    <style:style style:name="Heading_20_7" style:display-name="Heading 7" style:family="paragraph" style:parent-style-name="Standard" style:next-style-name="SBC_3a_paragraph" style:class="text">
      <style:paragraph-properties fo:margin-left="0cm" fo:margin-right="0cm" fo:text-align="justify" style:justify-single-word="false" fo:text-indent="0cm" style:auto-text-indent="false" fo:keep-with-next="always"/>
      <style:text-properties fo:language="pt" fo:country="BR" fo:font-weight="bold" style:language-asian="pt" style:country-asian="BR" style:font-weight-asian="bold"/>
    </style:style>
    <style:style style:name="Heading_20_8" style:display-name="Heading 8" style:family="paragraph" style:parent-style-name="Standard" style:next-style-name="SBC_3a_paragraph" style:class="text">
      <style:paragraph-properties fo:margin-left="0cm" fo:margin-right="0cm" fo:text-indent="0cm" style:auto-text-indent="false" fo:keep-with-next="always"/>
      <style:text-properties fo:font-weight="bold" style:font-weight-asian="bold"/>
    </style:style>
    <style:style style:name="Heading_20_9" style:display-name="Heading 9" style:family="paragraph" style:parent-style-name="Standard" style:next-style-name="SBC_3a_paragraph" style:class="text">
      <style:paragraph-properties fo:margin-left="0cm" fo:margin-right="0cm" fo:text-align="center" style:justify-single-word="false" fo:text-indent="0cm" style:auto-text-indent="false" fo:keep-with-next="always"/>
      <style:text-properties fo:language="pt" fo:country="BR" fo:font-weight="bold" style:language-asian="pt" style:country-asian="BR" style:font-weight-asian="bold"/>
    </style:style>
    <style:style style:name="Heading_20_10" style:display-name="Heading 10" style:family="paragraph" style:parent-style-name="Title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Lucidasans1" style:font-family-complex="Lucidasans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 style:font-family-complex="Lucidasans"/>
    </style:style>
    <style:style style:name="SBC_3a_author_28_s_29_" style:display-name="SBC:author(s)" style:family="paragraph" style:parent-style-name="Standard" style:next-style-name="SBC_3a_institution" style:master-page-name="">
      <style:paragraph-properties fo:margin-top="0.42cm" fo:margin-bottom="0cm" loext:contextual-spacing="false" fo:text-align="center" style:justify-single-word="false" style:page-number="auto"/>
      <style:text-properties fo:color="#000000" fo:language="pt" fo:country="BR" fo:font-weight="bold" style:language-asian="pt" style:country-asian="BR"/>
    </style:style>
    <style:style style:name="SBC_3a_address" style:display-name="SBC:address" style:family="paragraph" style:parent-style-name="Standard" style:next-style-name="SBC_3a_institution" style:master-page-name="">
      <style:paragraph-properties fo:text-align="center" style:justify-single-word="false" style:page-number="auto"/>
      <style:text-properties style:use-window-font-color="true" fo:font-size="12pt" fo:language="pt" fo:country="BR" fo:font-weight="normal" style:language-asian="pt" style:country-asian="BR"/>
    </style:style>
    <style:style style:name="SBC_3a_reference" style:display-name="SBC:reference" style:family="paragraph" style:parent-style-name="Standard" style:master-page-name="">
      <style:paragraph-properties fo:margin-left="0.499cm" fo:margin-right="0cm" fo:margin-top="0.21cm" fo:margin-bottom="0cm" loext:contextual-spacing="false" fo:text-align="justify" style:justify-single-word="false" fo:text-indent="-0.499cm" style:auto-text-indent="false" style:page-number="auto">
        <style:tab-stops/>
      </style:paragraph-properties>
      <style:text-properties fo:color="#000000" fo:language="pt" fo:country="BR" fo:font-weight="normal" style:language-asian="pt" style:country-asian="BR"/>
    </style:style>
    <style:style style:name="SBC_3a_paragraph" style:display-name="SBC:paragraph" style:family="paragraph" style:parent-style-name="Standard" style:master-page-name="">
      <style:paragraph-properties fo:margin-left="0cm" fo:margin-right="0cm" fo:margin-top="0.21cm" fo:margin-bottom="0cm" loext:contextual-spacing="false" fo:text-align="justify" style:justify-single-word="false" fo:text-indent="1.251cm" style:auto-text-indent="false" style:page-number="auto"/>
      <style:text-properties fo:color="#000000" fo:language="pt" fo:country="BR" fo:font-weight="normal" style:language-asian="pt" style:country-asian="BR"/>
    </style:style>
    <style:style style:name="SBC_3a_institution" style:display-name="SBC:institution" style:family="paragraph" style:parent-style-name="Standard" style:next-style-name="SBC_3a_address" style:master-page-name="">
      <style:paragraph-properties fo:margin-top="0.42cm" fo:margin-bottom="0cm" loext:contextual-spacing="false" fo:text-align="center" style:justify-single-word="false" style:page-number="auto"/>
      <style:text-properties fo:font-size="12pt"/>
    </style:style>
    <style:style style:name="SBC_3a_resumo" style:display-name="SBC:resumo" style:family="paragraph" style:parent-style-name="Standard" style:next-style-name="SBC_3a_title_3a_1" style:master-page-name="">
      <style:paragraph-properties fo:margin-left="0.801cm" fo:margin-right="0.801cm" fo:margin-top="0.21cm" fo:margin-bottom="0.21cm" loext:contextual-spacing="false" fo:text-align="justify" style:justify-single-word="false" fo:text-indent="0cm" style:auto-text-indent="false" style:page-number="auto"/>
      <style:text-properties fo:font-size="12pt" fo:font-style="italic"/>
    </style:style>
    <style:style style:name="SBC_3a_abstract" style:display-name="SBC:abstract" style:family="paragraph" style:parent-style-name="Standard" style:next-style-name="SBC_3a_resumo" style:master-page-name="">
      <style:paragraph-properties fo:margin-left="0.801cm" fo:margin-right="0.801cm" fo:margin-top="0.21cm" fo:margin-bottom="0.21cm" loext:contextual-spacing="false" fo:text-align="justify" style:justify-single-word="false" fo:text-indent="0cm" style:auto-text-indent="false" style:page-number="auto"/>
      <style:text-properties fo:language="en" fo:country="US" fo:font-style="italic" fo:font-weight="normal" style:font-style-asian="italic"/>
    </style:style>
    <style:style style:name="SBC_3a_list" style:display-name="SBC:list" style:family="paragraph" style:parent-style-name="Standard" style:list-style-name="SBC_3a_number_3a_list" style:master-page-name="">
      <style:paragraph-properties fo:margin-left="1.251cm" fo:margin-right="0cm" fo:text-align="justify" style:justify-single-word="false" fo:text-indent="0cm" style:auto-text-indent="false" style:page-number="auto">
        <style:tab-stops>
          <style:tab-stop style:position="0cm"/>
        </style:tab-stops>
      </style:paragraph-properties>
      <style:text-properties fo:language="pt" fo:country="BR" fo:font-weight="normal" style:language-asian="pt" style:country-asian="BR"/>
    </style:style>
    <style:style style:name="SBC_3a_figure" style:display-name="SBC:figure" style:family="paragraph" style:parent-style-name="Standard" style:next-style-name="SBC_3a_caption" style:master-page-name="">
      <style:paragraph-properties fo:margin-top="0.21cm" fo:margin-bottom="0cm" loext:contextual-spacing="false" fo:text-align="center" style:justify-single-word="false" fo:orphans="2" fo:widows="2" style:page-number="auto" fo:keep-with-next="always"/>
      <style:text-properties style:use-window-font-color="true" style:font-name="Times" fo:font-family="Times" style:font-style-name="Regular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SBC_3a_caption" style:display-name="SBC:caption" style:family="paragraph" style:parent-style-name="Standard" style:next-style-name="SBC_3a_paragraph" style:master-page-name="">
      <style:paragraph-properties fo:margin-left="0.801cm" fo:margin-right="0.801cm" fo:margin-top="0.21cm" fo:margin-bottom="0.21cm" loext:contextual-spacing="false" fo:text-align="center" style:justify-single-word="false" fo:orphans="2" fo:widows="2" fo:text-indent="0cm" style:auto-text-indent="false" style:page-number="auto"/>
      <style:text-properties style:use-window-font-color="true" style:font-name="Helvetica" fo:font-family="Helvetica" style:font-style-name="Bold" style:font-family-generic="swiss" style:font-pitch="variable" fo:font-size="10pt" fo:language="pt" fo:country="BR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SBC_3a_references" style:display-name="SBC:references" style:family="paragraph" style:parent-style-name="Standard" style:next-style-name="SBC_3a_reference" style:master-page-name="">
      <style:paragraph-properties fo:margin-top="0.42cm" fo:margin-bottom="0cm" loext:contextual-spacing="false" style:page-number="auto" fo:keep-with-next="always">
        <style:tab-stops/>
      </style:paragraph-properties>
      <style:text-properties fo:font-variant="normal" fo:text-transform="none" fo:font-size="13pt" fo:font-weight="bold"/>
    </style:style>
    <style:style style:name="SBC_3a_title" style:display-name="SBC:title" style:family="paragraph" style:parent-style-name="Standard" style:next-style-name="SBC_3a_author_28_s_29_" style:master-page-name="">
      <style:paragraph-properties fo:margin-top="0.42cm" fo:margin-bottom="0cm" loext:contextual-spacing="false" fo:text-align="center" style:justify-single-word="false" style:page-number="auto"/>
      <style:text-properties fo:font-variant="normal" fo:text-transform="none" fo:font-size="16pt" fo:font-weight="bold"/>
    </style:style>
    <style:style style:name="SBC_3a_title_3a_1" style:display-name="SBC:title:1" style:family="paragraph" style:parent-style-name="Standard" style:next-style-name="SBC_3a_paragraph_3a_first" style:default-outline-level="1" style:class="text" style:master-page-name="">
      <style:paragraph-properties fo:margin-top="0.42cm" fo:margin-bottom="0cm" loext:contextual-spacing="false" style:page-number="auto" fo:keep-with-next="always"/>
      <style:text-properties fo:font-variant="normal" fo:text-transform="none" fo:font-size="13pt" fo:font-weight="bold"/>
    </style:style>
    <style:style style:name="SBC_3a_title_3a_2" style:display-name="SBC:title:2" style:family="paragraph" style:parent-style-name="Standard" style:next-style-name="SBC_3a_paragraph_3a_first" style:default-outline-level="2" style:class="text" style:master-page-name="">
      <style:paragraph-properties fo:margin-top="0.42cm" fo:margin-bottom="0cm" loext:contextual-spacing="false" style:page-number="auto" fo:keep-with-next="always"/>
      <style:text-properties fo:font-size="12pt" fo:font-weight="bold"/>
    </style:style>
    <style:style style:name="SBC_3a_title_3a_3" style:display-name="SBC:title:3" style:family="paragraph" style:parent-style-name="Standard" style:next-style-name="SBC_3a_paragraph_3a_first" style:class="text" style:master-page-name="">
      <style:paragraph-properties fo:margin-top="0.199cm" fo:margin-bottom="0cm" loext:contextual-spacing="false" style:page-number="auto" fo:keep-with-next="always"/>
      <style:text-properties fo:font-weight="normal"/>
    </style:style>
    <style:style style:name="SBC_3a_list_3a_numbered" style:display-name="SBC:list:numbered" style:family="paragraph" style:parent-style-name="Standard" style:list-style-name="SBC_3a_number_3a_list_3a_numbered" style:master-page-name="">
      <style:paragraph-properties fo:margin-left="0cm" fo:margin-right="0cm" fo:text-align="justify" style:justify-single-word="false" fo:text-indent="0cm" style:auto-text-indent="false" style:page-number="auto" text:number-lines="true" text:line-number="1">
        <style:tab-stops>
          <style:tab-stop style:position="0cm"/>
        </style:tab-stops>
      </style:paragraph-properties>
      <style:text-properties fo:language="pt" fo:country="BR"/>
    </style:style>
    <style:style style:name="SBC_3a_footnote" style:display-name="SBC:footnote" style:family="paragraph" style:parent-style-name="Standard" style:master-page-name="">
      <style:paragraph-properties fo:margin-left="0.499cm" fo:margin-right="0cm" fo:margin-top="0.109cm" fo:margin-bottom="0cm" loext:contextual-spacing="false" fo:text-indent="-0.499cm" style:auto-text-indent="false" style:page-number="auto">
        <style:tab-stops/>
      </style:paragraph-properties>
      <style:text-properties fo:font-size="10pt"/>
    </style:style>
    <style:style style:name="SBC_3a_email" style:display-name="SBC:email" style:family="paragraph" style:parent-style-name="Standard" style:next-style-name="SBC_3a_abstract">
      <style:paragraph-properties fo:margin-top="0.21cm" fo:margin-bottom="0.21cm" loext:contextual-spacing="false" fo:text-align="center" style:justify-single-word="false"/>
      <style:text-properties style:font-name="Courier" fo:font-family="Courier" style:font-style-name="Regular" style:font-family-generic="modern" style:font-pitch="fixed" fo:font-size="10pt"/>
    </style:style>
    <style:style style:name="SBC_3a_paragraph_3a_first" style:display-name="SBC:paragraph:first" style:family="paragraph" style:parent-style-name="SBC_3a_paragraph" style:next-style-name="SBC_3a_paragraph">
      <style:paragraph-properties fo:margin-left="0cm" fo:margin-right="0cm" fo:margin-top="0.21cm" fo:margin-bottom="0cm" loext:contextual-spacing="false" fo:text-indent="0cm" style:auto-text-indent="false"/>
    </style:style>
    <style:style style:name="SBC_3a_caption_3a_2lines" style:display-name="SBC:caption:2lines" style:family="paragraph" style:parent-style-name="SBC_3a_caption" style:next-style-name="SBC_3a_paragraph" style:master-page-name="">
      <style:paragraph-properties fo:text-align="justify" style:justify-single-word="false" style:page-number="auto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Footnote_20_Symbol" style:display-name="Footnote Symbol" style:family="text"/>
    <style:style style:name="Page_20_Number" style:display-name="Page Number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11pt" fo:background-color="transparen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Zeichenformat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min-label-width="0.75cm"/>
      </text:outline-level-style>
      <text:outline-level-style text:level="2" style:num-suffix="." style:num-format="1" text:display-levels="2">
        <style:list-level-properties text:min-label-width="1cm"/>
      </text:outline-level-style>
      <text:outline-level-style text:level="3" style:num-suffix="." style:num-format="1" text:display-levels="3">
        <style:list-level-properties text:min-label-width="1.251cm"/>
      </text:outline-level-style>
      <text:outline-level-style text:level="4" style:num-suffix="." style:num-format="1" text:display-levels="4">
        <style:list-level-properties text:min-label-width="1.524cm"/>
      </text:outline-level-style>
      <text:outline-level-style text:level="5" style:num-suffix="." style:num-format="1" text:display-levels="5">
        <style:list-level-properties text:min-label-width="1.778cm"/>
      </text:outline-level-style>
      <text:outline-level-style text:level="6" style:num-suffix="." style:num-format="1" text:display-levels="6">
        <style:list-level-properties text:min-label-width="2.032cm"/>
      </text:outline-level-style>
      <text:outline-level-style text:level="7" style:num-suffix="." style:num-format="1" text:display-levels="7">
        <style:list-level-properties text:min-label-width="2.286cm"/>
      </text:outline-level-style>
      <text:outline-level-style text:level="8" style:num-suffix="." style:num-format="1" text:display-levels="8">
        <style:list-level-properties text:min-label-width="2.54cm"/>
      </text:outline-level-style>
      <text:outline-level-style text:level="9" style:num-suffix="." style:num-format="1" text:display-levels="9">
        <style:list-level-properties text:min-label-width="2.794cm"/>
      </text:outline-level-style>
      <text:outline-level-style text:level="10" style:num-suffix="." style:num-format="1" text:display-levels="10">
        <style:list-level-properties/>
      </text:outline-level-style>
    </text:outline-style>
    <text:list-style style:name="SBC_3a_number_3a_list" style:display-name="SBC:number:list" text:consecutive-numbering="true">
      <text:list-level-style-bullet text:level="1" text:style-name="Zeichenformat" text:bullet-char="•">
        <style:list-level-properties text:min-label-width="0.499cm"/>
        <style:text-properties style:font-name="StarSymbol"/>
      </text:list-level-style-bullet>
      <text:list-level-style-bullet text:level="2" text:style-name="Zeichenformat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Zeichenformat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Zeichenformat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Zeichenformat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Zeichenformat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Zeichenformat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Zeichenformat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Zeichenformat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Zeichenformat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SBC_3a_number_3a_list_3a_numbered" style:display-name="SBC:number:list:numbered" text:consecutive-numbering="true">
      <text:list-level-style-number text:level="1" text:style-name="Zeichenformat" style:num-suffix="." style:num-format="1">
        <style:list-level-properties text:space-before="1.25cm" text:min-label-width="0.75cm"/>
      </text:list-level-style-number>
      <text:list-level-style-number text:level="2" text:style-name="Zeichenformat" style:num-suffix="." style:num-format="1">
        <style:list-level-properties text:space-before="3.251cm" text:min-label-width="0.75cm"/>
      </text:list-level-style-number>
      <text:list-level-style-number text:level="3" text:style-name="Zeichenformat" style:num-suffix="." style:num-format="1">
        <style:list-level-properties text:space-before="5.251cm" text:min-label-width="0.75cm"/>
      </text:list-level-style-number>
      <text:list-level-style-number text:level="4" text:style-name="Zeichenformat" style:num-suffix="." style:num-format="1">
        <style:list-level-properties text:space-before="7.251cm" text:min-label-width="0.75cm"/>
      </text:list-level-style-number>
      <text:list-level-style-number text:level="5" text:style-name="Zeichenformat" style:num-suffix="." style:num-format="1">
        <style:list-level-properties text:space-before="9.251cm" text:min-label-width="0.75cm"/>
      </text:list-level-style-number>
      <text:list-level-style-number text:level="6" text:style-name="Zeichenformat" style:num-suffix="." style:num-format="1">
        <style:list-level-properties text:space-before="11.252cm" text:min-label-width="0.75cm"/>
      </text:list-level-style-number>
      <text:list-level-style-number text:level="7" text:style-name="Zeichenformat" style:num-suffix="." style:num-format="1">
        <style:list-level-properties text:space-before="13.252cm" text:min-label-width="0.75cm"/>
      </text:list-level-style-number>
      <text:list-level-style-number text:level="8" text:style-name="Zeichenformat" style:num-suffix="." style:num-format="1">
        <style:list-level-properties text:space-before="15.252cm" text:min-label-width="0.75cm"/>
      </text:list-level-style-number>
      <text:list-level-style-number text:level="9" text:style-name="Zeichenformat" style:num-suffix="." style:num-format="1">
        <style:list-level-properties text:space-before="17.252cm" text:min-label-width="0.75cm"/>
      </text:list-level-style-number>
      <text:list-level-style-number text:level="10" text:style-name="Zeichenformat" style:num-suffix="." style:num-format="1">
        <style:list-level-properties text:space-before="19.253cm" text:min-label-width="0.7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.5cm" fo:margin-bottom="2.499cm" fo:margin-left="3cm" fo:margin-right="3cm" style:writing-mode="lr-tb" style:layout-grid-color="#c0c0c0" style:layout-grid-lines="42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4.2$Linux_X86_64 LibreOffice_project/9b0d9b32d5dcda91d2f1a96dc04c645c450872bf</meta:generator>
    <meta:creation-date>2010-08-03T10:11:27.48</meta:creation-date>
    <dc:language>pt-BR</dc:language>
    <meta:editing-cycles>19</meta:editing-cycles>
    <meta:editing-duration>PT1H27M23S</meta:editing-duration>
    <dc:date>2018-09-20T04:45:47.290509183</dc:date>
    <meta:document-statistic meta:table-count="0" meta:image-count="13" meta:object-count="0" meta:page-count="14" meta:paragraph-count="188" meta:word-count="2150" meta:character-count="13039" meta:non-whitespace-character-count="10862"/>
    <meta:user-defined meta:name="Info 1"/>
    <meta:user-defined meta:name="Info 2"/>
    <meta:user-defined meta:name="Info 3"/>
    <meta:user-defined meta:name="Info 4"/>
  </office:meta>
</office:document-meta>
</file>