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0000001D730F6D7B77E060958.png" manifest:media-type="image/png"/>
  <manifest:file-entry manifest:full-path="Pictures/10000201000002D0000001D77BC1258F96920A63.png" manifest:media-type="image/png"/>
  <manifest:file-entry manifest:full-path="Pictures/10000201000002D0000001D746A9A07CF8462289.png" manifest:media-type="image/png"/>
  <manifest:file-entry manifest:full-path="Pictures/10000201000002D0000001D7D3CB24F9152D3FFA.png" manifest:media-type="image/png"/>
  <manifest:file-entry manifest:full-path="Pictures/10000201000002D0000001D7C404AD34E7AA8300.png" manifest:media-type="image/png"/>
  <manifest:file-entry manifest:full-path="Pictures/10000201000002D0000001D74C49526877C9154B.png" manifest:media-type="image/png"/>
  <manifest:file-entry manifest:full-path="Pictures/10000201000002D0000001D780F152E3388004CB.png" manifest:media-type="image/png"/>
  <manifest:file-entry manifest:full-path="Pictures/10000201000002D0000001D747407001C98B6D10.png" manifest:media-type="image/png"/>
  <manifest:file-entry manifest:full-path="Pictures/10000201000002AF000001BD2856DD504A988C94.png" manifest:media-type="image/png"/>
  <manifest:file-entry manifest:full-path="Pictures/10000201000002D0000001D7FB072660B6917E42.png" manifest:media-type="image/png"/>
  <manifest:file-entry manifest:full-path="Pictures/10000201000002D0000001D7779EDD47A9324C58.png" manifest:media-type="image/png"/>
  <manifest:file-entry manifest:full-path="Pictures/10000201000002D0000001D742BDA2C9B4E48423.png" manifest:media-type="image/png"/>
  <manifest:file-entry manifest:full-path="Pictures/10000201000002D0000001D7B3D15B0162581713.png" manifest:media-type="image/png"/>
  <manifest:file-entry manifest:full-path="Pictures/10000201000002D0000001D7FDF6E0875D4C446B.png" manifest:media-type="image/png"/>
  <manifest:file-entry manifest:full-path="Pictures/10000201000002D0000001D72CC2CA2F05D21017.png" manifest:media-type="image/png"/>
  <manifest:file-entry manifest:full-path="Pictures/1000020100000338000001FCF512C06BC2F17CC0.png" manifest:media-type="image/png"/>
  <manifest:file-entry manifest:full-path="Pictures/10000201000002D0000001D705FFACA8D2549EC9.png" manifest:media-type="image/png"/>
  <manifest:file-entry manifest:full-path="Pictures/10000201000002D0000001D73784FF32CF0A500D.png" manifest:media-type="image/png"/>
  <manifest:file-entry manifest:full-path="Pictures/10000201000002D0000001D72F635A1108240BB6.png" manifest:media-type="image/png"/>
  <manifest:file-entry manifest:full-path="Pictures/10000201000002D0000001D7CAE0747C169B83A7.png" manifest:media-type="image/png"/>
  <manifest:file-entry manifest:full-path="Pictures/10000201000002D0000001D7D66565802D7FC86F.png" manifest:media-type="image/png"/>
  <manifest:file-entry manifest:full-path="Pictures/10000201000002D0000001D7762352DCA18CCEB4.png" manifest:media-type="image/png"/>
  <manifest:file-entry manifest:full-path="Pictures/100002010000032F000001C98A33538A7032B411.png" manifest:media-type="image/png"/>
  <manifest:file-entry manifest:full-path="Pictures/100002010000032F000001C9B979DCF72050DD56.png" manifest:media-type="image/png"/>
  <manifest:file-entry manifest:full-path="Pictures/10000201000002D0000001D70116A5E762418A5A.png" manifest:media-type="image/png"/>
  <manifest:file-entry manifest:full-path="Pictures/10000201000002DE000001B850262481C0783075.png" manifest:media-type="image/png"/>
  <manifest:file-entry manifest:full-path="Pictures/10000201000002D0000001D7ED9761D68425D8EE.png" manifest:media-type="image/png"/>
  <manifest:file-entry manifest:full-path="Pictures/10000201000002FF0000028000B94C0665CC8B52.png" manifest:media-type="image/png"/>
  <manifest:file-entry manifest:full-path="Pictures/10000201000002D0000001D7DB3E536BC49F7E15.png" manifest:media-type="image/png"/>
  <manifest:file-entry manifest:full-path="Pictures/10000201000002D0000001D751CA943B6C7DF832.png" manifest:media-type="image/png"/>
  <manifest:file-entry manifest:full-path="Pictures/1000020100000291000002E8A230034D86D495C6.png" manifest:media-type="image/png"/>
  <manifest:file-entry manifest:full-path="Pictures/10000201000002DE000001B86C369F4AD41481FC.png" manifest:media-type="image/png"/>
  <manifest:file-entry manifest:full-path="Pictures/10000201000002D0000001D7011EA66F9EBE3FC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Times2" svg:font-family="Times" style:font-family-generic="roman"/>
    <style:font-face style:name="TimesNewRoman,Bold" svg:font-family="'TimesNewRoman,Bold'" style:font-family-generic="roman"/>
    <style:font-face style:name="Helvetica1" svg:font-family="Helvetica" style:font-family-generic="swiss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BC_3a_paragraph">
      <style:text-properties officeooo:rsid="00409f03" officeooo:paragraph-rsid="00409f03"/>
    </style:style>
    <style:style style:name="P2" style:family="paragraph" style:parent-style-name="SBC_3a_paragraph">
      <style:text-properties fo:font-style="normal" officeooo:rsid="00409f03" officeooo:paragraph-rsid="00409f03" style:font-style-asian="normal" style:font-style-complex="normal"/>
    </style:style>
    <style:style style:name="P3" style:family="paragraph" style:parent-style-name="SBC_3a_paragraph">
      <style:paragraph-properties fo:margin-left="0cm" fo:margin-right="0cm" fo:text-indent="0cm" style:auto-text-indent="false"/>
      <style:text-properties officeooo:rsid="00409f03" officeooo:paragraph-rsid="00409f03"/>
    </style:style>
    <style:style style:name="P4" style:family="paragraph" style:parent-style-name="SBC_3a_paragraph">
      <style:paragraph-properties fo:margin-left="0cm" fo:margin-right="0cm" fo:text-indent="0cm" style:auto-text-indent="false"/>
      <style:text-properties fo:font-style="normal" officeooo:rsid="004155de" officeooo:paragraph-rsid="004155de" style:font-style-asian="normal" style:font-style-complex="normal"/>
    </style:style>
    <style:style style:name="P5" style:family="paragraph" style:parent-style-name="SBC_3a_references">
      <style:text-properties officeooo:paragraph-rsid="0048cf83"/>
    </style:style>
    <style:style style:name="P6" style:family="paragraph" style:parent-style-name="SBC_3a_paragraph_3a_first">
      <style:text-properties officeooo:rsid="00409f03" officeooo:paragraph-rsid="00409f03"/>
    </style:style>
    <style:style style:name="P7" style:family="paragraph" style:parent-style-name="SBC_3a_paragraph">
      <style:paragraph-properties fo:text-align="center" style:justify-single-word="false"/>
      <style:text-properties fo:font-style="normal" fo:font-weight="bold" officeooo:rsid="00663be2" officeooo:paragraph-rsid="00663be2" style:font-style-asian="normal" style:font-weight-asian="bold" style:font-style-complex="normal" style:font-weight-complex="bold"/>
    </style:style>
    <style:style style:name="P8" style:family="paragraph" style:parent-style-name="SBC_3a_paragraph">
      <style:text-properties officeooo:rsid="005582a8" officeooo:paragraph-rsid="005582a8"/>
    </style:style>
    <style:style style:name="P9" style:family="paragraph" style:parent-style-name="SBC_3a_paragraph">
      <style:text-properties officeooo:rsid="005582a8" officeooo:paragraph-rsid="005769aa"/>
    </style:style>
    <style:style style:name="P10" style:family="paragraph" style:parent-style-name="SBC_3a_paragraph">
      <style:paragraph-properties fo:text-align="center" style:justify-single-word="false"/>
      <style:text-properties fo:font-weight="bold" officeooo:rsid="005d73cf" officeooo:paragraph-rsid="005d73cf" style:font-weight-asian="bold" style:font-weight-complex="bold"/>
    </style:style>
    <style:style style:name="P11" style:family="paragraph" style:parent-style-name="SBC_3a_paragraph">
      <style:paragraph-properties fo:text-align="center" style:justify-single-word="false"/>
      <style:text-properties fo:font-weight="bold" officeooo:rsid="005f9adf" officeooo:paragraph-rsid="005f9adf" style:font-weight-asian="bold" style:font-weight-complex="bold"/>
    </style:style>
    <style:style style:name="P12" style:family="paragraph" style:parent-style-name="SBC_3a_paragraph">
      <style:paragraph-properties fo:text-align="center" style:justify-single-word="false"/>
      <style:text-properties fo:font-weight="bold" officeooo:rsid="00611fbb" officeooo:paragraph-rsid="00611fbb" style:font-weight-asian="bold" style:font-weight-complex="bold"/>
    </style:style>
    <style:style style:name="P13" style:family="paragraph" style:parent-style-name="SBC_3a_paragraph">
      <style:paragraph-properties fo:text-align="center" style:justify-single-word="false"/>
      <style:text-properties fo:font-weight="bold" officeooo:rsid="0062e000" officeooo:paragraph-rsid="0062e000" style:font-weight-asian="bold" style:font-weight-complex="bold"/>
    </style:style>
    <style:style style:name="P14" style:family="paragraph" style:parent-style-name="SBC_3a_paragraph">
      <style:paragraph-properties fo:text-align="center" style:justify-single-word="false"/>
      <style:text-properties fo:font-weight="bold" officeooo:rsid="0065228b" officeooo:paragraph-rsid="0065228b" style:font-weight-asian="bold" style:font-weight-complex="bold"/>
    </style:style>
    <style:style style:name="P15" style:family="paragraph" style:parent-style-name="SBC_3a_paragraph">
      <style:paragraph-properties fo:text-align="center" style:justify-single-word="false"/>
      <style:text-properties fo:font-weight="bold" officeooo:rsid="00663be2" officeooo:paragraph-rsid="00663be2" style:font-weight-asian="bold" style:font-weight-complex="bold"/>
    </style:style>
    <style:style style:name="P16" style:family="paragraph" style:parent-style-name="SBC_3a_paragraph">
      <style:paragraph-properties fo:text-align="center" style:justify-single-word="false"/>
      <style:text-properties fo:font-weight="bold" officeooo:rsid="00663bfc" officeooo:paragraph-rsid="00663bfc" style:font-weight-asian="bold" style:font-weight-complex="bold"/>
    </style:style>
    <style:style style:name="P17" style:family="paragraph" style:parent-style-name="SBC_3a_paragraph">
      <style:paragraph-properties fo:text-align="center" style:justify-single-word="false"/>
      <style:text-properties fo:font-weight="bold" officeooo:rsid="00741272" officeooo:paragraph-rsid="00741272" style:font-weight-asian="bold" style:font-weight-complex="bold"/>
    </style:style>
    <style:style style:name="P18" style:family="paragraph" style:parent-style-name="SBC_3a_paragraph">
      <style:paragraph-properties fo:text-align="center" style:justify-single-word="false"/>
      <style:text-properties fo:font-weight="bold" officeooo:rsid="00746dac" officeooo:paragraph-rsid="00746dac" style:font-weight-asian="bold" style:font-weight-complex="bold"/>
    </style:style>
    <style:style style:name="P19" style:family="paragraph" style:parent-style-name="SBC_3a_paragraph">
      <style:text-properties officeooo:paragraph-rsid="005b2809"/>
    </style:style>
    <style:style style:name="P20" style:family="paragraph" style:parent-style-name="SBC_3a_paragraph" style:list-style-name="L4">
      <style:text-properties officeooo:paragraph-rsid="005b506a"/>
    </style:style>
    <style:style style:name="P21" style:family="paragraph" style:parent-style-name="SBC_3a_paragraph" style:list-style-name="L4">
      <style:text-properties officeooo:rsid="005c4396" officeooo:paragraph-rsid="005c4396"/>
    </style:style>
    <style:style style:name="P22" style:family="paragraph" style:parent-style-name="SBC_3a_paragraph">
      <style:text-properties officeooo:rsid="005c4396" officeooo:paragraph-rsid="005c4396"/>
    </style:style>
    <style:style style:name="P23" style:family="paragraph" style:parent-style-name="SBC_3a_paragraph" style:list-style-name="L4">
      <style:text-properties officeooo:rsid="005e02f4" officeooo:paragraph-rsid="005e02f4"/>
    </style:style>
    <style:style style:name="P24" style:family="paragraph" style:parent-style-name="SBC_3a_paragraph">
      <style:text-properties officeooo:rsid="005e02f4" officeooo:paragraph-rsid="005e02f4"/>
    </style:style>
    <style:style style:name="P25" style:family="paragraph" style:parent-style-name="SBC_3a_paragraph">
      <style:paragraph-properties fo:text-align="center" style:justify-single-word="false"/>
      <style:text-properties officeooo:rsid="005e02f4" officeooo:paragraph-rsid="005f9adf"/>
    </style:style>
    <style:style style:name="P26" style:family="paragraph" style:parent-style-name="SBC_3a_paragraph" style:list-style-name="L4">
      <style:text-properties officeooo:rsid="006231b5" officeooo:paragraph-rsid="006231b5"/>
    </style:style>
    <style:style style:name="P27" style:family="paragraph" style:parent-style-name="SBC_3a_paragraph" style:list-style-name="L4">
      <style:text-properties officeooo:rsid="0062e000" officeooo:paragraph-rsid="0062e000"/>
    </style:style>
    <style:style style:name="P28" style:family="paragraph" style:parent-style-name="SBC_3a_paragraph">
      <style:text-properties officeooo:rsid="0062e000" officeooo:paragraph-rsid="0062e000"/>
    </style:style>
    <style:style style:name="P29" style:family="paragraph" style:parent-style-name="SBC_3a_paragraph">
      <style:text-properties officeooo:rsid="0065228b" officeooo:paragraph-rsid="0065228b"/>
    </style:style>
    <style:style style:name="P30" style:family="paragraph" style:parent-style-name="SBC_3a_paragraph" style:list-style-name="L6">
      <style:text-properties officeooo:rsid="00663be2" officeooo:paragraph-rsid="00663be2"/>
    </style:style>
    <style:style style:name="P31" style:family="paragraph" style:parent-style-name="SBC_3a_paragraph">
      <style:text-properties officeooo:rsid="00663be2" officeooo:paragraph-rsid="00663be2"/>
    </style:style>
    <style:style style:name="P32" style:family="paragraph" style:parent-style-name="SBC_3a_paragraph">
      <style:paragraph-properties fo:text-align="center" style:justify-single-word="false"/>
      <style:text-properties officeooo:rsid="00663be2" officeooo:paragraph-rsid="00663be2"/>
    </style:style>
    <style:style style:name="P33" style:family="paragraph" style:parent-style-name="SBC_3a_paragraph" style:list-style-name="L6">
      <style:text-properties officeooo:rsid="00663bfc" officeooo:paragraph-rsid="00663bfc"/>
    </style:style>
    <style:style style:name="P34" style:family="paragraph" style:parent-style-name="SBC_3a_paragraph">
      <style:text-properties officeooo:rsid="00663bfc" officeooo:paragraph-rsid="00663bfc"/>
    </style:style>
    <style:style style:name="P35" style:family="paragraph" style:parent-style-name="SBC_3a_paragraph" style:list-style-name="L6">
      <style:text-properties officeooo:rsid="0067133c" officeooo:paragraph-rsid="0067133c"/>
    </style:style>
    <style:style style:name="P36" style:family="paragraph" style:parent-style-name="SBC_3a_paragraph" style:list-style-name="L8">
      <style:text-properties officeooo:rsid="00726e9f" officeooo:paragraph-rsid="00726e9f"/>
    </style:style>
    <style:style style:name="P37" style:family="paragraph" style:parent-style-name="SBC_3a_paragraph">
      <style:text-properties officeooo:rsid="00726e9f" officeooo:paragraph-rsid="00726e9f"/>
    </style:style>
    <style:style style:name="P38" style:family="paragraph" style:parent-style-name="SBC_3a_paragraph">
      <style:paragraph-properties fo:text-align="center" style:justify-single-word="false"/>
      <style:text-properties officeooo:rsid="00741272" officeooo:paragraph-rsid="00741272"/>
    </style:style>
    <style:style style:name="P39" style:family="paragraph" style:parent-style-name="SBC_3a_paragraph" style:list-style-name="L8">
      <style:text-properties officeooo:rsid="00741272" officeooo:paragraph-rsid="00741272"/>
    </style:style>
    <style:style style:name="P40" style:family="paragraph" style:parent-style-name="SBC_3a_paragraph">
      <style:text-properties officeooo:rsid="00741272" officeooo:paragraph-rsid="00741272"/>
    </style:style>
    <style:style style:name="P41" style:family="paragraph" style:parent-style-name="SBC_3a_paragraph">
      <style:paragraph-properties fo:text-align="center" style:justify-single-word="false"/>
      <style:text-properties officeooo:rsid="00746dac" officeooo:paragraph-rsid="00746dac"/>
    </style:style>
    <style:style style:name="P42" style:family="paragraph" style:parent-style-name="SBC_3a_paragraph" style:list-style-name="L8">
      <style:text-properties officeooo:rsid="00746dac" officeooo:paragraph-rsid="00746dac"/>
    </style:style>
    <style:style style:name="P43" style:family="paragraph" style:parent-style-name="SBC_3a_paragraph">
      <style:paragraph-properties fo:margin-left="0cm" fo:margin-right="0cm" fo:text-indent="0cm" style:auto-text-indent="false"/>
      <style:text-properties officeooo:rsid="00409f03" officeooo:paragraph-rsid="00409f03"/>
    </style:style>
    <style:style style:name="P44" style:family="paragraph" style:parent-style-name="SBC_3a_paragraph">
      <style:paragraph-properties fo:margin-left="0cm" fo:margin-right="0cm" fo:text-align="justify" style:justify-single-word="false" fo:text-indent="0cm" style:auto-text-indent="false"/>
      <style:text-properties officeooo:rsid="004e8d5b" officeooo:paragraph-rsid="004e8d5b"/>
    </style:style>
    <style:style style:name="P45" style:family="paragraph" style:parent-style-name="SBC_3a_paragraph">
      <style:paragraph-properties fo:margin-left="0cm" fo:margin-right="0cm" fo:text-align="center" style:justify-single-word="false" fo:text-indent="0cm" style:auto-text-indent="false"/>
      <style:text-properties fo:font-weight="bold" officeooo:rsid="004e8d5b" officeooo:paragraph-rsid="004e8d5b" style:font-weight-asian="bold" style:font-weight-complex="bold"/>
    </style:style>
    <style:style style:name="P46" style:family="paragraph" style:parent-style-name="SBC_3a_paragraph">
      <style:paragraph-properties fo:margin-left="0cm" fo:margin-right="0cm" fo:text-align="center" style:justify-single-word="false" fo:text-indent="0cm" style:auto-text-indent="false"/>
      <style:text-properties fo:font-weight="bold" officeooo:rsid="005582a8" officeooo:paragraph-rsid="005582a8" style:font-weight-asian="bold" style:font-weight-complex="bold"/>
    </style:style>
    <style:style style:name="P47" style:family="paragraph" style:parent-style-name="SBC_3a_paragraph">
      <style:paragraph-properties fo:margin-left="0cm" fo:margin-right="0cm" fo:text-align="center" style:justify-single-word="false" fo:text-indent="0cm" style:auto-text-indent="false"/>
      <style:text-properties fo:font-weight="bold" officeooo:rsid="0058625b" officeooo:paragraph-rsid="0058625b" style:font-weight-asian="bold" style:font-weight-complex="bold"/>
    </style:style>
    <style:style style:name="P48" style:family="paragraph" style:parent-style-name="SBC_3a_paragraph">
      <style:paragraph-properties fo:margin-left="0cm" fo:margin-right="0cm" fo:text-indent="0cm" style:auto-text-indent="false"/>
      <style:text-properties officeooo:rsid="004155de" officeooo:paragraph-rsid="004155de"/>
    </style:style>
    <style:style style:name="P49" style:family="paragraph" style:parent-style-name="SBC_3a_paragraph">
      <style:paragraph-properties fo:margin-left="0cm" fo:margin-right="0cm" fo:text-indent="0cm" style:auto-text-indent="false"/>
      <style:text-properties style:font-name="Helvetica1" fo:font-size="10pt" fo:font-style="normal" fo:font-weight="bold" officeooo:rsid="0045e376" officeooo:paragraph-rsid="004155de" style:font-size-asian="10pt" style:font-style-asian="normal" style:font-weight-asian="bold" style:font-size-complex="10pt" style:font-style-complex="normal" style:font-weight-complex="bold"/>
    </style:style>
    <style:style style:name="P50" style:family="paragraph" style:parent-style-name="SBC_3a_paragraph">
      <style:paragraph-properties fo:margin-left="0cm" fo:margin-right="0cm" fo:text-align="center" style:justify-single-word="false" fo:text-indent="0cm" style:auto-text-indent="false"/>
      <style:text-properties style:font-name="Times2" fo:font-size="12pt" fo:font-style="normal" fo:font-weight="bold" officeooo:rsid="0052161a" officeooo:paragraph-rsid="0052161a" style:font-size-asian="10.5pt" style:font-style-asian="normal" style:font-weight-asian="bold" style:font-size-complex="12pt" style:font-style-complex="normal" style:font-weight-complex="bold"/>
    </style:style>
    <style:style style:name="P51" style:family="paragraph" style:parent-style-name="SBC_3a_paragraph">
      <style:paragraph-properties fo:margin-left="0cm" fo:margin-right="0cm" fo:text-align="center" style:justify-single-word="false" fo:text-indent="0cm" style:auto-text-indent="false"/>
      <style:text-properties style:font-name="Times2" fo:font-size="12pt" fo:font-style="normal" fo:font-weight="bold" officeooo:rsid="00531c39" officeooo:paragraph-rsid="00531c39" style:font-size-asian="10.5pt" style:font-style-asian="normal" style:font-weight-asian="bold" style:font-size-complex="12pt" style:font-style-complex="normal" style:font-weight-complex="bold"/>
    </style:style>
    <style:style style:name="P52" style:family="paragraph" style:parent-style-name="SBC_3a_paragraph">
      <style:paragraph-properties fo:margin-left="0cm" fo:margin-right="0cm" fo:text-align="center" style:justify-single-word="false" fo:text-indent="0cm" style:auto-text-indent="false"/>
      <style:text-properties style:font-name="Times2" fo:font-size="12pt" fo:font-style="normal" fo:font-weight="bold" officeooo:rsid="0053e586" officeooo:paragraph-rsid="0053e586" style:font-size-asian="10.5pt" style:font-style-asian="normal" style:font-weight-asian="bold" style:font-size-complex="12pt" style:font-style-complex="normal" style:font-weight-complex="bold"/>
    </style:style>
    <style:style style:name="P53" style:family="paragraph" style:parent-style-name="SBC_3a_paragraph">
      <style:paragraph-properties fo:margin-left="0cm" fo:margin-right="0cm" fo:text-indent="0cm" style:auto-text-indent="false"/>
      <style:text-properties officeooo:paragraph-rsid="0052161a"/>
    </style:style>
    <style:style style:name="P54" style:family="paragraph" style:parent-style-name="SBC_3a_paragraph">
      <style:paragraph-properties fo:margin-left="0cm" fo:margin-right="0cm" fo:text-indent="0cm" style:auto-text-indent="false"/>
      <style:text-properties officeooo:rsid="005582a8" officeooo:paragraph-rsid="005769aa"/>
    </style:style>
    <style:style style:name="P55" style:family="paragraph" style:parent-style-name="SBC_3a_paragraph">
      <style:paragraph-properties fo:margin-left="0cm" fo:margin-right="0cm" fo:text-indent="0cm" style:auto-text-indent="false"/>
      <style:text-properties officeooo:rsid="0065228b" officeooo:paragraph-rsid="0065228b"/>
    </style:style>
    <style:style style:name="P56" style:family="paragraph" style:parent-style-name="SBC_3a_paragraph">
      <style:paragraph-properties fo:margin-left="0cm" fo:margin-right="0cm" fo:text-indent="0cm" style:auto-text-indent="false"/>
      <style:text-properties officeooo:rsid="00663be2" officeooo:paragraph-rsid="00663be2"/>
    </style:style>
    <style:style style:name="P57" style:family="paragraph" style:parent-style-name="SBC_3a_title" style:master-page-name="Standard">
      <style:paragraph-properties style:page-number="auto"/>
      <style:text-properties officeooo:rsid="00195d0b" officeooo:paragraph-rsid="00195d0b"/>
    </style:style>
    <style:style style:name="P58" style:family="paragraph" style:parent-style-name="SBC_3a_title_3a_1">
      <style:text-properties officeooo:rsid="00195d0b" officeooo:paragraph-rsid="001b1e7a"/>
    </style:style>
    <style:style style:name="P59" style:family="paragraph" style:parent-style-name="SBC_3a_title_3a_1">
      <style:text-properties officeooo:rsid="00195d0b" officeooo:paragraph-rsid="00552909"/>
    </style:style>
    <style:style style:name="P60" style:family="paragraph" style:parent-style-name="SBC_3a_title_3a_1">
      <style:text-properties officeooo:rsid="005989f9" officeooo:paragraph-rsid="005989f9"/>
    </style:style>
    <style:style style:name="P61" style:family="paragraph" style:parent-style-name="SBC_3a_title_3a_1">
      <style:text-properties officeooo:rsid="0063a79c" officeooo:paragraph-rsid="0063a79c"/>
    </style:style>
    <style:style style:name="P62" style:family="paragraph" style:parent-style-name="SBC_3a_title_3a_1">
      <style:text-properties officeooo:paragraph-rsid="00726e9f"/>
    </style:style>
    <style:style style:name="P63" style:family="paragraph" style:parent-style-name="SBC_3a_title_3a_1">
      <style:text-properties officeooo:paragraph-rsid="001b1e7a"/>
    </style:style>
    <style:style style:name="P64" style:family="paragraph" style:parent-style-name="SBC_3a_title_3a_1">
      <style:text-properties officeooo:rsid="00759a4b" officeooo:paragraph-rsid="00759a4b"/>
    </style:style>
    <style:style style:name="P65" style:family="paragraph" style:parent-style-name="SBC_3a_paragraph_3a_first">
      <style:text-properties officeooo:paragraph-rsid="00552909"/>
    </style:style>
    <style:style style:name="P66" style:family="paragraph" style:parent-style-name="SBC_3a_paragraph_3a_first">
      <style:text-properties officeooo:rsid="005582a8" officeooo:paragraph-rsid="005582a8"/>
    </style:style>
    <style:style style:name="P67" style:family="paragraph" style:parent-style-name="SBC_3a_paragraph_3a_first">
      <style:text-properties officeooo:paragraph-rsid="001b1e7a"/>
    </style:style>
    <style:style style:name="P68" style:family="paragraph" style:parent-style-name="SBC_3a_paragraph_3a_first">
      <style:text-properties officeooo:rsid="005989f9" officeooo:paragraph-rsid="005989f9"/>
    </style:style>
    <style:style style:name="P69" style:family="paragraph" style:parent-style-name="SBC_3a_paragraph_3a_first" style:list-style-name="L6">
      <style:text-properties officeooo:rsid="0065228b" officeooo:paragraph-rsid="0065228b"/>
    </style:style>
    <style:style style:name="P70" style:family="paragraph" style:parent-style-name="SBC_3a_paragraph_3a_first">
      <style:text-properties officeooo:paragraph-rsid="00726e9f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95d0b"/>
    </style:style>
    <style:style style:name="T3" style:family="text">
      <style:text-properties style:text-position="super 58%" officeooo:rsid="00318778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4d90e4" style:font-style-asian="italic" style:font-style-complex="italic"/>
    </style:style>
    <style:style style:name="T6" style:family="text">
      <style:text-properties fo:font-style="italic" officeooo:rsid="004e8d5b" style:font-style-asian="italic" style:font-style-complex="italic"/>
    </style:style>
    <style:style style:name="T7" style:family="text">
      <style:text-properties fo:font-style="italic" officeooo:rsid="005039c3" style:font-style-asian="italic" style:font-style-complex="italic"/>
    </style:style>
    <style:style style:name="T8" style:family="text">
      <style:text-properties fo:font-style="italic" officeooo:rsid="0052161a" style:font-style-asian="italic" style:font-style-complex="italic"/>
    </style:style>
    <style:style style:name="T9" style:family="text">
      <style:text-properties fo:font-style="italic" officeooo:rsid="00531c39" style:font-style-asian="italic" style:font-style-complex="italic"/>
    </style:style>
    <style:style style:name="T10" style:family="text">
      <style:text-properties fo:font-style="italic" officeooo:rsid="0053e586" style:font-style-asian="italic" style:font-style-complex="italic"/>
    </style:style>
    <style:style style:name="T11" style:family="text">
      <style:text-properties fo:font-style="italic" officeooo:rsid="0055ce5f" style:font-style-asian="italic" style:font-style-complex="italic"/>
    </style:style>
    <style:style style:name="T12" style:family="text">
      <style:text-properties fo:font-style="italic" officeooo:rsid="005769aa" style:font-style-asian="italic" style:font-style-complex="italic"/>
    </style:style>
    <style:style style:name="T13" style:family="text">
      <style:text-properties fo:font-style="italic" officeooo:rsid="0058625b" style:font-style-asian="italic" style:font-style-complex="italic"/>
    </style:style>
    <style:style style:name="T1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5b506a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5b2809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5d36d5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5f9adf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officeooo:rsid="00195d0b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4bb005" style:font-style-asian="normal" style:font-style-complex="normal"/>
    </style:style>
    <style:style style:name="T24" style:family="text">
      <style:text-properties fo:font-style="normal" officeooo:rsid="004d90e4" style:font-style-asian="normal" style:font-style-complex="normal"/>
    </style:style>
    <style:style style:name="T25" style:family="text">
      <style:text-properties fo:font-style="normal" officeooo:rsid="004e8d5b" style:font-style-asian="normal" style:font-style-complex="normal"/>
    </style:style>
    <style:style style:name="T26" style:family="text">
      <style:text-properties fo:font-style="normal" officeooo:rsid="005039c3" style:font-style-asian="normal" style:font-style-complex="normal"/>
    </style:style>
    <style:style style:name="T27" style:family="text">
      <style:text-properties fo:font-style="normal" officeooo:rsid="0052161a" style:font-style-asian="normal" style:font-style-complex="normal"/>
    </style:style>
    <style:style style:name="T28" style:family="text">
      <style:text-properties fo:font-style="normal" officeooo:rsid="00531c39" style:font-style-asian="normal" style:font-style-complex="normal"/>
    </style:style>
    <style:style style:name="T29" style:family="text">
      <style:text-properties fo:font-style="normal" officeooo:rsid="0053e586" style:font-style-asian="normal" style:font-style-complex="normal"/>
    </style:style>
    <style:style style:name="T30" style:family="text">
      <style:text-properties fo:font-style="normal" officeooo:rsid="0055ce5f" style:font-style-asian="normal" style:font-style-complex="normal"/>
    </style:style>
    <style:style style:name="T31" style:family="text">
      <style:text-properties fo:font-style="normal" officeooo:rsid="005769aa" style:font-style-asian="normal" style:font-style-complex="normal"/>
    </style:style>
    <style:style style:name="T32" style:family="text">
      <style:text-properties fo:font-style="normal" officeooo:rsid="0058625b" style:font-style-asian="normal" style:font-style-complex="normal"/>
    </style:style>
    <style:style style:name="T33" style:family="text">
      <style:text-properties fo:font-style="normal" officeooo:rsid="005d36d5" style:font-style-asian="normal" style:font-style-complex="normal"/>
    </style:style>
    <style:style style:name="T34" style:family="text">
      <style:text-properties fo:font-style="normal" officeooo:rsid="0065228b" style:font-style-asian="normal" style:font-style-complex="normal"/>
    </style:style>
    <style:style style:name="T3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6" style:family="text">
      <style:text-properties fo:font-style="normal" style:text-underline-style="none" fo:font-weight="normal" officeooo:rsid="004d90e4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5b506a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5b2809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5d36d5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5f9adf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65228b" style:font-style-asian="normal" style:font-weight-asian="normal" style:font-style-complex="normal" style:font-weight-complex="normal"/>
    </style:style>
    <style:style style:name="T43" style:family="text">
      <style:text-properties officeooo:rsid="00318778"/>
    </style:style>
    <style:style style:name="T44" style:family="text">
      <style:text-properties officeooo:rsid="0048cf83"/>
    </style:style>
    <style:style style:name="T45" style:family="text">
      <style:text-properties officeooo:rsid="004bb005"/>
    </style:style>
    <style:style style:name="T46" style:family="text">
      <style:text-properties officeooo:rsid="004e8d5b"/>
    </style:style>
    <style:style style:name="T47" style:family="text">
      <style:text-properties officeooo:rsid="00531c39"/>
    </style:style>
    <style:style style:name="T48" style:family="text">
      <style:text-properties officeooo:rsid="00552909"/>
    </style:style>
    <style:style style:name="T49" style:family="text">
      <style:text-properties officeooo:rsid="005769aa"/>
    </style:style>
    <style:style style:name="T50" style:family="text">
      <style:text-properties officeooo:rsid="0058625b"/>
    </style:style>
    <style:style style:name="T51" style:family="text">
      <style:text-properties officeooo:rsid="005b2809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officeooo:rsid="00759a4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PROJETO <text:span text:style-name="T45">3</text:span>: <text:span text:style-name="T45">MINIX</text:span></text:p>
      <text:p text:style-name="SBC_3a_author_28_s_29_"><text:span text:style-name="T43">Izaque Vieira de Souza</text:span><text:span text:style-name="T3">1</text:span>, <text:span text:style-name="T43">Olávio Gonçalves de Almeida</text:span><text:span text:style-name="T2">1</text:span>, <text:span text:style-name="T43">Wisley Kilder da Silva Nogueira</text:span><text:span text:style-name="T1">1</text:span></text:p>
      <text:p text:style-name="SBC_3a_institution"><text:span text:style-name="T1">1</text:span><text:span text:style-name="T21">Departamento de Ciência da Computação</text:span> – Universidade Federal d<text:span text:style-name="T21">e Goiás</text:span> (UFG)</text:p>
      <text:p text:style-name="SBC_3a_email"><text:span text:style-name="T43">izaquevieira</text:span>@<text:span text:style-name="T43">outlook.com.br</text:span>, <text:span text:style-name="T43">olaviog.almeida@gmail.com</text:span>, <text:span text:style-name="T43">w.kilder</text:span>@<text:span text:style-name="T43">hotmail.com</text:span></text:p>
      <text:p text:style-name="SBC_3a_resumo"/>
      <text:h text:style-name="P58" text:outline-level="1">Tarefa 1 – Instalação do sistema</text:h>
      <text:p text:style-name="P67"/>
      <text:p text:style-name="P6">1.1. Descrição</text:p>
      <text:p text:style-name="P1">A primeira tarefa consiste n<text:span text:style-name="T45">a instalação do SO Minix. Para esta atividade foi usada a versão 3.1.8 do Minix, com as configurações de máquinas exigidas (128 MB de memória RAM e 2 GB de armazenamento)</text:span><text:span text:style-name="T22">. </text:span><text:span text:style-name="T24">O software utilizado para a tarefa de virutalização do SO foi o VirtualBox, e a </text:span><text:span text:style-name="T23">seguir será apresentado como foi realizada a instalação do SO, bem como os softwares necessários.</text:span></text:p>
      <text:p text:style-name="P2"/>
      <text:p text:style-name="P3"><text:span text:style-name="T22">1.2. </text:span><text:span text:style-name="T24">Instalação do SO</text:span></text:p>
      <text:p text:style-name="P3"><text:span text:style-name="T22"><text:tab/></text:span><text:span text:style-name="T24">O iniciar a máquina, é necessário fazer o login com o usuário root, e logo em seguida executa o comando </text:span><text:span text:style-name="T5">setup </text:span><text:span text:style-name="T24">para que a instalação possa prosseguir. O processo está descrito na Imagem 1. A </text:span><text:span text:style-name="T25">Figura</text:span><text:span text:style-name="T24"> 1 apresenta como foi configurada a rede da máquina virtual, e logo em seguida na </text:span><text:span text:style-name="T25">Figura</text:span><text:span text:style-name="T24"> 2, é mostrada a instalação do SO.</text:span></text:p>
      <text:p text:style-name="P3"><text:span text:style-name="T24"/></text:p>
      <text:p text:style-name="P45"><draw:frame draw:style-name="fr1" draw:name="Image14" text:anchor-type="paragraph" svg:width="12.118cm" svg:height="7.849cm" draw:z-index="0"><draw:image xlink:href="Pictures/10000201000002AF000001BD2856DD504A988C94.png" xlink:type="simple" xlink:show="embed" xlink:actuate="onLoad"/></draw:frame><text:soft-page-break/><text:span text:style-name="T22">Figura 1 – Configuração da rede da VM</text:span></text:p>
      <text:p text:style-name="P45"><draw:frame draw:style-name="fr1" draw:name="Image15" text:anchor-type="paragraph" svg:width="12.675cm" svg:height="8.292cm" draw:z-index="1"><draw:image xlink:href="Pictures/10000201000002D0000001D70116A5E762418A5A.png" xlink:type="simple" xlink:show="embed" xlink:actuate="onLoad"/></draw:frame><text:span text:style-name="T24">F</text:span><text:span text:style-name="T22">igura 2 – Insalação do SO</text:span></text:p>
      <text:p text:style-name="P44"><text:span text:style-name="T35"><text:tab/>Após a instalação ser concluída, deve-se desligar a máquina e iniciar ela no disco que foi instalada, através do comando </text:span><text:span text:style-name="T14">boot b0p0.</text:span></text:p>
      <text:p text:style-name="P44"><text:span text:style-name="T36"/></text:p>
      <text:p text:style-name="P4">1.3. <text:span text:style-name="T46">Instalação dos </text:span><text:span text:style-name="T6">softwares</text:span><text:span text:style-name="T46"> necessários</text:span></text:p>
      <text:p text:style-name="P48"><text:span text:style-name="T22"><text:tab/></text:span><text:span text:style-name="T25">Seguindo com a preparação do ambiente, será descrito abaixo como os </text:span><text:span text:style-name="T6">softwares</text:span><text:span text:style-name="T25"> foram instalados no SO.</text:span></text:p>
      <text:p text:style-name="P53"><text:span text:style-name="T25"><text:tab/>Primeiramente, foi definido uma senha para o usuário </text:span><text:span text:style-name="T6">root</text:span><text:span text:style-name="T25">, através do comando </text:span><text:span text:style-name="T6">passwd</text:span><text:span text:style-name="T25">. Em seguida, foi instalado </text:span><text:span text:style-name="T26">os seguintes </text:span><text:span text:style-name="T7">softwares</text:span><text:span text:style-name="T26">: </text:span><text:span text:style-name="T7">ssh</text:span><text:span text:style-name="T26">, </text:span><text:span text:style-name="T7">bash-4.1nb1</text:span><text:span text:style-name="T26"> e</text:span><text:span text:style-name="T7"> nano</text:span><text:span text:style-name="T26">,</text:span><text:span text:style-name="T25"> </text:span><text:span text:style-name="T26">utilizando os seguintes comandos, respectivamente:</text:span><text:span text:style-name="T25"> </text:span><text:span text:style-name="T7">pkgin install openssh</text:span><text:span text:style-name="T26">, </text:span><text:span text:style-name="T7">pkgin install bash-4.1nb1</text:span><text:span text:style-name="T26">, </text:span><text:span text:style-name="T7">pkgin install nano</text:span><text:span text:style-name="T26">. </text:span><text:span text:style-name="T27">Na Figura 3 é possível perceber pela resposta “</text:span><text:span text:style-name="T8">google.com is alive</text:span><text:span text:style-name="T27">” que a rede está funcionando. Em seguida, a Figura 4 mostra que o </text:span><text:span text:style-name="T8">ssh</text:span><text:span text:style-name="T27"> foi instalado </text:span><text:span text:style-name="T28">e funciona</text:span><text:span text:style-name="T27">, e a Figura 5 </text:span><text:span text:style-name="T28">apresenta o</text:span><text:span text:style-name="T27"> </text:span><text:span text:style-name="T8">bash</text:span><text:span text:style-name="T27"> </text:span><text:span text:style-name="T28">instalado e funcionando.</text:span><text:span text:style-name="T27"> </text:span><text:span text:style-name="T28">A Figura 6 apresenta a conexão </text:span><text:span text:style-name="T9">ssh</text:span><text:span text:style-name="T28"> </text:span><text:span text:style-name="T29">estabelecida </text:span><text:span text:style-name="T28">do sistema hospedeiro com a máquina virtual </text:span><text:span text:style-name="T29">através do comando </text:span><text:span text:style-name="T10">ssh root@localhost -p 2020</text:span><text:span text:style-name="T28">, e na Figura 7 mostra que transmissão de um arquivo </text:span><text:span text:style-name="T9">teste.txt</text:span><text:span text:style-name="T28"> da máquina hospedeira para a máquina virtual foi feita corretamente, através do </text:span><text:span text:style-name="T9">ssh</text:span><text:span text:style-name="T28">, utilizando o comando </text:span><text:span text:style-name="T9">scp -P2020 teste.txt root@localhost:/</text:span><text:span text:style-name="T10">root</text:span><text:span text:style-name="T28">. Por fim, a Figura 8 apresenta a criação de um usuário “</text:span><text:span text:style-name="T9">olavio</text:span><text:span text:style-name="T28">”, assim como a definição de uma senha e configurando o </text:span><text:span text:style-name="T9">bash</text:span><text:span text:style-name="T28"> como </text:span><text:span text:style-name="T9">shell </text:span><text:span text:style-name="T28">padrão do usuário. </text:span><text:span text:style-name="T29">A criação do usuário, a definição do </text:span><text:span text:style-name="T10">bash</text:span><text:span text:style-name="T29"> como </text:span><text:span text:style-name="T10">shell</text:span><text:span text:style-name="T29"> padrão foram feitos pelos seguintes comandos, respectivamente: </text:span><text:span text:style-name="T10">adduser olavio other /usr/olavio</text:span><text:span text:style-name="T29">; </text:span><text:span text:style-name="T10">chsh olavio /usr/pkg/bin/bash</text:span><text:span text:style-name="T29">.</text:span></text:p>
      <text:p text:style-name="P49"><draw:frame draw:style-name="fr2" draw:name="Image1" text:anchor-type="paragraph" svg:x="1.312cm" svg:y="0.543cm" svg:width="12.966cm" svg:height="8.483cm" draw:z-index="2"><draw:image xlink:href="Pictures/10000201000002D0000001D73784FF32CF0A500D.png" xlink:type="simple" xlink:show="embed" xlink:actuate="onLoad"/></draw:frame></text:p>
      <text:p text:style-name="P50"><text:soft-page-break/>Figura 3 – demonstração da rede funcionando</text:p>
      <text:p text:style-name="P50"/>
      <text:p text:style-name="P50"><draw:frame draw:style-name="fr2" draw:name="Image2" text:anchor-type="paragraph" svg:x="1.12cm" svg:y="0cm" svg:width="13.531cm" svg:height="8.851cm" draw:z-index="3"><draw:image xlink:href="Pictures/10000201000002D0000001D7ED9761D68425D8EE.png" xlink:type="simple" xlink:show="embed" xlink:actuate="onLoad"/></draw:frame>Figura 4 – <text:span text:style-name="T9">ssh</text:span><text:span text:style-name="T47"> funcionando corretamente</text:span></text:p>
      <text:p text:style-name="P50"><text:span text:style-name="T22"/></text:p>
      <text:p text:style-name="P50"><draw:frame draw:style-name="fr1" draw:name="Image3" text:anchor-type="paragraph" svg:width="13.312cm" svg:height="8.708cm" draw:z-index="4"><draw:image xlink:href="Pictures/10000201000002D0000001D72CC2CA2F05D21017.png" xlink:type="simple" xlink:show="embed" xlink:actuate="onLoad"/></draw:frame><text:span text:style-name="T22"/></text:p>
      <text:p text:style-name="P50"><text:soft-page-break/>Figura 5 – <text:span text:style-name="T4">bash</text:span> funcionando corretamente</text:p>
      <text:p text:style-name="P50"/>
      <text:p text:style-name="P51"><draw:frame draw:style-name="fr1" draw:name="Image4" text:anchor-type="paragraph" svg:width="13.712cm" svg:height="7.689cm" draw:z-index="5"><draw:image xlink:href="Pictures/100002010000032F000001C98A33538A7032B411.png" xlink:type="simple" xlink:show="embed" xlink:actuate="onLoad"/></draw:frame>Figura 6 – conexão <text:span text:style-name="T4">ssh</text:span> do hospedeiro com a VM</text:p>
      <text:p text:style-name="P51"/>
      <text:p text:style-name="P51"><draw:frame draw:style-name="fr1" draw:name="Image5" text:anchor-type="paragraph" svg:width="14.298cm" svg:height="8.017cm" draw:z-index="6"><draw:image xlink:href="Pictures/100002010000032F000001C9B979DCF72050DD56.png" xlink:type="simple" xlink:show="embed" xlink:actuate="onLoad"/></draw:frame></text:p>
      <text:p text:style-name="P51"><text:soft-page-break/>Figura 7 – transmissão de um arquivo do hospedeiro para a VM</text:p>
      <text:p text:style-name="P51"/>
      <text:p text:style-name="P52"><draw:frame draw:style-name="fr1" draw:name="Image6" text:anchor-type="paragraph" svg:width="13.596cm" svg:height="8.894cm" draw:z-index="7"><draw:image xlink:href="Pictures/10000201000002D0000001D747407001C98B6D10.png" xlink:type="simple" xlink:show="embed" xlink:actuate="onLoad"/></draw:frame>Figura 8 – usuário criado</text:p>
      <text:p text:style-name="P51"/>
      <text:h text:style-name="P59" text:outline-level="1">Tarefa 2 – Recompilando o kernel no Minix</text:h>
      <text:p text:style-name="P65"/>
      <text:p text:style-name="P66">2.1. Descrição da tarefa</text:p>
      <text:p text:style-name="P9">O primeiro passo da tarefa consiste em recompilar o <text:span text:style-name="T4">kernel</text:span><text:span text:style-name="T22"> do Minix, </text:span><text:span text:style-name="T30">que pode ser feito após acessar o diretório </text:span><text:span text:style-name="T11">/usr/src/tools</text:span><text:span text:style-name="T30"> e executar o comando </text:span><text:span text:style-name="T11">make hdboot</text:span><text:span text:style-name="T30">. Feito </text:span><text:soft-page-break/><text:span text:style-name="T30">isso, deve-se reiniciar o sistema, e ao entrar, deve-se selecionar a opção “</text:span><text:span text:style-name="T11">Start custom kernel</text:span><text:span text:style-name="T30">”. A segunda parte desta tarefa consiste em modificar o kernel de modo que seja mostrado na tela qual tarefa está sendo executada.</text:span> </text:p>
      <text:p text:style-name="P54"><text:tab/><text:span text:style-name="T49">Após recompilar o </text:span><text:span text:style-name="T12">kernel</text:span><text:span text:style-name="T31"> do Minix o mesmo foi reiniciado e iniciado no modo </text:span><text:span text:style-name="T12">custom</text:span>. <text:span text:style-name="T49">Para prosseguir, foi alterado no código </text:span><text:span text:style-name="T12">exec.c</text:span><text:span text:style-name="T31"> presente no diretório </text:span><text:span text:style-name="T12">/usr/src/servers/pm</text:span><text:span text:style-name="T31">. O comando </text:span><text:span text:style-name="T12">diff -c /</text:span><text:span text:style-name="T13">usr/src/servers/pm/exec.c /usr/src.clean/servers/pm/exec.c &gt; diferenca.patch</text:span><text:span text:style-name="T32"> foi utilizado para gerar um arquivo contendo a diferença entre o arquivo original e o arquivo alterado. O conteúdo do arquivo </text:span><text:span text:style-name="T13">diferenca.patch</text:span><text:span text:style-name="T32"> é apresentado na Figura 9 e o resultado após recompilar o </text:span><text:span text:style-name="T13">kernel</text:span><text:span text:style-name="T32"> novamente e executar o SO é apresentado na Figura 10.</text:span></text:p>
      <text:p text:style-name="P54"><text:span text:style-name="T32"/></text:p>
      <text:p text:style-name="P47"><draw:frame draw:style-name="fr1" draw:name="Image7" text:anchor-type="paragraph" svg:width="13.028cm" svg:height="8.523cm" draw:z-index="8"><draw:image xlink:href="Pictures/10000201000002D0000001D72F635A1108240BB6.png" xlink:type="simple" xlink:show="embed" xlink:actuate="onLoad"/></draw:frame><text:span text:style-name="T22">Figura 9 – Conteúdo do arquivo </text:span><text:span text:style-name="T4">diferenca.patch</text:span></text:p>
      <text:p text:style-name="P47"><text:span text:style-name="T22"/></text:p>
      <text:p text:style-name="P47"><draw:frame draw:style-name="fr1" draw:name="Image8" text:anchor-type="paragraph" svg:width="13.561cm" svg:height="8.872cm" draw:z-index="9"><draw:image xlink:href="Pictures/10000201000002D0000001D7FDF6E0875D4C446B.png" xlink:type="simple" xlink:show="embed" xlink:actuate="onLoad"/></draw:frame><text:span text:style-name="T22"/></text:p>
      <text:p text:style-name="P46"><text:soft-page-break/><text:tab/><text:span text:style-name="T50">Figura 10 – resultado após recompilar o </text:span><text:span text:style-name="T13">kernel</text:span><text:span text:style-name="T32"> </text:span></text:p>
      <text:p text:style-name="P8"/>
      <text:h text:style-name="P60" text:outline-level="1">Gerenciamento de processos</text:h>
      <text:p text:style-name="P68"><text:tab/></text:p>
      <text:p text:style-name="P19"><text:span text:style-name="T51">Respondendo as questões teóricas:</text:span></text:p>
      <text:list xml:id="list2098935273751323359" text:style-name="L4">
        <text:list-item>
          <text:p text:style-name="P20"><text:span text:style-name="T39">A chamada de sistema </text:span><text:span text:style-name="T17">fork()</text:span><text:span text:style-name="T39"> é usada para criar processos filhos a partir de um processo pai. </text:span><text:span text:style-name="T38">Neste caso, o processo pai é o arquivo </text:span><text:span text:style-name="T16">fork-ex.c</text:span><text:span text:style-name="T38">, pois ele faz a chamada do </text:span><text:span text:style-name="T16">fork()</text:span><text:span text:style-name="T38"> para criar os processos filhos. No arquivo </text:span><text:span text:style-name="T16">fork-ex.c</text:span><text:span text:style-name="T38">, existe uma linha onde </text:span><text:span text:style-name="T16">pid = fork()</text:span><text:span text:style-name="T38">, e logo após é feita uma verificação se o valor de </text:span><text:span text:style-name="T16">pid</text:span><text:span text:style-name="T38"> é negativo. Caso ele seja negativo, indica que a chamada </text:span><text:span text:style-name="T16">fork()</text:span><text:span text:style-name="T38"> não foi feita com sucesso, apresentando uma mensagem de erro.</text:span></text:p>
        </text:list-item>
        <text:list-item>
          <text:p text:style-name="P21"><text:span text:style-name="T38">O </text:span><text:span text:style-name="T37">código foi modificado como pedido, para que a função </text:span><text:span text:style-name="T15">do_nothing()</text:span><text:span text:style-name="T37"> mostrasse na tela o número do processo pai e dos processos filhos criados. Foi feito também uma alteração para que o fosse mostrado na tela através do comando </text:span><text:span text:style-name="T15">ps</text:span><text:span text:style-name="T37"> os processos criados. </text:span><text:span text:style-name="T40">O arquivo após as alterações feitas é apresentado na Figura 11. </text:span><text:span text:style-name="T37">A Figura 1</text:span><text:span text:style-name="T40">2</text:span><text:span text:style-name="T37"> apresenta o resultado obtido </text:span><text:span text:style-name="T40">ao executar o arquivo </text:span><text:span text:style-name="T18">fork-ex.c</text:span><text:span text:style-name="T40"> após as modificações. </text:span></text:p>
        </text:list-item>
      </text:list>
      <text:p text:style-name="P22"><text:span text:style-name="T40"/></text:p>
      <text:p text:style-name="P22"><draw:frame draw:style-name="fr1" draw:name="Image9" text:anchor-type="paragraph" svg:width="14.455cm" svg:height="12.06cm" draw:z-index="10"><draw:image xlink:href="Pictures/10000201000002FF0000028000B94C0665CC8B52.png" xlink:type="simple" xlink:show="embed" xlink:actuate="onLoad"/></draw:frame><text:span text:style-name="T40"/></text:p>
      <text:p text:style-name="P10"><text:soft-page-break/><text:span text:style-name="T33">F</text:span><text:span text:style-name="T22">igura 11 – arquivo </text:span><text:span text:style-name="T4">fork-ex.c</text:span></text:p>
      <text:p text:style-name="P10"><text:span text:style-name="T22"/></text:p>
      <text:p text:style-name="P10"><draw:frame draw:style-name="fr3" draw:name="Image10" text:anchor-type="paragraph" svg:width="15cm" svg:height="9.246cm" draw:z-index="11"><draw:image xlink:href="Pictures/1000020100000338000001FCF512C06BC2F17CC0.png" xlink:type="simple" xlink:show="embed" xlink:actuate="onLoad"/></draw:frame><text:span text:style-name="T22">Figura 12 – execução do arquivo </text:span><text:span text:style-name="T4">fork-ex.c</text:span></text:p>
      <text:list xml:id="list52041642302781" text:continue-numbering="true" text:style-name="L4">
        <text:list-item>
          <text:p text:style-name="P23"><text:soft-page-break/><text:span text:style-name="T40">N</text:span><text:span text:style-name="T37">a implementação feita, </text:span><text:span text:style-name="T41">foi criada uma constate que é usada para generalizar a quantidade de escritores do problema. A constante foi chamada </text:span><text:span text:style-name="T19">QTD_WRITERS</text:span><text:span text:style-name="T41">. Na Figura 13 é possível ver o resultado e logo em seguida o código feito (Figura 14).</text:span></text:p>
        </text:list-item>
      </text:list>
      <text:p text:style-name="P24"><text:span text:style-name="T41"/></text:p>
      <text:p text:style-name="P11"><draw:frame draw:style-name="fr1" draw:name="Image11" text:anchor-type="paragraph" svg:width="13.314cm" svg:height="7.98cm" draw:z-index="12"><draw:image xlink:href="Pictures/10000201000002DE000001B850262481C0783075.png" xlink:type="simple" xlink:show="embed" xlink:actuate="onLoad"/></draw:frame><text:span text:style-name="T22">Figura 13 – resultado questão 3-c</text:span></text:p>
      <text:p text:style-name="P12"><draw:frame draw:style-name="fr2" draw:name="Image12" text:anchor-type="paragraph" svg:x="2.699cm" svg:y="0.303cm" svg:width="9.511cm" svg:height="10.77cm" draw:z-index="13"><draw:image xlink:href="Pictures/1000020100000291000002E8A230034D86D495C6.png" xlink:type="simple" xlink:show="embed" xlink:actuate="onLoad"/></draw:frame><text:span text:style-name="T22">Figura 14 – código questão 3-c</text:span></text:p>
      <text:p text:style-name="P25"><text:span text:style-name="T41"/></text:p>
      <text:list xml:id="list52039635580682" text:continue-numbering="true" text:style-name="L4">
        <text:list-item>
          <text:p text:style-name="P26"><text:soft-page-break/><text:span text:style-name="T40"/></text:p>
        </text:list-item>
        <text:list-item>
          <text:p text:style-name="P21"><text:span text:style-name="T40"/></text:p>
        </text:list-item>
        <text:list-item>
          <text:p text:style-name="P27"><text:span text:style-name="T40">O </text:span><text:span text:style-name="T37">código foi executado nos dois ambientes, e foi possível perceber que no Linux, o comando </text:span><text:span text:style-name="T15">Ctrl+c</text:span><text:span text:style-name="T37"> não parava a execução do mesmo, já no Minix a execução do programa era interrompida ao utilizar o mesmo comando. Na Figura </text:span><text:span text:style-name="T42">15</text:span><text:span text:style-name="T37"> e Figura </text:span><text:span text:style-name="T42">16</text:span><text:span text:style-name="T37"> é possível ver o resultado de execução no Linux e no Minix.</text:span></text:p>
        </text:list-item>
      </text:list>
      <text:p text:style-name="P28"><text:span text:style-name="T37"/></text:p>
      <text:p text:style-name="P13"><draw:frame draw:style-name="fr1" draw:name="Image13" text:anchor-type="paragraph" svg:width="12.28cm" svg:height="7.361cm" draw:z-index="14"><draw:image xlink:href="Pictures/10000201000002DE000001B86C369F4AD41481FC.png" xlink:type="simple" xlink:show="embed" xlink:actuate="onLoad"/></draw:frame><text:span text:style-name="T22">Figura </text:span><text:span text:style-name="T34">15</text:span><text:span text:style-name="T22"> – execução do código </text:span><text:span text:style-name="T4">ctrlc.c</text:span><text:span text:style-name="T22"> no Linux</text:span></text:p>
      <text:p text:style-name="P13"><text:span text:style-name="T22"/></text:p>
      <text:p text:style-name="P13"><draw:frame draw:style-name="fr1" draw:name="Image16" text:anchor-type="paragraph" svg:width="13.085cm" svg:height="8.56cm" draw:z-index="15"><draw:image xlink:href="Pictures/10000201000002D0000001D7CAE0747C169B83A7.png" xlink:type="simple" xlink:show="embed" xlink:actuate="onLoad"/></draw:frame><text:span text:style-name="T22">Figura </text:span><text:span text:style-name="T34">16</text:span><text:span text:style-name="T22"> – execução do código </text:span><text:span text:style-name="T4">ctrlc.c</text:span><text:span text:style-name="T22"> no Minix</text:span></text:p>
      <text:h text:style-name="P64" text:outline-level="1"><text:soft-page-break/>Tarefa 4 – Gerenciamento de processos: processos orfãos</text:h>
      <text:h text:style-name="P64" text:outline-level="1">Tarefa 5 – Gerenciamento de processos: processos zumbis</text:h>
      <text:h text:style-name="P61" text:outline-level="1"><text:span text:style-name="T53">Tarefa 6 - </text:span>Criando uma chamada de sistema</text:h>
      <text:list xml:id="list2494444919821739693" text:style-name="L6">
        <text:list-item>
          <text:p text:style-name="P69">Os arquivos <text:span text:style-name="T4">table.c </text:span><text:span text:style-name="T22">e </text:span><text:span text:style-name="T4">proto.h</text:span><text:span text:style-name="T22"> foram alterados como pedido no exercício. O arquivo </text:span><text:span text:style-name="T4">table.c</text:span><text:span text:style-name="T22"> foi alterado na entrada de número 70, atribuindo a chamada de sistema a ser criada (Figura 17). O arquivo </text:span><text:span text:style-name="T4">proto.h </text:span><text:span text:style-name="T22">foi alterado para que a a protótipo da chamada de sistema fosse incluída (Figura 18).</text:span></text:p>
        </text:list-item>
      </text:list>
      <text:p text:style-name="P29"><text:span text:style-name="T22"/></text:p>
      <text:p text:style-name="P14"><draw:frame draw:style-name="fr1" draw:name="Image17" text:anchor-type="paragraph" svg:width="12.645cm" svg:height="8.273cm" draw:z-index="16"><draw:image xlink:href="Pictures/10000201000002D0000001D7FB072660B6917E42.png" xlink:type="simple" xlink:show="embed" xlink:actuate="onLoad"/></draw:frame><text:span text:style-name="T22">Figura 17 – arquivo </text:span><text:span text:style-name="T4">table.c</text:span></text:p>
      <text:p text:style-name="P14"><text:span text:style-name="T15"/></text:p>
      <text:p text:style-name="P7"><draw:frame draw:style-name="fr2" draw:name="Image18" text:anchor-type="paragraph" svg:x="1.018cm" svg:y="0.226cm" svg:width="13.099cm" svg:height="8.569cm" draw:z-index="17"><draw:image xlink:href="Pictures/10000201000002D0000001D7DB3E536BC49F7E15.png" xlink:type="simple" xlink:show="embed" xlink:actuate="onLoad"/></draw:frame><text:soft-page-break/>Figura 18 – arquivo <text:span text:style-name="T4">proto.h</text:span></text:p>
      <text:p text:style-name="P55"><text:span text:style-name="T22"/></text:p>
      <text:list xml:id="list52040597417666" text:continue-numbering="true" text:style-name="L6">
        <text:list-item>
          <text:p text:style-name="P30">A chamada de sistema <text:span text:style-name="T4">do_mycall()</text:span> foi implementada de acordo com a Figura 19, apresentada a seguir:</text:p>
        </text:list-item>
      </text:list>
      <text:p text:style-name="P56"/>
      <text:p text:style-name="P32"><draw:frame draw:style-name="fr1" draw:name="Image19" text:anchor-type="paragraph" svg:width="12.668cm" svg:height="8.287cm" draw:z-index="18"><draw:image xlink:href="Pictures/10000201000002D0000001D7011EA66F9EBE3FC1.png" xlink:type="simple" xlink:show="embed" xlink:actuate="onLoad"/></draw:frame><text:tab/><text:span text:style-name="T52">Figura 19 – implementação de </text:span><text:span text:style-name="T20">do_mycall()</text:span></text:p>
      <text:p text:style-name="P32"><text:span text:style-name="T20"/></text:p>
      <text:list xml:id="list52040100173497" text:continue-numbering="true" text:style-name="L6">
        <text:list-item>
          <text:p text:style-name="P30">O <text:span text:style-name="T4">kernel </text:span><text:span text:style-name="T22">foi recompilado, assim como as bibliotecas e os includes, e não foi gerado nenhum erro (Figura 20).</text:span></text:p>
        </text:list-item>
      </text:list>
      <text:p text:style-name="P31"><text:span text:style-name="T22"/></text:p>
      <text:p text:style-name="P31"><text:soft-page-break/><text:span text:style-name="T22"/></text:p>
      <text:p text:style-name="P15"><draw:frame draw:style-name="fr1" draw:name="Image20" text:anchor-type="paragraph" svg:width="12.545cm" svg:height="8.206cm" draw:z-index="19"><draw:image xlink:href="Pictures/10000201000002D0000001D705FFACA8D2549EC9.png" xlink:type="simple" xlink:show="embed" xlink:actuate="onLoad"/></draw:frame><text:span text:style-name="T22">Figura 20 – saída ao recompilar o </text:span><text:span text:style-name="T4">kernel </text:span><text:span text:style-name="T22">e as bibliotecas</text:span></text:p>
      <text:p text:style-name="P15"><text:span text:style-name="T22"/></text:p>
      <text:list xml:id="list52040855478321" text:continue-numbering="true" text:style-name="L6">
        <text:list-item>
          <text:p text:style-name="P30">O arquivo <text:span text:style-name="T4">callnr.h</text:span><text:span text:style-name="T22"> foi alterado, para inserir a nova chamada de sistema. A alteração é apresentada em seguida na Figura 21.</text:span></text:p>
        </text:list-item>
      </text:list>
      <text:p text:style-name="P31"><text:span text:style-name="T22"/></text:p>
      <text:p text:style-name="P15"><draw:frame draw:style-name="fr1" draw:name="Image21" text:anchor-type="paragraph" svg:width="12.873cm" svg:height="8.421cm" draw:z-index="20"><draw:image xlink:href="Pictures/10000201000002D0000001D7D66565802D7FC86F.png" xlink:type="simple" xlink:show="embed" xlink:actuate="onLoad"/></draw:frame><text:span text:style-name="T22">Figura 21 – arquivo </text:span><text:span text:style-name="T4">callnr.h </text:span><text:span text:style-name="T22">após alteração</text:span></text:p>
      <text:p text:style-name="P31"><text:span text:style-name="T22"/></text:p>
      <text:list xml:id="list52040609604251" text:continue-numbering="true" text:style-name="L6">
        <text:list-item>
          <text:p text:style-name="P30">A nova biblioteca foi criada, e a <text:span text:style-name="T22">imagem a seguir (Figura 22) apresenta o código da mesma, após algumas alterações necessárias para que funcionasse corretamente:</text:span></text:p>
        </text:list-item>
      </text:list>
      <text:p text:style-name="P31"><text:soft-page-break/><text:span text:style-name="T22"/></text:p>
      <text:p text:style-name="P31"><text:span text:style-name="T22"/></text:p>
      <text:p text:style-name="P15"><draw:frame draw:style-name="fr1" draw:name="Image22" text:anchor-type="paragraph" svg:width="13.347cm" svg:height="8.731cm" draw:z-index="21"><draw:image xlink:href="Pictures/10000201000002D0000001D742BDA2C9B4E48423.png" xlink:type="simple" xlink:show="embed" xlink:actuate="onLoad"/></draw:frame><text:span text:style-name="T22">Figura 22 – código da biblioteca </text:span><text:span text:style-name="T4">mylib.h </text:span><text:span text:style-name="T22">após correções</text:span></text:p>
      <text:p text:style-name="P31"><text:span text:style-name="T22"/></text:p>
      <text:list xml:id="list52039837286481" text:continue-numbering="true" text:style-name="L6">
        <text:list-item>
          <text:p text:style-name="P35">O Minix usa o message para passar parâmetros para uma chamada de sistema. Quando é feita uma <text:span text:style-name="T4">sys_call(), </text:span><text:span text:style-name="T22">ela é</text:span> transformada em uma mensagem com o tipo <text:span text:style-name="T4">SYS_CALL, </text:span><text:span text:style-name="T22">que posteriormente é manipulada em uma função </text:span><text:span text:style-name="T4">do_call()</text:span>. Seguindo pelo diretório <text:span text:style-name="T4">/usr/src/kernel </text:span><text:span text:style-name="T22">é possível encontrar o arquivo </text:span><text:span text:style-name="T4">system.c, </text:span><text:span text:style-name="T22">onde são criadas as mensagens</text:span> <text:span text:style-name="T4">SYS_CALL</text:span><text:span text:style-name="T22">, redirecionando a mensagem para a função </text:span><text:span text:style-name="T4">do_call()</text:span><text:span text:style-name="T22">.</text:span></text:p>
        </text:list-item>
        <text:list-item>
          <text:p text:style-name="P33">O <text:span text:style-name="T4">kernel</text:span><text:span text:style-name="T22"> foi recompilado e o sistema foi iniciado novamente, sem nenhum erro.</text:span></text:p>
        </text:list-item>
        <text:list-item>
          <text:p text:style-name="P33">O programa foi criado de acordo com a Figura 23, e o resultado é apresentado na Figura 24.</text:p>
        </text:list-item>
      </text:list>
      <text:p text:style-name="P34"/>
      <text:p text:style-name="P16"><draw:frame draw:style-name="fr1" draw:name="Image23" text:anchor-type="paragraph" svg:width="13.46cm" svg:height="8.805cm" draw:z-index="22"><draw:image xlink:href="Pictures/10000201000002D0000001D74C49526877C9154B.png" xlink:type="simple" xlink:show="embed" xlink:actuate="onLoad"/></draw:frame>Figura 23 – código escrito para testar a chamada de sistema</text:p>
      <text:p text:style-name="P16"><text:soft-page-break/></text:p>
      <text:p text:style-name="P16"><draw:frame draw:style-name="fr1" draw:name="Image24" text:anchor-type="paragraph" svg:width="13.261cm" svg:height="8.675cm" draw:z-index="23"><draw:image xlink:href="Pictures/10000201000002D0000001D7C404AD34E7AA8300.png" xlink:type="simple" xlink:show="embed" xlink:actuate="onLoad"/></draw:frame>Figura 24 – saída apresentada ao rodar o código criado</text:p>
      <text:p text:style-name="P34"/>
      <text:h text:style-name="P62" text:outline-level="1"><text:span text:style-name="T53">Tarefa 7 - Criando uma chamada de kernel</text:span></text:h>
      <text:p text:style-name="P70"/>
      <text:p text:style-name="P37">Para essa tarefa, serão demonstrado todos os <text:span text:style-name="T4">prints</text:span><text:span text:style-name="T22"> para cada letra.</text:span></text:p>
      <text:p text:style-name="P37"/>
      <text:p text:style-name="P37"/>
      <text:list xml:id="list2358425281982977611" text:style-name="L8">
        <text:list-item>
          <text:p text:style-name="P36"><text:soft-page-break/></text:p>
        </text:list-item>
      </text:list>
      <text:p text:style-name="P37"/>
      <text:p text:style-name="P17"><draw:frame draw:style-name="fr1" draw:name="Image25" text:anchor-type="paragraph" svg:width="13.596cm" svg:height="8.894cm" draw:z-index="24"><draw:image xlink:href="Pictures/10000201000002D0000001D7779EDD47A9324C58.png" xlink:type="simple" xlink:show="embed" xlink:actuate="onLoad"/></draw:frame>Figura 25 – adicionando um protótipo da função</text:p>
      <text:p text:style-name="P37"/>
      <text:list xml:id="list52040500944254" text:continue-numbering="true" text:style-name="L8">
        <text:list-item>
          <text:p text:style-name="P36"/>
        </text:list-item>
      </text:list>
      <text:p text:style-name="P17"><draw:frame draw:style-name="fr1" draw:name="Image26" text:anchor-type="paragraph" svg:width="13.28cm" svg:height="8.687cm" draw:z-index="25"><draw:image xlink:href="Pictures/10000201000002D0000001D7D3CB24F9152D3FFA.png" xlink:type="simple" xlink:show="embed" xlink:actuate="onLoad"/></draw:frame>Figura 26 – implementação da função <text:span text:style-name="T4">do_mykernelcall();</text:span></text:p>
      <text:p text:style-name="P37"/>
      <text:p text:style-name="P37"/>
      <text:p text:style-name="P37"/>
      <text:list xml:id="list52040103186765" text:continue-numbering="true" text:style-name="L8">
        <text:list-item>
          <text:p text:style-name="P36"><text:soft-page-break/></text:p>
        </text:list-item>
      </text:list>
      <text:p text:style-name="P17"><draw:frame draw:style-name="fr1" draw:name="Image27" text:anchor-type="paragraph" svg:width="13.757cm" svg:height="8.999cm" draw:z-index="26"><draw:image xlink:href="Pictures/10000201000002D0000001D7762352DCA18CCEB4.png" xlink:type="simple" xlink:show="embed" xlink:actuate="onLoad"/></draw:frame>Figura 27 – adicionando ao <text:span text:style-name="T4">makefile</text:span></text:p>
      <text:p text:style-name="P37"/>
      <text:list xml:id="list52039917066868" text:continue-numbering="true" text:style-name="L8">
        <text:list-item>
          <text:p text:style-name="P36"/>
        </text:list-item>
      </text:list>
      <text:p text:style-name="P17"><draw:frame draw:style-name="fr1" draw:name="Image28" text:anchor-type="paragraph" svg:width="12.959cm" svg:height="8.477cm" draw:z-index="27"><draw:image xlink:href="Pictures/10000201000002D0000001D746A9A07CF8462289.png" xlink:type="simple" xlink:show="embed" xlink:actuate="onLoad"/></draw:frame>Figura 28 – adicionando na tabela de chamadas</text:p>
      <text:p text:style-name="P17"/>
      <text:p text:style-name="P17"/>
      <text:p text:style-name="P17"/>
      <text:p text:style-name="P17"/>
      <text:list xml:id="list52041056395574" text:continue-numbering="true" text:style-name="L8">
        <text:list-item>
          <text:p text:style-name="P39"><text:soft-page-break/></text:p>
        </text:list-item>
      </text:list>
      <text:p text:style-name="P38"><draw:frame draw:style-name="fr1" draw:name="Image29" text:anchor-type="paragraph" svg:width="13.212cm" svg:height="8.643cm" draw:z-index="28"><draw:image xlink:href="Pictures/10000201000002D0000001D77BC1258F96920A63.png" xlink:type="simple" xlink:show="embed" xlink:actuate="onLoad"/></draw:frame><text:span text:style-name="T52">Figura 29 – adicionando o protótipo na função </text:span><text:span text:style-name="T20">sys_mykernelcall.c</text:span></text:p>
      <text:list xml:id="list52041811369433" text:continue-numbering="true" text:style-name="L8">
        <text:list-item>
          <text:p text:style-name="P39"/>
        </text:list-item>
      </text:list>
      <text:p text:style-name="P17"><draw:frame draw:style-name="fr1" draw:name="Image30" text:anchor-type="paragraph" svg:width="13.624cm" svg:height="8.913cm" draw:z-index="29"><draw:image xlink:href="Pictures/10000201000002D0000001D730F6D7B77E060958.png" xlink:type="simple" xlink:show="embed" xlink:actuate="onLoad"/></draw:frame>Figura 30 – adicionando ao vetor de chamadas</text:p>
      <text:p text:style-name="P40"/>
      <text:p text:style-name="P40"/>
      <text:p text:style-name="P40"/>
      <text:p text:style-name="P40"/>
      <text:p text:style-name="P40"/>
      <text:list xml:id="list52041170182020" text:continue-numbering="true" text:style-name="L8">
        <text:list-item>
          <text:p text:style-name="P39"><text:soft-page-break/></text:p>
        </text:list-item>
      </text:list>
      <text:p text:style-name="P40"><draw:frame draw:style-name="fr1" draw:name="Image31" text:anchor-type="paragraph" svg:width="13.7cm" svg:height="8.962cm" draw:z-index="30"><draw:image xlink:href="Pictures/10000201000002D0000001D751CA943B6C7DF832.png" xlink:type="simple" xlink:show="embed" xlink:actuate="onLoad"/></draw:frame></text:p>
      <text:p text:style-name="P18">Figura 31 – adicionando à tabela de serviços</text:p>
      <text:list xml:id="list52041088920618" text:continue-numbering="true" text:style-name="L8">
        <text:list-item>
          <text:p text:style-name="P39"/>
        </text:list-item>
      </text:list>
      <text:p text:style-name="P18"><draw:frame draw:style-name="fr1" draw:name="Image32" text:anchor-type="paragraph" svg:width="13.594cm" svg:height="8.892cm" draw:z-index="31"><draw:image xlink:href="Pictures/10000201000002D0000001D7B3D15B0162581713.png" xlink:type="simple" xlink:show="embed" xlink:actuate="onLoad"/></draw:frame>Figura 32 – implementação da função <text:span text:style-name="T4">sys_mykernelcall.c</text:span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oft-page-break/><text:span text:style-name="T4"/></text:p>
      <text:p text:style-name="P40"/>
      <text:list xml:id="list52041961458699" text:continue-numbering="true" text:style-name="L8">
        <text:list-item>
          <text:p text:style-name="P39"/>
        </text:list-item>
      </text:list>
      <text:p text:style-name="P41"><draw:frame draw:style-name="fr1" draw:name="Image33" text:anchor-type="paragraph" svg:width="13.801cm" svg:height="9.028cm" draw:z-index="32"><draw:image xlink:href="Pictures/10000201000002D0000001D780F152E3388004CB.png" xlink:type="simple" xlink:show="embed" xlink:actuate="onLoad"/></draw:frame><text:span text:style-name="T52">Figura 33 – adicionando ao </text:span><text:span text:style-name="T20">makefile</text:span></text:p>
      <text:list xml:id="list52041598370565" text:continue-numbering="true" text:style-name="L8">
        <text:list-item>
          <text:p text:style-name="P42">Implementando os códigos disponibilizados no material, a chamada de <text:span text:style-name="T4">kernel</text:span><text:span text:style-name="T22"> criada recentemente não funcionou, gerando um erro ao usar o comando </text:span><text:span text:style-name="T4">make install</text:span><text:span text:style-name="T22">. Portanto, o código não funionou.</text:span></text:p>
        </text:list-item>
      </text:list>
      <text:h text:style-name="P63" text:outline-level="1"><text:span text:style-name="T21">Tarefa 8 – Entrada e saída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Times2" svg:font-family="Times" style:font-family-generic="roman"/>
    <style:font-face style:name="TimesNewRoman,Bold" svg:font-family="'TimesNewRoman,Bold'" style:font-family-generic="roman"/>
    <style:font-face style:name="Helvetica1" svg:font-family="Helvetica" style:font-family-generic="swiss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loext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loext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loext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loext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loext:contextual-spacing="false" fo:text-align="center" style:justify-single-word="false" style:page-number="auto"/>
      <style:text-properties fo:color="#000000" fo:language="pt" fo:country="BR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language="pt" fo:country="BR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loext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language="pt" fo:country="BR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loext:contextual-spacing="false" fo:text-align="justify" style:justify-single-word="false" fo:text-indent="1.251cm" style:auto-text-indent="false" style:page-number="auto"/>
      <style:text-properties fo:color="#000000" fo:language="pt" fo:country="BR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loext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language="en" fo:country="US"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loext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loext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loext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loext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loext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loext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loext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loext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loext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loext:contextual-spacing="false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Zeichenforma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0-08-03T10:11:27.48</meta:creation-date>
    <dc:language>pt-BR</dc:language>
    <meta:editing-cycles>25</meta:editing-cycles>
    <meta:editing-duration>PT1H53M5S</meta:editing-duration>
    <dc:date>2018-10-23T05:20:39.216765386</dc:date>
    <meta:document-statistic meta:table-count="0" meta:image-count="33" meta:object-count="0" meta:page-count="20" meta:paragraph-count="83" meta:word-count="1336" meta:character-count="8209" meta:non-whitespace-character-count="6926"/>
    <meta:user-defined meta:name="Info 1"/>
    <meta:user-defined meta:name="Info 2"/>
    <meta:user-defined meta:name="Info 3"/>
    <meta:user-defined meta:name="Info 4"/>
  </office:meta>
</office:document-meta>
</file>