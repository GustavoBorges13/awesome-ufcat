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Web" style:master-page-name="MP0" style:family="paragraph">
      <style:paragraph-properties fo:break-before="page" fo:text-align="center" fo:margin-top="0.0659in" fo:margin-bottom="0in" fo:margin-left="0.2083in" fo:margin-right="0.2236in">
        <style:tab-stops/>
      </style:paragraph-properties>
    </style:style>
    <style:style style:name="T2" style:parent-style-name="Fonteparág.padrão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3" style:parent-style-name="NormalWeb" style:family="paragraph">
      <style:paragraph-properties fo:text-align="center" fo:margin-top="0.1652in" fo:margin-bottom="0in"/>
    </style:style>
    <style:style style:name="T4" style:parent-style-name="Fonteparág.padrão" style:family="text">
      <style:text-properties style:font-name="Times" fo:font-weight="bold" style:font-weight-asian="bold" style:font-weight-complex="bold" fo:color="#000000"/>
    </style:style>
    <style:style style:name="P5" style:parent-style-name="NormalWeb" style:family="paragraph">
      <style:paragraph-properties fo:text-align="center" fo:margin-top="0.1652in" fo:margin-bottom="0in"/>
    </style:style>
    <style:style style:name="T6" style:parent-style-name="Fonteparág.padrão" style:family="text">
      <style:text-properties style:font-name="Times" fo:color="#000000"/>
    </style:style>
    <style:style style:name="P7" style:parent-style-name="NormalWeb" style:family="paragraph">
      <style:paragraph-properties fo:text-align="center" fo:margin-top="0.0826in" fo:margin-bottom="0.0826in"/>
    </style:style>
    <style:style style:name="T8" style:parent-style-name="Fonteparág.padrão" style:family="text">
      <style:text-properties style:font-name="Courier" fo:color="#000000" fo:font-size="10pt" style:font-size-asian="10pt" style:font-size-complex="10pt"/>
    </style:style>
    <style:style style:name="T9" style:parent-style-name="Fonteparág.padrão" style:family="text">
      <style:text-properties fo:font-style="italic" style:font-style-asian="italic" style:font-style-complex="italic"/>
    </style:style>
    <style:style style:name="P10" style:parent-style-name="SBCparagraph" style:family="paragraph">
      <style:paragraph-properties fo:text-indent="0in"/>
    </style:style>
    <style:style style:name="P11" style:parent-style-name="SBCparagraph" style:family="paragraph">
      <style:paragraph-properties fo:text-indent="0in"/>
    </style:style>
    <style:style style:name="P12" style:parent-style-name="SBCparagraph" style:family="paragraph">
      <style:paragraph-properties fo:text-indent="0in"/>
    </style:style>
    <style:style style:name="P13" style:parent-style-name="SBCparagraph" style:family="paragraph">
      <style:paragraph-properties fo:text-indent="0in"/>
    </style:style>
    <style:style style:name="P14" style:parent-style-name="SBCparagraph" style:family="paragraph">
      <style:paragraph-properties fo:text-indent="0in"/>
    </style:style>
    <style:style style:name="P15" style:parent-style-name="SBCparagraph" style:family="paragraph">
      <style:paragraph-properties fo:text-indent="0in"/>
    </style:style>
    <style:style style:name="P16" style:parent-style-name="SBCparagraph" style:family="paragraph">
      <style:paragraph-properties fo:text-indent="0in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P18" style:parent-style-name="SBCparagraph" style:family="paragraph">
      <style:paragraph-properties fo:text-indent="0in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P20" style:parent-style-name="SBCparagraph" style:family="paragraph">
      <style:paragraph-properties fo:text-indent="0in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P22" style:parent-style-name="SBCparagraph" style:family="paragraph">
      <style:paragraph-properties fo:text-indent="0in"/>
    </style:style>
    <style:style style:name="P23" style:parent-style-name="SBCparagraph" style:family="paragraph">
      <style:paragraph-properties fo:text-indent="0in"/>
    </style:style>
    <style:style style:name="P24" style:parent-style-name="SBCparagraph" style:family="paragraph">
      <style:paragraph-properties fo:text-indent="0in"/>
    </style:style>
    <style:style style:name="P25" style:parent-style-name="SBCparagraph" style:family="paragraph">
      <style:paragraph-properties fo:text-indent="0in"/>
    </style:style>
    <style:style style:name="P26" style:parent-style-name="SBCparagraph" style:family="paragraph">
      <style:paragraph-properties fo:text-indent="0in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T28" style:parent-style-name="Fonteparág.padrão" style:family="text">
      <style:text-properties fo:font-weight="bold" style:font-weight-asian="bold" style:font-weight-complex="bold"/>
    </style:style>
    <style:style style:name="P29" style:parent-style-name="SBCparagraph" style:family="paragraph">
      <style:paragraph-properties fo:text-indent="0in"/>
    </style:style>
    <style:style style:name="T30" style:parent-style-name="Fonteparág.padrão" style:family="text">
      <style:text-properties fo:font-weight="bold" style:font-weight-asian="bold" style:font-weight-complex="bold"/>
    </style:style>
    <style:style style:name="P31" style:parent-style-name="SBCparagraph" style:family="paragraph">
      <style:paragraph-properties fo:text-indent="0in"/>
    </style:style>
    <style:style style:name="P32" style:parent-style-name="SBCparagraph" style:family="paragraph">
      <style:paragraph-properties fo:text-indent="0in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P34" style:parent-style-name="SBCparagraph" style:family="paragraph">
      <style:paragraph-properties fo:text-indent="0in"/>
    </style:style>
    <style:style style:name="P35" style:parent-style-name="SBCparagraph" style:family="paragraph">
      <style:paragraph-properties fo:text-indent="0in"/>
    </style:style>
    <style:style style:name="P36" style:parent-style-name="SBCparagraph" style:family="paragraph">
      <style:paragraph-properties fo:text-indent="0in"/>
    </style:style>
    <style:style style:name="P37" style:parent-style-name="SBCparagraph" style:family="paragraph">
      <style:paragraph-properties fo:text-indent="0in"/>
    </style:style>
    <style:style style:name="P38" style:parent-style-name="SBCparagraph" style:family="paragraph">
      <style:paragraph-properties fo:text-indent="0in"/>
    </style:style>
    <style:style style:name="P39" style:parent-style-name="SBCparagraph" style:family="paragraph">
      <style:paragraph-properties fo:text-indent="0in"/>
    </style:style>
    <style:style style:name="P40" style:parent-style-name="SBCparagraph" style:family="paragraph">
      <style:paragraph-properties fo:text-indent="0in"/>
    </style:style>
    <style:style style:name="P41" style:parent-style-name="SBCparagraph" style:family="paragraph">
      <style:paragraph-properties fo:text-indent="0in"/>
    </style:style>
    <style:style style:name="P42" style:parent-style-name="SBCparagraph" style:family="paragraph">
      <style:paragraph-properties fo:text-indent="0in"/>
    </style:style>
    <style:style style:name="P43" style:parent-style-name="SBCparagraph" style:family="paragraph">
      <style:paragraph-properties fo:text-indent="0in"/>
    </style:style>
    <style:style style:name="P44" style:parent-style-name="SBCparagraph" style:family="paragraph">
      <style:paragraph-properties fo:text-indent="0in"/>
    </style:style>
    <style:style style:name="P45" style:parent-style-name="SBCparagraph" style:family="paragraph">
      <style:paragraph-properties fo:text-indent="0in"/>
    </style:style>
    <style:style style:name="P46" style:parent-style-name="SBCparagraph" style:family="paragraph">
      <style:paragraph-properties fo:text-indent="0in"/>
    </style:style>
    <style:style style:name="P47" style:parent-style-name="SBCparagraph" style:family="paragraph">
      <style:paragraph-properties fo:text-indent="0in"/>
    </style:style>
    <style:style style:name="P48" style:parent-style-name="SBCparagraph" style:family="paragraph">
      <style:paragraph-properties fo:text-indent="0in"/>
    </style:style>
    <style:style style:name="P49" style:parent-style-name="SBCparagraph" style:family="paragraph">
      <style:paragraph-properties fo:text-indent="0in"/>
    </style:style>
    <style:style style:name="P50" style:parent-style-name="SBCparagraph" style:family="paragraph">
      <style:paragraph-properties fo:text-indent="0in"/>
    </style:style>
    <style:style style:name="P51" style:parent-style-name="SBCparagraph" style:family="paragraph">
      <style:paragraph-properties fo:text-indent="0in"/>
    </style:style>
    <style:style style:name="P52" style:parent-style-name="SBCparagraph" style:family="paragraph">
      <style:paragraph-properties fo:text-indent="0in"/>
    </style:style>
    <style:style style:name="P53" style:parent-style-name="SBCparagraph" style:family="paragraph">
      <style:paragraph-properties fo:text-indent="0in"/>
    </style:style>
    <style:style style:name="P54" style:parent-style-name="SBCparagraph" style:family="paragraph">
      <style:paragraph-properties fo:text-indent="0in"/>
    </style:style>
    <style:style style:name="P55" style:parent-style-name="SBCparagraph" style:family="paragraph">
      <style:paragraph-properties fo:text-indent="0in"/>
    </style:style>
    <style:style style:name="P56" style:parent-style-name="SBCparagraph" style:family="paragraph">
      <style:paragraph-properties fo:text-indent="0in"/>
    </style:style>
    <style:style style:name="P57" style:parent-style-name="SBCparagraph" style:family="paragraph">
      <style:paragraph-properties fo:text-indent="0in"/>
    </style:style>
    <style:style style:name="P58" style:parent-style-name="SBCparagraph" style:family="paragraph">
      <style:paragraph-properties fo:text-indent="0in"/>
    </style:style>
    <style:style style:name="T59" style:parent-style-name="Fonteparág.padrão" style:family="text">
      <style:text-properties fo:font-weight="bold" style:font-weight-asian="bold" style:font-weight-complex="bold"/>
    </style:style>
    <style:style style:name="P60" style:parent-style-name="SBCparagraph" style:family="paragraph">
      <style:paragraph-properties fo:text-indent="0in"/>
    </style:style>
    <style:style style:name="T61" style:parent-style-name="Fonteparág.padrão" style:family="text">
      <style:text-properties fo:font-weight="bold" style:font-weight-asian="bold" style:font-weight-complex="bold"/>
    </style:style>
    <style:style style:name="P62" style:parent-style-name="SBCparagraph" style:family="paragraph">
      <style:paragraph-properties fo:text-indent="0in"/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P64" style:parent-style-name="SBCparagraph" style:family="paragraph">
      <style:paragraph-properties fo:text-indent="0in"/>
    </style:style>
    <style:style style:name="P65" style:parent-style-name="SBCparagraph" style:family="paragraph">
      <style:paragraph-properties fo:text-indent="0in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SBCparagraph" style:family="paragraph">
      <style:paragraph-properties fo:text-indent="0in"/>
    </style:style>
    <style:style style:name="T68" style:parent-style-name="Fonteparág.padrão" style:family="text">
      <style:text-properties fo:font-weight="bold" style:font-weight-asian="bold" style:font-weight-complex="bold"/>
    </style:style>
    <style:style style:name="P69" style:parent-style-name="SBCparagraph" style:family="paragraph">
      <style:paragraph-properties fo:text-indent="0in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P71" style:parent-style-name="SBCparagraph" style:family="paragraph">
      <style:paragraph-properties fo:text-indent="0in"/>
    </style:style>
    <style:style style:name="P72" style:parent-style-name="SBCparagraph" style:family="paragraph">
      <style:paragraph-properties fo:text-indent="0in"/>
    </style:style>
    <style:style style:name="P73" style:parent-style-name="SBCparagraph" style:family="paragraph">
      <style:paragraph-properties fo:text-indent="0in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P75" style:parent-style-name="SBCparagraph" style:family="paragraph">
      <style:paragraph-properties fo:text-indent="0in"/>
    </style:style>
    <style:style style:name="T76" style:parent-style-name="Fonteparág.padrão" style:family="text">
      <style:text-properties fo:font-weight="bold" style:font-weight-asian="bold" style:font-weight-complex="bold"/>
    </style:style>
    <style:style style:name="P77" style:parent-style-name="SBCparagraph" style:family="paragraph">
      <style:paragraph-properties fo:text-indent="0in"/>
    </style:style>
    <style:style style:name="T78" style:parent-style-name="Fonteparág.padrão" style:family="text">
      <style:text-properties fo:font-weight="bold" style:font-weight-asian="bold" style:font-weight-complex="bold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P80" style:parent-style-name="SBCparagraph" style:family="paragraph">
      <style:paragraph-properties fo:text-indent="0in"/>
    </style:style>
    <style:style style:name="P81" style:parent-style-name="SBCparagraph" style:family="paragraph">
      <style:paragraph-properties fo:text-indent="0in"/>
    </style:style>
    <style:style style:name="P82" style:parent-style-name="SBCparagraph" style:family="paragraph">
      <style:paragraph-properties fo:text-indent="0in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SBCparagraph" style:family="paragraph">
      <style:paragraph-properties fo:text-indent="0in"/>
    </style:style>
    <style:style style:name="T85" style:parent-style-name="Fonteparág.padrão" style:family="text">
      <style:text-properties fo:font-weight="bold" style:font-weight-asian="bold" style:font-weight-complex="bold"/>
    </style:style>
    <style:style style:name="T86" style:parent-style-name="Fonteparág.padrão" style:family="text">
      <style:text-properties fo:font-weight="bold" style:font-weight-asian="bold" style:font-weight-complex="bold"/>
    </style:style>
    <style:style style:name="P87" style:parent-style-name="SBCparagraph" style:family="paragraph">
      <style:paragraph-properties fo:text-indent="0in"/>
    </style:style>
    <style:style style:name="T88" style:parent-style-name="Fonteparág.padrão" style:family="text">
      <style:text-properties fo:font-weight="bold" style:font-weight-asian="bold" style:font-weight-complex="bold"/>
    </style:style>
    <style:style style:name="P89" style:parent-style-name="SBCparagraph" style:family="paragraph">
      <style:paragraph-properties fo:text-indent="0in"/>
    </style:style>
    <style:style style:name="P90" style:parent-style-name="SBCparagraph" style:family="paragraph">
      <style:paragraph-properties fo:text-indent="0in"/>
    </style:style>
    <style:style style:name="P91" style:parent-style-name="SBCparagraph" style:family="paragraph">
      <style:paragraph-properties fo:text-indent="0in"/>
    </style:style>
    <style:style style:name="T92" style:parent-style-name="Fonteparág.padrão" style:family="text">
      <style:text-properties fo:font-weight="bold" style:font-weight-asian="bold" style:font-weight-complex="bold"/>
    </style:style>
    <style:style style:name="P93" style:parent-style-name="SBCparagraph" style:family="paragraph">
      <style:paragraph-properties fo:text-indent="0in"/>
    </style:style>
    <style:style style:name="T94" style:parent-style-name="Fonteparág.padrão" style:family="text">
      <style:text-properties fo:font-weight="bold" style:font-weight-asian="bold" style:font-weight-complex="bold"/>
    </style:style>
    <style:style style:name="P95" style:parent-style-name="SBCparagraph" style:family="paragraph">
      <style:paragraph-properties fo:text-indent="0in"/>
    </style:style>
    <style:style style:name="P96" style:parent-style-name="SBCparagraph" style:family="paragraph">
      <style:paragraph-properties fo:text-indent="0in"/>
    </style:style>
    <style:style style:name="P97" style:parent-style-name="SBCparagraph" style:family="paragraph">
      <style:paragraph-properties fo:text-indent="0in"/>
    </style:style>
    <style:style style:name="T98" style:parent-style-name="Fonteparág.padrão" style:family="text">
      <style:text-properties fo:font-weight="bold" style:font-weight-asian="bold" style:font-weight-complex="bold"/>
    </style:style>
    <style:style style:name="P99" style:parent-style-name="SBCparagraph" style:family="paragraph">
      <style:paragraph-properties fo:text-indent="0in"/>
    </style:style>
    <style:style style:name="T100" style:parent-style-name="Fonteparág.padrão" style:family="text">
      <style:text-properties fo:font-weight="bold" style:font-weight-asian="bold" style:font-weight-complex="bold"/>
    </style:style>
    <style:style style:name="P101" style:parent-style-name="SBCparagraph" style:family="paragraph">
      <style:paragraph-properties fo:text-indent="0in"/>
    </style:style>
    <style:style style:name="T102" style:parent-style-name="Fonteparág.padrão" style:family="text">
      <style:text-properties fo:font-weight="bold" style:font-weight-asian="bold" style:font-weight-complex="bold"/>
    </style:style>
    <style:style style:name="P103" style:parent-style-name="SBCparagraph" style:family="paragraph">
      <style:paragraph-properties fo:text-indent="0in"/>
    </style:style>
    <style:style style:name="P104" style:parent-style-name="SBCparagraph" style:family="paragraph">
      <style:paragraph-properties fo:text-indent="0in"/>
    </style:style>
    <style:style style:name="P105" style:parent-style-name="SBCparagraph" style:family="paragraph">
      <style:paragraph-properties fo:text-indent="0in"/>
    </style:style>
    <style:style style:name="P106" style:parent-style-name="SBCparagraph" style:family="paragraph">
      <style:paragraph-properties fo:text-indent="0in"/>
    </style:style>
    <style:style style:name="P107" style:parent-style-name="SBCparagraph" style:family="paragraph">
      <style:paragraph-properties fo:text-indent="0in"/>
    </style:style>
    <style:style style:name="P108" style:parent-style-name="SBCparagraph" style:family="paragraph">
      <style:paragraph-properties fo:text-indent="0in"/>
    </style:style>
    <style:style style:name="T109" style:parent-style-name="Fonteparág.padrão" style:family="text">
      <style:text-properties fo:font-weight="bold" style:font-weight-asian="bold" style:font-weight-complex="bold"/>
    </style:style>
    <style:style style:name="P110" style:parent-style-name="SBCparagraph" style:family="paragraph">
      <style:paragraph-properties fo:text-indent="0in"/>
      <style:text-properties fo:font-weight="bold" style:font-weight-asian="bold" style:font-weight-complex="bold"/>
    </style:style>
    <style:style style:name="P111" style:parent-style-name="SBCparagraph" style:family="paragraph">
      <style:paragraph-properties fo:text-indent="0in"/>
      <style:text-properties fo:font-weight="bold" style:font-weight-asian="bold" style:font-weight-complex="bold"/>
    </style:style>
    <style:style style:name="P112" style:parent-style-name="SBCparagraph" style:family="paragraph">
      <style:paragraph-properties fo:text-indent="0in"/>
    </style:style>
    <style:style style:name="P113" style:parent-style-name="SBCparagraph" style:family="paragraph">
      <style:paragraph-properties fo:text-indent="0in"/>
    </style:style>
    <style:style style:name="P114" style:parent-style-name="SBCparagraph" style:family="paragraph">
      <style:paragraph-properties fo:text-indent="0in"/>
    </style:style>
    <style:style style:name="P115" style:parent-style-name="SBCparagraph" style:family="paragraph">
      <style:paragraph-properties fo:text-indent="0in"/>
    </style:style>
    <style:style style:name="P116" style:parent-style-name="SBCparagraph" style:family="paragraph">
      <style:paragraph-properties fo:text-indent="0in"/>
    </style:style>
    <style:style style:name="P117" style:parent-style-name="SBCparagraph" style:family="paragraph">
      <style:paragraph-properties fo:text-indent="0in"/>
    </style:style>
    <style:style style:name="T118" style:parent-style-name="Fonteparág.padrão" style:family="text">
      <style:text-properties fo:font-weight="bold" style:font-weight-asian="bold" style:font-weight-complex="bold"/>
    </style:style>
    <style:style style:name="P119" style:parent-style-name="SBCparagraph" style:family="paragraph">
      <style:paragraph-properties fo:text-indent="0in"/>
    </style:style>
    <style:style style:name="P120" style:parent-style-name="SBCparagraph" style:family="paragraph">
      <style:paragraph-properties fo:text-indent="0in"/>
    </style:style>
    <style:style style:name="P121" style:parent-style-name="SBCparagraph" style:family="paragraph">
      <style:paragraph-properties fo:text-indent="0in"/>
    </style:style>
    <style:style style:name="P122" style:parent-style-name="SBCparagraph" style:family="paragraph">
      <style:paragraph-properties fo:text-indent="0in"/>
      <style:text-properties fo:font-weight="bold" style:font-weight-asian="bold" style:font-weight-complex="bold"/>
    </style:style>
    <style:style style:name="P123" style:parent-style-name="SBCparagraph" style:family="paragraph">
      <style:paragraph-properties fo:text-indent="0in"/>
    </style:style>
    <style:style style:name="P124" style:parent-style-name="SBCparagraph" style:family="paragraph">
      <style:paragraph-properties fo:text-indent="0in"/>
    </style:style>
    <style:style style:name="P125" style:parent-style-name="SBCparagraph" style:family="paragraph">
      <style:paragraph-properties fo:text-indent="0in"/>
      <style:text-properties fo:font-weight="bold" style:font-weight-asian="bold" style:font-weight-complex="bold"/>
    </style:style>
    <style:style style:name="P126" style:parent-style-name="SBCparagraph" style:family="paragraph">
      <style:paragraph-properties fo:text-indent="0in"/>
      <style:text-properties fo:font-weight="bold" style:font-weight-asian="bold" style:font-weight-complex="bold"/>
    </style:style>
    <style:style style:name="P127" style:parent-style-name="SBCparagraph" style:family="paragraph">
      <style:paragraph-properties fo:text-indent="0in"/>
    </style:style>
    <style:style style:name="P128" style:parent-style-name="SBCparagraph" style:family="paragraph">
      <style:paragraph-properties fo:text-indent="0in"/>
    </style:style>
    <style:style style:name="P129" style:parent-style-name="SBCparagraph" style:family="paragraph">
      <style:paragraph-properties fo:text-indent="0in"/>
    </style:style>
    <style:style style:name="P130" style:parent-style-name="SBCparagraph" style:family="paragraph">
      <style:paragraph-properties fo:text-indent="0in"/>
    </style:style>
    <style:style style:name="P131" style:parent-style-name="SBCparagraph" style:family="paragraph">
      <style:paragraph-properties fo:text-indent="0in"/>
    </style:style>
    <style:style style:name="P132" style:parent-style-name="SBCparagraph" style:family="paragraph">
      <style:paragraph-properties fo:text-indent="0in"/>
    </style:style>
    <style:style style:name="P133" style:parent-style-name="SBCparagraph" style:family="paragraph">
      <style:paragraph-properties fo:text-indent="0in"/>
    </style:style>
    <style:style style:name="P134" style:parent-style-name="SBCparagraph" style:family="paragraph">
      <style:paragraph-properties fo:text-indent="0in"/>
    </style:style>
    <style:style style:name="P135" style:parent-style-name="SBCparagraph" style:family="paragraph">
      <style:paragraph-properties fo:text-indent="0in"/>
    </style:style>
    <style:style style:name="P136" style:parent-style-name="SBCparagraph" style:family="paragraph">
      <style:paragraph-properties fo:text-indent="0in"/>
    </style:style>
    <style:style style:name="P137" style:parent-style-name="SBCparagraph" style:family="paragraph">
      <style:paragraph-properties fo:text-indent="0in"/>
    </style:style>
    <style:style style:name="P138" style:parent-style-name="SBCparagraph" style:family="paragraph">
      <style:paragraph-properties fo:text-indent="0in"/>
    </style:style>
    <style:style style:name="P139" style:parent-style-name="SBCparagraph" style:family="paragraph">
      <style:paragraph-properties fo:text-indent="0in"/>
    </style:style>
    <style:style style:name="P140" style:parent-style-name="SBCparagraph" style:family="paragraph">
      <style:paragraph-properties fo:text-indent="0in"/>
    </style:style>
    <style:style style:name="P141" style:parent-style-name="SBCparagraph" style:family="paragraph">
      <style:paragraph-properties fo:text-indent="0in"/>
    </style:style>
    <style:style style:name="P142" style:parent-style-name="SBCparagraph" style:family="paragraph">
      <style:paragraph-properties fo:text-indent="0in"/>
    </style:style>
    <style:style style:name="P143" style:parent-style-name="SBCparagraph" style:family="paragraph">
      <style:paragraph-properties fo:text-indent="0in"/>
    </style:style>
    <style:style style:name="P144" style:parent-style-name="SBCparagraph" style:family="paragraph">
      <style:paragraph-properties fo:text-indent="0in"/>
    </style:style>
    <style:style style:name="P145" style:parent-style-name="SBCparagraph" style:family="paragraph">
      <style:paragraph-properties fo:text-indent="0in"/>
    </style:style>
    <style:style style:name="P146" style:parent-style-name="SBCparagraph" style:family="paragraph">
      <style:paragraph-properties fo:text-indent="0in"/>
    </style:style>
    <style:style style:name="P147" style:parent-style-name="SBCparagraph" style:family="paragraph">
      <style:paragraph-properties fo:text-indent="0in"/>
    </style:style>
    <style:style style:name="P148" style:parent-style-name="SBCparagraph" style:family="paragraph">
      <style:paragraph-properties fo:text-indent="0in"/>
    </style:style>
    <style:style style:name="P149" style:parent-style-name="SBCparagraph" style:family="paragraph">
      <style:paragraph-properties fo:text-indent="0in"/>
    </style:style>
    <style:style style:name="P150" style:parent-style-name="SBCparagraph" style:family="paragraph">
      <style:paragraph-properties fo:text-indent="0in"/>
    </style:style>
    <style:style style:name="P151" style:parent-style-name="SBCparagraph" style:family="paragraph">
      <style:paragraph-properties fo:text-indent="0in"/>
    </style:style>
    <style:style style:name="P152" style:parent-style-name="SBCparagraph" style:family="paragraph">
      <style:paragraph-properties fo:text-indent="0in"/>
    </style:style>
    <style:style style:name="P153" style:parent-style-name="SBCparagraph" style:family="paragraph">
      <style:paragraph-properties fo:text-indent="0in"/>
    </style:style>
    <style:style style:name="P154" style:parent-style-name="NormalWeb" style:family="paragraph">
      <style:paragraph-properties fo:margin-top="0.0826in" fo:margin-bottom="0in" fo:text-indent="-0.1965in"/>
    </style:style>
    <style:style style:name="T155" style:parent-style-name="Fonteparág.padrão" style:family="text">
      <style:text-properties style:font-name="Times" fo:color="#000000"/>
    </style:style>
    <style:style style:name="P156" style:parent-style-name="NormalWeb" style:family="paragraph">
      <style:paragraph-properties fo:margin-top="0.0826in" fo:margin-bottom="0in" fo:text-indent="-0.1965in"/>
    </style:style>
    <style:style style:name="T157" style:parent-style-name="Fonteparág.padrão" style:family="text">
      <style:text-properties style:font-name="Times" fo:color="#000000"/>
    </style:style>
    <style:style style:name="P158" style:parent-style-name="NormalWeb" style:family="paragraph">
      <style:paragraph-properties fo:margin-top="0.0826in" fo:margin-bottom="0in" fo:text-indent="-0.1965in"/>
    </style:style>
    <style:style style:name="T159" style:parent-style-name="Fonteparág.padrão" style:family="text">
      <style:text-properties style:font-name="Times" fo:color="#000000"/>
    </style:style>
    <style:style style:name="P160" style:parent-style-name="NormalWeb" style:family="paragraph">
      <style:paragraph-properties fo:margin-top="0.0826in" fo:margin-bottom="0in" fo:text-indent="-0.1965in"/>
    </style:style>
    <style:style style:name="T161" style:parent-style-name="Fonteparág.padrão" style:family="text">
      <style:text-properties style:font-name="Times" fo:color="#000000"/>
    </style:style>
    <style:style style:name="P162" style:parent-style-name="NormalWeb" style:family="paragraph">
      <style:paragraph-properties fo:margin-top="0.0826in" fo:margin-bottom="0in" fo:text-indent="-0.1965in"/>
    </style:style>
    <style:style style:name="T163" style:parent-style-name="Fonteparág.padrão" style:family="text">
      <style:text-properties style:font-name="Times" fo:color="#000000"/>
    </style:style>
    <style:style style:name="P164" style:parent-style-name="NormalWeb" style:family="paragraph">
      <style:paragraph-properties fo:margin-top="0.0826in" fo:margin-bottom="0in" fo:text-indent="-0.1965in"/>
    </style:style>
    <style:style style:name="T165" style:parent-style-name="Fonteparág.padrão" style:family="text">
      <style:text-properties style:font-name="Times" fo:color="#000000"/>
    </style:style>
    <style:style style:name="P166" style:parent-style-name="NormalWeb" style:family="paragraph">
      <style:paragraph-properties fo:margin-top="0.0826in" fo:margin-bottom="0in" fo:text-indent="-0.1965in"/>
    </style:style>
    <style:style style:name="T167" style:parent-style-name="Fonteparág.padrão" style:family="text">
      <style:text-properties style:font-name="Times" fo:color="#000000"/>
    </style:style>
    <style:style style:name="P168" style:parent-style-name="SBCreference" style:family="paragraph">
      <style:paragraph-properties fo:text-align="start"/>
    </style:style>
  </office:automatic-styles>
  <office:body>
    <office:text text:use-soft-page-breaks="true">
      <text:p text:style-name="P1"><text:span text:style-name="T2">PROJETO 1: FAMILIARIZAÇÃO COM MÁQUINA VIRTUAL E SINCRONIZAÇÃO DE PROCESSOS</text:span></text:p>
      <text:p text:style-name="P3"><text:span text:style-name="T4">Igor Gabriel Batista Rezende, Lucas Antonio Paiva Rezende Sousa, Mateus Bonfim de Souza</text:span></text:p>
      <text:p text:style-name="P5"><text:span text:style-name="T6">Departamento de Ciência da Computação – Universidade Federal de Catalão (UFCat)</text:span></text:p>
      <text:p text:style-name="P7"><text:span text:style-name="T8">igorgabriel@discente.ufg.br, lucas.rzd@discente.ufcat.edu.br, mateusbonfim6@discente.ufcat.edu.br</text:span></text:p>
      <text:p text:style-name="SBCresumo"/>
      <text:h text:style-name="SBCtitle1" text:outline-level="1">Tarefa 4</text:h>
      <text:p text:style-name="SBCparagraphfirst"><text:tab/>A tarefa proposta é apresentar uma implementação do algoritmo do jantar dos filósofos, utilizando<text:s/><text:span text:style-name="T9">threads<text:s/></text:span>e semáforos. A implementação feita utiliza um semáforo para cada<text:s/>filósofo, e também um vetor indicando o status de cada filósofo (Pensando, Faminto, Comendo). Sempre que um filósofo está no estado “Faminto” ele verifica se o garfo à sua esquerda e direita estão disponíveis. Caso sim, ele tem condições de comer, e caso contrário ele aguarda até que os garfos estejam disponíveis. O código será apresentado em seguida, e quando executado apresenta detalhadamente a situação de cada filósofo e de cada garfo.</text:p>
      <text:p text:style-name="SBCparagraph"/>
      <text:p text:style-name="P10">#include &lt;stdio.h&gt;</text:p>
      <text:p text:style-name="P11">#include &lt;stdlib.h&gt;</text:p>
      <text:p text:style-name="P12">#include &lt;pthread.h&gt;</text:p>
      <text:p text:style-name="P13">#include<text:s/>&lt;semaphore.h&gt;</text:p>
      <text:p text:style-name="P14">#include &lt;time.h&gt;</text:p>
      <text:p text:style-name="P15"/>
      <text:p text:style-name="P16">#define N 5<text:tab/><text:span text:style-name="T17">//Número de filósofos</text:span></text:p>
      <text:p text:style-name="P18">#define LEFT (i+N-1)%N<text:tab/><text:span text:style-name="T19">//Filosofo à esquerda de i</text:span></text:p>
      <text:p text:style-name="P20">#define RIGHT (i+1)%N<text:tab/><text:span text:style-name="T21">//Filosofo à direita de i</text:span></text:p>
      <text:p text:style-name="P22">#define THINKING 0</text:p>
      <text:p text:style-name="P23">#define HUNGRY 1</text:p>
      <text:p text:style-name="P24">#define EATING 2</text:p>
      <text:p text:style-name="P25"/>
      <text:p text:style-name="P26">pthread_t tid[N];<text:tab/><text:span text:style-name="T27">//Uma thread para<text:s/></text:span><text:span text:style-name="T28">cada filósofo</text:span></text:p>
      <text:p text:style-name="P29">int state[N];<text:tab/><text:span text:style-name="T30">//Estado de cada filósofo</text:span></text:p>
      <text:p text:style-name="P31">sem_t mutex;</text:p>
      <text:p text:style-name="P32">sem_t s[N];<text:tab/><text:span text:style-name="T33">//Um semáforo para cada filósofo</text:span></text:p>
      <text:p text:style-name="P34"/>
      <text:p text:style-name="P35">void test(int i){</text:p>
      <text:p text:style-name="P36"><text:s text:c="3"/>if(state[LEFT] == 0)</text:p>
      <text:p text:style-name="P37"><text:s text:c="6"/>printf("O filosofo a esquerda de %d está pensando!!\n", i+1);</text:p>
      <text:p text:style-name="P38"><text:s text:c="3"/>else if (state[LEFT] == 1)</text:p>
      <text:p text:style-name="P39"><text:s text:c="6"/>printf("O filosofo a esquerda de %d está com fome!!\n", i+1);</text:p>
      <text:p text:style-name="P40"><text:s text:c="3"/>else if (state[LEFT] == 2)</text:p>
      <text:p text:style-name="P41"><text:s text:c="6"/>printf("O filosofo a esquerda de %d está comendo!!\n", i+1);</text:p>
      <text:p text:style-name="P42"/>
      <text:p text:style-name="P43"><text:s text:c="3"/>if(state[RIGHT] == 0)</text:p>
      <text:p text:style-name="P44"><text:s text:c="6"/>printf("O filosofo a direita de %d está pensando!!\n", i+1);</text:p>
      <text:p text:style-name="P45"><text:s text:c="3"/>else if (state[RIGHT] == 1)</text:p>
      <text:p text:style-name="P46"><text:s text:c="6"/>printf("O filosofo a direita de %d está com fome!!\n", i+1);</text:p>
      <text:p text:style-name="P47"><text:s text:c="3"/>else if (state[RIGHT] == 2)</text:p>
      <text:p text:style-name="P48"><text:s text:c="6"/>printf("O filosofo a direita de %d está comendo!!\n", i+1);</text:p>
      <text:p text:style-name="P49"/>
      <text:p text:style-name="P50">//Testa se o filósofo pode pegar os garfos</text:p>
      <text:p text:style-name="P51"><text:s text:c="3"/>if(state[i]==HUNGRY &amp;&amp; state[LEFT]!=EATING &amp;&amp; state[RIGHT]!=EATING){</text:p>
      <text:p text:style-name="P52"><text:s text:c="6"/>state[i] = EATING;</text:p>
      <text:p text:style-name="P53"><text:s text:c="6"/>printf("O filosofo %d pegou os garfos %d e %d\n", i+1, LEFT+1, i+1);</text:p>
      <text:p text:style-name="P54"><text:s text:c="6"/>sem_post(&amp;s[i]);</text:p>
      <text:p text:style-name="P55"><text:s text:c="3"/>}</text:p>
      <text:p text:style-name="P56">}</text:p>
      <text:p text:style-name="P57"/>
      <text:p text:style-name="P58">void take_forks(int i){<text:tab/><text:span text:style-name="T59">//Função para pegar os garfos</text:span></text:p>
      <text:p text:style-name="P60"><text:s text:c="3"/>sem_wait(&amp;mutex);<text:tab/><text:tab/><text:span text:style-name="T61">//Trava o semáforo mutex</text:span></text:p>
      <text:p text:style-name="P62"><text:s text:c="3"/>state[i] = HUNGRY;<text:tab/><text:span text:style-name="T63">//Muda o estado do filósofo para "Faminto"</text:span></text:p>
      <text:p text:style-name="P64"><text:s text:c="3"/>printf("O filosofo %d está com fome!!\n", i+1);</text:p>
      <text:p text:style-name="P65"><text:s text:c="3"/>test(i);<text:tab/><text:span text:style-name="T66">//Chama a função para testar a situação dos garfos à direita e esquerda</text:span></text:p>
      <text:p text:style-name="P67"><text:s text:c="3"/>sem_post(&amp;mutex);<text:tab/><text:tab/><text:span text:style-name="T68">//Libera o semáforo mutex</text:span></text:p>
      <text:p text:style-name="P69"><text:s text:c="3"/>sem_wait(&amp;s[i]);<text:tab/><text:span text:style-name="T70">//Trava o semáforo do filósofo i</text:span></text:p>
      <text:p text:style-name="P71">}</text:p>
      <text:p text:style-name="P72"/>
      <text:p text:style-name="P73">void put_forks(int i){<text:tab/><text:span text:style-name="T74">//Função para devolver os garfos</text:span></text:p>
      <text:soft-page-break/>
      <text:p text:style-name="P75"><text:s text:c="3"/>sem_wait(&amp;mutex);<text:s/><text:tab/><text:span text:style-name="T76">//Trava o semáforo mutex</text:span></text:p>
      <text:p text:style-name="P77"><text:s text:c="3"/>state[i] = THINKING;<text:tab/><text:span text:style-name="T78">//Altera o estado do filósofo i<text:s/></text:span><text:span text:style-name="T79">para "Pensando"</text:span></text:p>
      <text:p text:style-name="P80"><text:s text:c="3"/>printf("O filosofo %d devolveu os garfos %d e %d!!\n", i+1, LEFT+1, i+1);</text:p>
      <text:p text:style-name="P81"><text:s text:c="3"/>printf(“O filósofo %d está pensando!!\n”, i+1);</text:p>
      <text:p text:style-name="P82"><text:s text:c="3"/>test(LEFT);<text:tab/><text:span text:style-name="T83">//Verifica a situação do filósofo à esquerda</text:span></text:p>
      <text:p text:style-name="P84"><text:s text:c="3"/>test(RIGHT);<text:tab/><text:span text:style-name="T85">//Verifica a situação do filósofo à<text:s/></text:span><text:span text:style-name="T86">direita</text:span></text:p>
      <text:p text:style-name="P87"><text:s text:c="3"/>sem_post(&amp;mutex)<text:s/>;<text:tab/><text:span text:style-name="T88">//Libera o semárofo mutex</text:span></text:p>
      <text:p text:style-name="P89">}</text:p>
      <text:p text:style-name="P90"/>
      <text:p text:style-name="P91">void *philosopher(void *arg){<text:tab/><text:span text:style-name="T92">//Função do filósofo</text:span></text:p>
      <text:p text:style-name="P93"><text:s text:c="3"/>int i = (int *) arg;<text:tab/><text:span text:style-name="T94">//Índice do filósofo</text:span></text:p>
      <text:p text:style-name="P95"><text:s text:c="3"/>while(1){</text:p>
      <text:p text:style-name="P96"><text:s text:c="6"/>sleep(2);</text:p>
      <text:p text:style-name="P97"><text:s text:c="6"/>take_forks(i);<text:tab/><text:span text:style-name="T98">//O filósofo tenta pegar os garfos</text:span></text:p>
      <text:p text:style-name="P99"><text:s text:c="6"/>printf("O filosofo %d comeu.\n", i+1);<text:tab/><text:span text:style-name="T100">//O filósofo conseguiu os garfos para comer</text:span></text:p>
      <text:p text:style-name="P101"><text:s text:c="6"/>put_forks(i);<text:tab/><text:span text:style-name="T102">//O filósofo i devolve os garfos</text:span></text:p>
      <text:p text:style-name="P103"><text:s text:c="3"/>}</text:p>
      <text:p text:style-name="P104">}</text:p>
      <text:p text:style-name="P105"/>
      <text:p text:style-name="P106">int main (void){</text:p>
      <text:p text:style-name="P107"><text:s text:c="3"/>int i;</text:p>
      <text:p text:style-name="P108"><text:s text:c="3"/>sem_init(&amp;mutex, 0, 1);<text:tab/><text:span text:style-name="T109">//Iniciando a variável de semáforo mutex</text:span></text:p>
      <text:p text:style-name="P110"/>
      <text:p text:style-name="P111"><text:s text:c="3"/>//Iniciando as variáveis<text:s/>de semáforo para cada filósofo</text:p>
      <text:p text:style-name="P112"><text:s text:c="3"/>for(i = 0; i &lt; N; i++)</text:p>
      <text:p text:style-name="P113"><text:s text:c="6"/>sem_init(&amp;s[i], 0, 0);</text:p>
      <text:p text:style-name="P114"/>
      <text:p text:style-name="P115"/>
      <text:p text:style-name="P116"/>
      <text:p text:style-name="P117"><text:s text:c="3"/><text:span text:style-name="T118">//Criando uma thread para cada filósofo</text:span></text:p>
      <text:p text:style-name="P119"><text:s text:c="3"/>for(i=0;i&lt;N;i++)</text:p>
      <text:p text:style-name="P120"><text:s text:c="6"/>pthread_create (&amp;(tid[i]), NULL, philosopher, (int *)i);</text:p>
      <text:p text:style-name="P121"/>
      <text:soft-page-break/>
      <text:p text:style-name="P122"><text:s text:c="3"/>//Iniciando cada thread criada</text:p>
      <text:p text:style-name="P123"><text:s text:c="3"/>for(i=0;i&lt;N;i++)</text:p>
      <text:p text:style-name="P124"><text:s text:c="6"/>pthread_join (tid[i], NULL);</text:p>
      <text:p text:style-name="P125"/>
      <text:p text:style-name="P126"><text:s text:c="3"/>//Ao final, destruindo os semáforos criados anteriormente</text:p>
      <text:p text:style-name="P127"><text:s text:c="3"/>for(i=0;i&lt;N;i++)</text:p>
      <text:p text:style-name="P128"><text:s text:c="6"/>sem_destroy(&amp;s[i]);</text:p>
      <text:p text:style-name="P129"><text:s text:c="6"/>sem_destroy(&amp;mutex);</text:p>
      <text:p text:style-name="P130"><text:tab/></text:p>
      <text:p text:style-name="P131"><text:s text:c="3"/>return 0;</text:p>
      <text:p text:style-name="P132">}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soft-page-break/>
      <text:p text:style-name="SBCreferences">Referências</text:p>
      <text:p text:style-name="P154"><text:span text:style-name="T155">KERRISK, Michael. PTHREAD_CREATE. Disponível em: &lt;http://man7.org/linux/man-pages/man3/pthread_create.3.html&gt;. Acesso em: 10 fev. 2022.</text:span></text:p>
      <text:p text:style-name="P156"><text:span text:style-name="T157">ATOMIC_FLAG_CLEAR, atomic_flag_clear_explicit. Disponível em: &lt;https://en.cppreference.com/w/c/atomic/atomic_flag_clear&gt;. Acesso em: 10 fev. 2022.</text:span></text:p>
      <text:p text:style-name="P158"><text:span text:style-name="T159">ATOMIC_FLAG_TEST_AND_SET, atomic_flag_test_and_set_explicit. Disponível em: &lt;https://en.cppreference.com/w/c/atomic/atomic_flag_test_and_set&gt;. Acesso em: 10 fev. 2022.</text:span></text:p>
      <text:p text:style-name="P160"><text:span text:style-name="T161">SEM_WAIT. Disponível em: &lt;http://man7.org/linux/man-pages/man3/sem_wait.3.html&gt;. Acesso em: 10 fev. 2022.</text:span></text:p>
      <text:p text:style-name="P162"><text:span text:style-name="T163">SEM_POST. Disponível em: &lt;http://man7.org/linux/man-pages/man3/sem_post.3.html&gt;. Acesso em: 10 fev. 2022.</text:span></text:p>
      <text:p text:style-name="P164"><text:span text:style-name="T165">SEM_INIT. Disponível em: &lt;http://man7.org/linux/man-pages/man3/sem_init.3.html&gt;. Acesso em:10 fev. 2022.</text:span></text:p>
      <text:p text:style-name="P166"><text:span text:style-name="T167">SEM_DESTROY. Disponível em: &lt;http://man7.org/linux/man-pages/man3/sem_destroy.3.html&gt;. Acesso em: 10 fev. 2022.</text:span></text:p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text-combine="none" fo:hyphenate="true"/>
    </style:default-style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Título2" style:display-name="Título 2" style:family="paragraph" style:parent-style-name="Título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Título3" style:display-name="Título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Título5" style:display-name="Título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style:language-asian="pt" style:country-asian="BR" fo:hyphenate="false"/>
    </style:style>
    <style:style style:name="Título6" style:display-name="Título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style:language-asian="pt" style:country-asian="BR" fo:hyphenate="false"/>
    </style:style>
    <style:style style:name="Título7" style:display-name="Título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style:language-asian="pt" style:country-asian="BR" fo:hyphenate="false"/>
    </style:style>
    <style:style style:name="Título8" style:display-name="Título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Título9" style:display-name="Título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style:language-asian="pt" style:country-asian="BR"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ítulo" style:next-style-name="Textbody">
      <style:text-properties style:font-weight-complex="bold" fo:hyphenate="false"/>
    </style:style>
    <style:style style:name="Lista" style:display-name="Lista" style:family="paragraph" style:parent-style-name="Textbody">
      <style:text-properties style:font-name-complex="Lucidasan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style:language-asian="pt" style:country-asian="BR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style:language-asian="pt" style:country-asian="BR"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style:language-asian="pt" style:country-asian="BR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style:language-asian="pt" style:country-asian="BR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0.2958in"/>
        </style:tab-stops>
      </style:paragraph-properties>
      <style:text-properties style:language-asian="pt" style:country-asian="BR"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0.78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Númerodepágina" style:display-name="Número de página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text:list-style style:name="SBCnumberlist" style:display-name="SBC:number:list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outline-level-style>
      <text:outline-level-style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s Antônio</meta:initial-creator>
    <dc:creator>Lucas Antônio</dc:creator>
    <meta:creation-date>2022-02-15T20:15:00Z</meta:creation-date>
    <dc:date>2022-02-15T20:15:00Z</dc:date>
    <meta:template xlink:href="Normal" xlink:type="simple"/>
    <meta:editing-cycles>2</meta:editing-cycles>
    <meta:editing-duration>PT420S</meta:editing-duration>
    <meta:user-defined meta:name="Info 1"/>
    <meta:user-defined meta:name="Info 2"/>
    <meta:user-defined meta:name="Info 3"/>
    <meta:user-defined meta:name="Info 4"/>
    <meta:document-statistic meta:page-count="5" meta:paragraph-count="9" meta:word-count="773" meta:character-count="4940" meta:row-count="34" meta:non-whitespace-character-count="4176"/>
  </office:meta>
</office:document-meta>
</file>