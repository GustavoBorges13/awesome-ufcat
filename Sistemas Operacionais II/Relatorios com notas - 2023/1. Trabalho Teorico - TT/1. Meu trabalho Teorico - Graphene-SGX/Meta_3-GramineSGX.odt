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BCtitle" style:master-page-name="MP0" style:family="paragraph">
      <style:paragraph-properties fo:break-before="page"/>
    </style:style>
    <style:style style:name="T2" style:parent-style-name="DefaultParagraphFont" style:family="text">
      <style:text-properties fo:language="es" fo:country="ES"/>
    </style:style>
    <style:style style:name="T3" style:parent-style-name="DefaultParagraphFont" style:family="text">
      <style:text-properties style:text-position="super 66.6%" fo:language="es" fo:country="ES"/>
    </style:style>
    <style:style style:name="T4" style:parent-style-name="DefaultParagraphFont"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DefaultParagraphFont"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DefaultParagraphFont" style:family="text">
      <style:text-properties fo:color="#0070C0"/>
    </style:style>
    <style:style style:name="P10" style:parent-style-name="SBCparagraph" style:family="paragraph">
      <style:paragraph-properties fo:text-indent="0.1972in"/>
    </style:style>
    <style:style style:name="T11" style:parent-style-name="DefaultParagraphFont" style:family="text">
      <style:text-properties fo:color="#0070C0"/>
    </style:style>
    <style:style style:name="P12" style:parent-style-name="SBCparagraph" style:family="paragraph">
      <style:paragraph-properties fo:text-indent="0.1972in"/>
    </style:style>
    <style:style style:name="T13" style:parent-style-name="DefaultParagraphFont" style:family="text">
      <style:text-properties fo:color="#0070C0"/>
    </style:style>
    <style:style style:name="T14" style:parent-style-name="DefaultParagraphFont" style:family="text">
      <style:text-properties fo:color="#0070C0"/>
    </style:style>
    <style:style style:name="T15" style:parent-style-name="DefaultParagraphFont" style:family="text">
      <style:text-properties fo:color="#0070C0"/>
    </style:style>
    <style:style style:name="T16" style:parent-style-name="DefaultParagraphFont" style:family="text">
      <style:text-properties fo:color="#0070C0"/>
    </style:style>
    <style:style style:name="T17" style:parent-style-name="DefaultParagraphFont"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DefaultParagraphFont"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DefaultParagraphFont" style:family="text">
      <style:text-properties fo:color="#0070C0"/>
    </style:style>
    <style:style style:name="P24" style:parent-style-name="SBCparagraph" style:family="paragraph">
      <style:paragraph-properties fo:text-indent="0.1972in"/>
    </style:style>
    <style:style style:name="T25" style:parent-style-name="DefaultParagraphFont" style:family="text">
      <style:text-properties fo:color="#0070C0"/>
    </style:style>
    <style:style style:name="T26" style:parent-style-name="DefaultParagraphFont" style:family="text">
      <style:text-properties fo:color="#0070C0"/>
    </style:style>
    <style:style style:name="T27" style:parent-style-name="DefaultParagraphFont" style:family="text">
      <style:text-properties fo:color="#0070C0"/>
    </style:style>
    <style:style style:name="T28" style:parent-style-name="DefaultParagraphFont" style:family="text">
      <style:text-properties fo:color="#0070C0"/>
    </style:style>
    <style:style style:name="T29" style:parent-style-name="DefaultParagraphFont" style:family="text">
      <style:text-properties fo:color="#0070C0"/>
    </style:style>
    <style:style style:name="P30" style:parent-style-name="SBCparagraph" style:family="paragraph">
      <style:paragraph-properties fo:text-indent="0.1972in"/>
    </style:style>
    <style:style style:name="T31" style:parent-style-name="DefaultParagraphFont" style:family="text">
      <style:text-properties style:font-name="Calibri"/>
    </style:style>
    <style:style style:name="T32" style:parent-style-name="DefaultParagraphFont" style:family="text">
      <style:text-properties fo:color="#0070C0"/>
    </style:style>
    <style:style style:name="T33" style:parent-style-name="DefaultParagraphFont" style:family="text">
      <style:text-properties fo:color="#0070C0"/>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style:style>
    <style:style style:name="T37" style:parent-style-name="DefaultParagraphFont" style:family="text">
      <style:text-properties fo:color="#0070C0"/>
    </style:style>
    <style:style style:name="T38" style:parent-style-name="DefaultParagraphFont" style:family="text">
      <style:text-properties fo:color="#0070C0"/>
    </style:style>
    <style:style style:name="P39" style:parent-style-name="SBCtitle1" style:list-style-name="Outline" style:family="paragraph"/>
    <style:style style:name="P40" style:parent-style-name="SBCparagraphfirst" style:family="paragraph">
      <style:paragraph-properties fo:text-indent="0.1972in"/>
    </style:style>
    <style:style style:name="P41" style:parent-style-name="SBCparagraph" style:family="paragraph">
      <style:paragraph-properties fo:text-indent="0.1972in"/>
    </style:style>
    <style:style style:name="T42" style:parent-style-name="DefaultParagraphFont" style:family="text">
      <style:text-properties fo:color="#4472C4"/>
    </style:style>
    <style:style style:name="P43" style:parent-style-name="SBCparagraph" style:family="paragraph">
      <style:paragraph-properties fo:text-indent="0.1972in"/>
    </style:style>
    <style:style style:name="P44" style:parent-style-name="SBCtitle1" style:list-style-name="Outline" style:family="paragraph"/>
    <style:style style:name="P45" style:parent-style-name="SBCparagraph" style:family="paragraph">
      <style:paragraph-properties fo:text-indent="0.1972in"/>
    </style:style>
    <style:style style:name="P46" style:parent-style-name="SBCparagraph" style:family="paragraph">
      <style:paragraph-properties fo:text-indent="0.1972in"/>
    </style:style>
    <style:style style:name="T47" style:parent-style-name="DefaultParagraphFont" style:family="text">
      <style:text-properties fo:color="#4472C4"/>
    </style:style>
    <style:style style:name="P48" style:parent-style-name="SBCparagraph" style:family="paragraph">
      <style:paragraph-properties fo:text-indent="0.1972in"/>
    </style:style>
    <style:style style:name="P49" style:parent-style-name="SBCparagraph" style:family="paragraph">
      <style:paragraph-properties fo:text-indent="0.1972in"/>
    </style:style>
    <style:style style:name="T50" style:parent-style-name="DefaultParagraphFont" style:family="text">
      <style:text-properties style:font-name="Calibri"/>
    </style:style>
    <style:style style:name="T51" style:parent-style-name="DefaultParagraphFont" style:family="text">
      <style:text-properties fo:color="#4472C4"/>
    </style:style>
    <style:style style:name="P52" style:parent-style-name="SBCparagraph" style:family="paragraph">
      <style:paragraph-properties fo:text-indent="0.1972in"/>
    </style:style>
    <style:style style:name="P53" style:parent-style-name="SBCtitle1" style:list-style-name="Outline" style:family="paragraph"/>
    <style:style style:name="P54" style:parent-style-name="SBCparagraph" style:family="paragraph">
      <style:paragraph-properties fo:text-indent="0.1972in"/>
    </style:style>
    <style:style style:name="P55" style:parent-style-name="SBCtitle2" style:list-style-name="Outline" style:family="paragraph"/>
    <style:style style:name="P56" style:parent-style-name="SBCparagraphfirst" style:family="paragraph">
      <style:paragraph-properties fo:text-indent="0.1972in"/>
    </style:style>
    <style:style style:name="P57" style:parent-style-name="SBCparagraph" style:list-style-name="LFO12" style:family="paragraph">
      <style:paragraph-properties fo:margin-left="0.4923in" fo:text-indent="-0.1965in">
        <style:tab-stops/>
      </style:paragraph-properties>
    </style:style>
    <style:style style:name="P58" style:parent-style-name="SBCparagraph" style:list-style-name="LFO12" style:family="paragraph">
      <style:paragraph-properties fo:margin-left="0.4923in" fo:text-indent="-0.1965in">
        <style:tab-stops/>
      </style:paragraph-properties>
    </style:style>
    <style:style style:name="P59" style:parent-style-name="SBCparagraph" style:list-style-name="LFO12" style:family="paragraph">
      <style:paragraph-properties fo:margin-left="0.4923in" fo:text-indent="-0.1965in">
        <style:tab-stops/>
      </style:paragraph-properties>
    </style:style>
    <style:style style:name="P60" style:parent-style-name="SBCparagraph" style:list-style-name="LFO12" style:family="paragraph">
      <style:paragraph-properties fo:margin-left="0.4923in" fo:text-indent="-0.1965in">
        <style:tab-stops/>
      </style:paragraph-properties>
    </style:style>
    <style:style style:name="P61" style:parent-style-name="SBCparagraph" style:family="paragraph">
      <style:paragraph-properties fo:text-align="center"/>
    </style:style>
    <style:style style:name="T62" style:parent-style-name="DefaultParagraphFont" style:family="text">
      <style:text-properties fo:font-weight="bold" style:font-weight-asian="bold" style:font-weight-complex="bold"/>
    </style:style>
    <style:style style:name="P63" style:parent-style-name="SBCparagraph" style:family="paragraph">
      <style:paragraph-properties fo:text-align="center"/>
      <style:text-properties fo:font-weight="bold" style:font-weight-asian="bold" style:font-weight-complex="bold"/>
    </style:style>
    <style:style style:name="P64" style:parent-style-name="SBCtitle2" style:list-style-name="Outline" style:family="paragraph"/>
    <style:style style:name="P65" style:parent-style-name="SBCparagraphfirst" style:family="paragraph">
      <style:paragraph-properties fo:text-indent="0.1972in"/>
    </style:style>
    <style:style style:name="P66" style:parent-style-name="SBCtitle2" style:list-style-name="Outline" style:family="paragraph"/>
    <style:style style:name="P67" style:parent-style-name="SBCparagraphfirst" style:family="paragraph">
      <style:paragraph-properties fo:text-indent="0.1972in"/>
    </style:style>
    <style:style style:name="P68" style:parent-style-name="SBCtitle2" style:list-style-name="Outline" style:family="paragraph"/>
    <style:style style:name="P69" style:parent-style-name="SBCparagraphfirst" style:family="paragraph">
      <style:paragraph-properties fo:text-indent="0.1972in"/>
    </style:style>
    <style:style style:name="P70" style:parent-style-name="SBCtitle2" style:list-style-name="Outline" style:family="paragraph"/>
    <style:style style:name="P71" style:parent-style-name="SBCparagraphfirst" style:family="paragraph">
      <style:paragraph-properties fo:text-indent="0.1972in"/>
    </style:style>
    <style:style style:name="P72" style:parent-style-name="SBCparagraph" style:family="paragraph">
      <style:paragraph-properties fo:text-indent="0.1972in"/>
    </style:style>
    <style:style style:name="P73" style:parent-style-name="SBCparagraph" style:family="paragraph">
      <style:paragraph-properties fo:text-indent="0.1972in"/>
    </style:style>
    <style:style style:name="P74" style:parent-style-name="Normal" style:family="paragraph">
      <style:paragraph-properties fo:text-align="center"/>
      <style:text-properties fo:font-weight="bold" style:font-weight-asian="bold" style:font-weight-complex="bold" fo:color="#000000"/>
    </style:style>
    <style:style style:name="P75" style:parent-style-name="Normal" style:family="paragraph">
      <style:paragraph-properties fo:text-align="center"/>
    </style:style>
    <style:style style:name="T76" style:parent-style-name="DefaultParagraphFont" style:family="text">
      <style:text-properties fo:font-weight="bold" style:font-weight-asian="bold" style:font-weight-complex="bold" fo:color="#000000"/>
    </style:style>
    <style:style style:name="P77" style:parent-style-name="Normal" style:family="paragraph">
      <style:paragraph-properties fo:text-align="center"/>
      <style:text-properties fo:font-weight="bold" style:font-weight-asian="bold" style:font-weight-complex="bold" fo:color="#000000"/>
    </style:style>
    <style:style style:name="P78" style:parent-style-name="Normal" style:family="paragraph">
      <style:paragraph-properties fo:text-align="center"/>
      <style:text-properties fo:font-weight="bold" style:font-weight-asian="bold" style:font-weight-complex="bold" fo:color="#000000"/>
    </style:style>
    <style:style style:name="P79" style:parent-style-name="Normal" style:family="paragraph">
      <style:paragraph-properties fo:text-align="center"/>
      <style:text-properties fo:font-weight="bold" style:font-weight-asian="bold" style:font-weight-complex="bold" fo:color="#000000"/>
    </style:style>
    <style:style style:name="P80" style:parent-style-name="Normal" style:family="paragraph">
      <style:paragraph-properties fo:text-align="center"/>
      <style:text-properties fo:font-weight="bold" style:font-weight-asian="bold" style:font-weight-complex="bold" fo:color="#000000"/>
    </style:style>
    <style:style style:name="P81" style:parent-style-name="Normal" style:family="paragraph">
      <style:text-properties fo:font-weight="bold" style:font-weight-asian="bold" style:font-weight-complex="bold" fo:color="#000000" fo:font-size="11pt" style:font-size-asian="11pt" style:font-size-complex="11pt"/>
    </style:style>
    <style:style style:name="P82" style:parent-style-name="Normal" style:family="paragraph">
      <style:paragraph-properties fo:text-align="center" fo:margin-bottom="0.1666in"/>
      <style:text-properties fo:font-weight="bold" style:font-weight-asian="bold" style:font-weight-complex="bold" fo:color="#000000"/>
    </style:style>
    <style:style style:name="P83" style:parent-style-name="Normal" style:family="paragraph">
      <style:paragraph-properties fo:text-align="center" fo:margin-bottom="0.1666in"/>
      <style:text-properties fo:font-weight="bold" style:font-weight-asian="bold" style:font-weight-complex="bold" fo:color="#000000"/>
    </style:style>
    <style:style style:name="P84" style:parent-style-name="Normal" style:family="paragraph">
      <style:paragraph-properties fo:text-align="center" fo:margin-bottom="0.1666in"/>
      <style:text-properties fo:font-weight="bold" style:font-weight-asian="bold" style:font-weight-complex="bold" fo:color="#000000"/>
    </style:style>
    <style:style style:name="P85"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86"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87" style:parent-style-name="Normal" style:family="paragraph">
      <style:text-properties fo:color="#000000"/>
    </style:style>
    <style:style style:name="P88" style:parent-style-name="Normal" style:family="paragraph">
      <style:text-properties fo:color="#000000"/>
    </style:style>
    <style:style style:name="P89" style:parent-style-name="Normal" style:family="paragraph">
      <style:text-properties fo:color="#000000"/>
    </style:style>
    <style:style style:name="P90"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91" style:parent-style-name="Normal" style:family="paragraph">
      <style:text-properties fo:color="#000000" fo:font-size="9pt" style:font-size-asian="9pt" style:font-size-complex="9pt"/>
    </style:style>
    <style:style style:name="P92" style:parent-style-name="Normal" style:family="paragraph">
      <style:text-properties fo:color="#000000" fo:font-size="9pt" style:font-size-asian="9pt" style:font-size-complex="9pt"/>
    </style:style>
    <style:style style:name="P93" style:parent-style-name="Normal" style:family="paragraph">
      <style:text-properties fo:color="#000000" fo:font-size="9pt" style:font-size-asian="9pt" style:font-size-complex="9pt"/>
    </style:style>
    <style:style style:name="P94" style:parent-style-name="Normal" style:family="paragraph">
      <style:text-properties fo:color="#000000" fo:font-size="9pt" style:font-size-asian="9pt" style:font-size-complex="9pt"/>
    </style:style>
    <style:style style:name="P95" style:parent-style-name="Normal" style:family="paragraph">
      <style:text-properties fo:color="#000000" fo:font-size="9pt" style:font-size-asian="9pt" style:font-size-complex="9pt"/>
    </style:style>
    <style:style style:name="P96"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97" style:parent-style-name="Normal" style:family="paragraph">
      <style:text-properties fo:color="#000000" fo:font-size="9pt" style:font-size-asian="9pt" style:font-size-complex="9pt" fo:language="en" fo:country="US"/>
    </style:style>
    <style:style style:name="P98" style:parent-style-name="Normal" style:family="paragraph">
      <style:text-properties fo:color="#000000" fo:font-size="9pt" style:font-size-asian="9pt" style:font-size-complex="9pt" fo:language="en" fo:country="US"/>
    </style:style>
    <style:style style:name="P99" style:parent-style-name="Normal" style:family="paragraph">
      <style:text-properties fo:color="#000000" fo:font-size="9pt" style:font-size-asian="9pt" style:font-size-complex="9pt" fo:language="en" fo:country="US"/>
    </style:style>
    <style:style style:name="P100" style:parent-style-name="Normal" style:family="paragraph">
      <style:text-properties fo:color="#000000" fo:font-size="9pt" style:font-size-asian="9pt" style:font-size-complex="9pt" fo:language="en" fo:country="US"/>
    </style:style>
    <style:style style:name="P101" style:parent-style-name="Normal" style:family="paragraph">
      <style:text-properties fo:color="#000000" fo:font-size="9pt" style:font-size-asian="9pt" style:font-size-complex="9pt" fo:language="en" fo:country="US"/>
    </style:style>
    <style:style style:name="P102" style:parent-style-name="Normal" style:family="paragraph">
      <style:text-properties fo:color="#000000" fo:font-size="9pt" style:font-size-asian="9pt" style:font-size-complex="9pt" fo:language="en" fo:country="US"/>
    </style:style>
    <style:style style:name="P103" style:parent-style-name="Normal" style:family="paragraph">
      <style:text-properties fo:color="#000000" fo:font-size="9pt" style:font-size-asian="9pt" style:font-size-complex="9pt" fo:language="en" fo:country="US"/>
    </style:style>
    <style:style style:name="P104" style:parent-style-name="Normal" style:family="paragraph">
      <style:text-properties fo:color="#FFFFFF" fo:font-size="9pt" style:font-size-asian="9pt" style:font-size-complex="9pt"/>
    </style:style>
    <style:style style:name="T105" style:parent-style-name="DefaultParagraphFont" style:family="text">
      <style:text-properties fo:color="#FFFFFF" fo:font-size="9pt" style:font-size-asian="9pt" style:font-size-complex="9pt"/>
    </style:style>
    <style:style style:name="T106" style:parent-style-name="DefaultParagraphFont" style:family="text">
      <style:text-properties fo:color="#FFFFFF" fo:font-size="9pt" style:font-size-asian="9pt" style:font-size-complex="9pt" fo:language="en" fo:country="US"/>
    </style:style>
    <style:style style:name="P107" style:parent-style-name="Normal" style:family="paragraph">
      <style:text-properties fo:color="#000000" fo:font-size="9pt" style:font-size-asian="9pt" style:font-size-complex="9pt" fo:language="en" fo:country="US"/>
    </style:style>
    <style:style style:name="P108" style:parent-style-name="Normal" style:family="paragraph">
      <style:text-properties fo:color="#000000" fo:font-size="9pt" style:font-size-asian="9pt" style:font-size-complex="9pt" fo:language="en" fo:country="US"/>
    </style:style>
    <style:style style:name="P109" style:parent-style-name="Normal" style:family="paragraph">
      <style:text-properties fo:color="#000000" fo:font-size="9pt" style:font-size-asian="9pt" style:font-size-complex="9pt" fo:language="en" fo:country="US"/>
    </style:style>
    <style:style style:name="P110" style:parent-style-name="Normal" style:family="paragraph">
      <style:text-properties fo:font-weight="bold" style:font-weight-asian="bold" style:font-weight-complex="bold" fo:color="#000000" fo:font-size="9pt" style:font-size-asian="9pt" style:font-size-complex="9pt" fo:language="en" fo:country="US"/>
    </style:style>
    <style:style style:name="P111" style:parent-style-name="SBCparagraph" style:family="paragraph">
      <style:paragraph-properties fo:text-align="center"/>
      <style:text-properties fo:font-weight="bold" style:font-weight-asian="bold" style:font-weight-complex="bold" fo:color="#000000"/>
    </style:style>
    <style:style style:name="P112" style:parent-style-name="SBCparagraph" style:family="paragraph">
      <style:paragraph-properties fo:text-indent="0.1972in"/>
    </style:style>
    <style:style style:name="P113" style:parent-style-name="SBCparagraph" style:family="paragraph">
      <style:paragraph-properties fo:text-indent="0.1972in"/>
    </style:style>
    <style:style style:name="P114" style:parent-style-name="SBCparagraph" style:family="paragraph">
      <style:paragraph-properties fo:text-indent="0.1972in"/>
    </style:style>
    <style:style style:name="P115" style:parent-style-name="SBCparagraph" style:family="paragraph">
      <style:paragraph-properties fo:text-indent="0.1972in"/>
    </style:style>
    <style:style style:name="P116" style:parent-style-name="SBCtitle2" style:list-style-name="Outline" style:family="paragraph"/>
    <style:style style:name="P117" style:parent-style-name="SBCparagraphfirst" style:family="paragraph">
      <style:paragraph-properties fo:text-indent="0.1972in"/>
    </style:style>
    <style:style style:name="P118" style:parent-style-name="SBCparagraph" style:family="paragraph">
      <style:paragraph-properties fo:text-align="center"/>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SBCparagraphfirst" style:family="paragraph">
      <style:paragraph-properties fo:text-align="center" fo:text-indent="0.1972in"/>
    </style:style>
    <style:style style:name="P122" style:parent-style-name="SBCtitle2" style:list-style-name="Outline" style:family="paragraph"/>
    <style:style style:name="P123" style:parent-style-name="SBCparagraphfirst" style:family="paragraph">
      <style:paragraph-properties fo:text-indent="0.1972in"/>
    </style:style>
    <style:style style:name="P124" style:parent-style-name="SBCparagraph" style:list-style-name="LFO11" style:family="paragraph">
      <style:text-properties style:font-name="Calibri"/>
    </style:style>
    <style:style style:name="P125" style:parent-style-name="SBCparagraph" style:list-style-name="LFO11" style:family="paragraph">
      <style:text-properties style:font-name="Calibri"/>
    </style:style>
    <style:style style:name="P126" style:parent-style-name="SBCparagraph" style:list-style-name="LFO11" style:family="paragraph">
      <style:text-properties style:font-name="Calibri"/>
    </style:style>
    <style:style style:name="P127" style:parent-style-name="SBCparagraph" style:list-style-name="LFO11" style:family="paragraph">
      <style:text-properties style:font-name="Calibri"/>
    </style:style>
    <style:style style:name="P128" style:parent-style-name="SBCparagraph" style:list-style-name="LFO11" style:family="paragraph">
      <style:text-properties style:font-name="Calibri"/>
    </style:style>
    <style:style style:name="P129" style:parent-style-name="SBCparagraph" style:list-style-name="LFO11" style:family="paragraph">
      <style:text-properties style:font-name="Calibri"/>
    </style:style>
    <style:style style:name="P130" style:parent-style-name="SBCparagraph" style:list-style-name="LFO11" style:family="paragraph">
      <style:text-properties style:font-name="Calibri"/>
    </style:style>
    <style:style style:name="P131" style:parent-style-name="SBCparagraph" style:list-style-name="LFO11" style:family="paragraph">
      <style:text-properties style:font-name="Calibri"/>
    </style:style>
    <style:style style:name="P132" style:parent-style-name="SBCparagraph" style:list-style-name="LFO11" style:family="paragraph">
      <style:text-properties style:font-name="Calibri"/>
    </style:style>
    <style:style style:name="P133" style:parent-style-name="SBCparagraph" style:list-style-name="LFO11" style:family="paragraph">
      <style:text-properties style:font-name="Calibri"/>
    </style:style>
    <style:style style:name="P134" style:parent-style-name="SBCparagraph" style:list-style-name="LFO11" style:family="paragraph">
      <style:text-properties style:font-name="Calibri"/>
    </style:style>
    <style:style style:name="P135" style:parent-style-name="SBCparagraph" style:list-style-name="LFO11" style:family="paragraph">
      <style:text-properties style:font-name="Calibri"/>
    </style:style>
    <style:style style:name="P136" style:parent-style-name="SBCparagraph" style:list-style-name="LFO11" style:family="paragraph">
      <style:text-properties style:font-name="Calibri"/>
    </style:style>
    <style:style style:name="P137" style:parent-style-name="SBCtitle2" style:list-style-name="Outline" style:family="paragraph"/>
    <style:style style:name="P138" style:parent-style-name="SBCparagraphfirst" style:family="paragraph">
      <style:paragraph-properties fo:text-indent="0.1972in"/>
    </style:style>
    <style:style style:name="P139" style:parent-style-name="SBCparagraph" style:family="paragraph">
      <style:paragraph-properties fo:text-indent="0.1972in"/>
    </style:style>
    <style:style style:name="P140" style:parent-style-name="SBCparagraph" style:family="paragraph">
      <style:paragraph-properties fo:text-align="center" fo:text-indent="0.1972in"/>
      <style:text-properties fo:font-weight="bold" style:font-weight-asian="bold" style:font-weight-complex="bold"/>
    </style:style>
    <style:style style:name="P141" style:parent-style-name="SBCparagraph" style:family="paragraph">
      <style:paragraph-properties fo:text-indent="0.1972in"/>
    </style:style>
    <style:style style:name="P142" style:parent-style-name="SBCparagraph" style:family="paragraph">
      <style:paragraph-properties fo:text-indent="0.1972in"/>
    </style:style>
    <style:style style:name="P143" style:parent-style-name="SBCparagraph" style:family="paragraph">
      <style:paragraph-properties fo:text-indent="0.1972in"/>
    </style:style>
    <style:style style:name="P144" style:parent-style-name="SBCparagraph" style:family="paragraph">
      <style:paragraph-properties fo:text-indent="0in"/>
    </style:style>
    <style:style style:name="P145" style:parent-style-name="Normal" style:family="paragraph">
      <style:paragraph-properties fo:text-align="center"/>
    </style:style>
    <style:style style:name="P146" style:parent-style-name="Normal" style:family="paragraph">
      <style:paragraph-properties fo:text-align="center"/>
      <style:text-properties fo:color="#000000" fo:font-size="9pt" style:font-size-asian="9pt" style:font-size-complex="9pt"/>
    </style:style>
    <style:style style:name="P147" style:parent-style-name="Normal" style:family="paragraph">
      <style:paragraph-properties fo:text-align="center"/>
      <style:text-properties fo:color="#000000" fo:font-size="9pt" style:font-size-asian="9pt" style:font-size-complex="9pt"/>
    </style:style>
    <style:style style:name="P148" style:parent-style-name="Normal" style:family="paragraph">
      <style:paragraph-properties fo:text-align="center"/>
      <style:text-properties fo:color="#000000" fo:font-size="9pt" style:font-size-asian="9pt" style:font-size-complex="9pt"/>
    </style:style>
    <style:style style:name="P149" style:parent-style-name="Normal" style:family="paragraph">
      <style:paragraph-properties fo:text-align="center"/>
      <style:text-properties fo:color="#000000" fo:font-size="9pt" style:font-size-asian="9pt" style:font-size-complex="9pt"/>
    </style:style>
    <style:style style:name="P150" style:parent-style-name="Normal" style:family="paragraph">
      <style:paragraph-properties fo:text-align="center"/>
      <style:text-properties fo:color="#000000" fo:font-size="9pt" style:font-size-asian="9pt" style:font-size-complex="9pt"/>
    </style:style>
    <style:style style:name="P151" style:parent-style-name="Normal" style:family="paragraph">
      <style:paragraph-properties fo:text-align="center"/>
      <style:text-properties fo:color="#000000" fo:font-size="9pt" style:font-size-asian="9pt" style:font-size-complex="9pt"/>
    </style:style>
    <style:style style:name="P152" style:parent-style-name="Normal" style:family="paragraph">
      <style:paragraph-properties fo:text-align="center"/>
      <style:text-properties fo:color="#000000" fo:font-size="9pt" style:font-size-asian="9pt" style:font-size-complex="9pt"/>
    </style:style>
    <style:style style:name="P153" style:parent-style-name="Normal" style:family="paragraph">
      <style:text-properties fo:color="#000000" fo:font-size="9pt" style:font-size-asian="9pt" style:font-size-complex="9pt"/>
    </style:style>
    <style:style style:name="P154" style:parent-style-name="Normal" style:family="paragraph">
      <style:paragraph-properties fo:text-align="center"/>
    </style:style>
    <style:style style:name="P155" style:parent-style-name="Normal" style:family="paragraph">
      <style:paragraph-properties fo:text-align="center"/>
      <style:text-properties fo:color="#000000" fo:font-size="9pt" style:font-size-asian="9pt" style:font-size-complex="9pt"/>
    </style:style>
    <style:style style:name="P156" style:parent-style-name="Normal" style:family="paragraph">
      <style:paragraph-properties fo:text-align="center"/>
      <style:text-properties fo:color="#000000" fo:font-size="9pt" style:font-size-asian="9pt" style:font-size-complex="9pt"/>
    </style:style>
    <style:style style:name="P157" style:parent-style-name="Normal" style:family="paragraph">
      <style:paragraph-properties fo:text-align="center"/>
      <style:text-properties fo:color="#000000" fo:font-size="9pt" style:font-size-asian="9pt" style:font-size-complex="9pt"/>
    </style:style>
    <style:style style:name="P158" style:parent-style-name="Normal" style:family="paragraph">
      <style:paragraph-properties fo:text-align="center"/>
      <style:text-properties fo:color="#000000" fo:font-size="9pt" style:font-size-asian="9pt" style:font-size-complex="9pt"/>
    </style:style>
    <style:style style:name="P159" style:parent-style-name="Normal" style:family="paragraph">
      <style:paragraph-properties fo:text-align="center"/>
      <style:text-properties fo:color="#000000" fo:font-size="9pt" style:font-size-asian="9pt" style:font-size-complex="9pt"/>
    </style:style>
    <style:style style:name="P160" style:parent-style-name="Normal" style:family="paragraph">
      <style:paragraph-properties fo:text-align="center"/>
      <style:text-properties fo:color="#000000"/>
    </style:style>
    <style:style style:name="P161" style:parent-style-name="Normal" style:family="paragraph">
      <style:text-properties fo:color="#000000" fo:font-size="9pt" style:font-size-asian="9pt" style:font-size-complex="9pt"/>
    </style:style>
    <style:style style:name="P162" style:parent-style-name="Normal" style:family="paragraph">
      <style:text-properties fo:color="#000000" fo:font-size="9pt" style:font-size-asian="9pt" style:font-size-complex="9pt"/>
    </style:style>
    <style:style style:name="P163" style:parent-style-name="Normal" style:family="paragraph">
      <style:paragraph-properties fo:text-align="center"/>
      <style:text-properties fo:color="#000000"/>
    </style:style>
    <style:style style:name="P164" style:parent-style-name="SBCparagraph" style:family="paragraph">
      <style:paragraph-properties fo:text-align="center" fo:text-indent="0.1972in"/>
      <style:text-properties fo:font-weight="bold" style:font-weight-asian="bold" style:font-weight-complex="bold"/>
    </style:style>
    <style:style style:name="P165" style:parent-style-name="SBCparagraph" style:family="paragraph">
      <style:paragraph-properties fo:text-indent="0.1972in"/>
    </style:style>
    <style:style style:name="P166" style:parent-style-name="SBCparagraph" style:family="paragraph">
      <style:paragraph-properties fo:text-indent="0.1972in"/>
    </style:style>
    <style:style style:name="P167" style:parent-style-name="SBCparagraph" style:family="paragraph">
      <style:paragraph-properties fo:text-align="center" fo:text-indent="0.1972in"/>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SBCparagraph" style:family="paragraph">
      <style:paragraph-properties fo:text-align="center" fo:text-indent="0.1972in"/>
    </style:style>
    <style:style style:name="P175" style:parent-style-name="SBCparagraph" style:family="paragraph">
      <style:paragraph-properties fo:text-align="center" fo:text-indent="0.1972in"/>
      <style:text-properties fo:font-weight="bold" style:font-weight-asian="bold" style:font-weight-complex="bold"/>
    </style:style>
    <style:style style:name="P176" style:parent-style-name="SBCparagraph" style:family="paragraph">
      <style:paragraph-properties fo:text-align="center"/>
      <style:text-properties style:font-name="Calibri" fo:color="#FF0000"/>
    </style:style>
    <style:style style:name="P177" style:parent-style-name="SBCparagraph" style:family="paragraph">
      <style:paragraph-properties fo:text-align="center"/>
    </style:style>
    <style:style style:name="T178" style:parent-style-name="DefaultParagraphFont" style:family="text">
      <style:text-properties style:font-name="Calibri" fo:color="#FF0000" fo:language="en" fo:country="US"/>
    </style:style>
    <style:style style:name="P179" style:parent-style-name="SBCtitle1" style:list-style-name="Outline" style:family="paragraph"/>
    <style:style style:name="P180" style:parent-style-name="SBCparagraphfirst" style:family="paragraph">
      <style:text-properties fo:color="#FF0000"/>
    </style:style>
    <style:style style:name="P181" style:parent-style-name="SBCtitle1" style:list-style-name="Outline" style:family="paragraph"/>
    <style:style style:name="P182" style:parent-style-name="SBCparagraph" style:list-style-name="LFO9" style:family="paragraph">
      <style:paragraph-properties fo:text-align="start"/>
    </style:style>
    <style:style style:name="T183" style:parent-style-name="DefaultParagraphFont" style:family="text">
      <style:text-properties style:font-name="Calibri" fo:font-weight="bold" style:font-weight-asian="bold" style:font-weight-complex="bold"/>
    </style:style>
    <style:style style:name="T184" style:parent-style-name="DefaultParagraphFont" style:family="text">
      <style:text-properties style:font-name="Calibri"/>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T188" style:parent-style-name="DefaultParagraphFont" style:family="text">
      <style:text-properties style:font-name="Calibri"/>
    </style:style>
    <style:style style:name="T189" style:parent-style-name="DefaultParagraphFont" style:family="text">
      <style:text-properties style:font-name="Calibri"/>
    </style:style>
    <style:style style:name="T190" style:parent-style-name="Hyperlink" style:family="text">
      <style:text-properties style:font-name="Calibri"/>
    </style:style>
    <style:style style:name="T191" style:parent-style-name="DefaultParagraphFont" style:family="text">
      <style:text-properties style:font-name="Calibri"/>
    </style:style>
    <style:style style:name="T192" style:parent-style-name="Hyperlink" style:family="text">
      <style:text-properties style:font-name="Calibri"/>
    </style:style>
    <style:style style:name="T193" style:parent-style-name="DefaultParagraphFont" style:family="text">
      <style:text-properties style:font-name="Calibri"/>
    </style:style>
    <style:style style:name="P194" style:parent-style-name="SBCparagraph" style:list-style-name="LFO9" style:family="paragraph"/>
    <style:style style:name="T195" style:parent-style-name="DefaultParagraphFont" style:family="text">
      <style:text-properties style:font-name="Calibri" fo:font-weight="bold" style:font-weight-asian="bold" style:font-weight-complex="bold"/>
    </style:style>
    <style:style style:name="T196" style:parent-style-name="DefaultParagraphFont" style:family="text">
      <style:text-properties style:font-name="Calibri"/>
    </style:style>
    <style:style style:name="T197" style:parent-style-name="DefaultParagraphFont" style:family="text">
      <style:text-properties style:font-name="Calibri"/>
    </style:style>
    <style:style style:name="T198" style:parent-style-name="DefaultParagraphFont" style:family="text">
      <style:text-properties style:font-name="Calibri"/>
    </style:style>
    <style:style style:name="T199" style:parent-style-name="DefaultParagraphFont" style:family="text">
      <style:text-properties style:font-name="Calibri"/>
    </style:style>
    <style:style style:name="T200" style:parent-style-name="DefaultParagraphFont" style:family="text">
      <style:text-properties style:font-name="Calibri"/>
    </style:style>
    <style:style style:name="T201" style:parent-style-name="Hyperlink" style:family="text">
      <style:text-properties style:font-name="Calibri"/>
    </style:style>
    <style:style style:name="T202" style:parent-style-name="DefaultParagraphFont" style:family="text">
      <style:text-properties style:font-name="Calibri"/>
    </style:style>
    <style:style style:name="P203" style:parent-style-name="SBCparagraph" style:list-style-name="LFO9" style:family="paragraph"/>
    <style:style style:name="T204" style:parent-style-name="DefaultParagraphFont" style:family="text">
      <style:text-properties style:font-name="Calibri" fo:font-weight="bold" style:font-weight-asian="bold" style:font-weight-complex="bold"/>
    </style:style>
    <style:style style:name="T205" style:parent-style-name="DefaultParagraphFont" style:family="text">
      <style:text-properties style:font-name="Calibri" fo:font-weight="bold" style:font-weight-asian="bold" style:font-weight-complex="bold"/>
    </style:style>
    <style:style style:name="T206" style:parent-style-name="DefaultParagraphFont" style:family="text">
      <style:text-properties style:font-name="Calibri"/>
    </style:style>
    <style:style style:name="T207" style:parent-style-name="DefaultParagraphFont" style:family="text">
      <style:text-properties style:font-name="Calibri"/>
    </style:style>
    <style:style style:name="T208" style:parent-style-name="DefaultParagraphFont" style:family="text">
      <style:text-properties style:font-name="Calibri"/>
    </style:style>
    <style:style style:name="T209" style:parent-style-name="Hyperlink" style:family="text">
      <style:text-properties style:font-name="Calibri"/>
    </style:style>
    <style:style style:name="T210" style:parent-style-name="DefaultParagraphFont" style:family="text">
      <style:text-properties style:font-name="Calibri"/>
    </style:style>
    <style:style style:name="T211" style:parent-style-name="Hyperlink" style:family="text">
      <style:text-properties style:font-name="Calibri"/>
    </style:style>
    <style:style style:name="T212" style:parent-style-name="DefaultParagraphFont" style:family="text">
      <style:text-properties style:font-name="Calibri"/>
    </style:style>
    <style:style style:name="P213" style:parent-style-name="SBCparagraph" style:list-style-name="LFO9" style:family="paragraph"/>
    <style:style style:name="T214" style:parent-style-name="DefaultParagraphFont" style:family="text">
      <style:text-properties style:font-name="Calibri" fo:font-weight="bold" style:font-weight-asian="bold" style:font-weight-complex="bold"/>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Hyperlink" style:family="text">
      <style:text-properties style:font-name="Calibri"/>
    </style:style>
    <style:style style:name="T220" style:parent-style-name="DefaultParagraphFont" style:family="text">
      <style:text-properties style:font-name="Calibri"/>
    </style:style>
    <style:style style:name="P221" style:parent-style-name="SBCparagraph" style:family="paragraph">
      <style:text-properties style:font-name="Calibri"/>
    </style:style>
    <style:style style:name="P222" style:parent-style-name="SBCtitle1" style:list-style-name="Outline" style:family="paragraph"/>
    <style:style style:name="P223" style:parent-style-name="SBCparagraphfirst" style:list-style-name="LFO13" style:family="paragraph"/>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P226" style:parent-style-name="SBCparagraph" style:list-style-name="LFO13" style:family="paragraph"/>
    <style:style style:name="T227" style:parent-style-name="DefaultParagraphFont" style:family="text">
      <style:text-properties style:font-name="Calibri"/>
    </style:style>
    <style:style style:name="P228" style:parent-style-name="SBCtitle1" style:list-style-name="Outline" style:family="paragraph"/>
    <style:style style:name="P229" style:parent-style-name="SBCparagraphfirst" style:family="paragraph">
      <style:paragraph-properties fo:text-indent="0.1972in"/>
      <style:text-properties style:font-name="Calibri"/>
    </style:style>
    <style:style style:name="P230" style:parent-style-name="SBCparagraphfirst" style:family="paragraph">
      <style:paragraph-properties fo:text-indent="0.1972in"/>
    </style:style>
    <style:style style:name="T231" style:parent-style-name="DefaultParagraphFont" style:family="text">
      <style:text-properties style:font-name="Calibri"/>
    </style:style>
    <style:style style:name="P232" style:parent-style-name="SBCreferences" style:family="paragraph">
      <style:text-properties fo:language="en" fo:country="US"/>
    </style:style>
    <style:style style:name="P233" style:parent-style-name="SBCreference" style:list-style-name="LFO7" style:family="paragraph">
      <style:paragraph-properties fo:margin-left="0.3937in" fo:text-indent="-0.3937in">
        <style:tab-stops/>
      </style:paragraph-properties>
    </style:style>
    <style:style style:name="T234" style:parent-style-name="DefaultParagraphFont" style:family="text">
      <style:text-properties fo:language="en" fo:country="US"/>
    </style:style>
    <style:style style:name="T235" style:parent-style-name="Hyperlink" style:family="text">
      <style:text-properties fo:language="en" fo:country="US"/>
    </style:style>
    <style:style style:name="T236" style:parent-style-name="Hyperlink" style:family="text">
      <style:text-properties fo:language="en" fo:country="US"/>
    </style:style>
    <style:style style:name="T237" style:parent-style-name="Hyperlink" style:family="text">
      <style:text-properties fo:language="en" fo:country="US"/>
    </style:style>
    <style:style style:name="P238" style:parent-style-name="SBCreference" style:list-style-name="LFO7" style:family="paragraph">
      <style:paragraph-properties fo:margin-left="0.3937in" fo:text-indent="-0.3937in">
        <style:tab-stops/>
      </style:paragraph-properties>
    </style:style>
    <style:style style:name="P239" style:parent-style-name="SBCreference" style:list-style-name="LFO7" style:family="paragraph">
      <style:paragraph-properties fo:margin-left="0.3937in" fo:text-indent="-0.3937in">
        <style:tab-stops/>
      </style:paragraph-properties>
    </style:style>
    <style:style style:name="T240" style:parent-style-name="DefaultParagraphFont" style:family="text">
      <style:text-properties fo:language="en" fo:country="US"/>
    </style:style>
    <style:style style:name="P241" style:parent-style-name="SBCreference" style:list-style-name="LFO7" style:family="paragraph">
      <style:paragraph-properties fo:margin-left="0.3937in" fo:text-indent="-0.3937in">
        <style:tab-stops/>
      </style:paragraph-properties>
    </style:style>
    <style:style style:name="P242" style:parent-style-name="SBCreference" style:list-style-name="LFO7" style:family="paragraph">
      <style:paragraph-properties fo:margin-left="0.3937in" fo:text-indent="-0.3937in">
        <style:tab-stops/>
      </style:paragraph-propertie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T245" style:parent-style-name="Hyperlink" style:family="text">
      <style:text-properties fo:language="en" fo:country="US"/>
    </style:style>
    <style:style style:name="T246" style:parent-style-name="Hyperlink" style:family="text">
      <style:text-properties fo:language="en" fo:country="US"/>
    </style:style>
    <style:style style:name="T247" style:parent-style-name="Hyperlink" style:family="text">
      <style:text-properties fo:language="en" fo:country="US"/>
    </style:style>
    <style:style style:name="T248" style:parent-style-name="DefaultParagraphFont" style:family="text">
      <style:text-properties fo:language="en" fo:country="US"/>
    </style:style>
    <style:style style:name="P249" style:parent-style-name="SBCreference" style:list-style-name="LFO7" style:family="paragraph">
      <style:paragraph-properties fo:margin-left="0.3937in" fo:text-indent="-0.3937in">
        <style:tab-stops/>
      </style:paragraph-properties>
    </style:style>
    <style:style style:name="P250" style:parent-style-name="SBCreference" style:list-style-name="LFO7" style:family="paragraph">
      <style:paragraph-properties fo:margin-left="0.3937in" fo:text-indent="-0.3937in">
        <style:tab-stops/>
      </style:paragraph-properties>
    </style:style>
    <style:style style:name="T251" style:parent-style-name="DefaultParagraphFont" style:family="text">
      <style:text-properties fo:language="en" fo:country="US"/>
    </style:style>
    <style:style style:name="T252" style:parent-style-name="Hyperlink" style:family="text">
      <style:text-properties fo:language="en" fo:country="US"/>
    </style:style>
    <style:style style:name="T253" style:parent-style-name="Hyperlink" style:family="text">
      <style:text-properties fo:language="en" fo:country="US"/>
    </style:style>
    <style:style style:name="T254" style:parent-style-name="Hyperlink" style:family="text">
      <style:text-properties fo:language="en" fo:country="US"/>
    </style:style>
    <style:style style:name="T255" style:parent-style-name="DefaultParagraphFont" style:family="text">
      <style:text-properties fo:language="en" fo:country="US"/>
    </style:style>
    <style:style style:name="P256" style:parent-style-name="SBCreference" style:list-style-name="LFO7" style:family="paragraph">
      <style:paragraph-properties fo:margin-left="0.3937in" fo:text-indent="-0.3937in">
        <style:tab-stops/>
      </style:paragraph-propertie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P259" style:parent-style-name="SBCreference" style:list-style-name="LFO7" style:family="paragraph">
      <style:paragraph-properties fo:margin-left="0.3937in" fo:text-indent="-0.3937in">
        <style:tab-stops/>
      </style:paragraph-properties>
    </style:style>
    <style:style style:name="T260" style:parent-style-name="DefaultParagraphFont" style:family="text">
      <style:text-properties fo:language="en" fo:country="US"/>
    </style:style>
    <style:style style:name="T261" style:parent-style-name="Hyperlink" style:family="text">
      <style:text-properties fo:language="en" fo:country="US"/>
    </style:style>
    <style:style style:name="T262" style:parent-style-name="Hyperlink" style:family="text">
      <style:text-properties fo:language="en" fo:country="US"/>
    </style:style>
    <style:style style:name="T263" style:parent-style-name="Hyperlink" style:family="text">
      <style:text-properties fo:language="en" fo:country="US"/>
    </style:style>
    <style:style style:name="T264" style:parent-style-name="Hyperlink" style:family="text">
      <style:text-properties fo:language="en" fo:country="US"/>
    </style:style>
    <style:style style:name="T265" style:parent-style-name="Hyperlink" style:family="text">
      <style:text-properties fo:language="en" fo:country="US"/>
    </style:style>
    <style:style style:name="T266" style:parent-style-name="DefaultParagraphFont" style:family="text">
      <style:text-properties fo:language="en" fo:country="US"/>
    </style:style>
    <style:style style:name="P267" style:parent-style-name="SBCreference" style:list-style-name="LFO7" style:family="paragraph">
      <style:paragraph-properties fo:margin-left="0.3937in" fo:text-indent="-0.3937in">
        <style:tab-stops/>
      </style:paragraph-properties>
    </style:style>
    <style:style style:name="T268" style:parent-style-name="DefaultParagraphFont" style:family="text">
      <style:text-properties style:font-name-complex="Times"/>
    </style:style>
    <style:style style:name="T269" style:parent-style-name="DefaultParagraphFont" style:family="text">
      <style:text-properties style:font-name="Cambria Math" style:font-name-complex="Cambria Math"/>
    </style:style>
    <style:style style:name="T270" style:parent-style-name="DefaultParagraphFont" style:family="text">
      <style:text-properties style:font-name="Cambria Math" style:font-name-complex="Cambria Math"/>
    </style:style>
    <style:style style:name="T271" style:parent-style-name="DefaultParagraphFont" style:family="text">
      <style:text-properties style:font-name-complex="Times"/>
    </style:style>
    <style:style style:name="T272" style:parent-style-name="DefaultParagraphFont" style:family="text">
      <style:text-properties style:font-name="Cambria Math" style:font-name-complex="Cambria Math"/>
    </style:style>
    <style:style style:name="T273" style:parent-style-name="DefaultParagraphFont" style:family="text">
      <style:text-properties style:font-name="Cambria Math" style:font-name-complex="Cambria Math"/>
    </style:style>
    <style:style style:name="T274" style:parent-style-name="DefaultParagraphFont" style:family="text">
      <style:text-properties fo:language="en" fo:country="US"/>
    </style:style>
    <style:style style:name="T275" style:parent-style-name="Hyperlink" style:family="text">
      <style:text-properties fo:language="en" fo:country="US"/>
    </style:style>
    <style:style style:name="T276" style:parent-style-name="Hyperlink" style:family="text">
      <style:text-properties fo:language="en" fo:country="US"/>
    </style:style>
    <style:style style:name="T277" style:parent-style-name="Hyperlink" style:family="text">
      <style:text-properties fo:language="en" fo:country="US"/>
    </style:style>
    <style:style style:name="T278" style:parent-style-name="DefaultParagraphFont" style:family="text">
      <style:text-properties fo:language="en" fo:country="US"/>
    </style:style>
    <style:style style:name="P279" style:parent-style-name="SBCreference" style:list-style-name="LFO7" style:family="paragraph">
      <style:paragraph-properties fo:margin-left="0.3937in" fo:text-indent="-0.3937in">
        <style:tab-stops/>
      </style:paragraph-properties>
      <style:text-properties fo:language="en" fo:country="US"/>
    </style:style>
    <style:style style:name="P280" style:parent-style-name="SBCreference" style:list-style-name="LFO7" style:family="paragraph">
      <style:paragraph-properties fo:margin-left="0.3937in" fo:text-indent="-0.3937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style:font-name="Cambria Math" style:font-name-complex="Cambria Math" fo:language="en" fo:country="US"/>
    </style:style>
    <style:style style:name="T283" style:parent-style-name="DefaultParagraphFont" style:family="text">
      <style:text-properties fo:language="en" fo:country="US"/>
    </style:style>
    <style:style style:name="P284" style:parent-style-name="SBCreference" style:list-style-name="LFO7" style:family="paragraph">
      <style:paragraph-properties fo:margin-left="0.3937in" fo:text-indent="-0.3937in">
        <style:tab-stops/>
      </style:paragraph-properties>
    </style:style>
    <style:style style:name="T285" style:parent-style-name="DefaultParagraphFont" style:family="text">
      <style:text-properties fo:language="en" fo:country="US"/>
    </style:style>
    <style:style style:name="T286" style:parent-style-name="DefaultParagraphFont" style:family="text">
      <style:text-properties style:font-name="Cambria Math" style:font-name-complex="Cambria Math" fo:language="en" fo:country="US"/>
    </style:style>
    <style:style style:name="T287" style:parent-style-name="DefaultParagraphFont" style:family="text">
      <style:text-properties fo:language="en" fo:country="US"/>
    </style:style>
    <style:style style:name="P288" style:parent-style-name="SBCreference" style:list-style-name="LFO7" style:family="paragraph">
      <style:paragraph-properties fo:margin-left="0.3937in" fo:text-indent="-0.3937in">
        <style:tab-stops/>
      </style:paragraph-properties>
    </style:style>
    <style:style style:name="T289" style:parent-style-name="DefaultParagraphFont" style:family="text">
      <style:text-properties fo:language="en" fo:country="US"/>
    </style:style>
    <style:style style:name="T290" style:parent-style-name="DefaultParagraphFont" style:family="text">
      <style:text-properties style:font-name="Calibri" fo:language="en" fo:country="US"/>
    </style:style>
    <style:style style:name="T291" style:parent-style-name="DefaultParagraphFont" style:family="text">
      <style:text-properties style:font-name="Calibri" fo:language="en" fo:country="US"/>
    </style:style>
    <style:style style:name="T292" style:parent-style-name="Hyperlink" style:family="text">
      <style:text-properties style:font-name="Calibri"/>
    </style:style>
    <style:style style:name="T293" style:parent-style-name="DefaultParagraphFont" style:family="text">
      <style:text-properties style:font-name="Calibri"/>
    </style:style>
    <style:style style:name="T294" style:parent-style-name="DefaultParagraphFont" style:family="text">
      <style:text-properties style:font-name="Calibri"/>
    </style:style>
    <style:style style:name="P295" style:parent-style-name="SBCreference" style:list-style-name="LFO7" style:family="paragraph">
      <style:paragraph-properties fo:margin-left="0.3937in" fo:text-indent="-0.3937in">
        <style:tab-stops/>
      </style:paragraph-properties>
    </style:style>
    <style:style style:name="T296" style:parent-style-name="DefaultParagraphFont" style:family="text">
      <style:text-properties style:font-name="Calibri" fo:language="en" fo:country="US"/>
    </style:style>
    <style:style style:name="T297" style:parent-style-name="DefaultParagraphFont" style:family="text">
      <style:text-properties style:font-name="Calibri" fo:language="en" fo:country="US"/>
    </style:style>
    <style:style style:name="T298" style:parent-style-name="Hyperlink" style:family="text">
      <style:text-properties style:font-name="Calibri" fo:language="en" fo:country="US"/>
    </style:style>
    <style:style style:name="T299" style:parent-style-name="DefaultParagraphFont" style:family="text">
      <style:text-properties style:font-name="Calibri" fo:language="en" fo:country="US"/>
    </style:style>
    <style:style style:name="T300" style:parent-style-name="DefaultParagraphFont" style:family="text">
      <style:text-properties style:font-name="Calibri" fo:language="en" fo:country="US"/>
    </style:style>
    <style:style style:name="T301" style:parent-style-name="DefaultParagraphFont" style:family="text">
      <style:text-properties style:font-name="Calibri" fo:language="en" fo:country="US"/>
    </style:style>
    <style:style style:family="graphic"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52">
      <style:graphic-properties draw:fill="none" draw:stroke="solid" svg:stroke-width="0.01389in" svg:stroke-color="#181717" draw:marker-start="a50" draw:marker-end="a51" svg:stroke-opacity="100%" draw:stroke-linejoin="miter" svg:stroke-linecap="butt"/>
    </style:style>
    <style:style style:family="graphic" style:name="a55">
      <style:graphic-properties draw:fill="none" draw:stroke="solid" svg:stroke-width="0.01389in" svg:stroke-color="#181717" draw:marker-start="a53" draw:marker-end="a54" svg:stroke-opacity="100%" draw:stroke-linejoin="miter" svg:stroke-linecap="butt"/>
    </style:style>
    <style:style style:family="graphic" style:name="a57">
      <style:graphic-properties draw:fill="none" draw:stroke="solid" svg:stroke-width="0.01389in" svg:stroke-color="#181717" draw:marker-end="a56" svg:stroke-opacity="100%" draw:stroke-linejoin="miter" svg:stroke-linecap="butt"/>
    </style:style>
    <style:style style:family="graphic" style:name="a20">
      <style:graphic-properties draw:fill="none" draw:stroke="solid" svg:stroke-width="0.02083in" svg:stroke-color="#000000" svg:stroke-opacity="100%" draw:stroke-linejoin="miter" svg:stroke-linecap="butt"/>
    </style:style>
    <style:style style:family="graphic" style:name="a59">
      <style:graphic-properties draw:fill="none" draw:stroke="solid" svg:stroke-width="0.01389in" svg:stroke-color="#181717" draw:marker-end="a58" svg:stroke-opacity="100%" draw:stroke-linejoin="miter" svg:stroke-linecap="butt"/>
    </style:style>
    <style:style style:family="graphic" style:name="a22">
      <style:graphic-properties draw:fill="none" draw:stroke="solid" svg:stroke-width="0.02083in" svg:stroke-color="#000000" draw:marker-end="a21" svg:stroke-opacity="100%" draw:stroke-linejoin="miter" svg:stroke-linecap="butt"/>
    </style:style>
    <style:style style:family="graphic" style:name="a23">
      <style:graphic-properties draw:fill="none" draw:stroke="solid" svg:stroke-width="0.02083in" svg:stroke-color="#000000" svg:stroke-opacity="100%" draw:stroke-linejoin="miter" svg:stroke-linecap="butt"/>
    </style:style>
    <style:style style:family="graphic" style:name="a24">
      <style:graphic-properties draw:fill="none" draw:stroke="solid" svg:stroke-width="0.02083in" svg:stroke-color="#000000" svg:stroke-opacity="100%" draw:stroke-linejoin="miter" svg:stroke-linecap="butt"/>
    </style:style>
    <style:style style:family="graphic" style:name="a25">
      <style:graphic-properties draw:fill="none" draw:stroke="solid" svg:stroke-width="0.02083in" svg:stroke-color="#000000" svg:stroke-opacity="100%" draw:stroke-linejoin="miter" svg:stroke-linecap="butt"/>
    </style:style>
    <style:style style:family="graphic" style:name="a26">
      <style:graphic-properties draw:fill="none" draw:stroke="solid" svg:stroke-width="0.02083in" svg:stroke-color="#000000" svg:stroke-opacity="100%" draw:stroke-linejoin="miter" svg:stroke-linecap="butt"/>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000000" draw:marker-end="a28" svg:stroke-opacity="100%" draw:stroke-linejoin="miter" svg:stroke-linecap="butt" style:horizontal-rel="paragraph" style:vertical-rel="paragraph" style:horizontal-pos="from-left" style:vertical-pos="from-top"/>
    </style:style>
    <style:style style:family="graphic" style:name="a90">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3">
      <style:graphic-properties draw:fill="none" draw:stroke="dash" draw:stroke-dash="a92" svg:stroke-width="0.02083in" svg:stroke-color="#000000" svg:stroke-opacity="100%" draw:stroke-linejoin="miter" svg:stroke-linecap="butt"/>
    </style:style>
    <style:style style:family="graphic" style:name="a95">
      <style:graphic-properties draw:fill="none" draw:stroke="dash" draw:stroke-dash="a94" svg:stroke-width="0.02083in" svg:stroke-color="#000000" svg:stroke-opacity="100%" draw:stroke-linejoin="miter" svg:stroke-linecap="butt"/>
    </style:style>
    <style:style style:family="graphic" style:name="a97">
      <style:graphic-properties draw:fill="none" draw:stroke="dash" draw:stroke-dash="a96" svg:stroke-width="0.02083in" svg:stroke-color="#000000" svg:stroke-opacity="100%" draw:stroke-linejoin="miter" svg:stroke-linecap="butt"/>
    </style:style>
    <style:style style:family="graphic" style:name="a60">
      <style:graphic-properties/>
    </style:style>
    <style:style style:family="graphic" style:name="a61" style:parent-style-name="Graphics">
      <style:graphic-properties fo:border="none" fo:background-color="transparent" fo:clip="rect(0in, 0in, 0in, 0in)"/>
    </style:style>
    <style:style style:family="graphic" style:name="a99">
      <style:graphic-properties draw:fill="none" draw:stroke="dash" draw:stroke-dash="a98" svg:stroke-width="0.02083in" svg:stroke-color="#000000" svg:stroke-opacity="100%" draw:stroke-linejoin="miter" svg:stroke-linecap="butt"/>
    </style:style>
    <style:style style:family="graphic" style:name="a62" style:parent-style-name="Graphics">
      <style:graphic-properties fo:border="0.01042in none" fo:background-color="transparent" style:wrap="parallel" style:wrap-contour="false" fo:clip="rect(0.33068in, 0in, 0in, 0in)" style:horizontal-rel="page-content" style:vertical-rel="paragraph" style:horizontal-pos="right" style:vertical-pos="from-top"/>
    </style:style>
    <style:style style:family="graphic" style:name="a63">
      <style:graphic-properties draw:fill="none" draw:stroke="solid" svg:stroke-width="0.01389in" svg:stroke-color="#172c51" svg:stroke-opacity="100%" draw:stroke-linejoin="miter" svg:stroke-linecap="butt"/>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64">
      <style:graphic-properties draw:fill="none" draw:stroke="solid" svg:stroke-width="0.01389in" svg:stroke-color="#172c51" svg:stroke-opacity="100%" draw:stroke-linejoin="miter" svg:stroke-linecap="butt"/>
    </style:style>
    <style:style style:family="graphic" style:name="a0">
      <style:graphic-properties style:wrap="run-through" style:run-through="foreground" draw:fill="solid" draw:fill-color="#c00000"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65">
      <style:graphic-properties draw:fill="none" draw:stroke="solid" svg:stroke-width="0.01389in" svg:stroke-color="#172c51" svg:stroke-opacity="100%" draw:stroke-linejoin="miter" svg:stroke-linecap="butt"/>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1">
      <style:graphic-properties style:wrap="run-through" style:run-through="foreground" draw:fill="solid" draw:fill-color="#7f7f7f"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66">
      <style:graphic-properties draw:fill="none" draw:stroke="solid" svg:stroke-width="0.01389in" svg:stroke-color="#172c51" svg:stroke-opacity="100%" draw:stroke-linejoin="miter" svg:stroke-linecap="butt"/>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68">
      <style:graphic-properties draw:fill="none" draw:stroke="solid" svg:stroke-width="0.01389in" svg:stroke-color="#172c51" svg:stroke-opacity="100%" draw:stroke-linejoin="miter" svg:stroke-linecap="butt"/>
    </style:style>
    <style:style style:family="graphic" style:name="a31">
      <style:graphic-properties style:wrap="run-through" style:run-through="foreground" draw:fill="none" draw:stroke="solid" svg:stroke-width="0.02083in" svg:stroke-color="#000000" draw:marker-end="a30" svg:stroke-opacity="100%" draw:stroke-linejoin="miter" svg:stroke-linecap="butt" style:horizontal-rel="paragraph" style:vertical-rel="paragraph" style:horizontal-pos="from-left" style:vertical-pos="from-top"/>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69">
      <style:graphic-properties draw:fill="none" draw:stroke="solid" svg:stroke-width="0.01389in" svg:stroke-color="#172c51" svg:stroke-opacity="100%" draw:stroke-linejoin="miter" svg:stroke-linecap="butt"/>
    </style:style>
    <style:style style:family="graphic" style:name="a32" style:parent-style-name="Graphics">
      <style:graphic-properties fo:border="none" fo:background-color="transparent"/>
    </style:style>
    <style:style style:family="graphic" style:name="a6">
      <style:graphic-properties draw:fill="none" draw:stroke="solid" svg:stroke-width="0.02083in" svg:stroke-color="#000000" svg:stroke-opacity="100%" draw:stroke-linejoin="miter" svg:stroke-linecap="butt"/>
    </style:style>
    <style:style style:family="graphic" style:name="a33">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7">
      <style:graphic-properties draw:fill="none" draw:stroke="solid" svg:stroke-width="0.02083in" svg:stroke-color="#000000" svg:stroke-opacity="100%" draw:stroke-linejoin="miter" svg:stroke-linecap="butt"/>
    </style:style>
    <style:style style:family="graphic" style:name="a34">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8">
      <style:graphic-properties draw:fill="none" draw:stroke="solid" svg:stroke-width="0.02083in" svg:stroke-color="#000000" svg:stroke-opacity="100%" draw:stroke-linejoin="miter" svg:stroke-linecap="butt"/>
    </style:style>
    <style:style style:family="graphic" style:name="a35">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a9d18e" draw:opacity="100%"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bfbfb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1389in" svg:stroke-color="#172c51" svg:stroke-opacity="100%" draw:stroke-linejoin="miter" svg:stroke-linecap="butt"/>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
      <style:graphic-properties draw:fill="none" draw:stroke="solid" svg:stroke-width="0.00694in" svg:stroke-color="#000000" draw:marker-end="a109" svg:stroke-opacity="100%" draw:stroke-linejoin="miter" svg:stroke-linecap="butt"/>
    </style:style>
    <style:style style:family="graphic"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
      <style:graphic-properties/>
    </style:style>
    <style:style style:family="graphic"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 style:parent-style-name="Graphics">
      <style:graphic-properties fo:border="none" fo:background-color="transparent" fo:clip="rect(0in, 0in, 0in, 0in)"/>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203864" draw:opacity="100%"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843c0c" draw:opacity="100%" draw:stroke="none"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
      <style:graphic-properties draw:fill="none" draw:stroke="solid" svg:stroke-width="0.02083in" svg:stroke-color="#000000" draw:marker-end="a9" svg:stroke-opacity="100%" draw:stroke-linejoin="miter" svg:stroke-linecap="butt"/>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49">
      <style:graphic-properties draw:fill="none" draw:stroke="solid" svg:stroke-width="0.01389in" svg:stroke-color="#181717" draw:marker-end="a48" svg:stroke-opacity="100%" draw:stroke-linejoin="miter" svg:stroke-linecap="butt"/>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none" draw:stroke="solid" svg:stroke-width="0.02083in" svg:stroke-color="#000000" svg:stroke-opacity="100%" draw:stroke-linejoin="miter" svg:stroke-linecap="butt"/>
    </style:style>
    <style:style style:family="graphic" style:name="a14">
      <style:graphic-properties draw:fill="none" draw:stroke="solid" svg:stroke-width="0.02083in" svg:stroke-color="#000000" svg:stroke-opacity="100%" draw:stroke-linejoin="miter" svg:stroke-linecap="butt"/>
    </style:style>
    <style:style style:family="graphic" style:name="a16">
      <style:graphic-properties draw:fill="none" draw:stroke="solid" svg:stroke-width="0.02083in" svg:stroke-color="#000000" draw:marker-end="a15" svg:stroke-opacity="100%" draw:stroke-linejoin="miter" svg:stroke-linecap="butt"/>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draw:fill="none" draw:stroke="solid" svg:stroke-width="0.02083in" svg:stroke-color="#000000" svg:stroke-opacity="100%" draw:stroke-linejoin="miter" svg:stroke-linecap="butt"/>
    </style:style>
    <style:style style:family="graphic" style:name="a19">
      <style:graphic-properties draw:fill="none" draw:stroke="solid" svg:stroke-width="0.02083in" svg:stroke-color="#000000" svg:stroke-opacity="100%" draw:stroke-linejoin="miter" svg:stroke-linecap="butt"/>
    </style:style>
    <style:style style:family="graphic" style:name="a80">
      <style:graphic-properties draw:fill="none" draw:stroke="solid" svg:stroke-width="0.01389in" svg:stroke-color="#172c51" svg:stroke-opacity="100%" draw:stroke-linejoin="miter" svg:stroke-linecap="butt"/>
    </style:style>
    <style:style style:family="graphic" style:name="a81">
      <style:graphic-properties draw:fill="none" draw:stroke="solid" svg:stroke-width="0.01389in" svg:stroke-color="#172c51" svg:stroke-opacity="100%" draw:stroke-linejoin="miter" svg:stroke-linecap="butt"/>
    </style:style>
    <style:style style:family="graphic" style:name="a82">
      <style:graphic-properties draw:fill="none" draw:stroke="solid" svg:stroke-width="0.01389in" svg:stroke-color="#172c51" svg:stroke-opacity="100%" draw:stroke-linejoin="miter" svg:stroke-linecap="butt"/>
    </style:style>
    <style:style style:family="graphic" style:name="a83">
      <style:graphic-properties draw:fill="none" draw:stroke="solid" svg:stroke-width="0.01389in" svg:stroke-color="#172c51" svg:stroke-opacity="100%" draw:stroke-linejoin="miter" svg:stroke-linecap="butt"/>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Título do Trabalho: Estudo de Caso sobre o Sistema Operacional Gramine SGX<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saúde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 confidenciais contra acessos não autorizados e alterações. Ele opera<text:s/>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 SGX pode ter um impacto dramático no design e implementação de<text:s/>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p>
      <text:list text:style-name="Outline" text:continue-numbering="true">
        <text:list-item>
          <text:p text:style-name="P39">Questões relacionadas a proteção do SO</text:p>
        </text:list-item>
      </text:list>
      <text:p text:style-name="P40">No contexto da evolução das ameaças cibernéticas, o Sistema Operacional Gramine SGX destaca-se como uma solução robusta. Sua base reside na tecnologia revolucionária 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text:s/><text:soft-page-break/>como o kernel, sistema operacional e a BIOS.</text:p>
      <text:p text:style-name="P41">Além disso, de acordo com Mona Vij (Engenheira principal da Intel Labs), no epsodio aberto da Intel podcast<text:s/><text:span text:style-name="T42"><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3">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text:s/>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4">Questões relacionadas a modularidade do S.O</text:p>
        </text:list-item>
      </text:list>
      <text:p text:style-name="P45">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6">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text:s/>de isolamento e interconexão<text:s/><text:span text:style-name="T47"><text:bookmark-ref text:ref-name="_Ref148901522" text:reference-format="text">[13]</text:bookmark-ref></text:span>.</text:p>
      <text:p text:style-name="P48">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49">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text:s/><text:soft-page-break/>garantir a segurança e a confidencialidade dos dados em um nível fundamental do sistema operacional. Est<text:span text:style-name="T50">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1"><text:bookmark-ref text:ref-name="_Ref148901522" text:reference-format="text">[ 13]</text:bookmark-ref></text:span>.</text:p>
      <text:p text:style-name="P52">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3">Questões relacionadas a generalidade do S.O.</text:p>
        </text:list-item>
      </text:list>
      <text:p text:style-name="P54">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p>
      <text:list text:style-name="Outline" text:continue-numbering="true">
        <text:list-item>
          <text:list>
            <text:list-item>
              <text:p text:style-name="P55">Implementação e Estruturas Fundamentais do Intel SGX</text:p>
            </text:list-item>
          </text:list>
        </text:list-item>
      </text:list>
      <text:p text:style-name="P56">O Intel SGX (Software Guard Extensions) propõe uma abordagem revolucionária para a implementação de ambientes de execução segura, introduzindo conceitos fundamentais que redefinem a segurança em sistemas computacionais modernos.</text:p>
      <text:p text:style-name="SBCparagraph">Em relação ao processo de como a tecnologia SGX funciona protegendo contra ataques de software, abaixo temos a visualização do processo (Figura 1). Esse processo funciona da seguinte forma:</text:p>
      <text:list text:style-name="LFO12" text:continue-numbering="true">
        <text:list-item>
          <text:p text:style-name="P57">O aplicativo é construído com partes confiáveis e não confiáveis.</text:p>
        </text:list-item>
        <text:list-item>
          <text:p text:style-name="P58">O aplicativo é executado e cria um enclave, que é colocado na memória confiável.</text:p>
        </text:list-item>
        <text:list-item>
          <text:p text:style-name="P59">Uma função confiável é chamada; o código em execução dentro do enclave visualiza dados sem criptografia; o acesso externo aos dados é negado.</text:p>
        </text:list-item>
        <text:list-item>
          <text:p text:style-name="P60">A função retorna; os dados do enclave permanecem na memória confiável.</text:p>
        </text:list-item>
      </text:list>
      <text:soft-page-break/>
      <text:p text:style-name="P61"><draw:custom-shape svg:x="3.87222in" svg:y="2.61736in" svg:width="0.79236in" svg:height="0.79236in" draw:z-index="251654144" draw:id="id0" draw:style-name="a0" draw:name="&quot;Not Allowed&quot; Symbol 3" text:anchor-type="paragraph"><svg:title/><svg:desc/><draw:enhanced-geometry draw:path-stretchpoint-x="21600" draw:path-stretchpoint-y="21600" draw:type="non-primitive" svg:viewBox="0 0 21600 21600" draw:enhanced-path="M ?f2 ?f8 A ?f123 ?f124 ?f125 ?f126 ?f2 ?f8 ?f120 ?f122  W ?f127 ?f128 ?f129 ?f130 ?f2 ?f8 ?f120 ?f122 Z M ?f60 ?f61 A ?f161 ?f162 ?f163 ?f164 ?f60 ?f61 ?f158 ?f160  W ?f165 ?f166 ?f167 ?f168 ?f60 ?f61 ?f158 ?f160 Z M ?f62 ?f63 A ?f204 ?f205 ?f206 ?f207 ?f62 ?f63 ?f201 ?f203  W ?f208 ?f209 ?f210 ?f211 ?f62 ?f63 ?f201 ?f203 Z N" draw:text-areas="?f73 ?f75 ?f74 ?f76" draw:glue-points="?f73 ?f75 ?f73 ?f76 ?f74 ?f76 ?f74 ?f75" draw:glue-point-leaving-directions="-360, -180, -180, -360" draw:modifiers="1875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0 - ?f9"/><draw:equation draw:name="f20" draw:formula="0 - ?f6"/><draw:equation draw:name="f21" draw:formula="atan2(?f19, ?f20)"/><draw:equation draw:name="f22" draw:formula="0 - ?f21"/><draw:equation draw:name="f23" draw:formula="?f22 * ?f0 / ?f13"/><draw:equation draw:name="f24" draw:formula="?f23 - ?f1"/><draw:equation draw:name="f25" draw:formula="?f24 + ?f1"/><draw:equation draw:name="f26" draw:formula="?f25 * ?f13 / ?f0"/><draw:equation draw:name="f27" draw:formula="0 - ?f26"/><draw:equation draw:name="f28" draw:formula="sin(?f27)"/><draw:equation draw:name="f29" draw:formula="0 - ?f28"/><draw:equation draw:name="f30" draw:formula="?f29 * ?f18"/><draw:equation draw:name="f31" draw:formula="cos(?f27)"/><draw:equation draw:name="f32" draw:formula="0 - ?f31"/><draw:equation draw:name="f33" draw:formula="?f32 * ?f17"/><draw:equation draw:name="f34" draw:formula="sqrt(?f30 * ?f30 + ?f33 * ?f33 + 0 * 0)"/><draw:equation draw:name="f35" draw:formula="?f17 * ?f18 / ?f34"/><draw:equation draw:name="f36" draw:formula="?f16 / 2"/><draw:equation draw:name="f37" draw:formula="0 - ?f35"/><draw:equation draw:name="f38" draw:formula="0 - ?f36"/><draw:equation draw:name="f39" draw:formula="atan2(?f37, ?f38)"/><draw:equation draw:name="f40" draw:formula="0 - ?f39"/><draw:equation draw:name="f41" draw:formula="?f40 * ?f0 / ?f13"/><draw:equation draw:name="f42" draw:formula="?f41 - ?f1"/><draw:equation draw:name="f43" draw:formula="?f42 * 2"/><draw:equation draw:name="f44" draw:formula="-10800000 + ?f43"/><draw:equation draw:name="f45" draw:formula="?f24 - ?f42"/><draw:equation draw:name="f46" draw:formula="?f45 - ?f0"/><draw:equation draw:name="f47" draw:formula="?f45 + ?f1"/><draw:equation draw:name="f48" draw:formula="?f47 * ?f13 / ?f0"/><draw:equation draw:name="f49" draw:formula="0 - ?f48"/><draw:equation draw:name="f50" draw:formula="sin(?f49)"/><draw:equation draw:name="f51" draw:formula="0 - ?f50"/><draw:equation draw:name="f52" draw:formula="?f51 * ?f18"/><draw:equation draw:name="f53" draw:formula="cos(?f49)"/><draw:equation draw:name="f54" draw:formula="0 - ?f53"/><draw:equation draw:name="f55" draw:formula="?f54 * ?f17"/><draw:equation draw:name="f56" draw:formula="sqrt(?f52 * ?f52 + ?f55 * ?f55 + 0 * 0)"/><draw:equation draw:name="f57" draw:formula="?f17 * ?f18 / ?f56"/><draw:equation draw:name="f58" draw:formula="?f51 * ?f57"/><draw:equation draw:name="f59" draw:formula="?f54 * ?f57"/><draw:equation draw:name="f60" draw:formula="?f11 + ?f58"/><draw:equation draw:name="f61" draw:formula="?f8 + ?f59"/><draw:equation draw:name="f62" draw:formula="?f11 - ?f58"/><draw:equation draw:name="f63" draw:formula="?f8 - ?f59"/><draw:equation draw:name="f64" draw:formula="2700000 + ?f1"/><draw:equation draw:name="f65" draw:formula="?f64 * ?f13 / ?f0"/><draw:equation draw:name="f66" draw:formula="0 - ?f65"/><draw:equation draw:name="f67" draw:formula="sin(?f66)"/><draw:equation draw:name="f68" draw:formula="0 - ?f67"/><draw:equation draw:name="f69" draw:formula="?f68 * ?f10"/><draw:equation draw:name="f70" draw:formula="cos(?f66)"/><draw:equation draw:name="f71" draw:formula="0 - ?f70"/><draw:equation draw:name="f72" draw:formula="?f71 * ?f7"/><draw:equation draw:name="f73" draw:formula="?f11 - ?f69"/><draw:equation draw:name="f74" draw:formula="?f11 + ?f69"/><draw:equation draw:name="f75" draw:formula="?f8 - ?f72"/><draw:equation draw:name="f76" draw:formula="?f8 + ?f72"/><draw:equation draw:name="f77" draw:formula="?f16 - 10800"/><draw:equation draw:name="f78" draw:formula="?f8 - 10800"/><draw:equation draw:name="f79" draw:formula="sqrt(?f77 * ?f77 + ?f78 * ?f78 + 0 * 0)"/><draw:equation draw:name="f80" draw:formula="atan2(?f77, ?f78)"/><draw:equation draw:name="f81" draw:formula="?f80 + ?f1"/><draw:equation draw:name="f82" draw:formula="?f81 * ?f14 / ?f0"/><draw:equation draw:name="f83" draw:formula="0 - ?f82"/><draw:equation draw:name="f84" draw:formula="21550000 - 21600000"/><draw:equation draw:name="f85" draw:formula="if(?f84, 21600000, 21550000)"/><draw:equation draw:name="f86" draw:formula="-21550000 - ?f85"/><draw:equation draw:name="f87" draw:formula="if(?f86, -21550000, ?f85)"/><draw:equation draw:name="f88" draw:formula="?f0 + ?f87"/><draw:equation draw:name="f89" draw:formula="?f0 + ?f1"/><draw:equation draw:name="f90" draw:formula="?f89 * ?f13 / ?f0"/><draw:equation draw:name="f91" draw:formula="0 - ?f90"/><draw:equation draw:name="f92" draw:formula="cos(?f91)"/><draw:equation draw:name="f93" draw:formula="0 - ?f92"/><draw:equation draw:name="f94" draw:formula="?f93 * ?f10"/><draw:equation draw:name="f95" draw:formula="sin(?f91)"/><draw:equation draw:name="f96" draw:formula="0 - ?f95"/><draw:equation draw:name="f97" draw:formula="?f96 * ?f7"/><draw:equation draw:name="f98" draw:formula="sqrt(?f94 * ?f94 + ?f97 * ?f97 + 0 * 0)"/><draw:equation draw:name="f99" draw:formula="?f10 * ?f7 / ?f98"/><draw:equation draw:name="f100" draw:formula="?f96 * ?f99"/><draw:equation draw:name="f101" draw:formula="?f2 - ?f100"/><draw:equation draw:name="f102" draw:formula="?f93 * ?f99"/><draw:equation draw:name="f103" draw:formula="?f8 - ?f102"/><draw:equation draw:name="f104" draw:formula="?f101 - ?f10"/><draw:equation draw:name="f105" draw:formula="?f103 - ?f7"/><draw:equation draw:name="f106" draw:formula="?f101 + ?f10"/><draw:equation draw:name="f107" draw:formula="?f103 + ?f7"/><draw:equation draw:name="f108" draw:formula="?f88 + ?f1"/><draw:equation draw:name="f109" draw:formula="?f108 * ?f13 / ?f0"/><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7"/><draw:equation draw:name="f117" draw:formula="sqrt(?f113 * ?f113 + ?f116 * ?f116 + 0 * 0)"/><draw:equation draw:name="f118" draw:formula="?f10 * ?f7 / ?f117"/><draw:equation draw:name="f119" draw:formula="?f115 * ?f118"/><draw:equation draw:name="f120" draw:formula="?f101 + ?f119"/><draw:equation draw:name="f121" draw:formula="?f112 * ?f118"/><draw:equation draw:name="f122" draw:formula="?f103 + ?f121"/><draw:equation draw:name="f123" draw:formula="if(?f87, ?f2, ?f104)"/><draw:equation draw:name="f124" draw:formula="if(?f87, ?f8, ?f105)"/><draw:equation draw:name="f125" draw:formula="if(?f87, ?f2, ?f106)"/><draw:equation draw:name="f126" draw:formula="if(?f87, ?f8, ?f107)"/><draw:equation draw:name="f127" draw:formula="if(?f87, ?f104, ?f120)"/><draw:equation draw:name="f128" draw:formula="if(?f87, ?f105, ?f122)"/><draw:equation draw:name="f129" draw:formula="if(?f87, ?f106, ?f120)"/><draw:equation draw:name="f130" draw:formula="if(?f87, ?f107, ?f122)"/><draw:equation draw:name="f131" draw:formula="21550000 - ?f44"/><draw:equation draw:name="f132" draw:formula="if(?f131, ?f44, 21550000)"/><draw:equation draw:name="f133" draw:formula="-21550000 - ?f132"/><draw:equation draw:name="f134" draw:formula="if(?f133, -21550000, ?f132)"/><draw:equation draw:name="f135" draw:formula="?f45 + ?f134"/><draw:equation draw:name="f136" draw:formula="sqrt(?f55 * ?f55 + ?f52 * ?f52 + 0 * 0)"/><draw:equation draw:name="f137" draw:formula="?f17 * ?f18 / ?f136"/><draw:equation draw:name="f138" draw:formula="?f51 * ?f137"/><draw:equation draw:name="f139" draw:formula="?f60 - ?f138"/><draw:equation draw:name="f140" draw:formula="?f54 * ?f137"/><draw:equation draw:name="f141" draw:formula="?f61 - ?f140"/><draw:equation draw:name="f142" draw:formula="?f139 - ?f17"/><draw:equation draw:name="f143" draw:formula="?f141 - ?f18"/><draw:equation draw:name="f144" draw:formula="?f139 + ?f17"/><draw:equation draw:name="f145" draw:formula="?f141 + ?f18"/><draw:equation draw:name="f146" draw:formula="?f135 + ?f1"/><draw:equation draw:name="f147" draw:formula="?f146 * ?f13 / ?f0"/><draw:equation draw:name="f148" draw:formula="0 - ?f147"/><draw:equation draw:name="f149" draw:formula="cos(?f148)"/><draw:equation draw:name="f150" draw:formula="0 - ?f149"/><draw:equation draw:name="f151" draw:formula="?f150 * ?f17"/><draw:equation draw:name="f152" draw:formula="sin(?f148)"/><draw:equation draw:name="f153" draw:formula="0 - ?f152"/><draw:equation draw:name="f154" draw:formula="?f153 * ?f18"/><draw:equation draw:name="f155" draw:formula="sqrt(?f151 * ?f151 + ?f154 * ?f154 + 0 * 0)"/><draw:equation draw:name="f156" draw:formula="?f17 * ?f18 / ?f155"/><draw:equation draw:name="f157" draw:formula="?f153 * ?f156"/><draw:equation draw:name="f158" draw:formula="?f139 + ?f157"/><draw:equation draw:name="f159" draw:formula="?f150 * ?f156"/><draw:equation draw:name="f160" draw:formula="?f141 + ?f159"/><draw:equation draw:name="f161" draw:formula="if(?f134, ?f60, ?f142)"/><draw:equation draw:name="f162" draw:formula="if(?f134, ?f61, ?f143)"/><draw:equation draw:name="f163" draw:formula="if(?f134, ?f60, ?f144)"/><draw:equation draw:name="f164" draw:formula="if(?f134, ?f61, ?f145)"/><draw:equation draw:name="f165" draw:formula="if(?f134, ?f142, ?f158)"/><draw:equation draw:name="f166" draw:formula="if(?f134, ?f143, ?f160)"/><draw:equation draw:name="f167" draw:formula="if(?f134, ?f144, ?f158)"/><draw:equation draw:name="f168" draw:formula="if(?f134, ?f145, ?f160)"/><draw:equation draw:name="f169" draw:formula="?f46 + ?f134"/><draw:equation draw:name="f170" draw:formula="?f46 + ?f1"/><draw:equation draw:name="f171" draw:formula="?f170 * ?f13 / ?f0"/><draw:equation draw:name="f172" draw:formula="0 - ?f171"/><draw:equation draw:name="f173" draw:formula="cos(?f172)"/><draw:equation draw:name="f174" draw:formula="0 - ?f173"/><draw:equation draw:name="f175" draw:formula="?f174 * ?f17"/><draw:equation draw:name="f176" draw:formula="sin(?f172)"/><draw:equation draw:name="f177" draw:formula="0 - ?f176"/><draw:equation draw:name="f178" draw:formula="?f177 * ?f18"/><draw:equation draw:name="f179" draw:formula="sqrt(?f175 * ?f175 + ?f178 * ?f178 + 0 * 0)"/><draw:equation draw:name="f180" draw:formula="?f17 * ?f18 / ?f179"/><draw:equation draw:name="f181" draw:formula="?f177 * ?f180"/><draw:equation draw:name="f182" draw:formula="?f62 - ?f181"/><draw:equation draw:name="f183" draw:formula="?f174 * ?f180"/><draw:equation draw:name="f184" draw:formula="?f63 - ?f183"/><draw:equation draw:name="f185" draw:formula="?f182 - ?f17"/><draw:equation draw:name="f186" draw:formula="?f184 - ?f18"/><draw:equation draw:name="f187" draw:formula="?f182 + ?f17"/><draw:equation draw:name="f188" draw:formula="?f184 + ?f18"/><draw:equation draw:name="f189" draw:formula="?f169 + ?f1"/><draw:equation draw:name="f190" draw:formula="?f189 * ?f13 / ?f0"/><draw:equation draw:name="f191" draw:formula="0 - ?f190"/><draw:equation draw:name="f192" draw:formula="cos(?f191)"/><draw:equation draw:name="f193" draw:formula="0 - ?f192"/><draw:equation draw:name="f194" draw:formula="?f193 * ?f17"/><draw:equation draw:name="f195" draw:formula="sin(?f191)"/><draw:equation draw:name="f196" draw:formula="0 - ?f195"/><draw:equation draw:name="f197" draw:formula="?f196 * ?f18"/><draw:equation draw:name="f198" draw:formula="sqrt(?f194 * ?f194 + ?f197 * ?f197 + 0 * 0)"/><draw:equation draw:name="f199" draw:formula="?f17 * ?f18 / ?f198"/><draw:equation draw:name="f200" draw:formula="?f196 * ?f199"/><draw:equation draw:name="f201" draw:formula="?f182 + ?f200"/><draw:equation draw:name="f202" draw:formula="?f193 * ?f199"/><draw:equation draw:name="f203" draw:formula="?f184 + ?f202"/><draw:equation draw:name="f204" draw:formula="if(?f134, ?f62, ?f185)"/><draw:equation draw:name="f205" draw:formula="if(?f134, ?f63, ?f186)"/><draw:equation draw:name="f206" draw:formula="if(?f134, ?f62, ?f187)"/><draw:equation draw:name="f207" draw:formula="if(?f134, ?f63, ?f188)"/><draw:equation draw:name="f208" draw:formula="if(?f134, ?f185, ?f201)"/><draw:equation draw:name="f209" draw:formula="if(?f134, ?f186, ?f203)"/><draw:equation draw:name="f210" draw:formula="if(?f134, ?f187, ?f201)"/><draw:equation draw:name="f211" draw:formula="if(?f134, ?f188, ?f203)"/></draw:enhanced-geometry></draw:custom-shape><draw:custom-shape svg:width="0.69792in" svg:height="1.42431in" draw:z-index="251653120" draw:id="id1" draw:style-name="a1" draw:transform="translate(-0.34896in -0.71215in) rotate(-3.14159) translate(4.27812in 2.94271in)" draw:name="Arrow: Down 2"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type="line" svg:x1="4.20764in" svg:y1="1.15139in" svg:x2="4.21458in" svg:y2="1.56111in" draw:z-index="251658240" draw:id="id2" draw:style-name="a3" draw:name="Straight Arrow Connector 5" text:anchor-type="paragraph"><svg:title/><svg:desc/></draw:connector><draw:connector draw:type="line" svg:x1="3.89167in" svg:y1="1.87639in" svg:x2="2.91111in" svg:y2="2.10278in" draw:z-index="251655168" draw:id="id3" draw:style-name="a5" draw:name="Straight Arrow Connector 4" text:anchor-type="paragraph"><svg:title/><svg:desc/></draw:connector><draw:g draw:z-index="251669504" draw:name="Group 9" draw:id="id8" draw:style-name="a11" text:anchor-type="paragraph"><svg:title/><svg:desc/><draw:connector draw:type="line" svg:x1="2.10898in" svg:y1="0.82014in" svg:x2="2.22357in" svg:y2="0.95631in" draw:id="id4" draw:style-name="a6" draw:name="Straight Connector 6"><svg:title/><svg:desc/></draw:connector><draw:connector draw:type="line" svg:x1="2.10898in" svg:y1="1.08548in" svg:x2="2.22357in" svg:y2="0.94931in" draw:id="id5" draw:style-name="a7" draw:name="Straight Connector 6"><svg:title/><svg:desc/></draw:connector><draw:connector draw:type="line" svg:x1="2.10898in" svg:y1="1.07222in" svg:x2="2.22357in" svg:y2="1.2084in" draw:id="id6" draw:style-name="a8" draw:name="Straight Connector 6"><svg:title/><svg:desc/></draw:connector><draw:connector draw:type="line" svg:x1="2.22148in" svg:y1="1.20347in" svg:x2="2.14232in" svg:y2="1.28889in" draw:id="id7" draw:style-name="a10" draw:name="Straight Arrow Connector 8"><svg:title/><svg:desc/></draw:connector></draw:g><draw:g draw:z-index="251671552" draw:name="Group 9" draw:id="id13" draw:style-name="a17" text:anchor-type="paragraph"><svg:title/><svg:desc/><draw:connector draw:type="line" svg:x1="2.12014in" svg:y1="1.55903in" svg:x2="2.23472in" svg:y2="1.6952in" draw:id="id9" draw:style-name="a12" draw:name="Straight Connector 6"><svg:title/><svg:desc/></draw:connector><draw:connector draw:type="line" svg:x1="2.12014in" svg:y1="1.82437in" svg:x2="2.23472in" svg:y2="1.68819in" draw:id="id10" draw:style-name="a13" draw:name="Straight Connector 6"><svg:title/><svg:desc/></draw:connector><draw:connector draw:type="line" svg:x1="2.12014in" svg:y1="1.81111in" svg:x2="2.23472in" svg:y2="1.94729in" draw:id="id11" draw:style-name="a14" draw:name="Straight Connector 6"><svg:title/><svg:desc/></draw:connector><draw:connector draw:type="line" svg:x1="2.23264in" svg:y1="1.94236in" svg:x2="2.15347in" svg:y2="2.02778in" draw:id="id12" draw:style-name="a16" draw:name="Straight Arrow Connector 8"><svg:title/><svg:desc/></draw:connector></draw:g><draw:g draw:z-index="251680768" draw:name="Group 10" draw:id="id23" draw:style-name="a27" text:anchor-type="paragraph"><svg:title/><svg:desc/><draw:g draw:name="Group 9" draw:id="id18"><svg:title/><svg:desc/><draw:connector draw:type="line" svg:x1="2.10675in" svg:y1="2.84564in" svg:x2="2.22134in" svg:y2="2.98182in" draw:id="id14" draw:style-name="a18" draw:name="Straight Connector 6"><svg:title/><svg:desc/></draw:connector><draw:connector draw:type="line" svg:x1="2.10675in" svg:y1="3.11098in" svg:x2="2.22134in" svg:y2="2.97481in" draw:id="id15" draw:style-name="a19" draw:name="Straight Connector 6"><svg:title/><svg:desc/></draw:connector><draw:connector draw:type="line" svg:x1="2.10675in" svg:y1="3.09772in" svg:x2="2.22134in" svg:y2="3.2339in" draw:id="id16" draw:style-name="a20" draw:name="Straight Connector 6"><svg:title/><svg:desc/></draw:connector><draw:connector draw:type="line" svg:x1="2.21925in" svg:y1="3.22897in" svg:x2="2.14009in" svg:y2="3.31439in" draw:id="id17" draw:style-name="a22" draw:name="Straight Arrow Connector 8"><svg:title/><svg:desc/></draw:connector></draw:g><draw:connector draw:type="line" svg:x1="2.10625in" svg:y1="2.59382in" svg:x2="2.22083in" svg:y2="2.72993in" draw:id="id19" draw:style-name="a23" draw:name="Straight Connector 6"><svg:title/><svg:desc/></draw:connector><draw:connector draw:type="line" svg:x1="2.10625in" svg:y1="2.85833in" svg:x2="2.22083in" svg:y2="2.72215in" draw:id="id20" draw:style-name="a24" draw:name="Straight Connector 6"><svg:title/><svg:desc/></draw:connector><draw:connector draw:type="line" svg:x1="2.11109in" svg:y1="2.3299in" svg:x2="2.22568in" svg:y2="2.46601in" draw:id="id21" draw:style-name="a25" draw:name="Straight Connector 6"><svg:title/><svg:desc/></draw:connector><draw:connector draw:type="line" svg:x1="2.11109in" svg:y1="2.59676in" svg:x2="2.22568in" svg:y2="2.46065in" draw:id="id22" draw:style-name="a26" draw:name="Straight Connector 6"><svg:title/><svg:desc/></draw:connector></draw:g><draw:connector draw:type="line" svg:x1="3.38273in" svg:y1="1.04656in" svg:x2="3.80426in" svg:y2="1.04656in" draw:z-index="251681792" draw:id="id24" draw:style-name="a29" draw:name="Straight Arrow Connector 13" text:anchor-type="paragraph"><svg:title/><svg:desc/></draw:connector><draw:connector draw:type="line" svg:x1="2.82818in" svg:y1="2.02318in" svg:x2="3.19554in" svg:y2="1.25582in" draw:z-index="251657216" draw:id="id25" draw:style-name="a31" draw:name="Straight Arrow Connector 4" text:anchor-type="paragraph"><svg:title/><svg:desc/></draw:connector><text:span text:style-name="T62"><draw:frame draw:style-name="a32" draw:name="Picture 1" text:anchor-type="as-char" svg:x="0in" svg:y="0in" svg:width="4.16981in" svg:height="4.16981in" style:rel-width="scale" style:rel-height="scale"><draw:image xlink:href="media/image1.png" xlink:type="simple" xlink:show="embed" xlink:actuate="onLoad"/><svg:title/><svg:desc>A diagram of a computer system

Description automatically generated</svg:desc></draw:frame></text:span></text:p>
      <text:p text:style-name="P63">Figura 1.<text:s/>Visualização do Processo.</text:p>
      <text:list text:style-name="Outline" text:continue-numbering="true">
        <text:list-item>
          <text:list>
            <text:list-item>
              <text:p text:style-name="P64">Divisão de Aplicativos: Partes Seguras e Não Seguras</text:p>
            </text:list-item>
          </text:list>
        </text:list-item>
      </text:list>
      <text:p text:style-name="P65">O SGX reorganiza a arquitetura de aplicativos, segregando-os em duas partes distintas: uma parte segura e 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p>
      <text:list text:style-name="Outline" text:continue-numbering="true">
        <text:list-item>
          <text:list>
            <text:list-item>
              <text:p text:style-name="P66">Lançamento de Enclaves em Memória Protegida</text:p>
            </text:list-item>
          </text:list>
        </text:list-item>
      </text:list>
      <text:p text:style-name="P67">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p>
      <text:list text:style-name="Outline" text:continue-numbering="true">
        <text:list-item>
          <text:list>
            <text:list-item>
              <text:p text:style-name="P68">Execução de Funções de Enclave com Acesso Restrito</text:p>
            </text:list-item>
          </text:list>
        </text:list-item>
      </text:list>
      <text:p text:style-name="P69">Ao chamar funções dentro de um enclave, apenas o código 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p>
      <text:soft-page-break/>
      <text:list text:style-name="Outline" text:continue-numbering="true">
        <text:list-item>
          <text:list>
            <text:list-item>
              <text:p text:style-name="P70">Estrutura do Ambiente de Execução Seguro (TEE)<text:s/>do SGX<text:s/>Integrado</text:p>
            </text:list-item>
          </text:list>
        </text:list-item>
      </text:list>
      <text:p text:style-name="P71">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p>
      <text:p text:style-name="P72">Sendo assim, abaixo na Figura 2, veremos a visão<text:s/>geral de<text:s/>alto<text:s/>nível de<text:s/>hardware/software do SGX<text:s/>para termos uma base de como funciona.</text:p>
      <text:p text:style-name="P73"><draw:g draw:name="Canvas 14" draw:id="id46" draw:style-name="a60" text:anchor-type="as-char"><svg:title/><svg:desc/><draw:custom-shape svg:x="1.04057in" svg:y="1.77496in" svg:width="3.09375in" svg:height="0.51021in" draw:id="id26" draw:style-name="a33" draw:name="Rectangle 2044752498"><svg:title/><svg:desc/><text:p text:style-name="P74">SGX<text:s/></text:p><text:p text:style-name="P75"><text:span text:style-name="T76">Módulo</text:span></text:p><draw:enhanced-geometry draw:type="non-primitive" svg:viewBox="0 0 21600 21600" draw:enhanced-path="M 0 0 L 21600 0 21600 21600 0 21600 Z N"/></draw:custom-shape><draw:custom-shape svg:x="1.53762in" svg:y="0.16157in" svg:width="0.97917in" svg:height="0.41767in" draw:id="id27" draw:style-name="a34" draw:name="Rectangle 2010633657"><svg:title/><svg:desc/><text:p text:style-name="P77">Enclave</text:p><draw:enhanced-geometry draw:type="non-primitive" svg:viewBox="0 0 21600 21600" draw:enhanced-path="M 0 0 L 21600 0 21600 21600 0 21600 Z N"/></draw:custom-shape><draw:custom-shape svg:x="2.69281in" svg:y="0.16157in" svg:width="0.97917in" svg:height="0.4173in" draw:id="id28" draw:style-name="a35" draw:name="Rectangle 1983118253"><svg:title/><svg:desc/><text:p text:style-name="P78">Enclave</text:p><draw:enhanced-geometry draw:type="non-primitive" svg:viewBox="0 0 21600 21600" draw:enhanced-path="M 0 0 L 21600 0 21600 21600 0 21600 Z N"/></draw:custom-shape><draw:custom-shape svg:x="1.52614in" svg:y="0.8981in" svg:width="0.97917in" svg:height="0.501in" draw:id="id29" draw:style-name="a36" draw:name="Rectangle 1680747670"><svg:title/><svg:desc/><text:p text:style-name="P79">SGX User Runtime</text:p><draw:enhanced-geometry draw:type="non-primitive" svg:viewBox="0 0 21600 21600" draw:enhanced-path="M 0 0 L 21600 0 21600 21600 0 21600 Z N"/></draw:custom-shape><draw:custom-shape svg:x="2.69281in" svg:y="0.8981in" svg:width="0.97917in" svg:height="0.50062in" draw:id="id30" draw:style-name="a37" draw:name="Rectangle 216901580"><svg:title/><svg:desc/><text:p text:style-name="P80">SGX User Runtime</text:p><draw:enhanced-geometry draw:type="non-primitive" svg:viewBox="0 0 21600 21600" draw:enhanced-path="M 0 0 L 21600 0 21600 21600 0 21600 Z N"/></draw:custom-shape><draw:custom-shape svg:x="1.09434in" svg:y="1.81355in" svg:width="0.80315in" svg:height="0.44276in" draw:id="id31" draw:style-name="a38" draw:name="Rectangle 1489552879"><svg:title/><svg:desc/><text:p text:style-name="P81">Page Tables</text:p><draw:enhanced-geometry draw:type="non-primitive" svg:viewBox="0 0 21600 21600" draw:enhanced-path="M 0 0 L 21600 0 21600 21600 0 21600 Z N"/></draw:custom-shape><draw:custom-shape svg:x="0.96353in" svg:y="2.76498in" svg:width="3.26415in" svg:height="1.04829in" draw:id="id32" draw:style-name="a39" draw:name="Rectangle 1073638864"><svg:title/><svg:desc/><text:p text:style-name="P82">Plataforma</text:p><text:p text:style-name="P83"/><text:p text:style-name="P84"/><draw:enhanced-geometry draw:type="non-primitive" svg:viewBox="0 0 21600 21600" draw:enhanced-path="M 0 0 L 21600 0 21600 21600 0 21600 Z N"/></draw:custom-shape><draw:custom-shape svg:x="1.04057in" svg:y="3.17058in" svg:width="2.35692in" svg:height="0.4423in" draw:id="id33" draw:style-name="a40" draw:name="Rectangle 1910473625"><svg:title/><svg:desc/><text:p text:style-name="P85">EPC</text:p><draw:enhanced-geometry draw:type="non-primitive" svg:viewBox="0 0 21600 21600" draw:enhanced-path="M 0 0 L 21600 0 21600 21600 0 21600 Z N"/></draw:custom-shape><draw:custom-shape svg:x="3.46226in" svg:y="3.16828in" svg:width="0.69938in" svg:height="0.4423in" draw:id="id34" draw:style-name="a41" draw:name="Rectangle 464356606"><svg:title/><svg:desc/><text:p text:style-name="P86">EPCM</text:p><draw:enhanced-geometry draw:type="non-primitive" svg:viewBox="0 0 21600 21600" draw:enhanced-path="M 0 0 L 21600 0 21600 21600 0 21600 Z N"/></draw:custom-shape><draw:custom-shape svg:x="0.0107in" svg:y="1.77446in" svg:width="1.16986in" svg:height="0.56548in" draw:id="id35" draw:style-name="a42" draw:name="Rectangle 1295921685"><svg:title/><svg:desc/><text:p text:style-name="P87">Ambiente Privilegiado</text:p><draw:enhanced-geometry draw:type="non-primitive" svg:viewBox="0 0 21600 21600" draw:enhanced-path="M 0 0 L 21600 0 21600 21600 0 21600 Z N"/></draw:custom-shape><draw:custom-shape svg:x="0in" svg:y="0.43512in" svg:width="1.16418in" svg:height="0.70111in" draw:id="id36" draw:style-name="a43" draw:name="Rectangle 1706121972"><svg:title/><svg:desc/><text:p text:style-name="P88">Ambiente de Aplicação</text:p><draw:enhanced-geometry draw:type="non-primitive" svg:viewBox="0 0 21600 21600" draw:enhanced-path="M 0 0 L 21600 0 21600 21600 0 21600 Z N"/></draw:custom-shape><draw:custom-shape svg:x="0in" svg:y="3.07626in" svg:width="0.99852in" svg:height="0.50062in" draw:id="id37" draw:style-name="a44" draw:name="Rectangle 1785196883"><svg:title/><svg:desc/><text:p text:style-name="P89">Hardware Exposto</text:p><draw:enhanced-geometry draw:type="non-primitive" svg:viewBox="0 0 21600 21600" draw:enhanced-path="M 0 0 L 21600 0 21600 21600 0 21600 Z N"/></draw:custom-shape><draw:custom-shape svg:x="4.26866in" svg:y="0.03936in" svg:width="1.63433in" svg:height="1.53259in" draw:id="id38" draw:style-name="a45" draw:name="Rectangle 1839542248"><svg:title/><svg:desc/><text:p text:style-name="P90">Instruções</text:p><text:p text:style-name="P91">EEXIT</text:p><text:p text:style-name="P92">EGETKEY</text:p><text:p text:style-name="P93">EREPORT</text:p><text:p text:style-name="P94">EENTER</text:p><text:p text:style-name="P95">ERESUME</text:p><draw:enhanced-geometry draw:type="non-primitive" svg:viewBox="0 0 21600 21600" draw:enhanced-path="M 0 0 L 21600 0 21600 21600 0 21600 Z N"/></draw:custom-shape><draw:custom-shape svg:x="4.26866in" svg:y="0.99699in" svg:width="1.63433in" svg:height="1.88497in" draw:id="id39" draw:style-name="a46" draw:name="Rectangle 1504420053"><svg:title/><svg:desc/><text:p text:style-name="P96">Instruções</text:p><text:p text:style-name="P97">EADD <text:s text:c="15"/>ELDB</text:p><text:p text:style-name="P98">EBLOCK <text:s text:c="10"/>ELDU</text:p><text:p text:style-name="P99">ECREATE <text:s text:c="8"/>EPA</text:p><text:p text:style-name="P100">EDBGRD <text:s text:c="9"/>EREMOVE</text:p><text:p text:style-name="P101">EBDGWR <text:s text:c="8"/>ETRACE</text:p><text:p text:style-name="P102">EINIT <text:s text:c="15"/>EWB</text:p><text:p text:style-name="P103">EEXTEND</text:p><draw:enhanced-geometry draw:type="non-primitive" svg:viewBox="0 0 21600 21600" draw:enhanced-path="M 0 0 L 21600 0 21600 21600 0 21600 Z N"/></draw:custom-shape><draw:custom-shape svg:x="4.25437in" svg:y="2.76497in" svg:width="1.64861in" svg:height="1.06284in" draw:id="id40" draw:style-name="a47" draw:name="Rectangle 1835910391"><svg:title/><svg:desc/><text:p text:style-name="P104">Estrutura de<text:s/></text:p><text:p text:style-name="Normal"><text:span text:style-name="T105">Dados de Hardware</text:span></text:p><text:p text:style-name="Normal"><text:span text:style-name="T106">Hardware</text:span></text:p><text:p text:style-name="P107">Runtime</text:p><text:p text:style-name="P108">Application</text:p><text:p text:style-name="P109">OS Data structure</text:p><text:p text:style-name="P110"/><draw:enhanced-geometry draw:type="non-primitive" svg:viewBox="0 0 21600 21600" draw:enhanced-path="M 0 0 L 21600 0 21600 21600 0 21600 Z N"/></draw:custom-shape><draw:connector draw:type="line" svg:x1="2.58745in" svg:y1="2.28486in" draw:start-shape="id26" draw:start-glue-point="2" svg:x2="2.5956in" svg:y2="2.76459in" draw:end-shape="id32" draw:end-glue-point="0" draw:id="id41" draw:style-name="a49" draw:name="Straight Arrow Connector 2015725941"><svg:title/><svg:desc/></draw:connector><draw:connector draw:type="line" svg:x1="2.02312in" svg:y1="0.59529in" svg:x2="2.01572in" svg:y2="0.89798in" draw:end-shape="id29" draw:end-glue-point="0" draw:id="id42" draw:style-name="a52" draw:name="Straight Arrow Connector 1059003063"><svg:title/><svg:desc/></draw:connector><draw:connector draw:type="line" svg:x1="3.19653in" svg:y1="0.57916in" svg:x2="3.18239in" svg:y2="0.89798in" draw:end-shape="id30" draw:end-glue-point="0" draw:id="id43" draw:style-name="a55" draw:name="Straight Arrow Connector 2020216379"><svg:title/><svg:desc/></draw:connector><draw:connector draw:type="line" svg:x1="2.00578in" svg:y1="1.41021in" svg:x2="2.00578in" svg:y2="1.77471in" draw:id="id44" draw:style-name="a57" draw:name="Straight Arrow Connector 129768291"><svg:title/><svg:desc/></draw:connector><draw:connector draw:type="line" svg:x1="3.18239in" svg:y1="1.39853in" draw:start-shape="id30" draw:start-glue-point="2" svg:x2="3.18239in" svg:y2="1.77446in" draw:id="id45" draw:style-name="a59" draw:name="Straight Arrow Connector 1119326872"><svg:title/><svg:desc/></draw:connector></draw:g></text:p>
      <text:p text:style-name="P111">Figura 2. Arquitetura SGX.</text:p>
      <text:p text:style-name="P112">Segundo a Intel, o ponto chave dessa perspectiva arquitetural é que a tradução básica de virtual para físico ocorria por meio dessas tabelas de páginas. No entanto, a enclave possui seu próprio espaço de memória restrito, e é por isso que existe essa estrutura adicional (Plataforma retângulo de cor cinza).</text:p>
      <text:p text:style-name="P113">Essencialmente, chamamos isso de Enclave Page Cache (EPC) e Enclave Page Cache Manager (EPCM), que supervisiona todas as páginas alocadas para o enclave.</text:p>
      <text:p text:style-name="P114">Imagine um programa no qual algumas informações confidenciais não podem ser comprometidas, como dados cruciais. Para garantir a confidencialidade de seus próprios dados, você pode recorrer ao Ambiente de Execução SGX.</text:p>
      <text:p text:style-name="P115">Dentro desse ambiente SGX, utilizamos as páginas do EPC e do gerenciador do EPC para monitorar quantas páginas foram designadas para o enclave.</text:p>
      <text:list text:style-name="Outline" text:continue-numbering="true">
        <text:list-item>
          <text:list>
            <text:list-item>
              <text:p text:style-name="P116">Instruções do Intel SGX</text:p>
            </text:list-item>
          </text:list>
        </text:list-item>
      </text:list>
      <text:p text:style-name="P117">O SGX introduz 18 novas instruções, divididas entre o supervisor e o usuário. Essas instruções, como EADD, EENTER, EEXIT, EREPORT e EGETKEY, desempenham<text:s/><text:soft-page-break/>papéis cruciais na criação, entrada e saída de enclaves, bem como na obtenção de chaves e relatórios de atestação. Elas são os blocos de construção fundamentais que capacitam a operação segura dos enclaves.</text:p>
      <text:p text:style-name="P118"><text:span text:style-name="T119">Tabela 1. Instruções do Intel SGX em destaque</text:span><text:span text:style-name="T120">.</text:span></text:p>
      <text:p text:style-name="P121"><draw:frame draw:style-name="a61" draw:name="Picture 1" text:anchor-type="as-char" svg:x="0in" svg:y="0in" svg:width="5.90556in" svg:height="2.51042in" style:rel-width="scale" style:rel-height="scale"><draw:image xlink:href="media/image2.emf" xlink:type="simple" xlink:show="embed" xlink:actuate="onLoad"/><svg:title/><svg:desc/></draw:frame></text:p>
      <text:list text:style-name="Outline" text:continue-numbering="true">
        <text:list-item>
          <text:list>
            <text:list-item>
              <text:p text:style-name="P122">Estruturas de Controle de Enclave</text:p>
            </text:list-item>
          </text:list>
        </text:list-item>
      </text:list>
      <text:p text:style-name="P123">O SGX define 13 novas estruturas de dados, essenciais para o gerenciamento de enclaves. Essas estruturas, incluindo SGX Enclave<text:s/>Control<text:s/>Structure (SECS), Thread Control Structure (TCS) e Version Array (VA), desempenham papéis vitais na criação, execução e salvamento de estados do enclave. Cada estrutura é projetada para garantir a integridade e confidencialidade dos dados contidos nos enclaves.</text:p>
      <text:list text:style-name="LFO11" text:continue-numbering="true">
        <text:list-item>
          <text:p text:style-name="P124">SGX Enclave Control Structure (SECS): Metadados sobre o enclave.</text:p>
        </text:list-item>
        <text:list-item>
          <text:p text:style-name="P125">Thread Control Structure (TCS): Ponto de execução no enclave.</text:p>
        </text:list-item>
        <text:list-item>
          <text:p text:style-name="P126">State State Area (SSA): Salva o estado do processador durante exceções.</text:p>
        </text:list-item>
        <text:list-item>
          <text:p text:style-name="P127">Page Information (PAGEINFO): Fornece informações sobre uma página.</text:p>
        </text:list-item>
        <text:list-item>
          <text:p text:style-name="P128">Security Information (SECINFO): Armazena metadados de página.</text:p>
        </text:list-item>
        <text:list-item>
          <text:p text:style-name="P129">Paging Crypto MetaData (PCMD): Rastreia metadados de página evitada.</text:p>
        </text:list-item>
        <text:list-item>
          <text:p text:style-name="P130">Version Array (VA): Armazena versões de páginas evitadas.</text:p>
        </text:list-item>
        <text:list-item>
          <text:p text:style-name="P131">Enclave Page Cache Map (EPCM): Armazena o estado das páginas no EPC.</text:p>
        </text:list-item>
        <text:list-item>
          <text:p text:style-name="P132">Enclave Signature Structure (SIGSTRUCT): Contém a medida do enclave e informações de assinatura.</text:p>
        </text:list-item>
        <text:list-item>
          <text:p text:style-name="P133">EINIT Token Structure (EINITTOKEN): Usado para verificar a autorização do enclave.</text:p>
        </text:list-item>
        <text:list-item>
          <text:p text:style-name="P134">Report (REPORT): Saída autenticada da instrução EREPORT.</text:p>
        </text:list-item>
        <text:list-item>
          <text:p text:style-name="P135">Report Target Info (TARGETINFO): Identifica o enclave destinatário.</text:p>
        </text:list-item>
        <text:list-item>
          <text:p text:style-name="P136">Key Request (KEYREQUEST): Usado para obter chaves específicas.</text:p>
        </text:list-item>
      </text:list>
      <text:soft-page-break/>
      <text:list text:style-name="Outline" text:continue-numbering="true">
        <text:list-item>
          <text:list>
            <text:list-item>
              <text:p text:style-name="P137">Papel da Memória: Enclave Page Cache (EPC) e Enclave Page Cache Map (EPCM)</text:p>
            </text:list-item>
          </text:list>
        </text:list-item>
      </text:list>
      <text:p text:style-name="P138">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p>
      <text:p text:style-name="P139"><draw:frame draw:z-index="251682816" draw:style-name="a62" draw:name="Picture 11" text:anchor-type="paragraph" svg:x="0in" svg:y="1.71947in" svg:width="5.90556in" svg:height="4.65625in" style:rel-width="scale" style:rel-height="scale"><draw:image xlink:href="media/image3.png" xlink:type="simple" xlink:show="embed" xlink:actuate="onLoad"/><svg:title/><svg:desc>A diagram of a computer program

Description automatically generated</svg:desc></draw:frame>A memória EPC é definida pela BIOS e possui um tamanho limitado. O SGX tem um método para remover uma página da EPC, colocá-la na memória desprotegida e restaurá-la posteriormente. As páginas mantêm as 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40">Figura 3. Memória<text:s/>–<text:s/>Caminho da página<text:s/>do Enclave</text:p>
      <text:p text:style-name="P141">Os conteúdos das enclaves e as estruturas de dados associadas são armazenados no Enclave Page Cache (EPC), que é um subconjunto do PRM<text:s/>(Memória Reservada do Processador).</text:p>
      <text:p text:style-name="P142">O design do SGX suporta a existência de várias enclaves em um sistema ao mesmo tempo, o que é uma necessidade em ambientes de vários processos. Isso é alcançado<text:s/><text:soft-page-break/>dividindo o EPC em páginas de 4 KB que podem ser atribuídas a diferentes enclaves. O EPC utiliza o mesmo tamanho de página que o recurso de tradução de endereço da arquitetura.</text:p>
      <text:p text:style-name="P143">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 às enclaves não pode acessar diretamente o EPC, pois está contido no PRM<text:s/>conforme na Figura 4 abaixo.</text:p>
      <text:p text:style-name="P144"><draw:g draw:name="Canvas 15" draw:id="id86" draw:style-name="a111" text:anchor-type="as-char"><svg:title/><svg:desc/><draw:custom-shape svg:x="0in" svg:y="0.10363in" svg:width="1.1791in" svg:height="1.76119in" draw:id="id47" draw:style-name="a63" draw:name="Rectangle: Rounded Corners 1168464128"><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48789in" svg:y="0.10363in" svg:width="1.17847in" svg:height="1.76111in" draw:id="id48" draw:style-name="a64" draw:name="Rectangle: Rounded Corners 22088453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24163in" svg:y="0.10363in" svg:width="1.17847in" svg:height="1.76111in" draw:id="id49" draw:style-name="a65" draw:name="Rectangle: Rounded Corners 18726284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569in" svg:y="0.41447in" svg:width="0.99472in" svg:height="0.17038in" draw:id="id50" draw:style-name="a66" draw:name="Rectangle: Rounded Corners 29062934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569in" svg:y="0.58485in" svg:width="0.99444in" svg:height="0.16997in" draw:id="id51" draw:style-name="a67" draw:name="Rectangle: Rounded Corners 746676740"><svg:title/><svg:desc/><text:p text:style-name="P145"/><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321in" svg:y="0.75458in" svg:width="0.99444in" svg:height="0.16997in" draw:id="id52" draw:style-name="a68" draw:name="Rectangle: Rounded Corners 1076379600"><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597in" svg:y="1.34209in" svg:width="0.99444in" svg:height="0.16997in" draw:id="id53" draw:style-name="a69" draw:name="Rectangle: Rounded Corners 122504718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597in" svg:y="1.51275in" svg:width="0.99444in" svg:height="0.16997in" draw:id="id54" draw:style-name="a70" draw:name="Rectangle: Rounded Corners 999199438"><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91597in" svg:y="1.43058in" svg:width="0.99444in" svg:height="0.32967in" draw:id="id55" draw:style-name="a71" draw:name="Rectangle 797500506"><svg:title/><svg:desc/><text:p text:style-name="P146">Entrada</text:p><draw:enhanced-geometry draw:type="non-primitive" svg:viewBox="0 0 21600 21600" draw:enhanced-path="M 0 0 L 21600 0 21600 21600 0 21600 Z N"/></draw:custom-shape><draw:custom-shape svg:x="4.91597in" svg:y="0.32315in" svg:width="0.99444in" svg:height="0.32917in" draw:id="id56" draw:style-name="a72" draw:name="Rectangle 1209550937"><svg:title/><svg:desc/><text:p text:style-name="P147">Entrada</text:p><draw:enhanced-geometry draw:type="non-primitive" svg:viewBox="0 0 21600 21600" draw:enhanced-path="M 0 0 L 21600 0 21600 21600 0 21600 Z N"/></draw:custom-shape><draw:custom-shape svg:x="4.91597in" svg:y="0.4816in" svg:width="0.99444in" svg:height="0.32917in" draw:id="id57" draw:style-name="a73" draw:name="Rectangle 641885352"><svg:title/><svg:desc/><text:p text:style-name="P148">Entrada</text:p><draw:enhanced-geometry draw:type="non-primitive" svg:viewBox="0 0 21600 21600" draw:enhanced-path="M 0 0 L 21600 0 21600 21600 0 21600 Z N"/></draw:custom-shape><draw:custom-shape svg:x="4.91597in" svg:y="0.65995in" svg:width="0.99444in" svg:height="0.32917in" draw:id="id58" draw:style-name="a74" draw:name="Rectangle 1460268968"><svg:title/><svg:desc/><text:p text:style-name="P149">Entrada</text:p><draw:enhanced-geometry draw:type="non-primitive" svg:viewBox="0 0 21600 21600" draw:enhanced-path="M 0 0 L 21600 0 21600 21600 0 21600 Z N"/></draw:custom-shape><draw:custom-shape svg:x="4.91597in" svg:y="1.25235in" svg:width="0.99444in" svg:height="0.32917in" draw:id="id59" draw:style-name="a75" draw:name="Rectangle 1836787484"><svg:title/><svg:desc/><text:p text:style-name="P150">Entrada</text:p><draw:enhanced-geometry draw:type="non-primitive" svg:viewBox="0 0 21600 21600" draw:enhanced-path="M 0 0 L 21600 0 21600 21600 0 21600 Z N"/></draw:custom-shape><draw:custom-shape svg:x="3.02652in" svg:y="0.08644in" svg:width="0.99444in" svg:height="0.32917in" draw:id="id60" draw:style-name="a76" draw:name="Rectangle 839673701"><svg:title/><svg:desc/><text:p text:style-name="P151">EPC</text:p><draw:enhanced-geometry draw:type="non-primitive" svg:viewBox="0 0 21600 21600" draw:enhanced-path="M 0 0 L 21600 0 21600 21600 0 21600 Z N"/></draw:custom-shape><draw:custom-shape svg:x="1.2463in" svg:y="0.08094in" svg:width="0.99444in" svg:height="0.32917in" draw:id="id61" draw:style-name="a77" draw:name="Rectangle 1600535250"><svg:title/><svg:desc/><text:p text:style-name="P152">PRM</text:p><draw:enhanced-geometry draw:type="non-primitive" svg:viewBox="0 0 21600 21600" draw:enhanced-path="M 0 0 L 21600 0 21600 21600 0 21600 Z N"/></draw:custom-shape><draw:custom-shape svg:x="0in" svg:y="0.09098in" svg:width="0.62609in" svg:height="0.32917in" draw:id="id62" draw:style-name="a78" draw:name="Rectangle 1049021572"><svg:title/><svg:desc/><text:p text:style-name="P153">DRAM</text:p><draw:enhanced-geometry draw:type="non-primitive" svg:viewBox="0 0 21600 21600" draw:enhanced-path="M 0 0 L 21600 0 21600 21600 0 21600 Z N"/></draw:custom-shape><draw:custom-shape svg:x="3.31868in" svg:y="0.41561in" svg:width="1.04395in" svg:height="0.16971in" draw:id="id63" draw:style-name="a79" draw:name="Rectangle 1179471069"><svg:title/><svg:desc/><text:p text:style-name="P154"/><draw:enhanced-geometry draw:type="non-primitive" svg:viewBox="0 0 21600 21600" draw:enhanced-path="M 0 0 L 21600 0 21600 21600 0 21600 Z N"/></draw:custom-shape><draw:custom-shape svg:x="3.31868in" svg:y="0.58531in" svg:width="1.04375in" svg:height="0.16944in" draw:id="id64" draw:style-name="a80" draw:name="Rectangle 9692940"><svg:title/><svg:desc/><draw:enhanced-geometry draw:type="non-primitive" svg:viewBox="0 0 21600 21600" draw:enhanced-path="M 0 0 L 21600 0 21600 21600 0 21600 Z N"/></draw:custom-shape><draw:custom-shape svg:x="3.31889in" svg:y="0.75514in" svg:width="1.04375in" svg:height="0.16944in" draw:id="id65" draw:style-name="a81" draw:name="Rectangle 885407973"><svg:title/><svg:desc/><draw:enhanced-geometry draw:type="non-primitive" svg:viewBox="0 0 21600 21600" draw:enhanced-path="M 0 0 L 21600 0 21600 21600 0 21600 Z N"/></draw:custom-shape><draw:custom-shape svg:x="3.32389in" svg:y="1.34355in" svg:width="1.04375in" svg:height="0.16944in" draw:id="id66" draw:style-name="a82" draw:name="Rectangle 17566906"><svg:title/><svg:desc/><draw:enhanced-geometry draw:type="non-primitive" svg:viewBox="0 0 21600 21600" draw:enhanced-path="M 0 0 L 21600 0 21600 21600 0 21600 Z N"/></draw:custom-shape><draw:custom-shape svg:x="3.32389in" svg:y="1.51293in" svg:width="1.04375in" svg:height="0.16944in" draw:id="id67" draw:style-name="a83" draw:name="Rectangle 317112904"><svg:title/><svg:desc/><draw:enhanced-geometry draw:type="non-primitive" svg:viewBox="0 0 21600 21600" draw:enhanced-path="M 0 0 L 21600 0 21600 21600 0 21600 Z N"/></draw:custom-shape><draw:custom-shape svg:x="3.36156in" svg:y="0.33598in" svg:width="0.97631in" svg:height="0.30646in" draw:id="id68" draw:style-name="a84" draw:name="Rectangle 1506428893"><svg:title/><svg:desc/><text:p text:style-name="P155">4kb página</text:p><draw:enhanced-geometry draw:type="non-primitive" svg:viewBox="0 0 21600 21600" draw:enhanced-path="M 0 0 L 21600 0 21600 21600 0 21600 Z N"/></draw:custom-shape><draw:custom-shape svg:x="3.34994in" svg:y="0.4816in" svg:width="0.99444in" svg:height="0.36061in" draw:id="id69" draw:style-name="a85" draw:name="Rectangle 1123060661"><svg:title/><svg:desc/><text:p text:style-name="P156">4kb página</text:p><draw:enhanced-geometry draw:type="non-primitive" svg:viewBox="0 0 21600 21600" draw:enhanced-path="M 0 0 L 21600 0 21600 21600 0 21600 Z N"/></draw:custom-shape><draw:custom-shape svg:x="3.34994in" svg:y="0.66946in" svg:width="0.99444in" svg:height="0.32917in" draw:id="id70" draw:style-name="a86" draw:name="Rectangle 1258270931"><svg:title/><svg:desc/><text:p text:style-name="P157">4kb página</text:p><draw:enhanced-geometry draw:type="non-primitive" svg:viewBox="0 0 21600 21600" draw:enhanced-path="M 0 0 L 21600 0 21600 21600 0 21600 Z N"/></draw:custom-shape><draw:custom-shape svg:x="3.34994in" svg:y="1.25235in" svg:width="0.99444in" svg:height="0.32917in" draw:id="id71" draw:style-name="a87" draw:name="Rectangle 200210307"><svg:title/><svg:desc/><text:p text:style-name="P158">4kb página</text:p><draw:enhanced-geometry draw:type="non-primitive" svg:viewBox="0 0 21600 21600" draw:enhanced-path="M 0 0 L 21600 0 21600 21600 0 21600 Z N"/></draw:custom-shape><draw:custom-shape svg:x="3.34994in" svg:y="1.41988in" svg:width="0.99444in" svg:height="0.32917in" draw:id="id72" draw:style-name="a88" draw:name="Rectangle 1921778867"><svg:title/><svg:desc/><text:p text:style-name="P159">4kb página</text:p><draw:enhanced-geometry draw:type="non-primitive" svg:viewBox="0 0 21600 21600" draw:enhanced-path="M 0 0 L 21600 0 21600 21600 0 21600 Z N"/></draw:custom-shape><draw:custom-shape svg:x="3.41368in" svg:y="0.95593in" svg:width="0.96979in" svg:height="0.32917in" draw:id="id73" draw:style-name="a89" draw:name="Rectangle 1332505350"><svg:title/><svg:desc/><text:p text:style-name="P160">...</text:p><draw:enhanced-geometry draw:type="non-primitive" svg:viewBox="0 0 21600 21600" draw:enhanced-path="M 0 0 L 21600 0 21600 21600 0 21600 Z N"/></draw:custom-shape><draw:custom-shape svg:x="1.56167in" svg:y="0.77644in" svg:width="1.04375in" svg:height="0.71205in" draw:id="id74" draw:style-name="a90" draw:name="Rectangle 1252158810"><svg:title/><svg:desc/><text:p text:style-name="P161">EPC</text:p><draw:enhanced-geometry draw:type="non-primitive" svg:viewBox="0 0 21600 21600" draw:enhanced-path="M 0 0 L 21600 0 21600 21600 0 21600 Z N"/></draw:custom-shape><draw:custom-shape svg:x="0.06982in" svg:y="0.77026in" svg:width="1.04375in" svg:height="0.40901in" draw:id="id75" draw:style-name="a91" draw:name="Rectangle 82657654"><svg:title/><svg:desc/><text:p text:style-name="P162">PRM</text:p><draw:enhanced-geometry draw:type="non-primitive" svg:viewBox="0 0 21600 21600" draw:enhanced-path="M 0 0 L 21600 0 21600 21600 0 21600 Z N"/></draw:custom-shape><draw:connector draw:type="line" svg:x1="1.11357in" svg:y1="0.77026in" svg:x2="1.51792in" svg:y2="0.20534in" draw:id="id76" draw:style-name="a93" draw:name="Straight Connector 365123092"><svg:title/><svg:desc/></draw:connector><draw:connector draw:type="line" svg:x1="1.50814in" svg:y1="1.71348in" svg:x2="1.12193in" svg:y2="1.17417in" draw:id="id77" draw:style-name="a95" draw:name="Straight Connector 1766329955"><svg:title/><svg:desc/></draw:connector><draw:connector draw:type="line" svg:x1="3.36156in" svg:y1="1.85029in" svg:x2="2.5975in" svg:y2="1.46733in" draw:id="id78" draw:style-name="a97" draw:name="Straight Connector 224777670"><svg:title/><svg:desc/></draw:connector><draw:connector draw:type="line" svg:x1="3.33551in" svg:y1="0.12716in" svg:x2="2.60912in" svg:y2="0.77026in" draw:id="id79" draw:style-name="a99" draw:name="Straight Connector 1690904062"><svg:title/><svg:desc/></draw:connector><draw:custom-shape svg:x="5.07047in" svg:y="0.91112in" svg:width="0.83995in" svg:height="0.32917in" draw:id="id80" draw:style-name="a100" draw:name="Rectangle 1132929376"><svg:title/><svg:desc/><text:p text:style-name="P163">...</text:p><draw:enhanced-geometry draw:type="non-primitive" svg:viewBox="0 0 21600 21600" draw:enhanced-path="M 0 0 L 21600 0 21600 21600 0 21600 Z N"/></draw:custom-shape><draw:connector draw:type="line" svg:x1="4.91569in" svg:y1="0.49966in" draw:start-shape="id50" draw:start-glue-point="3" svg:x2="4.36264in" svg:y2="0.50046in" draw:end-shape="id63" draw:end-glue-point="1" draw:id="id81" draw:style-name="a102" draw:name="Straight Arrow Connector 2069598626"><svg:title/><svg:desc/></draw:connector><draw:connector draw:type="line" svg:x1="4.91569in" svg:y1="0.66984in" draw:start-shape="id51" draw:start-glue-point="3" svg:x2="4.36243in" svg:y2="0.67004in" draw:end-shape="id64" draw:end-glue-point="1" draw:id="id82" draw:style-name="a104" draw:name="Straight Arrow Connector 330989565"><svg:title/><svg:desc/></draw:connector><draw:connector draw:type="line" svg:x1="4.91321in" svg:y1="0.83956in" draw:start-shape="id52" draw:start-glue-point="3" svg:x2="4.36264in" svg:y2="0.83986in" draw:end-shape="id65" draw:end-glue-point="1" draw:id="id83" draw:style-name="a106" draw:name="Straight Arrow Connector 2113445522"><svg:title/><svg:desc/></draw:connector><draw:connector draw:type="line" svg:x1="4.91597in" svg:y1="1.42708in" draw:start-shape="id53" draw:start-glue-point="3" svg:x2="4.36764in" svg:y2="1.42828in" draw:end-shape="id66" draw:end-glue-point="1" draw:id="id84" draw:style-name="a108" draw:name="Straight Arrow Connector 1825601399"><svg:title/><svg:desc/></draw:connector><draw:connector draw:type="line" svg:x1="4.90554in" svg:y1="1.59935in" svg:x2="4.36764in" svg:y2="1.59766in" draw:end-shape="id67" draw:end-glue-point="1" draw:id="id85" draw:style-name="a110" draw:name="Straight Arrow Connector 711467765"><svg:title/><svg:desc/></draw:connector></draw:g></text:p>
      <text:p text:style-name="P164">Figura<text:s/>4. Memória<text:s/>–<text:s/>Cache de página enclave (EPC) no PRM<text:s/></text:p>
      <text:p text:style-name="P165">O design do SGX espera que o software do sistema aloque as páginas do EPC para as enclaves. No entanto, como o 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166">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text:s/>a Tabela 2 abaixo)</text:p>
      <text:p text:style-name="P167"><text:span text:style-name="T168">Tabela 2</text:span><text:span text:style-name="T169">.</text:span><text:span text:style-name="T170"><text:s/>EPCM - Tabela de p</text:span><text:span text:style-name="T171">áginas em um<text:s/></text:span><text:span text:style-name="T172">SO</text:span><text:span text:style-name="T173"><text:s/>regular</text:span></text:p>
      <text:p text:style-name="P174"><draw:frame draw:style-name="a112" draw:name="Picture 2" text:anchor-type="as-char" svg:x="0in" svg:y="0in" svg:width="4.13542in" svg:height="0.84375in" style:rel-width="scale" style:rel-height="scale"><draw:image xlink:href="media/image4.emf" xlink:type="simple" xlink:show="embed" xlink:actuate="onLoad"/><svg:title/><svg:desc/></draw:frame></text:p>
      <text:p text:style-name="P175"/>
      <text:p text:style-name="P176">//Figura<text:s/>em desenvolvimento</text:p>
      <text:p text:style-name="P177"><text:span text:style-name="T178">Source: https://blog.quarkslab.com/resources/2018-07-05-intel-sgx/page_management.png</text:span></text:p>
      <text:list text:style-name="Outline" text:continue-numbering="true">
        <text:list-item>
          <text:p text:style-name="P179">Desempenho frente a SOs tradicionais<text:s/></text:p>
        </text:list-item>
      </text:list>
      <text:p text:style-name="P180">//EM DESENVOLVIMENTO...</text:p>
      <text:soft-page-break/>
      <text:list text:style-name="Outline" text:continue-numbering="true">
        <text:list-item>
          <text:p text:style-name="P181">Images</text:p>
        </text:list-item>
      </text:list>
      <text:p text:style-name="SBCparagraphfirst">Todas as imagens foram reproduzidas por mim (autor) algumas foram traduzidas, portanto, deixei o credito abaixo.</text:p>
      <text:list text:style-name="LFO9" text:continue-numbering="true">
        <text:list-item>
          <text:p text:style-name="P182"><text:span text:style-name="T183">Figura 1</text:span><text:span text:style-name="T184">:</text:span><text:span text:style-name="T185"><text:s/></text:span><text:span text:style-name="T186">Visualização do Processo</text:span><text:span text:style-name="T187">. Disponível em:</text:span><text:span text:style-name="T188"><text:s/></text:span><text:span text:style-name="T189">&lt;</text:span><text:a xlink:href="https://blog.quarkslab.com/overview-of-intel-sgx-part-1-sgx-internals.html" office:target-frame-name="_top" xlink:show="replace"><text:span text:style-name="T190">https://blog.quarkslab.com/overview-of-intel-sgx-part-1-sgx-internals.html</text:span></text:a><text:span text:style-name="T191">&gt;,&lt;</text:span><text:a xlink:href="https://community.intel.com/legacyfs/online/drupal_files/332680-002.pdf" office:target-frame-name="_top" xlink:show="replace"><text:span text:style-name="T192">https://community.intel.com/legacyfs/online/drupal_files/332680-002.pdf</text:span></text:a><text:span text:style-name="T193">&gt;;<text:s/></text:span></text:p>
        </text:list-item>
        <text:list-item>
          <text:p text:style-name="P194"><text:span text:style-name="T195">Figura 2</text:span><text:span text:style-name="T196">:</text:span><text:span text:style-name="T197"><text:s/></text:span><text:span text:style-name="T198">Arquitetura SGX.</text:span><text:span text:style-name="T199"><text:s/>Disponível em:<text:s/></text:span><text:span text:style-name="T200">&lt;</text:span><text:a xlink:href="https://community.intel.com/legacyfs/online/drupal_files/332680-002.pdf" office:target-frame-name="_top" xlink:show="replace"><text:span text:style-name="T201">https://community.intel.com/legacyfs/online/drupal_files/332680-002.pdf</text:span></text:a><text:span text:style-name="T202">&gt;;<text:s/></text:span></text:p>
        </text:list-item>
        <text:list-item>
          <text:p text:style-name="P203"><text:span text:style-name="T204">Figura 3:</text:span><text:span text:style-name="T205"><text:s/></text:span><text:span text:style-name="T206">Memória – Caminho da página do Enclave</text:span><text:span text:style-name="T207">. Disponível em:<text:s/></text:span><text:span text:style-name="T208">&lt;</text:span><text:a xlink:href="https://blog.quarkslab.com/overview-of-intel-sgx-part-1-sgx-internals.html" office:target-frame-name="_top" xlink:show="replace"><text:span text:style-name="T209">https://blog.quarkslab.com/overview-of-intel-sgx-part-1-sgx-internals.html</text:span></text:a><text:span text:style-name="T210">&gt;,&lt;</text:span><text:a xlink:href="https://community.intel.com/legacyfs/online/drupal_files/332680-002.pdf" office:target-frame-name="_top" xlink:show="replace"><text:span text:style-name="T211">https://community.intel.com/legacyfs/online/drupal_files/332680-002.pdf</text:span></text:a><text:span text:style-name="T212">&gt;;</text:span></text:p>
        </text:list-item>
        <text:list-item>
          <text:p text:style-name="P213"><text:span text:style-name="T214">Figura 4:</text:span><text:span text:style-name="T215"><text:s/></text:span><text:span text:style-name="T216">Memória – Cache de página enclave (EPC) no PRM</text:span><text:span text:style-name="T217">. Disponivel em:<text:s/></text:span><text:span text:style-name="T218">&lt;</text:span><text:a xlink:href="https://sgx101.gitbook.io/sgx101/sgx-bootstrap/enclave" office:target-frame-name="_top" xlink:show="replace"><text:span text:style-name="T219">https://sgx101.gitbook.io/sgx101/sgx-bootstrap/enclave</text:span></text:a><text:span text:style-name="T220">&gt;.</text:span></text:p>
        </text:list-item>
      </text:list>
      <text:p text:style-name="P221"/>
      <text:list text:style-name="Outline" text:continue-numbering="true">
        <text:list-item>
          <text:p text:style-name="P222">Tabelas</text:p>
        </text:list-item>
      </text:list>
      <text:list text:style-name="LFO13" text:continue-numbering="true">
        <text:list-item>
          <text:p text:style-name="P223">Tabela 1:<text:s/>Instruções do Intel SGX em destaque. Dispon<text:span text:style-name="T224">ível em:<text:s/></text:span><text:a xlink:href="https://blog.quarkslab.com/overview-of-intel-sgx-part-1-sgx-internals.html" office:target-frame-name="_top" xlink:show="replace"><text:span text:style-name="Hyperlink">https://blog.quarkslab.com/overview-of-intel-sgx-part-1-sgx-internals.html</text:span></text:a><text:span text:style-name="T225">;<text:s/></text:span></text:p>
        </text:list-item>
        <text:list-item>
          <text:p text:style-name="P226">Tabela 2:<text:s/>EPCM - Tabela de páginas em um SO regular. Dispon<text:span text:style-name="T227">ível em:<text:s/></text:span><text:a xlink:href="https://sgx101.gitbook.io/sgx101/sgx-bootstrap/enclave" office:target-frame-name="_top" xlink:show="replace"><text:span text:style-name="Hyperlink">https://sgx101.gitbook.io/sgx101/sgx-bootstrap/enclave</text:span></text:a>.<text:s/></text:p>
        </text:list-item>
      </text:list>
      <text:list text:style-name="Outline" text:continue-numbering="true">
        <text:list-item>
          <text:p text:style-name="P228">Conclusão</text:p>
        </text:list-item>
      </text:list>
      <text:p text:style-name="P229">Referências bibliográficas devem ser claras e uniformes. Recomendamos fornecer os nomes dos autores entre colchetes, por exemplo, [Knuth 1984], [Boulic and Renault 1991]; ou datas entre parênteses, por exemplo, Knuth (1984), Smith and Jones (1999).</text:p>
      <text:p text:style-name="P230"><text:span text:style-name="T231">As referências devem ser listadas em fonte de tamanho 12, com 6 pontos de espaço antes de cada referência. A primeira linha de cada referência não deve ser recuada, enquanto as subsequentes devem ser recuadas por 0,5 cm.</text:span></text:p>
      <text:p text:style-name="P232">References</text:p>
      <text:list text:style-name="LFO7" text:continue-numbering="true">
        <text:list-item>
          <text:p text:style-name="P233"><text:bookmark-start text:name="_Ref148644700"/><text:span text:style-name="T234">[J. Rutkowska]. Thoughts on Intel’s upcoming Software Guard Extensions (Part 1), Aug. 2013.<text:s/></text:span><text:a xlink:href="http://theinvisiblethings.blogspot.com/2013/08/thoughts-on-intels-upcoming-software.html" office:target-frame-name="_top" xlink:show="replace"><text:span text:style-name="T235">http://theinvisiblethings.blogspot.com/2013/08/thoughts-on-intels-upcoming-software.h</text:span><text:bookmark-start text:name="_Hlt148640179"/><text:bookmark-start text:name="_Hlt148640180"/><text:span text:style-name="T236">t</text:span><text:bookmark-end text:name="_Hlt148640179"/><text:bookmark-end text:name="_Hlt148640180"/><text:span text:style-name="T237">ml</text:span></text:a><text:bookmark-end text:name="_Ref148644700"/></text:p>
        </text:list-item>
        <text:list-item>
          <text:p text:style-name="P238">[Lucas Andrade, Edson Borin 2021)]. Projeto final de graduação: “Análise de desempenho do uso de Enclaves com Intel SGX”,<text:s/><text:a xlink:href="https://www.ic.unicamp.br/~reltech/PFG/2021/PFG-21-15.pdf" office:target-frame-name="_top" xlink:show="replace"><text:span text:style-name="Hyperlink">https://www.ic.unicamp.</text:span><text:bookmark-start text:name="_Hlt148644130"/><text:span text:style-name="Hyperlink">b</text:span><text:bookmark-end text:name="_Hlt148644130"/><text:span text:style-name="Hyperlink">r/~reltech/PFG/2021/PFG-21-15.p</text:span><text:bookmark-start text:name="_Hlt148640274"/><text:bookmark-start text:name="_Hlt148640275"/><text:span text:style-name="Hyperlink">d</text:span><text:bookmark-end text:name="_Hlt148640274"/><text:bookmark-end text:name="_Hlt148640275"/><text:span text:style-name="Hyperlink">f</text:span></text:a>, Dezembro.</text:p>
        </text:list-item>
        <text:list-item>
          <text:p text:style-name="P239"><text:span text:style-name="T240">[Sergio Prado 2020]. Trusted Execution Environment e ARM TrustZone.<text:s/></text:span><text:a xlink:href="https://sergioprado.org/trusted-execution-environment-e-arm-trustzone" office:target-frame-name="_top" xlink:show="replace"><text:span text:style-name="Hyperlink">https://sergioprado.org/trusted-execution-environment-e-arm-trustzone</text:span></text:a>. Março.</text:p>
        </text:list-item>
        <text:list-item>
          <text:p text:style-name="P241"><text:bookmark-start text:name="_Ref148643966"/>[Rafael Campra Reis Condé 2017]. Proteção de dados de autenticação em um<text:s/><text:soft-page-break/>sistema operacional usando enclaves SGX.<text:s/><text:a xlink:href="https://www.acervodigital.ufpr.br/bitstream/handle/1884/53489/R%20-%20D%20-%20RAFAEL%20CAMPRA%20REIS%20CONDE.pdf?sequence=1&amp;isAllowed=y" office:target-frame-name="_top" xlink:show="replace"><text:span text:style-name="Hyperlink">https://www.acervodigital.ufpr.br/bitstream/handle/1884/53489/R%20-%20D%20-%20RAFAEL%20CAMPRA%20REIS%20CONDE.pdf?sequence=1&amp;isAllowed=y</text:span></text:a><text:bookmark-end text:name="_Ref148643966"/>.<text:s/></text:p>
        </text:list-item>
        <text:list-item>
          <text:p text:style-name="P242"><text:span text:style-name="T243">IBM. (2023)<text:s/></text:span><text:bookmark-start text:name="trusted_comp_base__title__1"/><text:bookmark-end text:name="trusted_comp_base__title__1"/><text:span text:style-name="T244">Trusted Computing Base.<text:s/></text:span><text:a xlink:href="https://www.ibm.com/docs/pt-br/aix/7.3?topic=configuration-trusted-computing-base" office:target-frame-name="_top" xlink:show="replace"><text:span text:style-name="T245">https://www.ibm.com/docs/pt-br/aix/7.3?topic=configuration-trusted-computing-ba</text:span><text:bookmark-start text:name="_Hlt148644176"/><text:bookmark-start text:name="_Hlt148644177"/><text:span text:style-name="T246">s</text:span><text:bookmark-end text:name="_Hlt148644176"/><text:bookmark-end text:name="_Hlt148644177"/><text:span text:style-name="T247">e</text:span></text:a><text:span text:style-name="T248">. Março.</text:span></text:p>
        </text:list-item>
        <text:list-item>
          <text:p text:style-name="P249">Gramine (2023) Gramine documentation.<text:s/><text:a xlink:href="https://gramine.readthedocs.io/en/stable/" office:target-frame-name="_top" xlink:show="replace"><text:span text:style-name="Hyperlink">https://gramine.readthedoc</text:span><text:bookmark-start text:name="_Hlt148900924"/><text:bookmark-start text:name="_Hlt148900925"/><text:span text:style-name="Hyperlink">s</text:span><text:bookmark-end text:name="_Hlt148900924"/><text:bookmark-end text:name="_Hlt148900925"/><text:span text:style-name="Hyperlink">.io/en/stable/</text:span></text:a>.<text:s/></text:p>
        </text:list-item>
        <text:list-item>
          <text:p text:style-name="P250"><text:span text:style-name="T251">Gramine (2023) Introduction to SGX.<text:s/></text:span><text:a xlink:href="https://gramine.readthedocs.io/en/stable/sgx-intro.html" office:target-frame-name="_top" xlink:show="replace"><text:span text:style-name="T252">https://gramine.rea</text:span><text:bookmark-start text:name="_Hlt148900929"/><text:bookmark-start text:name="_Hlt148900930"/><text:span text:style-name="T253">d</text:span><text:bookmark-end text:name="_Hlt148900929"/><text:bookmark-end text:name="_Hlt148900930"/><text:span text:style-name="T254">thedocs.io/en/stable/sgx-intro.html</text:span></text:a><text:span text:style-name="T255">.<text:s/></text:span></text:p>
        </text:list-item>
        <text:list-item>
          <text:p text:style-name="P256"><text:bookmark-start text:name="_Ref148643999"/><text:span text:style-name="T257">Quarkslab’s website, [Alexandre Adamski 2018]. Overview of Intel SGX - Part 1, SGX Internals.<text:s/></text:span><text:a xlink:href="https://blog.quarkslab.com/overview-of-intel-sgx-part-1-sgx-internals.html" office:target-frame-name="_top" xlink:show="replace"><text:span text:style-name="Hyperlink">https://blog.quarkslab.com/overview-of-intel-sgx-part-1-sgx-internals.htm</text:span><text:bookmark-start text:name="_Hlt148644218"/><text:bookmark-start text:name="_Hlt148644219"/><text:span text:style-name="Hyperlink">l</text:span><text:bookmark-end text:name="_Hlt148644218"/><text:bookmark-end text:name="_Hlt148644219"/></text:a>.<text:s/><text:span text:style-name="T258">Julho.</text:span><text:bookmark-end text:name="_Ref148643999"/></text:p>
        </text:list-item>
        <text:list-item>
          <text:p text:style-name="P259"><text:bookmark-start text:name="_Ref148643921"/><text:span text:style-name="T260">[Ensar Seker (Medium website) 2021]. Trusted Execution Environment (TEE), Implementations, Drawbacks.<text:s/></text:span><text:a xlink:href="https://taesoo.kim/pubs/2016/jain:opensgx.pdf" office:target-frame-name="_top" xlink:show="replace"><text:span text:style-name="T261">https://ta</text:span><text:bookmark-start text:name="_Hlt148644525"/><text:bookmark-start text:name="_Hlt148644526"/><text:span text:style-name="T262">e</text:span><text:bookmark-end text:name="_Hlt148644525"/><text:bookmark-end text:name="_Hlt148644526"/><text:span text:style-name="T263">soo.</text:span><text:bookmark-start text:name="_Hlt148644223"/><text:bookmark-start text:name="_Hlt148644224"/><text:span text:style-name="T264">k</text:span><text:bookmark-end text:name="_Hlt148644223"/><text:bookmark-end text:name="_Hlt148644224"/><text:span text:style-name="T265">im/pubs/2016/jain:opensgx.pdf</text:span></text:a><text:span text:style-name="T266">, Junho.</text:span><text:bookmark-end text:name="_Ref148643921"/></text:p>
        </text:list-item>
        <text:list-item>
          <text:p text:style-name="P267"><text:bookmark-start text:name="_Ref148644037"/>[Prerit Jain, Soham Desai, Seongmin Kim, Ming-Wei Shih<text:span text:style-name="T268">,</text:span><text:s/>JaeHyuk Leek, Changho Choi<text:span text:style-name="T269">,</text:span><text:s/>Youjung Shin<text:span text:style-name="T270">,</text:span><text:s/>Taesoo Kim<text:span text:style-name="T271">,</text:span><text:s/>Brent Byunghoon Kang<text:span text:style-name="T272">,</text:span><text:s/>Dongsu Han<text:span text:style-name="T273"><text:s/></text:span>2016].<text:s/><text:span text:style-name="T274">OpenSGX: An Open Platform for SGX Research, Implementations, Drawbacks.<text:s/></text:span><text:a xlink:href="https://medium.com/geekculture/trusted-execution-environment-tee-implementations-drawbacks-8a434301d679" office:target-frame-name="_top" xlink:show="replace"><text:span text:style-name="T275">https://medium.com/geekculture/trusted-execution-environment-tee-implementations-drawbacks-</text:span><text:bookmark-start text:name="_Hlt148644516"/><text:bookmark-start text:name="_Hlt148644517"/><text:span text:style-name="T276">8</text:span><text:bookmark-end text:name="_Hlt148644516"/><text:bookmark-end text:name="_Hlt148644517"/><text:span text:style-name="T277">a434301d679</text:span></text:a><text:span text:style-name="T278">, Junho.</text:span><text:bookmark-end text:name="_Ref148644037"/></text:p>
        </text:list-item>
        <text:list-item>
          <text:p text:style-name="P279"><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280"><text:bookmark-start text:name="_Ref148644708"/><text:span text:style-name="T281">[Tobias Konopik</text:span><text:span text:style-name="T282"><text:s/></text:span><text:span text:style-name="T283">2023]. Securing Whole Applications with SGX.<text:s/></text:span><text:a xlink:href="https://sys.cs.fau.de/extern/lehre/ws22/akss/material/gramine-scone.pdf" office:target-frame-name="_top" xlink:show="replace"><text:span text:style-name="Hyperlink">https://sys.cs.fau.de/extern/lehre/ws22/akss/material/gramine-scone.pdf</text:span></text:a>, Janeiro.<text:bookmark-end text:name="_Ref148644708"/></text:p>
        </text:list-item>
        <text:list-item>
          <text:p text:style-name="P284"><text:bookmark-start text:name="_Ref148901522"/><text:span text:style-name="T285">[Katherine Druckman, Mona Vij</text:span><text:span text:style-name="T286"><text:s/></text:span><text:span text:style-name="T287">2023]. Securing Applications with Gramine.<text:s/></text:span><text:a xlink:href="https://www.intel.com/content/www/us/en/developer/articles/community/securing-applications-with-gramine.html?wapkw=Gramine%20SGX" office:target-frame-name="_top" xlink:show="replace"><text:span text:style-name="Hyperlink">https://www.intel.com/content/www/us/en/deve</text:span><text:bookmark-start text:name="_Hlt149264380"/><text:bookmark-start text:name="_Hlt149264381"/><text:span text:style-name="Hyperlink">l</text:span><text:bookmark-end text:name="_Hlt149264380"/><text:bookmark-end text:name="_Hlt149264381"/><text:span text:style-name="Hyperlink">oper/articles/community/securing-applications-with-gramine.html?wapkw=Gramine%20SGX</text:span></text:a>.<text:bookmark-end text:name="_Ref148901522"/></text:p>
        </text:list-item>
        <text:list-item>
          <text:p text:style-name="P288"><text:span text:style-name="T289">Intel Corporation (2015</text:span><text:span text:style-name="T290">). Intel Software Guard E</text:span><text:span text:style-name="T291">xtensions (Intel SGX).<text:s/></text:span><text:a xlink:href="https://community.intel.com/legacyfs/online/drupal_files/332680-002.pdf" office:target-frame-name="_top" xlink:show="replace"><text:span text:style-name="T292">https://community.intel.com/legacyfs/online/drupal_files/332680-002.pdf</text:span></text:a><text:span text:style-name="T293">,<text:s/></text:span><text:span text:style-name="T294">Junho.</text:span></text:p>
        </text:list-item>
        <text:list-item>
          <text:p text:style-name="P295"><text:span text:style-name="T296">SGX 101 (</text:span><text:span text:style-name="T297">2019). Bootstrap SGX – Enclave.<text:s/></text:span><text:a xlink:href="https://sgx101.gitbook.io/sgx101/sgx-bootstrap/enclave" office:target-frame-name="_top" xlink:show="replace"><text:span text:style-name="T298">https://sgx101.gitbook.io/sgx101/sgx-bootstrap/enclave</text:span></text:a><text:span text:style-name="T299">.</text:span><text:span text:style-name="T300"><text:s/>Outubro.</text:span><text:span text:style-name="T301"><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4902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3.93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5" svg:viewBox="0 0 20 30" svg:d="m10 0-10 30h20z"/>
    <draw:marker draw:name="a2" svg:viewBox="0 0 20 30" svg:d="m10 0-10 30h20z"/>
    <draw:marker draw:name="a21" svg:viewBox="0 0 20 30" svg:d="m10 0-10 30h20z"/>
    <draw:marker draw:name="a4" svg:viewBox="0 0 20 30" svg:d="m10 0-10 30h20z"/>
    <draw:marker draw:name="a30" svg:viewBox="0 0 20 30" svg:d="m10 0-10 30h20z"/>
    <draw:marker draw:name="a28" svg:viewBox="0 0 20 30" svg:d="m10 0-10 30h20z"/>
    <draw:marker draw:name="a9" svg:viewBox="0 0 20 30" svg:d="m10 0-10 30h20z"/>
    <draw:marker draw:name="a101" svg:viewBox="0 0 20 30" svg:d="m10 0-10 30h20z"/>
    <draw:marker draw:name="a50" svg:viewBox="0 0 20 30" svg:d="m10 0-10 30h20z"/>
    <draw:marker draw:name="a103" svg:viewBox="0 0 20 30" svg:d="m10 0-10 30h20z"/>
    <draw:marker draw:name="a51" svg:viewBox="0 0 20 30" svg:d="m10 0-10 30h20z"/>
    <draw:marker draw:name="a105" svg:viewBox="0 0 20 30" svg:d="m10 0-10 30h20z"/>
    <draw:marker draw:name="a53" svg:viewBox="0 0 20 30" svg:d="m10 0-10 30h20z"/>
    <draw:marker draw:name="a48" svg:viewBox="0 0 20 30" svg:d="m10 0-10 30h20z"/>
    <draw:marker draw:name="a107" svg:viewBox="0 0 20 30" svg:d="m10 0-10 30h20z"/>
    <draw:marker draw:name="a54" svg:viewBox="0 0 20 30" svg:d="m10 0-10 30h20z"/>
    <draw:marker draw:name="a56" svg:viewBox="0 0 20 30" svg:d="m10 0-10 30h20z"/>
    <draw:marker draw:name="a109" svg:viewBox="0 0 20 30" svg:d="m10 0-10 30h20z"/>
    <draw:marker draw:name="a58" svg:viewBox="0 0 20 30" svg:d="m10 0-10 30h20z"/>
    <draw:stroke-dash draw:name="a98" draw:display-name="SysDash" draw:style="rect" draw:dots1="1" draw:dots1-length="0.02083in" draw:dots2="0" draw:dots2-length="0in" draw:distance="0.02083in"/>
    <draw:stroke-dash draw:name="a92" draw:display-name="SysDash" draw:style="rect" draw:dots1="1" draw:dots1-length="0.02083in" draw:dots2="0" draw:dots2-length="0in" draw:distance="0.02083in"/>
    <draw:stroke-dash draw:name="a94" draw:display-name="SysDash" draw:style="rect" draw:dots1="1" draw:dots1-length="0.02083in" draw:dots2="0" draw:dots2-length="0in" draw:distance="0.02083in"/>
    <draw:stroke-dash draw:name="a96" draw:display-name="SysDash" draw:style="rect" draw:dots1="1" draw:dots1-length="0.02083in" draw:dots2="0" draw:dots2-length="0in" draw:distance="0.02083in"/>
  </office:style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ustavo Borges</meta:initial-creator>
    <dc:creator>Gustavo Borges</dc:creator>
    <meta:creation-date>2023-10-27T01:49:00Z</meta:creation-date>
    <dc:date>2023-10-27T05:37:00Z</dc:date>
    <meta:template xlink:href="Normal" xlink:type="simple"/>
    <meta:editing-cycles>14</meta:editing-cycles>
    <meta:editing-duration>PT13800S</meta:editing-duration>
    <meta:user-defined meta:name="Info 1"/>
    <meta:user-defined meta:name="Info 2"/>
    <meta:user-defined meta:name="Info 3"/>
    <meta:user-defined meta:name="Info 4"/>
    <meta:document-statistic meta:page-count="11" meta:paragraph-count="52" meta:word-count="4086" meta:character-count="26102" meta:row-count="183" meta:non-whitespace-character-count="22068"/>
  </office:meta>
</office:document-meta>
</file>