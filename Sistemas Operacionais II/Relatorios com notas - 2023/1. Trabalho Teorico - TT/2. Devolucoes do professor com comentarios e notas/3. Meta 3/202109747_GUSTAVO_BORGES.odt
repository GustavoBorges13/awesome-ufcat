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Bitstream Vera Serif" svg:font-family="Bitstream Vera Serif" style:font-family-generic="roman" style:font-pitch="variable"/>
    <style:font-face style:name="Bitstream Vera Sans" svg:font-family="Bitstream Vera Sans" style:font-family-generic="system" style:font-pitch="variable"/>
    <style:font-face style:name="Lucidasans" svg:font-family="Lucidasans" style:font-family-generic="system" style:font-pitch="variable"/>
    <style:font-face style:name="Times" svg:font-family="Times" style:font-family-generic="roman" style:font-pitch="variable" svg:panose-1="2 2 6 3 5 4 5 2 3 4"/>
    <style:font-face style:name="Times New Roman" svg:font-family="Times New Roman" style:font-family-generic="roman" style:font-pitch="variable" svg:panose-1="2 2 6 3 5 4 5 2 3 4"/>
    <style:font-face style:name="TimesNewRoman, Bold" svg:font-family="TimesNewRoman, Bold" style:font-family-generic="roman"/>
    <style:font-face style:name="Liberation Sans" svg:font-family="Liberation Sans" style:font-family-generic="swiss" style:font-pitch="variable"/>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Courier" svg:font-family="Courier" style:font-family-generic="modern" style:font-pitch="fixed" svg:panose-1="2 7 4 9 2 2 5 2 4 4"/>
    <style:font-face style:name="StarSymbol" style:font-charset="x-symbol" svg:font-family="Star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office:font-face-decls>
  <office:automatic-styles>
    <text:list-style style:name="LFO7">
      <text:list-level-style-number text:level="1" style:num-prefix="["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format="a" style:num-letter-sync="true">
        <style:list-level-properties text:space-before="0.7958in" text:min-label-width="0.25in" text:list-level-position-and-space-mode="label-alignment">
          <style:list-level-label-alignment text:label-followed-by="listtab" fo:margin-left="1.0458in" fo:text-indent="-0.25in"/>
        </style:list-level-properties>
      </text:list-level-style-number>
      <text:list-level-style-number text:level="3" style:num-suffix="." style:num-format="i">
        <style:list-level-properties fo:text-align="end" text:space-before="1.4208in" text:min-label-width="0.125in" text:list-level-position-and-space-mode="label-alignment">
          <style:list-level-label-alignment text:label-followed-by="listtab" fo:margin-left="1.5458in" fo:text-indent="-0.125in"/>
        </style:list-level-properties>
      </text:list-level-style-number>
      <text:list-level-style-number text:level="4" style:num-suffix="." style:num-format="1">
        <style:list-level-properties text:space-before="1.7958in" text:min-label-width="0.25in" text:list-level-position-and-space-mode="label-alignment">
          <style:list-level-label-alignment text:label-followed-by="listtab" fo:margin-left="2.0458in" fo:text-indent="-0.25in"/>
        </style:list-level-properties>
      </text:list-level-style-number>
      <text:list-level-style-number text:level="5" style:num-suffix="." style:num-format="a" style:num-letter-sync="true">
        <style:list-level-properties text:space-before="2.2958in" text:min-label-width="0.25in" text:list-level-position-and-space-mode="label-alignment">
          <style:list-level-label-alignment text:label-followed-by="listtab" fo:margin-left="2.5458in" fo:text-indent="-0.25in"/>
        </style:list-level-properties>
      </text:list-level-style-number>
      <text:list-level-style-number text:level="6" style:num-suffix="." style:num-format="i">
        <style:list-level-properties fo:text-align="end" text:space-before="2.9208in" text:min-label-width="0.125in" text:list-level-position-and-space-mode="label-alignment">
          <style:list-level-label-alignment text:label-followed-by="listtab" fo:margin-left="3.0458in" fo:text-indent="-0.125in"/>
        </style:list-level-properties>
      </text:list-level-style-number>
      <text:list-level-style-number text:level="7" style:num-suffix="." style:num-format="1">
        <style:list-level-properties text:space-before="3.2958in" text:min-label-width="0.25in" text:list-level-position-and-space-mode="label-alignment">
          <style:list-level-label-alignment text:label-followed-by="listtab" fo:margin-left="3.5458in" fo:text-indent="-0.25in"/>
        </style:list-level-properties>
      </text:list-level-style-number>
      <text:list-level-style-number text:level="8" style:num-suffix="." style:num-format="a" style:num-letter-sync="true">
        <style:list-level-properties text:space-before="3.7958in" text:min-label-width="0.25in" text:list-level-position-and-space-mode="label-alignment">
          <style:list-level-label-alignment text:label-followed-by="listtab" fo:margin-left="4.0458in" fo:text-indent="-0.25in"/>
        </style:list-level-properties>
      </text:list-level-style-number>
      <text:list-level-style-number text:level="9" style:num-suffix="." style:num-format="i">
        <style:list-level-properties fo:text-align="end" text:space-before="4.4208in" text:min-label-width="0.125in" text:list-level-position-and-space-mode="label-alignment">
          <style:list-level-label-alignment text:label-followed-by="listtab" fo:margin-left="4.5458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BCtitle" style:master-page-name="MP0" style:family="paragraph">
      <style:paragraph-properties fo:break-before="page"/>
    </style:style>
    <style:style style:name="T2" style:parent-style-name="DefaultParagraphFont" style:family="text">
      <style:text-properties fo:language="es" fo:country="ES"/>
    </style:style>
    <style:style style:name="T3" style:parent-style-name="DefaultParagraphFont" style:family="text">
      <style:text-properties style:text-position="super 66.6%" fo:language="es" fo:country="ES"/>
    </style:style>
    <style:style style:name="T4" style:parent-style-name="DefaultParagraphFont" style:family="text">
      <style:text-properties style:text-position="super 66.6%"/>
    </style:style>
    <style:style style:name="P5" style:parent-style-name="SBCresumo" style:family="paragraph">
      <style:paragraph-properties fo:margin-left="0in">
        <style:tab-stops/>
      </style:paragraph-properties>
    </style:style>
    <style:style style:name="T6" style:parent-style-name="DefaultParagraphFont" style:family="text">
      <style:text-properties fo:font-weight="bold" style:font-weight-asian="bold" style:font-weight-complex="bold"/>
    </style:style>
    <style:style style:name="P7" style:parent-style-name="SBCtitle1" style:list-style-name="Outline" style:family="paragraph"/>
    <style:style style:name="P8" style:parent-style-name="SBCparagraph" style:family="paragraph">
      <style:paragraph-properties fo:text-indent="0.1972in"/>
    </style:style>
    <style:style style:name="T9" style:parent-style-name="DefaultParagraphFont" style:family="text">
      <style:text-properties fo:color="#0070C0"/>
    </style:style>
    <style:style style:name="P10" style:parent-style-name="SBCparagraph" style:family="paragraph">
      <style:paragraph-properties fo:text-indent="0.1972in"/>
    </style:style>
    <style:style style:name="T11" style:parent-style-name="DefaultParagraphFont" style:family="text">
      <style:text-properties fo:color="#0070C0"/>
    </style:style>
    <style:style style:name="P12" style:parent-style-name="SBCparagraph" style:family="paragraph">
      <style:paragraph-properties fo:text-indent="0.1972in"/>
    </style:style>
    <style:style style:name="T13" style:parent-style-name="DefaultParagraphFont" style:family="text">
      <style:text-properties fo:color="#0070C0"/>
    </style:style>
    <style:style style:name="T14" style:parent-style-name="DefaultParagraphFont" style:family="text">
      <style:text-properties fo:color="#0070C0"/>
    </style:style>
    <style:style style:name="T15" style:parent-style-name="DefaultParagraphFont" style:family="text">
      <style:text-properties fo:color="#0070C0"/>
    </style:style>
    <style:style style:name="T16" style:parent-style-name="DefaultParagraphFont" style:family="text">
      <style:text-properties fo:color="#0070C0"/>
    </style:style>
    <style:style style:name="T17" style:parent-style-name="DefaultParagraphFont" style:family="text">
      <style:text-properties fo:color="#0070C0"/>
    </style:style>
    <style:style style:name="P18" style:parent-style-name="SBCparagraph" style:family="paragraph">
      <style:paragraph-properties fo:text-indent="0.1972in"/>
    </style:style>
    <style:style style:name="P19" style:parent-style-name="SBCparagraph" style:family="paragraph">
      <style:paragraph-properties fo:text-indent="0.1972in"/>
    </style:style>
    <style:style style:name="T20" style:parent-style-name="DefaultParagraphFont" style:family="text">
      <style:text-properties fo:color="#0070C0"/>
    </style:style>
    <style:style style:name="P21" style:parent-style-name="SBCparagraph" style:family="paragraph">
      <style:paragraph-properties fo:text-indent="0.1972in"/>
    </style:style>
    <style:style style:name="P22" style:parent-style-name="SBCparagraph" style:family="paragraph">
      <style:paragraph-properties fo:text-indent="0.1972in"/>
    </style:style>
    <style:style style:name="T23" style:parent-style-name="DefaultParagraphFont" style:family="text">
      <style:text-properties fo:color="#0070C0"/>
    </style:style>
    <style:style style:name="P24" style:parent-style-name="SBCparagraph" style:family="paragraph">
      <style:paragraph-properties fo:text-indent="0.1972in"/>
    </style:style>
    <style:style style:name="T25" style:parent-style-name="DefaultParagraphFont" style:family="text">
      <style:text-properties fo:color="#0070C0"/>
    </style:style>
    <style:style style:name="T26" style:parent-style-name="DefaultParagraphFont" style:family="text">
      <style:text-properties fo:color="#0070C0"/>
    </style:style>
    <style:style style:name="T27" style:parent-style-name="DefaultParagraphFont" style:family="text">
      <style:text-properties fo:color="#0070C0"/>
    </style:style>
    <style:style style:name="T28" style:parent-style-name="DefaultParagraphFont" style:family="text">
      <style:text-properties fo:color="#0070C0"/>
    </style:style>
    <style:style style:name="T29" style:parent-style-name="DefaultParagraphFont" style:family="text">
      <style:text-properties fo:color="#0070C0"/>
    </style:style>
    <style:style style:name="P30" style:parent-style-name="SBCparagraph" style:family="paragraph">
      <style:paragraph-properties fo:text-indent="0.1972in"/>
    </style:style>
    <style:style style:name="T31" style:parent-style-name="DefaultParagraphFont" style:family="text">
      <style:text-properties style:font-name="Calibri"/>
    </style:style>
    <style:style style:name="T32" style:parent-style-name="DefaultParagraphFont" style:family="text">
      <style:text-properties fo:color="#0070C0"/>
    </style:style>
    <style:style style:name="T33" style:parent-style-name="DefaultParagraphFont" style:family="text">
      <style:text-properties fo:color="#0070C0"/>
    </style:style>
    <style:style style:name="T34" style:parent-style-name="DefaultParagraphFont" style:family="text">
      <style:text-properties fo:color="#0070C0"/>
    </style:style>
    <style:style style:name="T35" style:parent-style-name="DefaultParagraphFont" style:family="text">
      <style:text-properties fo:color="#0070C0"/>
    </style:style>
    <style:style style:name="T36" style:parent-style-name="DefaultParagraphFont" style:family="text">
      <style:text-properties fo:color="#0070C0"/>
    </style:style>
    <style:style style:name="T37" style:parent-style-name="DefaultParagraphFont" style:family="text">
      <style:text-properties fo:color="#0070C0"/>
    </style:style>
    <style:style style:name="T38" style:parent-style-name="DefaultParagraphFont" style:family="text">
      <style:text-properties fo:color="#0070C0"/>
    </style:style>
    <style:style style:name="P39" style:parent-style-name="SBCtitle1" style:list-style-name="Outline" style:family="paragraph"/>
    <style:style style:name="P40" style:parent-style-name="SBCparagraphfirst" style:family="paragraph">
      <style:paragraph-properties fo:text-indent="0.1972in"/>
    </style:style>
    <style:style style:name="P41" style:parent-style-name="SBCparagraph" style:family="paragraph">
      <style:paragraph-properties fo:text-indent="0.1972in"/>
    </style:style>
    <style:style style:name="T42" style:parent-style-name="DefaultParagraphFont" style:family="text">
      <style:text-properties fo:color="#4472C4"/>
    </style:style>
    <style:style style:name="P43" style:parent-style-name="SBCparagraph" style:family="paragraph">
      <style:paragraph-properties fo:text-indent="0.1972in"/>
    </style:style>
    <style:style style:name="P44" style:parent-style-name="SBCtitle1" style:list-style-name="Outline" style:family="paragraph"/>
    <style:style style:name="P45" style:parent-style-name="SBCparagraph" style:family="paragraph">
      <style:paragraph-properties fo:text-indent="0.1972in"/>
    </style:style>
    <style:style style:name="P46" style:parent-style-name="SBCparagraph" style:family="paragraph">
      <style:paragraph-properties fo:text-indent="0.1972in"/>
    </style:style>
    <style:style style:name="T47" style:parent-style-name="DefaultParagraphFont" style:family="text">
      <style:text-properties fo:color="#4472C4"/>
    </style:style>
    <style:style style:name="P48" style:parent-style-name="SBCparagraph" style:family="paragraph">
      <style:paragraph-properties fo:text-indent="0.1972in"/>
    </style:style>
    <style:style style:name="P49" style:parent-style-name="SBCparagraph" style:family="paragraph">
      <style:paragraph-properties fo:text-indent="0.1972in"/>
    </style:style>
    <style:style style:name="T50" style:parent-style-name="DefaultParagraphFont" style:family="text">
      <style:text-properties style:font-name="Calibri"/>
    </style:style>
    <style:style style:name="T51" style:parent-style-name="DefaultParagraphFont" style:family="text">
      <style:text-properties fo:color="#4472C4"/>
    </style:style>
    <style:style style:name="P52" style:parent-style-name="SBCparagraph" style:family="paragraph">
      <style:paragraph-properties fo:text-indent="0.1972in"/>
    </style:style>
    <style:style style:name="P53" style:parent-style-name="SBCtitle1" style:list-style-name="Outline" style:family="paragraph"/>
    <style:style style:name="P54" style:parent-style-name="SBCparagraph" style:family="paragraph">
      <style:paragraph-properties fo:text-indent="0.1972in"/>
    </style:style>
    <style:style style:name="P55" style:parent-style-name="SBCparagraph" style:family="paragraph">
      <style:paragraph-properties fo:text-indent="0.1972in"/>
    </style:style>
    <style:style style:name="P56" style:parent-style-name="SBCparagraph" style:family="paragraph">
      <style:paragraph-properties fo:text-indent="0.1972in"/>
    </style:style>
    <style:style style:name="P57" style:parent-style-name="SBCparagraph" style:family="paragraph">
      <style:paragraph-properties fo:text-indent="0.1972in"/>
    </style:style>
    <style:style style:name="P58" style:parent-style-name="SBCparagraph" style:family="paragraph">
      <style:paragraph-properties fo:text-indent="0.1972in"/>
    </style:style>
    <style:style style:name="P59" style:parent-style-name="SBCparagraph" style:family="paragraph">
      <style:paragraph-properties fo:text-indent="0.1972in"/>
    </style:style>
    <style:style style:name="P60" style:parent-style-name="SBCparagraph" style:family="paragraph">
      <style:paragraph-properties fo:text-indent="0.1972in"/>
    </style:style>
    <style:style style:name="P61" style:parent-style-name="SBCparagraph" style:family="paragraph">
      <style:paragraph-properties fo:text-indent="0.1972in"/>
    </style:style>
    <style:style style:name="P62" style:parent-style-name="SBCparagraph" style:family="paragraph">
      <style:paragraph-properties fo:text-indent="0.1972in"/>
    </style:style>
    <style:style style:name="P63" style:parent-style-name="SBCtitle2" style:list-style-name="Outline" style:family="paragraph"/>
    <style:style style:name="P64" style:parent-style-name="SBCparagraphfirst" style:family="paragraph">
      <style:paragraph-properties fo:text-indent="0.1972in"/>
    </style:style>
    <style:style style:name="P65" style:parent-style-name="SBCtitle2" style:list-style-name="Outline" style:family="paragraph"/>
    <style:style style:name="P66" style:parent-style-name="SBCparagraphfirst" style:family="paragraph">
      <style:paragraph-properties fo:text-indent="0.1972in"/>
    </style:style>
    <style:style style:name="P67" style:parent-style-name="SBCtitle2" style:list-style-name="Outline" style:family="paragraph"/>
    <style:style style:name="P68" style:parent-style-name="SBCparagraphfirst" style:family="paragraph">
      <style:paragraph-properties fo:text-indent="0.1972in"/>
    </style:style>
    <style:style style:name="P69" style:parent-style-name="SBCtitle2" style:list-style-name="Outline" style:family="paragraph"/>
    <style:style style:name="P70" style:parent-style-name="SBCparagraphfirst" style:family="paragraph">
      <style:paragraph-properties fo:text-indent="0.1972in"/>
    </style:style>
    <style:style style:name="P71" style:parent-style-name="SBCtitle2" style:list-style-name="Outline" style:family="paragraph"/>
    <style:style style:name="P72" style:parent-style-name="SBCparagraphfirst" style:family="paragraph">
      <style:paragraph-properties fo:text-indent="0.1972in"/>
    </style:style>
    <style:style style:name="P73" style:parent-style-name="SBCtitle2" style:list-style-name="Outline" style:family="paragraph"/>
    <style:style style:name="P74" style:parent-style-name="SBCparagraphfirst" style:family="paragraph">
      <style:paragraph-properties fo:text-indent="0.1972in"/>
    </style:style>
    <style:style style:name="P75" style:parent-style-name="SBCtitle2" style:list-style-name="Outline" style:family="paragraph"/>
    <style:style style:name="P76" style:parent-style-name="SBCparagraphfirst" style:family="paragraph">
      <style:paragraph-properties fo:text-indent="0.1972in"/>
    </style:style>
    <style:style style:name="P77" style:parent-style-name="SBCtitle2" style:list-style-name="Outline" style:family="paragraph"/>
    <style:style style:name="P78" style:parent-style-name="SBCparagraphfirst" style:family="paragraph">
      <style:paragraph-properties fo:text-indent="0.1972in"/>
    </style:style>
    <style:style style:name="P79" style:parent-style-name="SBCtitle2" style:list-style-name="Outline" style:family="paragraph"/>
    <style:style style:name="P80" style:parent-style-name="SBCparagraphfirst" style:list-style-name="LFO8" style:family="paragraph"/>
    <style:style style:name="P81" style:parent-style-name="SBCparagraphfirst" style:list-style-name="LFO8" style:family="paragraph"/>
    <style:style style:name="P82" style:parent-style-name="SBCparagraphfirst" style:list-style-name="LFO8" style:family="paragraph"/>
    <style:style style:name="P83" style:parent-style-name="SBCparagraphfirst" style:list-style-name="LFO8" style:family="paragraph"/>
    <style:style style:name="P84" style:parent-style-name="SBCparagraphfirst" style:list-style-name="LFO8" style:family="paragraph"/>
    <style:style style:name="P85" style:parent-style-name="SBCparagraphfirst" style:list-style-name="LFO8" style:family="paragraph"/>
    <style:style style:name="P86" style:parent-style-name="SBCtitle1" style:list-style-name="Outline" style:family="paragraph"/>
    <style:style style:name="P87" style:parent-style-name="SBCtitle1" style:list-style-name="Outline" style:family="paragraph"/>
    <style:style style:name="P88" style:parent-style-name="SBCparagraph" style:list-style-name="LFO9" style:family="paragraph"/>
    <style:style style:name="T89" style:parent-style-name="DefaultParagraphFont" style:family="text">
      <style:text-properties style:font-name="Calibri" fo:font-weight="bold" style:font-weight-asian="bold" style:font-weight-complex="bold"/>
    </style:style>
    <style:style style:name="T90" style:parent-style-name="DefaultParagraphFont" style:family="text">
      <style:text-properties style:font-name="Calibri"/>
    </style:style>
    <style:style style:name="T91" style:parent-style-name="DefaultParagraphFont" style:family="text">
      <style:text-properties style:font-name="Calibri"/>
    </style:style>
    <style:style style:name="T92" style:parent-style-name="DefaultParagraphFont" style:family="text">
      <style:text-properties style:font-name="Calibri"/>
    </style:style>
    <style:style style:name="P93" style:parent-style-name="SBCparagraph" style:list-style-name="LFO9" style:family="paragraph"/>
    <style:style style:name="T94" style:parent-style-name="DefaultParagraphFont" style:family="text">
      <style:text-properties style:font-name="Calibri" fo:font-weight="bold" style:font-weight-asian="bold" style:font-weight-complex="bold"/>
    </style:style>
    <style:style style:name="T95" style:parent-style-name="DefaultParagraphFont" style:family="text">
      <style:text-properties style:font-name="Calibri"/>
    </style:style>
    <style:style style:name="T96" style:parent-style-name="DefaultParagraphFont" style:family="text">
      <style:text-properties style:font-name="Calibri"/>
    </style:style>
    <style:style style:name="T97" style:parent-style-name="DefaultParagraphFont" style:family="text">
      <style:text-properties style:font-name="Calibri"/>
    </style:style>
    <style:style style:name="P98" style:parent-style-name="SBCparagraph" style:list-style-name="LFO9" style:family="paragraph"/>
    <style:style style:name="T99" style:parent-style-name="DefaultParagraphFont" style:family="text">
      <style:text-properties style:font-name="Calibri" fo:font-weight="bold" style:font-weight-asian="bold" style:font-weight-complex="bold"/>
    </style:style>
    <style:style style:name="T100" style:parent-style-name="DefaultParagraphFont" style:family="text">
      <style:text-properties style:font-name="Calibri"/>
    </style:style>
    <style:style style:name="T101" style:parent-style-name="DefaultParagraphFont" style:family="text">
      <style:text-properties style:font-name="Calibri"/>
    </style:style>
    <style:style style:name="T102" style:parent-style-name="DefaultParagraphFont" style:family="text">
      <style:text-properties style:font-name="Calibri"/>
    </style:style>
    <style:style style:name="P103" style:parent-style-name="SBCparagraph" style:list-style-name="LFO9" style:family="paragraph"/>
    <style:style style:name="T104" style:parent-style-name="DefaultParagraphFont" style:family="text">
      <style:text-properties style:font-name="Calibri" fo:font-weight="bold" style:font-weight-asian="bold" style:font-weight-complex="bold"/>
    </style:style>
    <style:style style:name="T105" style:parent-style-name="DefaultParagraphFont" style:family="text">
      <style:text-properties style:font-name="Calibri"/>
    </style:style>
    <style:style style:name="T106" style:parent-style-name="DefaultParagraphFont" style:family="text">
      <style:text-properties style:font-name="Calibri"/>
    </style:style>
    <style:style style:name="T107" style:parent-style-name="DefaultParagraphFont" style:family="text">
      <style:text-properties style:font-name="Calibri"/>
    </style:style>
    <style:style style:name="P108" style:parent-style-name="SBCtitle1" style:list-style-name="Outline" style:family="paragraph"/>
    <style:style style:name="P109" style:parent-style-name="SBCparagraphfirst" style:family="paragraph">
      <style:paragraph-properties fo:text-indent="0.1972in"/>
      <style:text-properties style:font-name="Calibri"/>
    </style:style>
    <style:style style:name="P110" style:parent-style-name="SBCparagraphfirst" style:family="paragraph">
      <style:paragraph-properties fo:text-indent="0.1972in"/>
    </style:style>
    <style:style style:name="T111" style:parent-style-name="DefaultParagraphFont" style:family="text">
      <style:text-properties style:font-name="Calibri"/>
    </style:style>
    <style:style style:name="P112" style:parent-style-name="SBCreferences" style:family="paragraph">
      <style:text-properties fo:language="en" fo:country="US"/>
    </style:style>
    <style:style style:name="P113" style:parent-style-name="SBCreference" style:list-style-name="LFO7" style:family="paragraph">
      <style:paragraph-properties fo:margin-left="0.3937in" fo:text-indent="-0.3937in">
        <style:tab-stops/>
      </style:paragraph-properties>
    </style:style>
    <style:style style:name="T114" style:parent-style-name="DefaultParagraphFont" style:family="text">
      <style:text-properties fo:language="en" fo:country="US"/>
    </style:style>
    <style:style style:name="T115" style:parent-style-name="Hyperlink" style:family="text">
      <style:text-properties fo:language="en" fo:country="US"/>
    </style:style>
    <style:style style:name="T116" style:parent-style-name="Hyperlink" style:family="text">
      <style:text-properties fo:language="en" fo:country="US"/>
    </style:style>
    <style:style style:name="T117" style:parent-style-name="Hyperlink" style:family="text">
      <style:text-properties fo:language="en" fo:country="US"/>
    </style:style>
    <style:style style:name="P118" style:parent-style-name="SBCreference" style:list-style-name="LFO7" style:family="paragraph">
      <style:paragraph-properties fo:margin-left="0.3937in" fo:text-indent="-0.3937in">
        <style:tab-stops/>
      </style:paragraph-properties>
    </style:style>
    <style:style style:name="P119" style:parent-style-name="SBCreference" style:list-style-name="LFO7" style:family="paragraph">
      <style:paragraph-properties fo:margin-left="0.3937in" fo:text-indent="-0.3937in">
        <style:tab-stops/>
      </style:paragraph-properties>
    </style:style>
    <style:style style:name="T120" style:parent-style-name="DefaultParagraphFont" style:family="text">
      <style:text-properties fo:language="en" fo:country="US"/>
    </style:style>
    <style:style style:name="P121" style:parent-style-name="SBCreference" style:list-style-name="LFO7" style:family="paragraph">
      <style:paragraph-properties fo:margin-left="0.3937in" fo:text-indent="-0.3937in">
        <style:tab-stops/>
      </style:paragraph-properties>
    </style:style>
    <style:style style:name="P122" style:parent-style-name="SBCreference" style:list-style-name="LFO7" style:family="paragraph">
      <style:paragraph-properties fo:margin-left="0.3937in" fo:text-indent="-0.3937in">
        <style:tab-stops/>
      </style:paragraph-properties>
    </style:style>
    <style:style style:name="T123" style:parent-style-name="DefaultParagraphFont" style:family="text">
      <style:text-properties fo:language="en" fo:country="US"/>
    </style:style>
    <style:style style:name="T124" style:parent-style-name="DefaultParagraphFont" style:family="text">
      <style:text-properties fo:language="en" fo:country="US"/>
    </style:style>
    <style:style style:name="T125" style:parent-style-name="Hyperlink" style:family="text">
      <style:text-properties fo:language="en" fo:country="US"/>
    </style:style>
    <style:style style:name="T126" style:parent-style-name="Hyperlink" style:family="text">
      <style:text-properties fo:language="en" fo:country="US"/>
    </style:style>
    <style:style style:name="T127" style:parent-style-name="Hyperlink" style:family="text">
      <style:text-properties fo:language="en" fo:country="US"/>
    </style:style>
    <style:style style:name="T128" style:parent-style-name="DefaultParagraphFont" style:family="text">
      <style:text-properties fo:language="en" fo:country="US"/>
    </style:style>
    <style:style style:name="P129" style:parent-style-name="SBCreference" style:list-style-name="LFO7" style:family="paragraph">
      <style:paragraph-properties fo:margin-left="0.3937in" fo:text-indent="-0.3937in">
        <style:tab-stops/>
      </style:paragraph-properties>
    </style:style>
    <style:style style:name="P130" style:parent-style-name="SBCreference" style:list-style-name="LFO7" style:family="paragraph">
      <style:paragraph-properties fo:margin-left="0.3937in" fo:text-indent="-0.3937in">
        <style:tab-stops/>
      </style:paragraph-properties>
    </style:style>
    <style:style style:name="T131" style:parent-style-name="DefaultParagraphFont" style:family="text">
      <style:text-properties fo:language="en" fo:country="US"/>
    </style:style>
    <style:style style:name="T132" style:parent-style-name="Hyperlink" style:family="text">
      <style:text-properties fo:language="en" fo:country="US"/>
    </style:style>
    <style:style style:name="T133" style:parent-style-name="Hyperlink" style:family="text">
      <style:text-properties fo:language="en" fo:country="US"/>
    </style:style>
    <style:style style:name="T134" style:parent-style-name="Hyperlink" style:family="text">
      <style:text-properties fo:language="en" fo:country="US"/>
    </style:style>
    <style:style style:name="T135" style:parent-style-name="DefaultParagraphFont" style:family="text">
      <style:text-properties fo:language="en" fo:country="US"/>
    </style:style>
    <style:style style:name="P136" style:parent-style-name="SBCreference" style:list-style-name="LFO7" style:family="paragraph">
      <style:paragraph-properties fo:margin-left="0.3937in" fo:text-indent="-0.3937in">
        <style:tab-stops/>
      </style:paragraph-properties>
    </style:style>
    <style:style style:name="T137" style:parent-style-name="DefaultParagraphFont" style:family="text">
      <style:text-properties fo:language="en" fo:country="US"/>
    </style:style>
    <style:style style:name="T138" style:parent-style-name="DefaultParagraphFont" style:family="text">
      <style:text-properties fo:language="en" fo:country="US"/>
    </style:style>
    <style:style style:name="P139" style:parent-style-name="SBCreference" style:list-style-name="LFO7" style:family="paragraph">
      <style:paragraph-properties fo:margin-left="0.3937in" fo:text-indent="-0.3937in">
        <style:tab-stops/>
      </style:paragraph-properties>
    </style:style>
    <style:style style:name="T140" style:parent-style-name="DefaultParagraphFont" style:family="text">
      <style:text-properties fo:language="en" fo:country="US"/>
    </style:style>
    <style:style style:name="T141" style:parent-style-name="Hyperlink" style:family="text">
      <style:text-properties fo:language="en" fo:country="US"/>
    </style:style>
    <style:style style:name="T142" style:parent-style-name="Hyperlink" style:family="text">
      <style:text-properties fo:language="en" fo:country="US"/>
    </style:style>
    <style:style style:name="T143" style:parent-style-name="Hyperlink" style:family="text">
      <style:text-properties fo:language="en" fo:country="US"/>
    </style:style>
    <style:style style:name="T144" style:parent-style-name="Hyperlink" style:family="text">
      <style:text-properties fo:language="en" fo:country="US"/>
    </style:style>
    <style:style style:name="T145" style:parent-style-name="Hyperlink" style:family="text">
      <style:text-properties fo:language="en" fo:country="US"/>
    </style:style>
    <style:style style:name="T146" style:parent-style-name="DefaultParagraphFont" style:family="text">
      <style:text-properties fo:language="en" fo:country="US"/>
    </style:style>
    <style:style style:name="P147" style:parent-style-name="SBCreference" style:list-style-name="LFO7" style:family="paragraph">
      <style:paragraph-properties fo:margin-left="0.3937in" fo:text-indent="-0.3937in">
        <style:tab-stops/>
      </style:paragraph-properties>
    </style:style>
    <style:style style:name="T148" style:parent-style-name="DefaultParagraphFont" style:family="text">
      <style:text-properties style:font-name-complex="Times"/>
    </style:style>
    <style:style style:name="T149" style:parent-style-name="DefaultParagraphFont" style:family="text">
      <style:text-properties style:font-name="Cambria Math" style:font-name-complex="Cambria Math"/>
    </style:style>
    <style:style style:name="T150" style:parent-style-name="DefaultParagraphFont" style:family="text">
      <style:text-properties style:font-name="Cambria Math" style:font-name-complex="Cambria Math"/>
    </style:style>
    <style:style style:name="T151" style:parent-style-name="DefaultParagraphFont" style:family="text">
      <style:text-properties style:font-name-complex="Times"/>
    </style:style>
    <style:style style:name="T152" style:parent-style-name="DefaultParagraphFont" style:family="text">
      <style:text-properties style:font-name="Cambria Math" style:font-name-complex="Cambria Math"/>
    </style:style>
    <style:style style:name="T153" style:parent-style-name="DefaultParagraphFont" style:family="text">
      <style:text-properties style:font-name="Cambria Math" style:font-name-complex="Cambria Math"/>
    </style:style>
    <style:style style:name="T154" style:parent-style-name="DefaultParagraphFont" style:family="text">
      <style:text-properties fo:language="en" fo:country="US"/>
    </style:style>
    <style:style style:name="T155" style:parent-style-name="Hyperlink" style:family="text">
      <style:text-properties fo:language="en" fo:country="US"/>
    </style:style>
    <style:style style:name="T156" style:parent-style-name="Hyperlink" style:family="text">
      <style:text-properties fo:language="en" fo:country="US"/>
    </style:style>
    <style:style style:name="T157" style:parent-style-name="Hyperlink" style:family="text">
      <style:text-properties fo:language="en" fo:country="US"/>
    </style:style>
    <style:style style:name="T158" style:parent-style-name="DefaultParagraphFont" style:family="text">
      <style:text-properties fo:language="en" fo:country="US"/>
    </style:style>
    <style:style style:name="P159" style:parent-style-name="SBCreference" style:list-style-name="LFO7" style:family="paragraph">
      <style:paragraph-properties fo:margin-left="0.3937in" fo:text-indent="-0.3937in">
        <style:tab-stops/>
      </style:paragraph-properties>
      <style:text-properties fo:language="en" fo:country="US"/>
    </style:style>
    <style:style style:name="P160" style:parent-style-name="SBCreference" style:list-style-name="LFO7" style:family="paragraph">
      <style:paragraph-properties fo:margin-left="0.3937in" fo:text-indent="-0.3937in">
        <style:tab-stops/>
      </style:paragraph-properties>
    </style:style>
    <style:style style:name="T161" style:parent-style-name="DefaultParagraphFont" style:family="text">
      <style:text-properties fo:language="en" fo:country="US"/>
    </style:style>
    <style:style style:name="T162" style:parent-style-name="DefaultParagraphFont" style:family="text">
      <style:text-properties style:font-name="Cambria Math" style:font-name-complex="Cambria Math" fo:language="en" fo:country="US"/>
    </style:style>
    <style:style style:name="T163" style:parent-style-name="DefaultParagraphFont" style:family="text">
      <style:text-properties fo:language="en" fo:country="US"/>
    </style:style>
    <style:style style:name="P164" style:parent-style-name="SBCreference" style:list-style-name="LFO7" style:family="paragraph">
      <style:paragraph-properties fo:margin-left="0.3937in" fo:text-indent="-0.3937in">
        <style:tab-stops/>
      </style:paragraph-properties>
    </style:style>
    <style:style style:name="T165" style:parent-style-name="DefaultParagraphFont" style:family="text">
      <style:text-properties fo:language="en" fo:country="US"/>
    </style:style>
    <style:style style:name="T166" style:parent-style-name="DefaultParagraphFont" style:family="text">
      <style:text-properties style:font-name="Cambria Math" style:font-name-complex="Cambria Math" fo:language="en" fo:country="US"/>
    </style:style>
    <style:style style:name="T167" style:parent-style-name="DefaultParagraphFont" style:family="text">
      <style:text-properties fo:language="en" fo:country="US"/>
    </style:style>
  </office:automatic-styles>
  <office:body>
    <office:text text:use-soft-page-breaks="true">
      <text:p text:style-name="P1">Título do Trabalho: Estudo de Caso sobre o Sistema Operacional Gramine SGX<text:span text:style-name="FootnoteReference"><text:note text:note-class="footnote" text:id="_ftn0"><text:note-citation text:label="*">*</text:note-citation><text:note-body><text:p text:style-name="SBCfootnote">Adaptação para OpenOffice.org 1.1 feita por Roland Teodorowitsch (roland@ulbra.tche.br) em 29 mar. 2005.</text:p></text:note-body></text:note></text:span></text:p>
      <text:p text:style-name="SBCauthors"><text:span text:style-name="T2">Gustavo Borges Peres da Silva</text:span><text:span text:style-name="T3">1</text:span></text:p>
      <text:p text:style-name="SBCinstitution"><text:span text:style-name="T4">1</text:span>Departamento de Ciência da Computação – Universidade Federal de Catalão (UFCAT)</text:p>
      <text:p text:style-name="SBCemail">gustavo.silva@discente.ufcat.edu.br</text:p>
      <text:p text:style-name="P5"><text:span text:style-name="T6">Resumo.</text:span><text:s/>O Sistema Operacional Gramine SGX oferece um ambiente seguro impulsionado pela tecnologia Intel Software Guard Extensions (SGX), criando "enclaves" na CPU para a execução segura de operações críticas, protegendo assim dados sensíveis contra acessos não autorizados. Projetado para proporcionar isolamento e segurança, o Gramine SGX é uma solução leve que suporta nativamente binários Linux não modificados em qualquer plataforma. Sua funcionalidade estende-se a ambientes de nuvem e borda, permitindo a transição simples de aplicativos para Computação Confidencial com Intel SGX. Este estudo de caso provavelmente explora implementações específicas do Gramine SGX, destacando benefícios tangíveis em segurança e confidencialidade de dados. Exemplos práticos podem ser fornecidos, demonstrando sua aplicação eficaz em setores como finanças, saúde ou em contextos que exigem uma camada robusta de proteção de informações.</text:p>
      <text:list text:style-name="Outline" text:continue-numbering="true">
        <text:list-item>
          <text:p text:style-name="P7">Introdução</text:p>
        </text:list-item>
      </text:list>
      <text:p text:style-name="P8">A evolução das ameaças cibernéticas demanda inovações contínuas em segurança computacional, e é nesse contexto que o Sistema Operacional Gramine SGX emerge como uma solução de destaque. A base de sua robustez reside na tecnologia revolucionária da Intel, Software Guard Extensions (SGX), lançada em 2015<text:s/><text:span text:style-name="T9"><text:bookmark-ref text:ref-name="_Ref148643999" text:reference-format="text">[8]</text:bookmark-ref></text:span>. Essa tecnologia introduziu um conjunto inovador de instruções de CPU, permitindo que as aplicações utilizem regiões encriptadas de memória chamadas "enclaves".</text:p>
      <text:p text:style-name="P10">Esses enclaves não apenas tornam a execução do código mais segura, mas também protegem os dados processados de acessos não autorizados, inclusive de códigos com alto nível de privilégio, como o kernel, sistema operacional e a BIOS. Em essência, o SGX visa salvaguardar código e dados sensíveis contra modificações e acessos não autorizados. Para compreender o enclave SGX, é crucial reconhecê-lo como opaco (conteúdo interno do enclave é praticamente inacessível e incompreensível para o ambiente externo), ou seja, suas regiões encriptadas isolam-se do restante do ambiente, garantindo que os códigos executados em enclaves sejam considerados confiáveis e protegidos contra ataques privilegiados. Enquanto isso, o restante do ambiente, incluindo o sistema operacional e o hypervisor, é considerado não confiável e potencialmente mal-intencionado<text:s/><text:span text:style-name="T11"><text:bookmark-ref text:ref-name="_Ref148643966" text:reference-format="text">[4]</text:bookmark-ref></text:span>.</text:p>
      <text:p text:style-name="P12">A eficácia do enclave SGX repousa na alocação de parte da memória física (RAM) para enclaves, conhecida como EPC (Enclave Page Cache). Essa memória é encriptada para evitar ataques por hardware, e a chave criptográfica é armazenada de maneira segura<text:s/><text:soft-page-break/>dentro da CPU, mudando aleatoriamente a cada ciclo de energia<text:s/><text:span text:style-name="T13">[</text:span><text:span text:style-name="T14"><text:bookmark-ref text:ref-name="_Ref148644700" text:reference-format="text">1</text:bookmark-ref></text:span><text:span text:style-name="T15">,<text:s/></text:span><text:span text:style-name="T16"><text:bookmark-ref text:ref-name="_Ref148644708" text:reference-format="text">12</text:bookmark-ref></text:span><text:span text:style-name="T17">]<text:s/></text:span>.</text:p>
      <text:p text:style-name="P18">Além disso, o SGX entrega dois mecanismos cruciais para suportar sistemas que demandam alto nível de segurança: a selagem de dados, que criptografa dados destinados a serem salvos fora da região segura do enclave, e a atestação, que permite que o enclave prove sua identidade e integridade a outros enclaves, seja localmente ou remotamente.</text:p>
      <text:p text:style-name="P19">Os sistemas de autenticação podem se beneficiar dessa arquitetura, implementando até três processos principais: Autenticação, que identifica e valida o usuário; Autorização, que determina quais recursos o usuário autenticado pode acessar; e Responsabilização, que registra as ações do usuário durante o acesso aos recursos computacionais<text:s/><text:span text:style-name="T20"><text:bookmark-ref text:ref-name="_Ref148643966" text:reference-format="text">[4]</text:bookmark-ref></text:span>.</text:p>
      <text:p text:style-name="P21">A diferença crucial entre um Trusted Execution Environment (TEE) e a tecnologia Intel Software Guard Extensions (SGX) reside na abordagem de isolamento e proteção.</text:p>
      <text:p text:style-name="P22">O TEE é um ambiente seguro e isolado dentro do processador principal, projetado para proteger dados e código confidenciais contra acessos não autorizados e alterações. Ele opera<text:s/>paralelamente ao sistema operacional principal, garantindo que os dados processados sejam protegidos em um ambiente confiável. O TEE é comumente utilizado em dispositivos como smartphones, decodificadores, consoles de videogame e Smart TVs, proporcionando um ambiente de processamento seguro com recursos dedicados de processamento e armazenamento<text:s/><text:span text:style-name="T23"><text:bookmark-ref text:ref-name="_Ref148643921" text:reference-format="text">[9]</text:bookmark-ref></text:span>.</text:p>
      <text:p text:style-name="P24">Por outro lado, o SGX, parte da família de TEEs, é uma tecnologia específica da Intel que vai além do isolamento físico ao introduzir enclaves dentro da CPU. Esses enclaves oferecem não apenas isolamento robusto, mas também opacidade, tornando o conteúdo interno praticamente inacessível para entidades externas. A principal vantagem do SGX é sua capacidade de proteger dados e código contra ameaças internas, incluindo sistemas operacionais e hypervisors, proporcionando uma camada adicional de segurança em comparação com abordagens tradicionais baseadas em TEE. Entretanto, para poder usar o SGX, ele deve ter sido habilitado pelo BIOS, e apenas alguns BIOS realmente suportam essa tecnologia. Essa é uma das razões pelas quais não é amplamente utilizado<text:s/><text:span text:style-name="T25">[</text:span><text:bookmark-start text:name="_Hlt148645342"/><text:span text:style-name="T26"><text:bookmark-ref text:ref-name="_Ref148643966" text:reference-format="text">4</text:bookmark-ref></text:span><text:bookmark-end text:name="_Hlt148645342"/><text:span text:style-name="T27">,<text:s/></text:span><text:bookmark-start text:name="_Hlt148645353"/><text:span text:style-name="T28"><text:bookmark-ref text:ref-name="_Ref148643999" text:reference-format="text">8</text:bookmark-ref></text:span><text:bookmark-end text:name="_Hlt148645353"/><text:span text:style-name="T29">]</text:span>.</text:p>
      <text:p text:style-name="P30">A utiliza<text:span text:style-name="T31">ção</text:span><text:s/>do Intel SGX pode ter um impacto dramático no design e implementação de<text:s/>software. Por exemplo, a introdução do SGX pode exigir novos modelos de programação ou até mesmo um novo paradigma a ser considerado. No entanto, apesar do rápido desenvolvimento de ambientes de execução confiáveis (TEEs), as tecnologias de software para TEE ainda estão em estágio inicial. Na verdade, para o Intel SGX, não é viável explorar completamente todo o potencial que o SGX pode proporcionar porque a comunidade de pesquisa carece de uma plataforma utilizável para experimentação. Em particular, o acesso à plataforma Intel SGX é atualmente limitado a apenas um grupo seleto de pessoas<text:s/><text:span text:style-name="T32">[</text:span><text:span text:style-name="T33"><text:bookmark-ref text:ref-name="_Ref148643921" text:reference-format="text">9</text:bookmark-ref></text:span><text:span text:style-name="T34">,<text:s/></text:span><text:span text:style-name="T35"><text:bookmark-ref text:ref-name="_Ref148644037" text:reference-format="text">10</text:bookmark-ref></text:span><text:span text:style-name="T36">,<text:s/></text:span><text:span text:style-name="T37"><text:bookmark-ref text:ref-name="_Ref148644073" text:reference-format="text">11</text:bookmark-ref></text:span><text:span text:style-name="T38">]</text:span>. Isso é uma das barreiras fundamentais para a inovação e pesquisa de software sobre o SGX, especialmente em sua fase inicial.</text:p>
      <text:list text:style-name="Outline" text:continue-numbering="true">
        <text:list-item>
          <text:p text:style-name="P39">Questões relacionadas a proteção do SO</text:p>
        </text:list-item>
      </text:list>
      <text:p text:style-name="P40">No contexto da evolução das ameaças cibernéticas, o Sistema Operacional Gramine SGX destaca-se como uma solução robusta. Sua base reside na tecnologia revolucionária da Intel, Software Guard Extensions (SGX), introduzindo instruções de CPU que permitem o uso de regiões encriptadas de memória chamadas "enclaves". Esses enclaves não apenas tornam a execução do código mais segura, mas também protegem os dados processados de acessos não autorizados, inclusive de códigos com alto nível de privilégio,<text:s/><text:soft-page-break/>como o kernel, sistema operacional e a BIOS.</text:p>
      <text:p text:style-name="P41">Além disso, de acordo com Mona Vij (Engenheira principal da Intel Labs), no epsodio aberto da Intel podcast<text:s/><text:span text:style-name="T42"><text:bookmark-ref text:ref-name="_Ref148901522" text:reference-format="text">[13]</text:bookmark-ref></text:span>, o Intel SGX é uma extensão de proteção de software e oferece um espaço para executar seu código onde a confidencialidade e a integridade do código e dos dados são protegidas. A Intel tem um conjunto de instruções para usar esse recurso, mas, como desenvolvedor, você precisa saber o que deseja proteger. Você quer proteger todo o aplicativo? Provavelmente, mas há algum dado confidencial que seu código esteja gerenciando? Muitas vezes, você tem o código e os dados, que são milhões de linhas de código, e precisa descobrir que parte do código precisa ser protegida e o que pode não ser seguro, mas isso pode ser um desafio, dependendo da complexidade do seu software. Normalmente, não se trata de um único desenvolvedor, mas de um conjunto de desenvolvedores criando um aplicativo.<text:s/></text:p>
      <text:p text:style-name="P43">Por outro lado, o Gramine tira o fardo que o desenvolvedor tem relacionado à complexidade e desafios de adaptar código existente, como por exemplo o Snort, que para serem compatíveis e executados em enclaves, pode ser introduzido bugs inadvertidos e isso requirindo um profundo conhecimento do codigo existente. Quando você executa seu aplicativo em Gramine, ele cria automaticamente o enclave para você e pega seu aplicativo e o executa dentro do enclave. Quando você deseja executar um binário, basta digitar o<text:s/>nome do executável e ele começa a ser executado. Com Gramine você pode simplesmente digitar ‘gramine’ e o nome do binário e Gramine fará todo o trabalho de criação do enclave, carregando seu binário dentro do enclave, e então você obtém essas proteções automáticas.</text:p>
      <text:list text:style-name="Outline" text:continue-numbering="true">
        <text:list-item>
          <text:p text:style-name="P44">Questões relacionadas a modularidade do S.O</text:p>
        </text:list-item>
      </text:list>
      <text:p text:style-name="P45">A modularidade no contexto do Intel SGX (Software Guard eXtensions) revela-se através da criação de enclaves, regiões isoladas de memória que promovem a segurança do sistema operacional. Estes enclaves, introduzidos como uma camada adicional no SGX, encapsulam partes críticas do sistema, contribuindo para a robustez e confidencialidade.</text:p>
      <text:p text:style-name="P46">Ao adotar enclaves seguros, como o Intel SGX, observamos uma nova dimensão de modularidade no sistema operacional. Os enclaves atuam como módulos isolados, permitindo que aplicativos operem em um ambiente seguro. Essa abordagem modular isola efetivamente aplicativos uns dos outros, mas mantém a flexibilidade ao permitir que um superusuário acesse, se necessário. Aqui, a modularidade é clara na interação entre diferentes partes do sistema operacional, como aplicações e superusuários, destacando a capacidade<text:s/>de isolamento e interconexão<text:s/><text:span text:style-name="T47"><text:bookmark-ref text:ref-name="_Ref148901522" text:reference-format="text">[13]</text:bookmark-ref></text:span>.</text:p>
      <text:p text:style-name="P48">O Gramine, ao automatizar a criação de enclaves e facilitar a execução de aplicativos dentro desses ambientes protegidos, contribui para a modularidade ao simplificar o desenvolvimento. Ao isolar automaticamente o código do aplicativo em um enclave, o Gramine elimina a necessidade de extensivas modificações no código existente, demonstrando uma abordagem modular e eficiente<text:s/><text:bookmark-ref text:ref-name="_Ref148901522" text:reference-format="text">[12, 13]</text:bookmark-ref>.</text:p>
      <text:p text:style-name="P49">É relevante notar que a adesão do Gramine ao Confidential Computing Consortium em 2021 sublinha a importância da modularidade na proteção de dados em uso. Este consórcio, parte da The Linux Foundation, promove princípios fundamentais de confidential computing, centrados na execução de dados sensíveis em Trusted Execution Environments (TEEs). Essa adesão ressalta a necessidade de abordagens modulares para<text:s/><text:soft-page-break/>garantir a segurança e a confidencialidade dos dados em um nível fundamental do sistema operacional. Est<text:span text:style-name="T50">á pa</text:span>rticipação no consórcio evidencia como a modularidade é essencial para criar ambientes seguros de computação confidencial. O TEE, oferecido por vários fornecedores, incluindo Intel com SGX e Intel TDX, representa uma abstração modular de hardware que proporciona confidencialidade e integridade aos dados em uso. Esta flexibilidade modular permite a escolha de diferentes TEEs com base nas necessidades de segurança, contribuindo para a generalidade e flexibilidade do S.O<text:s/><text:span text:style-name="T51"><text:bookmark-ref text:ref-name="_Ref148901522" text:reference-format="text">[ 13]</text:bookmark-ref></text:span>.</text:p>
      <text:p text:style-name="P52">Assim, a jornada do SGX, do uso de enclaves à automação com o Gramine e à integração com o Confidential Computing Consortium, destaca a contínua evolução da modularidade como um pilar fundamental na construção de sistemas operacionais seguros e eficientes.</text:p>
      <text:list text:style-name="Outline" text:continue-numbering="true">
        <text:list-item>
          <text:p text:style-name="P53">Questões relacionadas a generalidade do S.O.</text:p>
        </text:list-item>
      </text:list>
      <text:p text:style-name="P54">O Sistema Operacional Gramine SGX representa um ambiente seguro e inovador que utiliza a tecnologia Intel Software Guard Extensions (SGX) para proporcionar isolamento e proteção a dados sensíveis em sistemas computacionais. Este sistema é projetado com a capacidade de criar "enclaves" seguros diretamente na CPU, onde operações críticas podem ser executadas sem risco de acesso não autorizado.</text:p>
      <text:p text:style-name="P55">A implementação do Intel SGX pode ser resumida em vários pontos-chave. Inicialmente, uma aplicação é dividida em duas partes distintas: uma segura e outra não segura. Quando a aplicação é iniciada, o enclave, uma área de memória protegida, é lançado, garantindo a confidencialidade e integridade dos dados e código contidos.</text:p>
      <text:p text:style-name="P56">O ambiente de execução seguro (TEE) está integrado ao processo do host, o que implica que a aplicação contém seu próprio código, dados e enclave. Este enclave, por sua vez, possui sua própria lógica e dados protegidos. A SGX desempenha um papel crucial na proteção da confidencialidade e integridade do código e dados do enclave, com pontos de entrada do enclave pré-definidos durante a compilação.</text:p>
      <text:p text:style-name="P57">A arquitetura Intel SGX introduz 18 novas instruções, divididas entre o usuário e o supervisor. Essas instruções, implementadas em microcódigo, são essenciais para a execução e gestão eficazes dos enclaves. Paralelamente, 13 novas estruturas de dados são definidas, desempenhando papéis cruciais na gestão de enclaves, páginas de memória e recursos.</text:p>
      <text:p text:style-name="P58">A memória é um componente crítico do SGX, com o Enclave Page Cache (EPC) sendo uma área especial protegida. As instruções EBLOCK, ETRACK, ELDB e ELDU são fundamentais para o gerenciamento da EPC, permitindo a movimentação segura de páginas dentro e fora do enclave.</text:p>
      <text:p text:style-name="P59">Especificamente, a criação de enclaves é realizada pela instrução ECREATE, seguida por alocações de páginas usando EADD. O processo é finalizado com EINIT, assegurando que o enclave seja instanciado corretamente. Para a entrada e saída de enclaves, EENTER e EEXIT são utilizadas, proporcionando a transição suave entre o ambiente seguro e não seguro.</text:p>
      <text:p text:style-name="P60">A proteção de dados é um ponto crucial, e SGX oferece recursos como "Sealing". A instrução EGETKEY é utilizada para acessar chaves específicas para operações como "Sealing", garantindo a integridade e confidencialidade dos dados do enclave.</text:p>
      <text:soft-page-break/>
      <text:p text:style-name="P61">A atestação, seja local ou remota, é realizada através das instruções EREPORT e EGETKEY. Isso permite a verificação da integridade e autenticidade do enclave, garantindo que ele não tenha sido comprometido e está executando em uma plataforma legítima.</text:p>
      <text:p text:style-name="P62">Em resumo, a implementação do Intel SGX no Sistema Operacional Gramine SGX destaca-se pela capacidade de criar ambientes de execução seguros, proporcionando isolamento robusto e garantindo a confidencialidade e integridade dos dados e código. As instruções e estruturas específicas do SGX desempenham papéis fundamentais nesse processo, tornando-o uma tecnologia essencial para ambientes que demandam segurança avançada.</text:p>
      <text:list text:style-name="Outline" text:continue-numbering="true">
        <text:list-item>
          <text:list>
            <text:list-item>
              <text:p text:style-name="P63">Implementação e Estruturas Fundamentais do Intel SGX</text:p>
            </text:list-item>
          </text:list>
        </text:list-item>
      </text:list>
      <text:p text:style-name="P64">O Intel SGX (Software Guard Extensions) propõe uma abordagem revolucionária para a implementação de ambientes de execução segura, introduzindo conceitos fundamentais que redefinem a segurança em sistemas computacionais modernos.</text:p>
      <text:list text:style-name="Outline" text:continue-numbering="true">
        <text:list-item>
          <text:list>
            <text:list-item>
              <text:p text:style-name="P65">Divisão de Aplicativos: Partes Seguras e Não Seguras</text:p>
            </text:list-item>
          </text:list>
        </text:list-item>
      </text:list>
      <text:p text:style-name="P66">O SGX reorganiza a arquitetura de aplicativos, segregando-os em duas partes distintas: uma parte segura e outra não segura. A parte segura, conhecida como enclave, é um ambiente isolado na CPU, enquanto a parte não segura mantém as operações convencionais. Essa divisão permite isolar operações críticas em enclaves seguros, protegendo-as contra acessos não autorizados e garantindo que apenas o código interno ao enclave tenha visibilidade sobre seus dados.</text:p>
      <text:list text:style-name="Outline" text:continue-numbering="true">
        <text:list-item>
          <text:list>
            <text:list-item>
              <text:p text:style-name="P67">Lançamento de Enclaves em Memória Protegida</text:p>
            </text:list-item>
          </text:list>
        </text:list-item>
      </text:list>
      <text:p text:style-name="P68">O processo de lançamento de enclaves envolve a alocação de memória protegida, denominada Enclave Page Cache (EPC). Essa região de memória é criptografada pelo Memory Encryption Engine (MEE), uma unidade dedicada, assegurando a confidencialidade e integridade dos dados do enclave. A EPC atua como um cofre digital, garantindo que dados sensíveis permaneçam inacessíveis a qualquer entidade não autorizada.</text:p>
      <text:list text:style-name="Outline" text:continue-numbering="true">
        <text:list-item>
          <text:list>
            <text:list-item>
              <text:p text:style-name="P69">Execução de Funções de Enclave com Acesso Restrito</text:p>
            </text:list-item>
          </text:list>
        </text:list-item>
      </text:list>
      <text:p text:style-name="P70">Ao chamar funções dentro de um enclave, apenas o código interno ao enclave pode acessar seus dados. Isso implica que operações críticas são realizadas com acesso restrito, protegendo a confidencialidade das operações executadas. Qualquer tentativa de acesso externo é rigorosamente negada, garantindo a segurança das operações realizadas dentro do enclave.</text:p>
      <text:list text:style-name="Outline" text:continue-numbering="true">
        <text:list-item>
          <text:list>
            <text:list-item>
              <text:p text:style-name="P71">Estrutura do Ambiente de Execução Seguro (TEE) no Processo do Host</text:p>
            </text:list-item>
          </text:list>
        </text:list-item>
      </text:list>
      <text:p text:style-name="P72">O ambiente de execução seguro (TEE) do SGX é integrado ao processo do host, com o aplicativo contendo seu próprio código e dados, enquanto o enclave mantém sua própria cópia isolada. Essa estrutura proporciona uma camada adicional de segurança, protegendo não apenas o enclave, mas também garantindo que o código do aplicativo não possa comprometer as operações seguras do enclave.</text:p>
      <text:soft-page-break/>
      <text:list text:style-name="Outline" text:continue-numbering="true">
        <text:list-item>
          <text:list>
            <text:list-item>
              <text:p text:style-name="P73">Instruções do Intel SGX</text:p>
            </text:list-item>
          </text:list>
        </text:list-item>
      </text:list>
      <text:p text:style-name="P74">O SGX introduz 18 novas instruções, divididas entre o supervisor e o usuário. Essas instruções, como EADD, EENTER, EEXIT, EREPORT e EGETKEY, desempenham papéis cruciais na criação, entrada e saída de enclaves, bem como na obtenção de chaves e relatórios de atestação. Elas são os blocos de construção fundamentais que capacitam a operação segura dos enclaves.</text:p>
      <text:list text:style-name="Outline" text:continue-numbering="true">
        <text:list-item>
          <text:list>
            <text:list-item>
              <text:p text:style-name="P75">Estruturas de Controle de Enclave</text:p>
            </text:list-item>
          </text:list>
        </text:list-item>
      </text:list>
      <text:p text:style-name="P76">O SGX define 13 novas estruturas de dados, essenciais para o gerenciamento de enclaves. Essas estruturas, incluindo SGX Enclave Control Structure (SECS), Thread Control Structure (TCS) e Version Array (VA), desempenham papéis vitais na criação, execução e salvamento de estados do enclave. Cada estrutura é projetada para garantir a integridade e confidencialidade dos dados contidos nos enclaves.</text:p>
      <text:list text:style-name="Outline" text:continue-numbering="true">
        <text:list-item>
          <text:list>
            <text:list-item>
              <text:p text:style-name="P77">Papel da Memória: Enclave Page Cache (EPC) e Enclave Page Cache Map (EPCM)</text:p>
            </text:list-item>
          </text:list>
        </text:list-item>
      </text:list>
      <text:p text:style-name="P78">A memória desempenha um papel crítico no SGX, com o EPC servindo como área dedicada ao enclave e o EPCM mapeando o estado das páginas. O conteúdo do EPC é protegido contra leituras externas, garantindo a segurança das informações. A EPCM é responsável por rastrear o estado das páginas, garantindo que somente páginas alocadas e apropriadas para o enclave sejam acessíveis.</text:p>
      <text:list text:style-name="Outline" text:continue-numbering="true">
        <text:list-item>
          <text:list>
            <text:list-item>
              <text:p text:style-name="P79">Uso de Instruções Específicas</text:p>
            </text:list-item>
          </text:list>
        </text:list-item>
      </text:list>
      <text:list text:style-name="LFO8" text:continue-numbering="true">
        <text:list-item>
          <text:p text:style-name="P80">ECREATE: Instantia um novo enclave, definindo seu espaço de endereçamento e raiz de confiança.</text:p>
        </text:list-item>
        <text:list-item>
          <text:p text:style-name="P81">EADD: Adiciona uma nova página ao enclave.</text:p>
        </text:list-item>
        <text:list-item>
          <text:p text:style-name="P82">EEXIT: Coloca o processo de volta ao modo original e limpa as entradas da TLB.</text:p>
        </text:list-item>
        <text:list-item>
          <text:p text:style-name="P83">EENTER: Transfere o controle para o enclave, preparando o processador para a execução segura.</text:p>
        </text:list-item>
        <text:list-item>
          <text:p text:style-name="P84">EREPORT: Gera um relatório contendo informações sobre o enclave.</text:p>
        </text:list-item>
        <text:list-item>
          <text:p text:style-name="P85">EGETKEY: Permite que um enclave acesse chaves específicas para operações criptográficas.</text:p>
        </text:list-item>
      </text:list>
      <text:list text:style-name="Outline" text:continue-numbering="true">
        <text:list-item>
          <text:p text:style-name="P86">Desempenho frente a SOs tradicionais<text:s/></text:p>
        </text:list-item>
        <text:list-item>
          <text:p text:style-name="P87">Images</text:p>
        </text:list-item>
      </text:list>
      <text:list text:style-name="LFO9" text:continue-numbering="true">
        <text:list-item>
          <text:p text:style-name="P88"><text:span text:style-name="T89">Figura 1</text:span><text:span text:style-name="T90">:<text:s/></text:span><text:span text:style-name="T91">Imagem_Overview_SGX (Apresentação geral da implementação do Intel SGX)</text:span><text:span text:style-name="T92">;</text:span></text:p>
        </text:list-item>
        <text:list-item>
          <text:p text:style-name="P93"><text:span text:style-name="T94">Figura 2</text:span><text:span text:style-name="T95">:<text:s/></text:span><text:span text:style-name="T96">Imagem_TEE_Structure (Estrutura do Ambiente de Execução Seguro)</text:span><text:span text:style-name="T97">;</text:span></text:p>
        </text:list-item>
        <text:list-item>
          <text:p text:style-name="P98"><text:span text:style-name="T99">Figura 3:</text:span><text:span text:style-name="T100"><text:s/></text:span><text:span text:style-name="T101">Imagem_EPC_EPCM (Papel da Memória: Enclave Page Cache e Enclave Page Cache Map)</text:span><text:span text:style-name="T102">;</text:span></text:p>
        </text:list-item>
        <text:list-item>
          <text:p text:style-name="P103"><text:span text:style-name="T104">Figura 4</text:span><text:span text:style-name="T105">:<text:s/></text:span><text:span text:style-name="T106">Imagem_Instructions (Instruções do Intel SGX em destaque)</text:span><text:span text:style-name="T107">.</text:span></text:p>
        </text:list-item>
      </text:list>
      <text:soft-page-break/>
      <text:list text:style-name="Outline" text:continue-numbering="true">
        <text:list-item>
          <text:p text:style-name="P108">Conclusão</text:p>
        </text:list-item>
      </text:list>
      <text:p text:style-name="P109">Referências bibliográficas devem ser claras e uniformes. Recomendamos fornecer os nomes dos autores entre colchetes, por exemplo, [Knuth 1984], [Boulic and Renault 1991]; ou datas entre parênteses, por exemplo, Knuth (1984), Smith and Jones (1999).</text:p>
      <text:p text:style-name="P110"><text:span text:style-name="T111">As referências devem ser listadas em fonte de tamanho 12, com 6 pontos de espaço antes de cada referência. A primeira linha de cada referência não deve ser recuada, enquanto as subsequentes devem ser recuadas por 0,5 cm.</text:span></text:p>
      <text:p text:style-name="P112">References</text:p>
      <text:list text:style-name="LFO7" text:continue-numbering="true">
        <text:list-item>
          <text:p text:style-name="P113"><text:bookmark-start text:name="_Ref148644700"/><text:span text:style-name="T114">[J. Rutkowska]. Thoughts on Intel’s upcoming Software Guard Extensions (Part 1), Aug. 2013.<text:s/></text:span><text:a xlink:href="http://theinvisiblethings.blogspot.com/2013/08/thoughts-on-intels-upcoming-software.html" office:target-frame-name="_top" xlink:show="replace"><text:span text:style-name="T115">http://theinvisiblethings.blogspot.com/2013/08/thoughts-on-intels-upcoming-software.h</text:span><text:bookmark-start text:name="_Hlt148640179"/><text:bookmark-start text:name="_Hlt148640180"/><text:span text:style-name="T116">t</text:span><text:bookmark-end text:name="_Hlt148640179"/><text:bookmark-end text:name="_Hlt148640180"/><text:span text:style-name="T117">ml</text:span></text:a><text:bookmark-end text:name="_Ref148644700"/></text:p>
        </text:list-item>
        <text:list-item>
          <text:p text:style-name="P118">[Lucas Andrade, Edson Borin 2021)]. Projeto final de graduação: “Análise de desempenho do uso de Enclaves com Intel SGX”,<text:s/><text:a xlink:href="https://www.ic.unicamp.br/~reltech/PFG/2021/PFG-21-15.pdf" office:target-frame-name="_top" xlink:show="replace"><text:span text:style-name="Hyperlink">https://www.ic.unicamp.</text:span><text:bookmark-start text:name="_Hlt148644130"/><text:span text:style-name="Hyperlink">b</text:span><text:bookmark-end text:name="_Hlt148644130"/><text:span text:style-name="Hyperlink">r/~reltech/PFG/2021/PFG-21-15.p</text:span><text:bookmark-start text:name="_Hlt148640274"/><text:bookmark-start text:name="_Hlt148640275"/><text:span text:style-name="Hyperlink">d</text:span><text:bookmark-end text:name="_Hlt148640274"/><text:bookmark-end text:name="_Hlt148640275"/><text:span text:style-name="Hyperlink">f</text:span></text:a>, Dezembro.</text:p>
        </text:list-item>
        <text:list-item>
          <text:p text:style-name="P119"><text:span text:style-name="T120">[Sergio Prado 2020]. Trusted Execution Environment e ARM TrustZone.<text:s/></text:span><text:a xlink:href="https://sergioprado.org/trusted-execution-environment-e-arm-trustzone" office:target-frame-name="_top" xlink:show="replace"><text:span text:style-name="Hyperlink">https://sergioprado.org/trusted-execution-environment-e-arm-trustzone</text:span></text:a>. Março.</text:p>
        </text:list-item>
        <text:list-item>
          <text:p text:style-name="P121"><text:bookmark-start text:name="_Ref148643966"/>[Rafael Campra Reis Condé 2017]. Proteção de dados de autenticação em um sistema operacional usando enclaves SGX.<text:s/><text:a xlink:href="https://www.acervodigital.ufpr.br/bitstream/handle/1884/53489/R%20-%20D%20-%20RAFAEL%20CAMPRA%20REIS%20CONDE.pdf?sequence=1&amp;isAllowed=y" office:target-frame-name="_top" xlink:show="replace"><text:span text:style-name="Hyperlink">https://www.acervodigital.ufpr.br/bitstream/handle/1884/53489/R%20-%20D%20-%20RAFAEL%20CAMPRA%20REIS%20CONDE.pdf?sequence=1&amp;isAllowed=y</text:span></text:a><text:bookmark-end text:name="_Ref148643966"/>.<text:s/></text:p>
        </text:list-item>
        <text:list-item>
          <text:p text:style-name="P122"><text:span text:style-name="T123">IBM. (2023)<text:s/></text:span><text:bookmark-start text:name="trusted_comp_base__title__1"/><text:bookmark-end text:name="trusted_comp_base__title__1"/><text:span text:style-name="T124">Trusted Computing Base.<text:s/></text:span><text:a xlink:href="https://www.ibm.com/docs/pt-br/aix/7.3?topic=configuration-trusted-computing-base" office:target-frame-name="_top" xlink:show="replace"><text:span text:style-name="T125">https://www.ibm.com/docs/pt-br/aix/7.3?topic=configuration-trusted-computing-ba</text:span><text:bookmark-start text:name="_Hlt148644176"/><text:bookmark-start text:name="_Hlt148644177"/><text:span text:style-name="T126">s</text:span><text:bookmark-end text:name="_Hlt148644176"/><text:bookmark-end text:name="_Hlt148644177"/><text:span text:style-name="T127">e</text:span></text:a><text:span text:style-name="T128">. Março.</text:span></text:p>
        </text:list-item>
        <text:list-item>
          <text:p text:style-name="P129">Gramine (2023) Gramine documentation.<text:s/><text:a xlink:href="https://gramine.readthedocs.io/en/stable/" office:target-frame-name="_top" xlink:show="replace"><text:span text:style-name="Hyperlink">https://gramine.readthedoc</text:span><text:bookmark-start text:name="_Hlt148900924"/><text:bookmark-start text:name="_Hlt148900925"/><text:span text:style-name="Hyperlink">s</text:span><text:bookmark-end text:name="_Hlt148900924"/><text:bookmark-end text:name="_Hlt148900925"/><text:span text:style-name="Hyperlink">.io/en/stable/</text:span></text:a>.<text:s/></text:p>
        </text:list-item>
        <text:list-item>
          <text:p text:style-name="P130"><text:span text:style-name="T131">Gramine (2023) Introduction to SGX.<text:s/></text:span><text:a xlink:href="https://gramine.readthedocs.io/en/stable/sgx-intro.html" office:target-frame-name="_top" xlink:show="replace"><text:span text:style-name="T132">https://gramine.rea</text:span><text:bookmark-start text:name="_Hlt148900929"/><text:bookmark-start text:name="_Hlt148900930"/><text:span text:style-name="T133">d</text:span><text:bookmark-end text:name="_Hlt148900929"/><text:bookmark-end text:name="_Hlt148900930"/><text:span text:style-name="T134">thedocs.io/en/stable/sgx-intro.html</text:span></text:a><text:span text:style-name="T135">.<text:s/></text:span></text:p>
        </text:list-item>
        <text:list-item>
          <text:p text:style-name="P136"><text:bookmark-start text:name="_Ref148643999"/><text:span text:style-name="T137">Quarkslab’s website, [Alexandre Adamski 2018]. Overview of Intel SGX - Part 1, SGX Internals.<text:s/></text:span><text:a xlink:href="https://blog.quarkslab.com/overview-of-intel-sgx-part-1-sgx-internals.html" office:target-frame-name="_top" xlink:show="replace"><text:span text:style-name="Hyperlink">https://blog.quarkslab.com/overview-of-intel-sgx-part-1-sgx-internals.htm</text:span><text:bookmark-start text:name="_Hlt148644218"/><text:bookmark-start text:name="_Hlt148644219"/><text:span text:style-name="Hyperlink">l</text:span><text:bookmark-end text:name="_Hlt148644218"/><text:bookmark-end text:name="_Hlt148644219"/></text:a>.<text:s/><text:span text:style-name="T138">Julho.</text:span><text:bookmark-end text:name="_Ref148643999"/></text:p>
        </text:list-item>
        <text:list-item>
          <text:p text:style-name="P139"><text:bookmark-start text:name="_Ref148643921"/><text:span text:style-name="T140">[Ensar Seker (Medium website) 2021]. Trusted Execution Environment (TEE), Implementations, Drawbacks.<text:s/></text:span><text:a xlink:href="https://taesoo.kim/pubs/2016/jain:opensgx.pdf" office:target-frame-name="_top" xlink:show="replace"><text:span text:style-name="T141">https://ta</text:span><text:bookmark-start text:name="_Hlt148644525"/><text:bookmark-start text:name="_Hlt148644526"/><text:span text:style-name="T142">e</text:span><text:bookmark-end text:name="_Hlt148644525"/><text:bookmark-end text:name="_Hlt148644526"/><text:span text:style-name="T143">soo.</text:span><text:bookmark-start text:name="_Hlt148644223"/><text:bookmark-start text:name="_Hlt148644224"/><text:span text:style-name="T144">k</text:span><text:bookmark-end text:name="_Hlt148644223"/><text:bookmark-end text:name="_Hlt148644224"/><text:span text:style-name="T145">im/pubs/2016/jain:opensgx.pdf</text:span></text:a><text:span text:style-name="T146">, Junho.</text:span><text:bookmark-end text:name="_Ref148643921"/></text:p>
        </text:list-item>
        <text:list-item>
          <text:p text:style-name="P147"><text:bookmark-start text:name="_Ref148644037"/>[Prerit Jain, Soham Desai, Seongmin Kim, Ming-Wei Shih<text:span text:style-name="T148">,</text:span><text:s/>JaeHyuk Leek, Changho Choi<text:span text:style-name="T149">,</text:span><text:s/>Youjung Shin<text:span text:style-name="T150">,</text:span><text:s/>Taesoo Kim<text:span text:style-name="T151">,</text:span><text:s/>Brent Byunghoon Kang<text:span text:style-name="T152">,</text:span><text:s/>Dongsu Han<text:span text:style-name="T153"><text:s/></text:span>2016].<text:s/><text:span text:style-name="T154">OpenSGX: An Open Platform for SGX Research, Implementations, Drawbacks.<text:s/></text:span><text:a xlink:href="https://medium.com/geekculture/trusted-execution-environment-tee-implementations-drawbacks-8a434301d679" office:target-frame-name="_top" xlink:show="replace"><text:span text:style-name="T155">https://medium.com/geekculture/trusted-execution-environment-tee-implementations-drawbacks-</text:span><text:bookmark-start text:name="_Hlt148644516"/><text:bookmark-start text:name="_Hlt148644517"/><text:span text:style-name="T156">8</text:span><text:bookmark-end text:name="_Hlt148644516"/><text:bookmark-end text:name="_Hlt148644517"/><text:span text:style-name="T157">a434301d679</text:span></text:a><text:span text:style-name="T158">, Junho.</text:span><text:bookmark-end text:name="_Ref148644037"/></text:p>
        </text:list-item>
        <text:list-item>
          <text:p text:style-name="P159"><text:bookmark-start text:name="_Ref148644073"/>[A. Baumann, M. Peinado, and G. Hunt 2014]. Shielding applications from an untrusted cloud with haven. In Proceedings of the 11th Symposium on Operating<text:s/><text:soft-page-break/>Systems 15 Design and Implementation (OSDI), pages 267–283, Broomfield, Colorado, Outubro.<text:bookmark-end text:name="_Ref148644073"/></text:p>
        </text:list-item>
        <text:list-item>
          <text:p text:style-name="P160"><text:bookmark-start text:name="_Ref148644708"/><text:span text:style-name="T161">[Tobias Konopik</text:span><text:span text:style-name="T162"><text:s/></text:span><text:span text:style-name="T163">2023]. Securing Whole Applications with SGX.<text:s/></text:span><text:a xlink:href="https://sys.cs.fau.de/extern/lehre/ws22/akss/material/gramine-scone.pdf" office:target-frame-name="_top" xlink:show="replace"><text:span text:style-name="Hyperlink">https://sys.cs.fau.de/extern/lehre/ws22/akss/material/gramine-scone.pdf</text:span></text:a>, Janeiro.<text:bookmark-end text:name="_Ref148644708"/></text:p>
        </text:list-item>
        <text:list-item>
          <text:p text:style-name="P164"><text:bookmark-start text:name="_Ref148901522"/><text:span text:style-name="T165">[Katherine Druckman, Mona Vij</text:span><text:span text:style-name="T166"><text:s/></text:span><text:span text:style-name="T167">2023]. Securing Applications with Gramine.<text:s/></text:span><text:a xlink:href="https://www.intel.com/content/www/us/en/developer/articles/community/securing-applications-with-gramine.html?wapkw=Gramine%20SGX" office:target-frame-name="_top" xlink:show="replace"><text:span text:style-name="Hyperlink">https://www.intel.com/content/www/us/en/developer/articles/community/securing-applications-with-gramine.html?wapkw=Gramine%20SGX</text:span></text:a>.<text:bookmark-end text:name="_Ref148901522"/></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Bitstream Vera Serif" svg:font-family="Bitstream Vera Serif" style:font-family-generic="roman" style:font-pitch="variable"/>
    <style:font-face style:name="Bitstream Vera Sans" svg:font-family="Bitstream Vera Sans" style:font-family-generic="system" style:font-pitch="variable"/>
    <style:font-face style:name="Lucidasans" svg:font-family="Lucidasans" style:font-family-generic="system" style:font-pitch="variable"/>
    <style:font-face style:name="Times" svg:font-family="Times" style:font-family-generic="roman" style:font-pitch="variable" svg:panose-1="2 2 6 3 5 4 5 2 3 4"/>
    <style:font-face style:name="Times New Roman" svg:font-family="Times New Roman" style:font-family-generic="roman" style:font-pitch="variable" svg:panose-1="2 2 6 3 5 4 5 2 3 4"/>
    <style:font-face style:name="TimesNewRoman, Bold" svg:font-family="TimesNewRoman, Bold" style:font-family-generic="roman"/>
    <style:font-face style:name="Liberation Sans" svg:font-family="Liberation Sans" style:font-family-generic="swiss" style:font-pitch="variable"/>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Courier" svg:font-family="Courier" style:font-family-generic="modern" style:font-pitch="fixed" svg:panose-1="2 7 4 9 2 2 5 2 4 4"/>
    <style:font-face style:name="StarSymbol" style:font-charset="x-symbol" svg:font-family="Star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Bitstream Vera Serif" style:font-name-asian="Bitstream Vera Sans" style:font-name-complex="Lucida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pt" style:country-asian="BR" style:language-complex="ar" style:country-complex="SA" style:text-combine="none" fo:hyphenate="true"/>
    </style:default-style>
    <style:style style:name="Heading1" style:display-name="Heading 1" style:family="paragraph" style:parent-style-name="Standard" style:next-style-name="SBCparagraph" style:default-outline-level="1">
      <style:paragraph-properties fo:keep-with-next="always" fo:widows="2" fo:orphans="2" fo:margin-top="0.25in"/>
      <style:text-properties fo:font-weight="bold" style:font-weight-asian="bold" fo:font-variant="small-caps" fo:font-size="14pt" style:font-size-asian="14pt" fo:hyphenate="false"/>
    </style:style>
    <style:style style:name="Heading2" style:display-name="Heading 2" style:family="paragraph" style:parent-style-name="Heading1" style:next-style-name="SBCparagraph" style:default-outline-level="2">
      <style:paragraph-properties fo:margin-top="0.1666in"/>
      <style:text-properties fo:font-variant="normal" fo:font-size="13pt" style:font-size-asian="13pt" fo:hyphenate="false"/>
    </style:style>
    <style:style style:name="Heading3" style:display-name="Heading 3" style:family="paragraph" style:parent-style-name="Standard" style:next-style-name="SBCparagraph" style:default-outline-level="3">
      <style:paragraph-properties fo:keep-with-next="always" fo:margin-top="0.1666in"/>
      <style:text-properties fo:font-weight="bold" style:font-weight-asian="bold" fo:hyphenate="false"/>
    </style:style>
    <style:style style:name="Heading4" style:display-name="Heading 4" style:family="paragraph" style:parent-style-name="Standard" style:next-style-name="SBCparagraph" style:default-outline-level="4">
      <style:paragraph-properties fo:keep-with-next="always" fo:text-align="justify"/>
      <style:text-properties fo:font-style="italic" style:font-style-asian="italic" fo:hyphenate="false"/>
    </style:style>
    <style:style style:name="Heading5" style:display-name="Heading 5" style:family="paragraph" style:parent-style-name="Standard" style:next-style-name="SBCparagraph" style:default-outline-level="5">
      <style:paragraph-properties fo:keep-with-next="always"/>
      <style:text-properties style:font-name="TimesNewRoman, Bold" style:font-name-asian="TimesNewRoman, Bold" style:font-name-complex="TimesNewRoman, Bold" fo:font-weight="bold" style:font-weight-asian="bold" fo:color="#000000" fo:hyphenate="false"/>
    </style:style>
    <style:style style:name="Heading6" style:display-name="Heading 6" style:family="paragraph" style:parent-style-name="Standard" style:next-style-name="SBCparagraph" style:default-outline-level="6">
      <style:paragraph-properties fo:keep-with-next="always" fo:text-align="center"/>
      <style:text-properties fo:font-weight="bold" style:font-weight-asian="bold" fo:font-style="italic" style:font-style-asian="italic" fo:color="#000000" fo:hyphenate="false"/>
    </style:style>
    <style:style style:name="Heading7" style:display-name="Heading 7" style:family="paragraph" style:parent-style-name="Standard" style:next-style-name="SBCparagraph" style:default-outline-level="7">
      <style:paragraph-properties fo:keep-with-next="always" fo:text-align="justify"/>
      <style:text-properties fo:font-weight="bold" style:font-weight-asian="bold" fo:hyphenate="false"/>
    </style:style>
    <style:style style:name="Heading8" style:display-name="Heading 8" style:family="paragraph" style:parent-style-name="Standard" style:next-style-name="SBCparagraph" style:default-outline-level="8">
      <style:paragraph-properties fo:keep-with-next="always"/>
      <style:text-properties fo:font-weight="bold" style:font-weight-asian="bold" fo:hyphenate="false"/>
    </style:style>
    <style:style style:name="Heading9" style:display-name="Heading 9" style:family="paragraph" style:parent-style-name="Standard" style:next-style-name="SBCparagraph" style:default-outline-level="9">
      <style:paragraph-properties fo:keep-with-next="always" fo:text-align="center"/>
      <style:text-properties fo:font-weight="bold" style:font-weight-asian="bold"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_2" style:display-name="WW_OutlineListStyle_2">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4" style:num-suffix="."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suffix="."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text-properties style:font-name="Times" style:font-name-asian="Times New Roman" style:font-name-complex="Times New Roman" style:font-size-complex="10pt" fo:hyphenate="false"/>
    </style:style>
    <style:style style:name="SBCtitle1" style:display-name="SBC:title:1" style:family="paragraph" style:parent-style-name="Standard" style:next-style-name="SBCparagraphfirst" style:default-outline-level="1">
      <style:paragraph-properties fo:keep-with-next="always" fo:margin-top="0.1652in"/>
      <style:text-properties fo:font-weight="bold" style:font-weight-asian="bold" fo:font-size="13pt" style:font-size-asian="13pt" fo:hyphenate="false"/>
    </style:style>
    <style:style style:name="SBCtitle2" style:display-name="SBC:title:2" style:family="paragraph" style:parent-style-name="Standard" style:next-style-name="SBCparagraphfirst" style:list-style-name="Outline" style:default-outline-level="2">
      <style:paragraph-properties fo:keep-with-next="always" fo:margin-top="0.1652in"/>
      <style:text-properties fo:font-weight="bold" style:font-weight-asian="bold"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S Mincho"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Indent" style:display-name="List Indent" style:family="paragraph" style:parent-style-name="Textbody">
      <style:paragraph-properties fo:margin-left="1.9687in" fo:text-indent="-1.7715in">
        <style:tab-stops>
          <style:tab-stop style:type="left" style:position="0in"/>
        </style:tab-stops>
      </style:paragraph-properties>
      <style:text-properties fo:hyphenate="false"/>
    </style:style>
    <style:style style:name="Title" style:display-name="Title" style:family="paragraph" style:parent-style-name="Standard" style:next-style-name="SBCauthors">
      <style:paragraph-properties fo:text-align="center" fo:margin-bottom="0.1576in"/>
      <style:text-properties style:font-name-asian="Times" style:font-name-complex="Times" fo:font-weight="bold" style:font-weight-asian="bold" fo:font-variant="small-caps" fo:font-size="18pt" style:font-size-asian="18pt" fo:hyphenate="false"/>
    </style:style>
    <style:style style:name="Subtitle" style:display-name="Subtitle" style:family="paragraph" style:parent-style-name="Title" style:next-style-name="Textbody">
      <style:text-properties fo:font-style="italic" style:font-style-asian="italic" style:font-style-complex="italic" fo:font-size="14pt" style:font-size-asian="14pt" style:font-size-complex="14pt" fo:hyphenate="false"/>
    </style:style>
    <style:style style:name="Heading10" style:display-name="Heading 10" style:family="paragraph" style:parent-style-name="Title" style:next-style-name="Textbody">
      <style:text-properties style:font-weight-complex="bold" fo:hyphenate="false"/>
    </style:style>
    <style:style style:name="List" style:display-name="List" style:family="paragraph" style:parent-style-name="Textbody">
      <style:text-properties style:font-name-complex="Lucidasan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Header" style:display-name="Header" style:family="paragraph" style:parent-style-name="Standard">
      <style:paragraph-properties>
        <style:tab-stops>
          <style:tab-stop style:type="center" style:position="3.0687in"/>
          <style:tab-stop style:type="right" style:position="6.1375in"/>
        </style:tab-stops>
      </style:paragraph-properties>
      <style:text-properties fo:hyphenate="false"/>
    </style:style>
    <style:style style:name="Footer" style:display-name="Footer" style:family="paragraph" style:parent-style-name="Standard">
      <style:paragraph-properties>
        <style:tab-stops>
          <style:tab-stop style:type="center" style:position="3.0687in"/>
          <style:tab-stop style:type="right" style:position="6.1375in"/>
        </style:tab-stops>
      </style:paragraph-properties>
      <style:text-properties fo:hyphenate="false"/>
    </style:style>
    <style:style style:name="TableContents" style:display-name="Table Contents" style:family="paragraph" style:parent-style-name="Textbody">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font-style="italic" style:font-style-asian="italic" style:font-style-complex="italic" fo:hyphenate="false"/>
    </style:style>
    <style:style style:name="Caption" style:display-name="Caption" style:family="paragraph" style:parent-style-name="Standard">
      <style:paragraph-properties text:number-lines="false" fo:margin-top="0.0833in" fo:margin-bottom="0.0833in"/>
      <style:text-properties style:font-name-complex="Lucidasans" fo:font-style="italic" style:font-style-asian="italic" style:font-style-complex="italic" fo:font-size="10pt" style:font-size-asian="10pt"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fo:hyphenate="false"/>
    </style:style>
    <style:style style:name="Index" style:display-name="Index" style:family="paragraph" style:parent-style-name="Standard">
      <style:paragraph-properties text:number-lines="false"/>
      <style:text-properties style:font-name-complex="Lucidasans" fo:hyphenate="false"/>
    </style:style>
    <style:style style:name="SBCauthors" style:display-name="SBC:author(s)" style:family="paragraph" style:parent-style-name="Standard" style:next-style-name="SBCinstitution">
      <style:paragraph-properties fo:text-align="center" fo:margin-top="0.1652in"/>
      <style:text-properties fo:font-weight="bold" style:font-weight-asian="bold" fo:color="#000000" fo:hyphenate="false"/>
    </style:style>
    <style:style style:name="SBCaddress" style:display-name="SBC:address" style:family="paragraph" style:parent-style-name="Standard" style:next-style-name="SBCinstitution">
      <style:paragraph-properties fo:text-align="center"/>
      <style:text-properties fo:hyphenate="false"/>
    </style:style>
    <style:style style:name="SBCreference" style:display-name="SBC:reference" style:family="paragraph" style:parent-style-name="Standard">
      <style:paragraph-properties fo:text-align="justify" fo:margin-top="0.0826in" fo:margin-left="0.1965in" fo:text-indent="-0.1965in">
        <style:tab-stops/>
      </style:paragraph-properties>
      <style:text-properties fo:color="#000000" fo:hyphenate="false"/>
    </style:style>
    <style:style style:name="SBCparagraph" style:display-name="SBC:paragraph" style:family="paragraph" style:parent-style-name="Standard">
      <style:paragraph-properties fo:text-align="justify" fo:margin-top="0.0826in" fo:text-indent="0.4923in"/>
      <style:text-properties fo:color="#000000" fo:hyphenate="false"/>
    </style:style>
    <style:style style:name="SBCinstitution" style:display-name="SBC:institution" style:family="paragraph" style:parent-style-name="Standard" style:next-style-name="SBCaddress">
      <style:paragraph-properties fo:text-align="center" fo:margin-top="0.1652in"/>
      <style:text-properties fo:hyphenate="false"/>
    </style:style>
    <style:style style:name="SBCresumo" style:display-name="SBC:resumo" style:family="paragraph" style:parent-style-name="Standard" style:next-style-name="SBCtitle1">
      <style:paragraph-properties fo:text-align="justify" fo:margin-top="0.0826in" fo:margin-bottom="0.0826in" fo:margin-left="0.3152in" fo:margin-right="0.3152in">
        <style:tab-stops/>
      </style:paragraph-properties>
      <style:text-properties fo:font-style="italic" style:font-style-asian="italic" fo:hyphenate="false"/>
    </style:style>
    <style:style style:name="SBCabstract" style:display-name="SBC:abstract" style:family="paragraph" style:parent-style-name="Standard" style:next-style-name="SBCresumo">
      <style:paragraph-properties fo:text-align="justify" fo:margin-top="0.0826in" fo:margin-bottom="0.0826in" fo:margin-left="0.3152in" fo:margin-right="0.3152in">
        <style:tab-stops/>
      </style:paragraph-properties>
      <style:text-properties fo:font-style="italic" style:font-style-asian="italic" fo:language="en" fo:country="US" fo:hyphenate="false"/>
    </style:style>
    <style:style style:name="SBClist" style:display-name="SBC:list" style:family="paragraph" style:parent-style-name="Standard" style:list-style-name="SBCnumberlist">
      <style:paragraph-properties fo:text-align="justify">
        <style:tab-stops>
          <style:tab-stop style:type="left" style:position="-0.4902in"/>
        </style:tab-stops>
      </style:paragraph-properties>
      <style:text-properties fo:hyphenate="false"/>
    </style:style>
    <style:style style:name="SBCfigure" style:display-name="SBC:figure" style:family="paragraph" style:parent-style-name="Standard" style:next-style-name="SBCcaption">
      <style:paragraph-properties fo:keep-with-next="always" fo:widows="2" fo:orphans="2" fo:text-align="center" fo:margin-top="0.0826in"/>
      <style:text-properties fo:hyphenate="false"/>
    </style:style>
    <style:style style:name="SBCcaption" style:display-name="SBC:caption" style:family="paragraph" style:parent-style-name="Standard" style:next-style-name="SBCparagraph">
      <style:paragraph-properties fo:widows="2" fo:orphans="2" fo:text-align="center" fo:margin-top="0.0826in" fo:margin-bottom="0.0826in" fo:margin-left="0.3152in" fo:margin-right="0.3152in">
        <style:tab-stops/>
      </style:paragraph-properties>
      <style:text-properties style:font-name="Helvetica" style:font-name-asian="Helvetica" style:font-name-complex="Helvetica" fo:font-weight="bold" style:font-weight-asian="bold" fo:hyphenate="false"/>
    </style:style>
    <style:style style:name="SBCreferences" style:display-name="SBC:references" style:family="paragraph" style:parent-style-name="Standard" style:next-style-name="SBCreference">
      <style:paragraph-properties fo:keep-with-next="always" fo:margin-top="0.1652in"/>
      <style:text-properties fo:font-weight="bold" style:font-weight-asian="bold" fo:font-size="13pt" style:font-size-asian="13pt" fo:hyphenate="false"/>
    </style:style>
    <style:style style:name="SBCtitle" style:display-name="SBC:title" style:family="paragraph" style:parent-style-name="Standard" style:next-style-name="SBCauthors">
      <style:paragraph-properties fo:text-align="center" fo:margin-top="0.1652in"/>
      <style:text-properties fo:font-weight="bold" style:font-weight-asian="bold" fo:font-size="16pt" style:font-size-asian="16pt" fo:hyphenate="false"/>
    </style:style>
    <style:style style:name="SBCtitle3" style:display-name="SBC:title:3" style:family="paragraph" style:parent-style-name="Standard" style:next-style-name="SBCparagraphfirst">
      <style:paragraph-properties fo:keep-with-next="always" fo:margin-top="0.0784in"/>
      <style:text-properties fo:hyphenate="false"/>
    </style:style>
    <style:style style:name="SBClistnumbered" style:display-name="SBC:list:numbered" style:family="paragraph" style:parent-style-name="Standard" style:list-style-name="SBCnumberlistnumbered">
      <style:paragraph-properties fo:text-align="justify">
        <style:tab-stops>
          <style:tab-stop style:type="left" style:position="-3.9375in"/>
        </style:tab-stops>
      </style:paragraph-properties>
      <style:text-properties fo:hyphenate="false"/>
    </style:style>
    <style:style style:name="SBCfootnote" style:display-name="SBC:footnote" style:family="paragraph" style:parent-style-name="Standard">
      <style:paragraph-properties fo:margin-top="0.043in" fo:margin-left="0.1965in" fo:text-indent="-0.1965in">
        <style:tab-stops/>
      </style:paragraph-properties>
      <style:text-properties fo:font-size="10pt" style:font-size-asian="10pt" fo:hyphenate="false"/>
    </style:style>
    <style:style style:name="SBCemail" style:display-name="SBC:email" style:family="paragraph" style:parent-style-name="Standard" style:next-style-name="SBCabstract">
      <style:paragraph-properties fo:text-align="center" fo:margin-top="0.0826in" fo:margin-bottom="0.0826in"/>
      <style:text-properties style:font-name="Courier" style:font-name-asian="Courier" style:font-name-complex="Courier" fo:font-size="10pt" style:font-size-asian="10pt" fo:hyphenate="false"/>
    </style:style>
    <style:style style:name="SBCparagraphfirst" style:display-name="SBC:paragraph:first" style:family="paragraph" style:parent-style-name="SBCparagraph" style:next-style-name="SBCparagraph">
      <style:paragraph-properties fo:text-indent="0in"/>
      <style:text-properties fo:hyphenate="false"/>
    </style:style>
    <style:style style:name="SBCcaption2lines" style:display-name="SBC:caption:2lines" style:family="paragraph" style:parent-style-name="SBCcaption" style:next-style-name="SBCparagraph">
      <style:paragraph-properties fo:text-align="justify"/>
      <style:text-properties fo:hyphenate="false"/>
    </style:style>
    <style:style style:name="FootnoteSymbol" style:display-name="Footnote Symbol" style:family="text"/>
    <style:style style:name="PageNumber" style:display-name="Page Number" style:family="text"/>
    <style:style style:name="NumberingSymbols" style:display-name="Numbering Symbols" style:family="text"/>
    <style:style style:name="BulletSymbols" style:display-name="Bullet Symbols" style:family="text">
      <style:text-properties style:font-name="StarSymbol" style:font-name-asian="StarSymbol" style:font-name-complex="StarSymbol" fo:font-size="11pt" style:font-size-asian="11pt" style:font-size-complex="9pt" fo:background-color="transparen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Footnoteanchor" style:display-name="Footnote anchor" style:family="text">
      <style:text-properties style:text-position="super 66.6%"/>
    </style:style>
    <style:style style:name="EndnoteSymbol" style:display-name="Endnote Symbol" style:family="text"/>
    <style:style style:name="Zeichenformat" style:display-name="Zeichenforma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FootnoteReference" style:display-name="Footnote Reference" style:family="text" style:parent-style-name="DefaultParagraphFont">
      <style:text-properties style:text-position="super 66.6%"/>
    </style:style>
    <style:style style:name="Endnoteanchor" style:display-name="Endnote anchor" style:family="text">
      <style:text-properties style:text-position="super 66.6%"/>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list-style style:name="WW_OutlineListStyle_1" style:display-name="WW_OutlineListStyle_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4" style:num-suffix="."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suffix="."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4" style:num-suffix="."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suffix="."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Outline" style:display-name="Outline">
      <text:list-level-style-number text:level="1" style:num-suffix="."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suffix="."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suffix="." style:num-format="1" text:display-levels="3">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4" style:num-suffix="."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suffix="."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5LVL1" style:family="text">
      <style:text-properties style:font-name="StarSymbol"/>
    </style:style>
    <style:style style:name="WW_CharLFO5LVL2" style:family="text">
      <style:text-properties style:font-name="StarSymbol"/>
    </style:style>
    <style:style style:name="WW_CharLFO5LVL3" style:family="text">
      <style:text-properties style:font-name="StarSymbol"/>
    </style:style>
    <style:style style:name="WW_CharLFO5LVL4" style:family="text">
      <style:text-properties style:font-name="StarSymbol"/>
    </style:style>
    <style:style style:name="WW_CharLFO5LVL5" style:family="text">
      <style:text-properties style:font-name="StarSymbol"/>
    </style:style>
    <style:style style:name="WW_CharLFO5LVL6" style:family="text">
      <style:text-properties style:font-name="StarSymbol"/>
    </style:style>
    <style:style style:name="WW_CharLFO5LVL7" style:family="text">
      <style:text-properties style:font-name="StarSymbol"/>
    </style:style>
    <style:style style:name="WW_CharLFO5LVL8" style:family="text">
      <style:text-properties style:font-name="StarSymbol"/>
    </style:style>
    <style:style style:name="WW_CharLFO5LVL9" style:family="text">
      <style:text-properties style:font-name="StarSymbol"/>
    </style:style>
    <text:list-style style:name="SBCnumberlist" style:display-name="SBC:number:list">
      <text:list-level-style-bullet text:level="1" text:style-name="WW_CharLFO5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tarSymbol"/>
      </text:list-level-style-bullet>
      <text:list-level-style-bullet text:level="2" text:style-name="WW_CharLFO5LVL2" text:bullet-char="•">
        <style:list-level-properties text:space-before="0.1972in" text:min-label-width="0.1965in" text:list-level-position-and-space-mode="label-alignment">
          <style:list-level-label-alignment text:label-followed-by="listtab" fo:margin-left="0.3937in" fo:text-indent="-0.1965in"/>
        </style:list-level-properties>
        <style:text-properties style:font-name="StarSymbol"/>
      </text:list-level-style-bullet>
      <text:list-level-style-bullet text:level="3" text:style-name="WW_CharLFO5LVL3" text:bullet-char="•">
        <style:list-level-properties text:space-before="0.3937in" text:min-label-width="0.1965in" text:list-level-position-and-space-mode="label-alignment">
          <style:list-level-label-alignment text:label-followed-by="listtab" fo:margin-left="0.5902in" fo:text-indent="-0.1965in"/>
        </style:list-level-properties>
        <style:text-properties style:font-name="StarSymbol"/>
      </text:list-level-style-bullet>
      <text:list-level-style-bullet text:level="4" text:style-name="WW_CharLFO5LVL4" text:bullet-char="•">
        <style:list-level-properties text:space-before="0.5909in" text:min-label-width="0.1965in" text:list-level-position-and-space-mode="label-alignment">
          <style:list-level-label-alignment text:label-followed-by="listtab" fo:margin-left="0.7875in" fo:text-indent="-0.1965in"/>
        </style:list-level-properties>
        <style:text-properties style:font-name="StarSymbol"/>
      </text:list-level-style-bullet>
      <text:list-level-style-bullet text:level="5" text:style-name="WW_CharLFO5LVL5" text:bullet-char="•">
        <style:list-level-properties text:space-before="0.7875in" text:min-label-width="0.1965in" text:list-level-position-and-space-mode="label-alignment">
          <style:list-level-label-alignment text:label-followed-by="listtab" fo:margin-left="0.984in" fo:text-indent="-0.1965in"/>
        </style:list-level-properties>
        <style:text-properties style:font-name="StarSymbol"/>
      </text:list-level-style-bullet>
      <text:list-level-style-bullet text:level="6" text:style-name="WW_CharLFO5LVL6" text:bullet-char="•">
        <style:list-level-properties text:space-before="0.9847in" text:min-label-width="0.1965in" text:list-level-position-and-space-mode="label-alignment">
          <style:list-level-label-alignment text:label-followed-by="listtab" fo:margin-left="1.1812in" fo:text-indent="-0.1965in"/>
        </style:list-level-properties>
        <style:text-properties style:font-name="StarSymbol"/>
      </text:list-level-style-bullet>
      <text:list-level-style-bullet text:level="7" text:style-name="WW_CharLFO5LVL7" text:bullet-char="•">
        <style:list-level-properties text:space-before="1.1812in" text:min-label-width="0.1965in" text:list-level-position-and-space-mode="label-alignment">
          <style:list-level-label-alignment text:label-followed-by="listtab" fo:margin-left="1.3777in" fo:text-indent="-0.1965in"/>
        </style:list-level-properties>
        <style:text-properties style:font-name="StarSymbol"/>
      </text:list-level-style-bullet>
      <text:list-level-style-bullet text:level="8" text:style-name="WW_CharLFO5LVL8" text:bullet-char="•">
        <style:list-level-properties text:space-before="1.3784in" text:min-label-width="0.1965in" text:list-level-position-and-space-mode="label-alignment">
          <style:list-level-label-alignment text:label-followed-by="listtab" fo:margin-left="1.575in" fo:text-indent="-0.1965in"/>
        </style:list-level-properties>
        <style:text-properties style:font-name="StarSymbol"/>
      </text:list-level-style-bullet>
      <text:list-level-style-bullet text:level="9" text:style-name="WW_CharLFO5LVL9" text:bullet-char="•">
        <style:list-level-properties text:space-before="1.575in" text:min-label-width="0.1965in" text:list-level-position-and-space-mode="label-alignment">
          <style:list-level-label-alignment text:label-followed-by="listtab" fo:margin-left="1.7715in" fo:text-indent="-0.1965in"/>
        </style:list-level-properties>
        <style:text-properties style:font-name="StarSymbol"/>
      </text:list-level-style-bullet>
    </text:list-style>
    <text:list-style style:name="SBCnumberlistnumbered" style:display-name="SBC:number:list:numbered">
      <text:list-level-style-number text:level="1" style:num-suffix="." style:num-format="1">
        <style:list-level-properties text:space-before="0.4923in" text:min-label-width="0.2951in" text:list-level-position-and-space-mode="label-alignment">
          <style:list-level-label-alignment text:label-followed-by="listtab" fo:margin-left="0.7875in" fo:text-indent="-0.2951in"/>
        </style:list-level-properties>
      </text:list-level-style-number>
      <text:list-level-style-number text:level="2" style:num-suffix="." style:num-format="1">
        <style:list-level-properties text:space-before="1.2798in" text:min-label-width="0.2951in" text:list-level-position-and-space-mode="label-alignment">
          <style:list-level-label-alignment text:label-followed-by="listtab" fo:margin-left="1.575in" fo:text-indent="-0.2951in"/>
        </style:list-level-properties>
      </text:list-level-style-number>
      <text:list-level-style-number text:level="3" style:num-suffix="." style:num-format="1">
        <style:list-level-properties text:space-before="2.0673in" text:min-label-width="0.2951in" text:list-level-position-and-space-mode="label-alignment">
          <style:list-level-label-alignment text:label-followed-by="listtab" fo:margin-left="2.3625in" fo:text-indent="-0.2951in"/>
        </style:list-level-properties>
      </text:list-level-style-number>
      <text:list-level-style-number text:level="4" style:num-suffix="." style:num-format="1">
        <style:list-level-properties text:space-before="2.8548in" text:min-label-width="0.2951in" text:list-level-position-and-space-mode="label-alignment">
          <style:list-level-label-alignment text:label-followed-by="listtab" fo:margin-left="3.15in" fo:text-indent="-0.2951in"/>
        </style:list-level-properties>
      </text:list-level-style-number>
      <text:list-level-style-number text:level="5" style:num-suffix="." style:num-format="1">
        <style:list-level-properties text:space-before="3.6423in" text:min-label-width="0.2951in" text:list-level-position-and-space-mode="label-alignment">
          <style:list-level-label-alignment text:label-followed-by="listtab" fo:margin-left="3.9375in" fo:text-indent="-0.2951in"/>
        </style:list-level-properties>
      </text:list-level-style-number>
      <text:list-level-style-number text:level="6" style:num-suffix="." style:num-format="1">
        <style:list-level-properties text:space-before="4.4298in" text:min-label-width="0.2951in" text:list-level-position-and-space-mode="label-alignment">
          <style:list-level-label-alignment text:label-followed-by="listtab" fo:margin-left="4.725in" fo:text-indent="-0.2951in"/>
        </style:list-level-properties>
      </text:list-level-style-number>
      <text:list-level-style-number text:level="7" style:num-suffix="." style:num-format="1">
        <style:list-level-properties text:space-before="5.2173in" text:min-label-width="0.2951in" text:list-level-position-and-space-mode="label-alignment">
          <style:list-level-label-alignment text:label-followed-by="listtab" fo:margin-left="5.5125in" fo:text-indent="-0.2951in"/>
        </style:list-level-properties>
      </text:list-level-style-number>
      <text:list-level-style-number text:level="8" style:num-suffix="." style:num-format="1">
        <style:list-level-properties text:space-before="6.0048in" text:min-label-width="0.2951in" text:list-level-position-and-space-mode="label-alignment">
          <style:list-level-label-alignment text:label-followed-by="listtab" fo:margin-left="6.3in" fo:text-indent="-0.2951in"/>
        </style:list-level-properties>
      </text:list-level-style-number>
      <text:list-level-style-number text:level="9" style:num-suffix="." style:num-format="1">
        <style:list-level-properties text:space-before="6.7923in" text:min-label-width="0.2951in" text:list-level-position-and-space-mode="label-alignment">
          <style:list-level-label-alignment text:label-followed-by="listtab" fo:margin-left="7.0875in" fo:text-indent="-0.2951in"/>
        </style:list-level-properties>
      </text:list-level-style-number>
    </text:list-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1" text:start-numbering-at="document" text:footnotes-position="document"/>
    <text:outline-style style:name="WW_OutlineListStyle_3">
      <text:outline-level-style text:level="1" style:num-format=""/>
      <text:outline-level-style text:level="2" style:num-format=""/>
      <text:outline-level-style text:level="3" style:num-suffix="." style:num-format="1" text:display-levels="3">
        <style:list-level-properties text:space-before="0in" text:min-label-width="0.4923in" text:list-level-position-and-space-mode="label-alignment">
          <style:list-level-label-alignment text:label-followed-by="listtab" fo:margin-left="0.4923in" fo:text-indent="-0.4923in"/>
        </style:list-level-properties>
      </text:outline-level-style>
      <text:outline-level-style text:level="4" style:num-suffix="."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suffix="."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suffix="."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suffix="."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suffix="."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7">
      <text:list-level-style-number text:level="1" style:num-prefix="["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format="a" style:num-letter-sync="true">
        <style:list-level-properties text:space-before="0.7958in" text:min-label-width="0.25in" text:list-level-position-and-space-mode="label-alignment">
          <style:list-level-label-alignment text:label-followed-by="listtab" fo:margin-left="1.0458in" fo:text-indent="-0.25in"/>
        </style:list-level-properties>
      </text:list-level-style-number>
      <text:list-level-style-number text:level="3" style:num-suffix="." style:num-format="i">
        <style:list-level-properties fo:text-align="end" text:space-before="1.4208in" text:min-label-width="0.125in" text:list-level-position-and-space-mode="label-alignment">
          <style:list-level-label-alignment text:label-followed-by="listtab" fo:margin-left="1.5458in" fo:text-indent="-0.125in"/>
        </style:list-level-properties>
      </text:list-level-style-number>
      <text:list-level-style-number text:level="4" style:num-suffix="." style:num-format="1">
        <style:list-level-properties text:space-before="1.7958in" text:min-label-width="0.25in" text:list-level-position-and-space-mode="label-alignment">
          <style:list-level-label-alignment text:label-followed-by="listtab" fo:margin-left="2.0458in" fo:text-indent="-0.25in"/>
        </style:list-level-properties>
      </text:list-level-style-number>
      <text:list-level-style-number text:level="5" style:num-suffix="." style:num-format="a" style:num-letter-sync="true">
        <style:list-level-properties text:space-before="2.2958in" text:min-label-width="0.25in" text:list-level-position-and-space-mode="label-alignment">
          <style:list-level-label-alignment text:label-followed-by="listtab" fo:margin-left="2.5458in" fo:text-indent="-0.25in"/>
        </style:list-level-properties>
      </text:list-level-style-number>
      <text:list-level-style-number text:level="6" style:num-suffix="." style:num-format="i">
        <style:list-level-properties fo:text-align="end" text:space-before="2.9208in" text:min-label-width="0.125in" text:list-level-position-and-space-mode="label-alignment">
          <style:list-level-label-alignment text:label-followed-by="listtab" fo:margin-left="3.0458in" fo:text-indent="-0.125in"/>
        </style:list-level-properties>
      </text:list-level-style-number>
      <text:list-level-style-number text:level="7" style:num-suffix="." style:num-format="1">
        <style:list-level-properties text:space-before="3.2958in" text:min-label-width="0.25in" text:list-level-position-and-space-mode="label-alignment">
          <style:list-level-label-alignment text:label-followed-by="listtab" fo:margin-left="3.5458in" fo:text-indent="-0.25in"/>
        </style:list-level-properties>
      </text:list-level-style-number>
      <text:list-level-style-number text:level="8" style:num-suffix="." style:num-format="a" style:num-letter-sync="true">
        <style:list-level-properties text:space-before="3.7958in" text:min-label-width="0.25in" text:list-level-position-and-space-mode="label-alignment">
          <style:list-level-label-alignment text:label-followed-by="listtab" fo:margin-left="4.0458in" fo:text-indent="-0.25in"/>
        </style:list-level-properties>
      </text:list-level-style-number>
      <text:list-level-style-number text:level="9" style:num-suffix="." style:num-format="i">
        <style:list-level-properties fo:text-align="end" text:space-before="4.4208in" text:min-label-width="0.125in" text:list-level-position-and-space-mode="label-alignment">
          <style:list-level-label-alignment text:label-followed-by="listtab" fo:margin-left="4.5458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3777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Gustavo Borges</meta:initial-creator>
    <dc:creator>Gustavo Borges</dc:creator>
    <meta:creation-date>2023-10-27T01:49:00Z</meta:creation-date>
    <dc:date>2023-10-27T02:11:00Z</dc:date>
    <meta:template xlink:href="Normal" xlink:type="simple"/>
    <meta:editing-cycles>3</meta:editing-cycles>
    <meta:editing-duration>PT1440S</meta:editing-duration>
    <meta:user-defined meta:name="Info 1"/>
    <meta:user-defined meta:name="Info 2"/>
    <meta:user-defined meta:name="Info 3"/>
    <meta:user-defined meta:name="Info 4"/>
    <meta:document-statistic meta:page-count="8" meta:paragraph-count="44" meta:word-count="3465" meta:character-count="22135" meta:row-count="155" meta:non-whitespace-character-count="18714"/>
  </office:meta>
</office:document-meta>
</file>