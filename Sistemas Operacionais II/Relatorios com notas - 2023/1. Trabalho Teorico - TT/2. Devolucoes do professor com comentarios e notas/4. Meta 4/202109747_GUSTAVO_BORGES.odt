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2">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number text:level="1" text:style-name="WW_CharLFO22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SBCtitle" style:master-page-name="MP0" style:family="paragraph">
      <style:paragraph-properties fo:break-before="page"/>
    </style:style>
    <style:style style:name="T2" style:parent-style-name="Tipodeletrapredefinidodoparágrafo" style:family="text">
      <style:text-properties style:text-position="super 66.6%"/>
    </style:style>
    <style:style style:name="T3" style:parent-style-name="Tipodeletrapredefinidodoparágrafo" style:family="text">
      <style:text-properties style:text-position="super 66.6%"/>
    </style:style>
    <style:style style:name="P4" style:parent-style-name="SBCresumo" style:family="paragraph">
      <style:paragraph-properties fo:margin-left="0in">
        <style:tab-stops/>
      </style:paragraph-properties>
    </style:style>
    <style:style style:name="T5" style:parent-style-name="Tipodeletrapredefinidodoparágrafo" style:family="text">
      <style:text-properties fo:font-weight="bold" style:font-weight-asian="bold" style:font-weight-complex="bold"/>
    </style:style>
    <style:style style:name="P6" style:parent-style-name="SBCtitle1" style:list-style-name="Outline" style:family="paragraph"/>
    <style:style style:name="P7" style:parent-style-name="SBCparagraph" style:family="paragraph">
      <style:paragraph-properties fo:text-indent="0.1972in"/>
    </style:style>
    <style:style style:name="T8" style:parent-style-name="Tipodeletrapredefinidodoparágrafo" style:family="text">
      <style:text-properties fo:color="#0070C0"/>
    </style:style>
    <style:style style:name="P9" style:parent-style-name="SBCparagraph" style:family="paragraph">
      <style:paragraph-properties fo:text-indent="0.1972in"/>
    </style:style>
    <style:style style:name="T10" style:parent-style-name="Tipodeletrapredefinidodoparágrafo" style:family="text">
      <style:text-properties fo:color="#0070C0"/>
    </style:style>
    <style:style style:name="P11" style:parent-style-name="SBCparagraph" style:family="paragraph">
      <style:paragraph-properties fo:text-indent="0.1972in"/>
    </style:style>
    <style:style style:name="T12" style:parent-style-name="Tipodeletrapredefinidodoparágrafo" style:family="text">
      <style:text-properties fo:color="#0070C0"/>
    </style:style>
    <style:style style:name="T13" style:parent-style-name="Tipodeletrapredefinidodoparágrafo" style:family="text">
      <style:text-properties fo:color="#0070C0"/>
    </style:style>
    <style:style style:name="T14" style:parent-style-name="Tipodeletrapredefinidodoparágrafo" style:family="text">
      <style:text-properties fo:color="#0070C0"/>
    </style:style>
    <style:style style:name="T15" style:parent-style-name="Tipodeletrapredefinidodoparágrafo" style:family="text">
      <style:text-properties fo:color="#0070C0"/>
    </style:style>
    <style:style style:name="T16" style:parent-style-name="Tipodeletrapredefinidodoparágrafo" style:family="text">
      <style:text-properties fo:color="#0070C0"/>
    </style:style>
    <style:style style:name="P17" style:parent-style-name="SBCparagraph" style:family="paragraph">
      <style:paragraph-properties fo:text-indent="0.1972in"/>
    </style:style>
    <style:style style:name="P18" style:parent-style-name="SBCparagraph" style:family="paragraph">
      <style:paragraph-properties fo:text-indent="0.1972in"/>
    </style:style>
    <style:style style:name="T19" style:parent-style-name="Tipodeletrapredefinidodoparágrafo" style:family="text">
      <style:text-properties fo:color="#0070C0"/>
    </style:style>
    <style:style style:name="P20" style:parent-style-name="SBCparagraph" style:family="paragraph">
      <style:paragraph-properties fo:text-indent="0.1972in"/>
    </style:style>
    <style:style style:name="P21" style:parent-style-name="SBCparagraph" style:family="paragraph">
      <style:paragraph-properties fo:text-indent="0.1972in"/>
    </style:style>
    <style:style style:name="T22" style:parent-style-name="Tipodeletrapredefinidodoparágrafo" style:family="text">
      <style:text-properties fo:color="#0070C0"/>
    </style:style>
    <style:style style:name="P23" style:parent-style-name="SBCparagraph" style:family="paragraph">
      <style:paragraph-properties fo:text-indent="0.1972in"/>
    </style:style>
    <style:style style:name="T24" style:parent-style-name="Tipodeletrapredefinidodoparágrafo" style:family="text">
      <style:text-properties fo:color="#0070C0"/>
    </style:style>
    <style:style style:name="T25" style:parent-style-name="Tipodeletrapredefinidodoparágrafo" style:family="text">
      <style:text-properties fo:color="#0070C0"/>
    </style:style>
    <style:style style:name="T26" style:parent-style-name="Tipodeletrapredefinidodoparágrafo" style:family="text">
      <style:text-properties fo:color="#0070C0"/>
    </style:style>
    <style:style style:name="T27" style:parent-style-name="Tipodeletrapredefinidodoparágrafo" style:family="text">
      <style:text-properties fo:color="#0070C0"/>
    </style:style>
    <style:style style:name="T28" style:parent-style-name="Tipodeletrapredefinidodoparágrafo" style:family="text">
      <style:text-properties fo:color="#0070C0"/>
    </style:style>
    <style:style style:name="P29" style:parent-style-name="SBCparagraph" style:family="paragraph">
      <style:paragraph-properties fo:text-indent="0.1972in"/>
    </style:style>
    <style:style style:name="T30" style:parent-style-name="Tipodeletrapredefinidodoparágrafo" style:family="text">
      <style:text-properties style:font-name="Calibri"/>
    </style:style>
    <style:style style:name="T31" style:parent-style-name="Tipodeletrapredefinidodoparágrafo" style:family="text">
      <style:text-properties fo:color="#0070C0"/>
    </style:style>
    <style:style style:name="T32" style:parent-style-name="Tipodeletrapredefinidodoparágrafo" style:family="text">
      <style:text-properties fo:color="#0070C0"/>
    </style:style>
    <style:style style:name="T33" style:parent-style-name="Tipodeletrapredefinidodoparágrafo" style:family="text">
      <style:text-properties fo:color="#0070C0"/>
    </style:style>
    <style:style style:name="T34" style:parent-style-name="Tipodeletrapredefinidodoparágrafo" style:family="text">
      <style:text-properties fo:color="#0070C0"/>
    </style:style>
    <style:style style:name="T35" style:parent-style-name="Tipodeletrapredefinidodoparágrafo" style:family="text">
      <style:text-properties fo:color="#0070C0"/>
    </style:style>
    <style:style style:name="T36" style:parent-style-name="Tipodeletrapredefinidodoparágrafo" style:family="text">
      <style:text-properties fo:color="#0070C0"/>
    </style:style>
    <style:style style:name="T37" style:parent-style-name="Tipodeletrapredefinidodoparágrafo" style:family="text">
      <style:text-properties fo:color="#0070C0"/>
    </style:style>
    <style:style style:name="P38" style:parent-style-name="SBCparagraph" style:family="paragraph">
      <style:paragraph-properties fo:text-indent="0.1972in"/>
    </style:style>
    <style:style style:name="P39" style:parent-style-name="SBCtitle1" style:list-style-name="Outline" style:family="paragraph"/>
    <style:style style:name="P40" style:parent-style-name="SBCparagraphfirst" style:family="paragraph">
      <style:paragraph-properties fo:text-indent="0.1972in"/>
    </style:style>
    <style:style style:name="P41" style:parent-style-name="SBCparagraph" style:family="paragraph">
      <style:paragraph-properties fo:text-indent="0.1972in"/>
    </style:style>
    <style:style style:name="T42" style:parent-style-name="Tipodeletrapredefinidodoparágrafo" style:family="text">
      <style:text-properties fo:color="#4472C4"/>
    </style:style>
    <style:style style:name="P43" style:parent-style-name="SBCparagraph" style:family="paragraph">
      <style:paragraph-properties fo:text-indent="0.1972in"/>
    </style:style>
    <style:style style:name="P44" style:parent-style-name="SBCtitle1" style:list-style-name="Outline" style:family="paragraph"/>
    <style:style style:name="P45" style:parent-style-name="SBCparagraph" style:family="paragraph">
      <style:paragraph-properties fo:text-indent="0.1972in"/>
    </style:style>
    <style:style style:name="P46" style:parent-style-name="SBCparagraph" style:family="paragraph">
      <style:paragraph-properties fo:text-indent="0.1972in"/>
    </style:style>
    <style:style style:name="T47" style:parent-style-name="Tipodeletrapredefinidodoparágrafo" style:family="text">
      <style:text-properties fo:color="#4472C4"/>
    </style:style>
    <style:style style:name="P48" style:parent-style-name="SBCparagraph" style:family="paragraph">
      <style:paragraph-properties fo:text-indent="0.1972in"/>
    </style:style>
    <style:style style:name="P49" style:parent-style-name="SBCparagraph" style:family="paragraph">
      <style:paragraph-properties fo:text-indent="0.1972in"/>
    </style:style>
    <style:style style:name="T50" style:parent-style-name="Tipodeletrapredefinidodoparágrafo" style:family="text">
      <style:text-properties style:font-name="Calibri"/>
    </style:style>
    <style:style style:name="T51" style:parent-style-name="Tipodeletrapredefinidodoparágrafo" style:family="text">
      <style:text-properties fo:color="#4472C4"/>
    </style:style>
    <style:style style:name="P52" style:parent-style-name="SBCparagraph" style:family="paragraph">
      <style:paragraph-properties fo:text-indent="0.1972in"/>
    </style:style>
    <style:style style:name="P53" style:parent-style-name="SBCtitle1" style:list-style-name="Outline" style:family="paragraph"/>
    <style:style style:name="P54" style:parent-style-name="SBCparagraph" style:family="paragraph">
      <style:paragraph-properties fo:text-indent="0.1972in"/>
    </style:style>
    <style:style style:name="T55" style:parent-style-name="Tipodeletrapredefinidodoparágrafo" style:family="text">
      <style:text-properties fo:color="#4472C4"/>
    </style:style>
    <style:style style:name="T56" style:parent-style-name="Tipodeletrapredefinidodoparágrafo" style:family="text">
      <style:text-properties style:font-name="Calibri" fo:color="#4472C4"/>
    </style:style>
    <style:style style:name="T57" style:parent-style-name="Tipodeletrapredefinidodoparágrafo" style:family="text">
      <style:text-properties style:font-name="Calibri" fo:color="#4472C4"/>
    </style:style>
    <style:style style:name="P58" style:parent-style-name="SBCtitle2" style:list-style-name="Outline" style:family="paragraph"/>
    <style:style style:name="P59" style:parent-style-name="SBCparagraphfirst" style:family="paragraph">
      <style:paragraph-properties fo:text-indent="0.1972in"/>
    </style:style>
    <style:style style:name="T60" style:parent-style-name="Tipodeletrapredefinidodoparágrafo" style:family="text">
      <style:text-properties fo:color="#4472C4"/>
    </style:style>
    <style:style style:name="T61" style:parent-style-name="Tipodeletrapredefinidodoparágrafo" style:family="text">
      <style:text-properties style:font-name="Calibri" fo:color="#4472C4"/>
    </style:style>
    <style:style style:name="T62" style:parent-style-name="Tipodeletrapredefinidodoparágrafo" style:family="text">
      <style:text-properties style:font-name="Calibri" fo:color="#4472C4"/>
    </style:style>
    <style:style style:name="P63" style:parent-style-name="SBCparagraph" style:list-style-name="LFO12" style:family="paragraph">
      <style:paragraph-properties fo:margin-left="0.4923in" fo:text-indent="-0.1965in">
        <style:tab-stops/>
      </style:paragraph-properties>
    </style:style>
    <style:style style:name="P64" style:parent-style-name="SBCparagraph" style:list-style-name="LFO12" style:family="paragraph">
      <style:paragraph-properties fo:margin-left="0.4923in" fo:text-indent="-0.1965in">
        <style:tab-stops/>
      </style:paragraph-properties>
    </style:style>
    <style:style style:name="P65" style:parent-style-name="SBCparagraph" style:list-style-name="LFO12" style:family="paragraph">
      <style:paragraph-properties fo:margin-left="0.4923in" fo:text-indent="-0.1965in">
        <style:tab-stops/>
      </style:paragraph-properties>
    </style:style>
    <style:style style:name="P66" style:parent-style-name="SBCparagraph" style:list-style-name="LFO12" style:family="paragraph">
      <style:paragraph-properties fo:margin-left="0.4923in" fo:text-indent="-0.1965in">
        <style:tab-stops/>
      </style:paragraph-properties>
    </style:style>
    <style:style style:name="P67" style:parent-style-name="SBCparagraph" style:family="paragraph">
      <style:paragraph-properties fo:text-align="center"/>
    </style:style>
    <style:style style:name="T68" style:parent-style-name="Tipodeletrapredefinidodoparágrafo" style:family="text">
      <style:text-properties fo:font-weight="bold" style:font-weight-asian="bold" style:font-weight-complex="bold"/>
    </style:style>
    <style:style style:name="P69" style:parent-style-name="SBCparagraph" style:family="paragraph">
      <style:paragraph-properties fo:text-align="center"/>
      <style:text-properties fo:font-weight="bold" style:font-weight-asian="bold" style:font-weight-complex="bold"/>
    </style:style>
    <style:style style:name="P70" style:parent-style-name="SBCtitle2" style:list-style-name="Outline" style:family="paragraph"/>
    <style:style style:name="P71" style:parent-style-name="SBCparagraphfirst" style:family="paragraph">
      <style:paragraph-properties fo:text-indent="0.1972in"/>
    </style:style>
    <style:style style:name="T72" style:parent-style-name="Tipodeletrapredefinidodoparágrafo" style:family="text">
      <style:text-properties fo:color="#4472C4"/>
    </style:style>
    <style:style style:name="T73" style:parent-style-name="Tipodeletrapredefinidodoparágrafo" style:family="text">
      <style:text-properties style:font-name="Calibri" fo:color="#4472C4"/>
    </style:style>
    <style:style style:name="T74" style:parent-style-name="Tipodeletrapredefinidodoparágrafo" style:family="text">
      <style:text-properties style:font-name="Calibri" fo:color="#4472C4"/>
    </style:style>
    <style:style style:name="P75" style:parent-style-name="SBCtitle2" style:list-style-name="Outline" style:family="paragraph"/>
    <style:style style:name="P76" style:parent-style-name="SBCparagraphfirst" style:family="paragraph">
      <style:paragraph-properties fo:text-indent="0.1972in"/>
    </style:style>
    <style:style style:name="T77" style:parent-style-name="Tipodeletrapredefinidodoparágrafo" style:family="text">
      <style:text-properties fo:color="#4472C4"/>
    </style:style>
    <style:style style:name="T78" style:parent-style-name="Tipodeletrapredefinidodoparágrafo" style:family="text">
      <style:text-properties style:font-name="Calibri" fo:color="#4472C4"/>
    </style:style>
    <style:style style:name="T79" style:parent-style-name="Tipodeletrapredefinidodoparágrafo" style:family="text">
      <style:text-properties style:font-name="Calibri" fo:color="#4472C4"/>
    </style:style>
    <style:style style:name="P80" style:parent-style-name="SBCtitle2" style:list-style-name="Outline" style:family="paragraph"/>
    <style:style style:name="P81" style:parent-style-name="SBCparagraphfirst" style:family="paragraph">
      <style:paragraph-properties fo:text-indent="0.1972in"/>
    </style:style>
    <style:style style:name="T82" style:parent-style-name="Tipodeletrapredefinidodoparágrafo" style:family="text">
      <style:text-properties fo:color="#4472C4"/>
    </style:style>
    <style:style style:name="T83" style:parent-style-name="Tipodeletrapredefinidodoparágrafo" style:family="text">
      <style:text-properties style:font-name="Calibri" fo:color="#4472C4"/>
    </style:style>
    <style:style style:name="T84" style:parent-style-name="Tipodeletrapredefinidodoparágrafo" style:family="text">
      <style:text-properties style:font-name="Calibri" fo:color="#4472C4"/>
    </style:style>
    <style:style style:name="P85" style:parent-style-name="SBCtitle2" style:list-style-name="Outline" style:family="paragraph"/>
    <style:style style:name="P86" style:parent-style-name="SBCparagraphfirst" style:family="paragraph">
      <style:paragraph-properties fo:text-indent="0.1972in"/>
    </style:style>
    <style:style style:name="T87" style:parent-style-name="Tipodeletrapredefinidodoparágrafo" style:family="text">
      <style:text-properties fo:color="#4472C4"/>
    </style:style>
    <style:style style:name="T88" style:parent-style-name="Tipodeletrapredefinidodoparágrafo" style:family="text">
      <style:text-properties style:font-name="Calibri" fo:color="#4472C4"/>
    </style:style>
    <style:style style:name="T89" style:parent-style-name="Tipodeletrapredefinidodoparágrafo" style:family="text">
      <style:text-properties style:font-name="Calibri" fo:color="#4472C4"/>
    </style:style>
    <style:style style:name="P90" style:parent-style-name="SBCparagraph" style:family="paragraph">
      <style:paragraph-properties fo:text-indent="0.1972in"/>
    </style:style>
    <style:style style:name="P91" style:parent-style-name="SBCparagraph" style:family="paragraph">
      <style:paragraph-properties fo:text-indent="0.1972in"/>
    </style:style>
    <style:style style:name="P92" style:parent-style-name="Normal" style:family="paragraph">
      <style:paragraph-properties fo:text-align="center"/>
      <style:text-properties fo:font-weight="bold" style:font-weight-asian="bold" style:font-weight-complex="bold" fo:color="#000000"/>
    </style:style>
    <style:style style:name="P93" style:parent-style-name="Normal" style:family="paragraph">
      <style:paragraph-properties fo:text-align="center"/>
    </style:style>
    <style:style style:name="T94" style:parent-style-name="Tipodeletrapredefinidodoparágrafo" style:family="text">
      <style:text-properties fo:font-weight="bold" style:font-weight-asian="bold" style:font-weight-complex="bold" fo:color="#000000"/>
    </style:style>
    <style:style style:name="P95" style:parent-style-name="Normal" style:family="paragraph">
      <style:paragraph-properties fo:text-align="center"/>
      <style:text-properties fo:font-weight="bold" style:font-weight-asian="bold" style:font-weight-complex="bold" fo:color="#000000"/>
    </style:style>
    <style:style style:name="P96" style:parent-style-name="Normal" style:family="paragraph">
      <style:paragraph-properties fo:text-align="center"/>
      <style:text-properties fo:font-weight="bold" style:font-weight-asian="bold" style:font-weight-complex="bold" fo:color="#000000"/>
    </style:style>
    <style:style style:name="P97" style:parent-style-name="Normal" style:family="paragraph">
      <style:paragraph-properties fo:text-align="center"/>
      <style:text-properties fo:font-weight="bold" style:font-weight-asian="bold" style:font-weight-complex="bold" fo:color="#000000"/>
    </style:style>
    <style:style style:name="P98" style:parent-style-name="Normal" style:family="paragraph">
      <style:paragraph-properties fo:text-align="center"/>
      <style:text-properties fo:font-weight="bold" style:font-weight-asian="bold" style:font-weight-complex="bold" fo:color="#000000"/>
    </style:style>
    <style:style style:name="P99" style:parent-style-name="Normal" style:family="paragraph">
      <style:text-properties fo:font-weight="bold" style:font-weight-asian="bold" style:font-weight-complex="bold" fo:color="#000000" fo:font-size="11pt" style:font-size-asian="11pt" style:font-size-complex="11pt"/>
    </style:style>
    <style:style style:name="P100" style:parent-style-name="Normal" style:family="paragraph">
      <style:paragraph-properties fo:text-align="center" fo:margin-bottom="0.1666in"/>
      <style:text-properties fo:font-weight="bold" style:font-weight-asian="bold" style:font-weight-complex="bold" fo:color="#000000"/>
    </style:style>
    <style:style style:name="P101" style:parent-style-name="Normal" style:family="paragraph">
      <style:paragraph-properties fo:text-align="center" fo:margin-bottom="0.1666in"/>
      <style:text-properties fo:font-weight="bold" style:font-weight-asian="bold" style:font-weight-complex="bold" fo:color="#000000"/>
    </style:style>
    <style:style style:name="P102" style:parent-style-name="Normal" style:family="paragraph">
      <style:paragraph-properties fo:text-align="center" fo:margin-bottom="0.1666in"/>
      <style:text-properties fo:font-weight="bold" style:font-weight-asian="bold" style:font-weight-complex="bold" fo:color="#000000"/>
    </style:style>
    <style:style style:name="P103"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04"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05" style:parent-style-name="Normal" style:family="paragraph">
      <style:text-properties fo:color="#000000"/>
    </style:style>
    <style:style style:name="P106" style:parent-style-name="Normal" style:family="paragraph">
      <style:text-properties fo:color="#000000"/>
    </style:style>
    <style:style style:name="P107" style:parent-style-name="Normal" style:family="paragraph">
      <style:text-properties fo:color="#000000"/>
    </style:style>
    <style:style style:name="P108"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P109" style:parent-style-name="Normal" style:family="paragraph">
      <style:text-properties fo:color="#000000" fo:font-size="9pt" style:font-size-asian="9pt" style:font-size-complex="9pt"/>
    </style:style>
    <style:style style:name="P110" style:parent-style-name="Normal" style:family="paragraph">
      <style:text-properties fo:color="#000000" fo:font-size="9pt" style:font-size-asian="9pt" style:font-size-complex="9pt"/>
    </style:style>
    <style:style style:name="P111" style:parent-style-name="Normal" style:family="paragraph">
      <style:text-properties fo:color="#000000" fo:font-size="9pt" style:font-size-asian="9pt" style:font-size-complex="9pt"/>
    </style:style>
    <style:style style:name="P112" style:parent-style-name="Normal" style:family="paragraph">
      <style:text-properties fo:color="#000000" fo:font-size="9pt" style:font-size-asian="9pt" style:font-size-complex="9pt"/>
    </style:style>
    <style:style style:name="P113" style:parent-style-name="Normal" style:family="paragraph">
      <style:text-properties fo:color="#000000" fo:font-size="9pt" style:font-size-asian="9pt" style:font-size-complex="9pt"/>
    </style:style>
    <style:style style:name="P114"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115" style:parent-style-name="Normal" style:family="paragraph">
      <style:text-properties fo:color="#000000" fo:font-size="9pt" style:font-size-asian="9pt" style:font-size-complex="9pt" fo:language="en" fo:country="US"/>
    </style:style>
    <style:style style:name="P116" style:parent-style-name="Normal" style:family="paragraph">
      <style:text-properties fo:color="#000000" fo:font-size="9pt" style:font-size-asian="9pt" style:font-size-complex="9pt" fo:language="en" fo:country="US"/>
    </style:style>
    <style:style style:name="P117" style:parent-style-name="Normal" style:family="paragraph">
      <style:text-properties fo:color="#000000" fo:font-size="9pt" style:font-size-asian="9pt" style:font-size-complex="9pt" fo:language="en" fo:country="US"/>
    </style:style>
    <style:style style:name="P118" style:parent-style-name="Normal" style:family="paragraph">
      <style:text-properties fo:color="#000000" fo:font-size="9pt" style:font-size-asian="9pt" style:font-size-complex="9pt" fo:language="en" fo:country="US"/>
    </style:style>
    <style:style style:name="P119" style:parent-style-name="Normal" style:family="paragraph">
      <style:text-properties fo:color="#000000" fo:font-size="9pt" style:font-size-asian="9pt" style:font-size-complex="9pt" fo:language="en" fo:country="US"/>
    </style:style>
    <style:style style:name="P120" style:parent-style-name="Normal" style:family="paragraph">
      <style:text-properties fo:color="#000000" fo:font-size="9pt" style:font-size-asian="9pt" style:font-size-complex="9pt" fo:language="en" fo:country="US"/>
    </style:style>
    <style:style style:name="P121" style:parent-style-name="Normal" style:family="paragraph">
      <style:text-properties fo:color="#000000" fo:font-size="9pt" style:font-size-asian="9pt" style:font-size-complex="9pt" fo:language="en" fo:country="US"/>
    </style:style>
    <style:style style:name="P122" style:parent-style-name="Normal" style:family="paragraph">
      <style:text-properties fo:color="#FFFFFF" fo:font-size="9pt" style:font-size-asian="9pt" style:font-size-complex="9pt"/>
    </style:style>
    <style:style style:name="T123" style:parent-style-name="Tipodeletrapredefinidodoparágrafo" style:family="text">
      <style:text-properties fo:color="#FFFFFF" fo:font-size="9pt" style:font-size-asian="9pt" style:font-size-complex="9pt"/>
    </style:style>
    <style:style style:name="T124" style:parent-style-name="Tipodeletrapredefinidodoparágrafo" style:family="text">
      <style:text-properties fo:color="#FFFFFF" fo:font-size="9pt" style:font-size-asian="9pt" style:font-size-complex="9pt"/>
    </style:style>
    <style:style style:name="P125" style:parent-style-name="Normal" style:family="paragraph">
      <style:text-properties fo:color="#000000" fo:font-size="9pt" style:font-size-asian="9pt" style:font-size-complex="9pt" fo:language="en" fo:country="US"/>
    </style:style>
    <style:style style:name="P126" style:parent-style-name="Normal" style:family="paragraph">
      <style:text-properties fo:color="#000000" fo:font-size="9pt" style:font-size-asian="9pt" style:font-size-complex="9pt" fo:language="en" fo:country="US"/>
    </style:style>
    <style:style style:name="P127" style:parent-style-name="Normal" style:family="paragraph">
      <style:text-properties fo:color="#000000" fo:font-size="9pt" style:font-size-asian="9pt" style:font-size-complex="9pt" fo:language="en" fo:country="US"/>
    </style:style>
    <style:style style:name="P128" style:parent-style-name="Normal" style:family="paragraph">
      <style:text-properties fo:font-weight="bold" style:font-weight-asian="bold" style:font-weight-complex="bold" fo:color="#000000" fo:font-size="9pt" style:font-size-asian="9pt" style:font-size-complex="9pt" fo:language="en" fo:country="US"/>
    </style:style>
    <style:style style:name="P129" style:parent-style-name="SBCparagraph" style:family="paragraph">
      <style:paragraph-properties fo:text-align="center"/>
      <style:text-properties fo:font-weight="bold" style:font-weight-asian="bold" style:font-weight-complex="bold"/>
    </style:style>
    <style:style style:name="P130" style:parent-style-name="SBCparagraph" style:family="paragraph">
      <style:paragraph-properties fo:text-indent="0.1972in"/>
    </style:style>
    <style:style style:name="P131" style:parent-style-name="SBCparagraph" style:family="paragraph">
      <style:paragraph-properties fo:text-indent="0.1972in"/>
    </style:style>
    <style:style style:name="P132" style:parent-style-name="SBCparagraph" style:family="paragraph">
      <style:paragraph-properties fo:text-indent="0.1972in"/>
    </style:style>
    <style:style style:name="P133" style:parent-style-name="SBCparagraph" style:family="paragraph">
      <style:paragraph-properties fo:text-indent="0.1972in"/>
    </style:style>
    <style:style style:name="P134" style:parent-style-name="SBCtitle2" style:list-style-name="Outline" style:family="paragraph"/>
    <style:style style:name="P135" style:parent-style-name="SBCparagraphfirst" style:family="paragraph">
      <style:paragraph-properties fo:text-indent="0.1972in"/>
    </style:style>
    <style:style style:name="T136" style:parent-style-name="Tipodeletrapredefinidodoparágrafo" style:family="text">
      <style:text-properties fo:color="#4472C4"/>
    </style:style>
    <style:style style:name="T137" style:parent-style-name="Tipodeletrapredefinidodoparágrafo" style:family="text">
      <style:text-properties style:font-name="Calibri" fo:color="#4472C4"/>
    </style:style>
    <style:style style:name="T138" style:parent-style-name="Tipodeletrapredefinidodoparágrafo" style:family="text">
      <style:text-properties style:font-name="Calibri" fo:color="#4472C4"/>
    </style:style>
    <style:style style:name="P139" style:parent-style-name="SBCparagraph" style:family="paragraph">
      <style:paragraph-properties fo:text-align="center"/>
    </style:style>
    <style:style style:name="T140" style:parent-style-name="Tipodeletrapredefinidodoparágrafo" style:family="text">
      <style:text-properties fo:font-weight="bold" style:font-weight-asian="bold" style:font-weight-complex="bold"/>
    </style:style>
    <style:style style:name="P141" style:parent-style-name="SBCparagraphfirst" style:family="paragraph">
      <style:paragraph-properties fo:text-align="center" fo:text-indent="0.1972in"/>
    </style:style>
    <style:style style:name="P142" style:parent-style-name="SBCtitle2" style:list-style-name="Outline" style:family="paragraph"/>
    <style:style style:name="P143" style:parent-style-name="SBCparagraphfirst" style:family="paragraph">
      <style:paragraph-properties fo:text-indent="0.1972in"/>
    </style:style>
    <style:style style:name="T144" style:parent-style-name="Tipodeletrapredefinidodoparágrafo" style:family="text">
      <style:text-properties fo:color="#4472C4"/>
    </style:style>
    <style:style style:name="T145" style:parent-style-name="Tipodeletrapredefinidodoparágrafo" style:family="text">
      <style:text-properties style:font-name="Calibri" fo:color="#4472C4"/>
    </style:style>
    <style:style style:name="T146" style:parent-style-name="Tipodeletrapredefinidodoparágrafo" style:family="text">
      <style:text-properties style:font-name="Calibri" fo:color="#4472C4"/>
    </style:style>
    <style:style style:name="P147" style:parent-style-name="SBCparagraph" style:list-style-name="LFO13" style:family="paragraph">
      <style:text-properties style:font-name="Calibri"/>
    </style:style>
    <style:style style:name="P148" style:parent-style-name="SBCparagraph" style:list-style-name="LFO13" style:family="paragraph">
      <style:text-properties style:font-name="Calibri"/>
    </style:style>
    <style:style style:name="P149" style:parent-style-name="SBCparagraph" style:list-style-name="LFO13" style:family="paragraph">
      <style:text-properties style:font-name="Calibri"/>
    </style:style>
    <style:style style:name="P150" style:parent-style-name="SBCparagraph" style:list-style-name="LFO13" style:family="paragraph">
      <style:text-properties style:font-name="Calibri"/>
    </style:style>
    <style:style style:name="P151" style:parent-style-name="SBCparagraph" style:list-style-name="LFO13" style:family="paragraph">
      <style:text-properties style:font-name="Calibri"/>
    </style:style>
    <style:style style:name="P152" style:parent-style-name="SBCparagraph" style:list-style-name="LFO13" style:family="paragraph">
      <style:text-properties style:font-name="Calibri"/>
    </style:style>
    <style:style style:name="P153" style:parent-style-name="SBCparagraph" style:list-style-name="LFO13" style:family="paragraph">
      <style:text-properties style:font-name="Calibri"/>
    </style:style>
    <style:style style:name="P154" style:parent-style-name="SBCparagraph" style:list-style-name="LFO13" style:family="paragraph">
      <style:text-properties style:font-name="Calibri"/>
    </style:style>
    <style:style style:name="P155" style:parent-style-name="SBCparagraph" style:list-style-name="LFO13" style:family="paragraph">
      <style:text-properties style:font-name="Calibri"/>
    </style:style>
    <style:style style:name="P156" style:parent-style-name="SBCparagraph" style:list-style-name="LFO13" style:family="paragraph">
      <style:text-properties style:font-name="Calibri"/>
    </style:style>
    <style:style style:name="P157" style:parent-style-name="SBCparagraph" style:list-style-name="LFO13" style:family="paragraph">
      <style:text-properties style:font-name="Calibri"/>
    </style:style>
    <style:style style:name="P158" style:parent-style-name="SBCparagraph" style:list-style-name="LFO13" style:family="paragraph">
      <style:text-properties style:font-name="Calibri"/>
    </style:style>
    <style:style style:name="P159" style:parent-style-name="SBCparagraph" style:list-style-name="LFO13" style:family="paragraph">
      <style:text-properties style:font-name="Calibri"/>
    </style:style>
    <style:style style:name="P160" style:parent-style-name="SBCtitle2" style:list-style-name="Outline" style:family="paragraph"/>
    <style:style style:name="P161" style:parent-style-name="SBCparagraphfirst" style:family="paragraph">
      <style:paragraph-properties fo:text-indent="0.1972in"/>
    </style:style>
    <style:style style:name="T162" style:parent-style-name="Tipodeletrapredefinidodoparágrafo" style:family="text">
      <style:text-properties fo:color="#4472C4"/>
    </style:style>
    <style:style style:name="T163" style:parent-style-name="Tipodeletrapredefinidodoparágrafo" style:family="text">
      <style:text-properties style:font-name="Calibri" fo:color="#4472C4"/>
    </style:style>
    <style:style style:name="T164" style:parent-style-name="Tipodeletrapredefinidodoparágrafo" style:family="text">
      <style:text-properties style:font-name="Calibri" fo:color="#4472C4"/>
    </style:style>
    <style:style style:name="P165" style:parent-style-name="SBCparagraph" style:family="paragraph">
      <style:paragraph-properties fo:text-indent="0.1972in"/>
    </style:style>
    <style:style style:name="P166" style:parent-style-name="SBCparagraph" style:family="paragraph">
      <style:paragraph-properties fo:text-align="center" fo:text-indent="0.1972in"/>
      <style:text-properties fo:font-weight="bold" style:font-weight-asian="bold" style:font-weight-complex="bold"/>
    </style:style>
    <style:style style:name="P167" style:parent-style-name="SBCparagraph" style:family="paragraph">
      <style:paragraph-properties fo:text-indent="0.1972in"/>
    </style:style>
    <style:style style:name="P168" style:parent-style-name="SBCparagraph" style:family="paragraph">
      <style:paragraph-properties fo:text-indent="0.1972in"/>
    </style:style>
    <style:style style:name="P169" style:parent-style-name="SBCparagraph" style:family="paragraph">
      <style:paragraph-properties fo:text-indent="0.1972in"/>
    </style:style>
    <style:style style:name="P170" style:parent-style-name="SBCparagraph" style:family="paragraph">
      <style:paragraph-properties fo:text-indent="0in"/>
    </style:style>
    <style:style style:name="P171" style:parent-style-name="Normal" style:family="paragraph">
      <style:paragraph-properties fo:text-align="center"/>
    </style:style>
    <style:style style:name="P172" style:parent-style-name="Normal" style:family="paragraph">
      <style:paragraph-properties fo:text-align="center"/>
      <style:text-properties fo:color="#000000" fo:font-size="9pt" style:font-size-asian="9pt" style:font-size-complex="9pt"/>
    </style:style>
    <style:style style:name="P173" style:parent-style-name="Normal" style:family="paragraph">
      <style:paragraph-properties fo:text-align="center"/>
      <style:text-properties fo:color="#000000" fo:font-size="9pt" style:font-size-asian="9pt" style:font-size-complex="9pt"/>
    </style:style>
    <style:style style:name="P174" style:parent-style-name="Normal" style:family="paragraph">
      <style:paragraph-properties fo:text-align="center"/>
      <style:text-properties fo:color="#000000" fo:font-size="9pt" style:font-size-asian="9pt" style:font-size-complex="9pt"/>
    </style:style>
    <style:style style:name="P175" style:parent-style-name="Normal" style:family="paragraph">
      <style:paragraph-properties fo:text-align="center"/>
      <style:text-properties fo:color="#000000" fo:font-size="9pt" style:font-size-asian="9pt" style:font-size-complex="9pt"/>
    </style:style>
    <style:style style:name="P176" style:parent-style-name="Normal" style:family="paragraph">
      <style:paragraph-properties fo:text-align="center"/>
      <style:text-properties fo:color="#000000" fo:font-size="9pt" style:font-size-asian="9pt" style:font-size-complex="9pt"/>
    </style:style>
    <style:style style:name="P177" style:parent-style-name="Normal" style:family="paragraph">
      <style:paragraph-properties fo:text-align="center"/>
      <style:text-properties fo:color="#000000" fo:font-size="9pt" style:font-size-asian="9pt" style:font-size-complex="9pt"/>
    </style:style>
    <style:style style:name="P178" style:parent-style-name="Normal" style:family="paragraph">
      <style:paragraph-properties fo:text-align="center"/>
      <style:text-properties fo:color="#000000" fo:font-size="9pt" style:font-size-asian="9pt" style:font-size-complex="9pt"/>
    </style:style>
    <style:style style:name="P179" style:parent-style-name="Normal" style:family="paragraph">
      <style:text-properties fo:color="#000000" fo:font-size="9pt" style:font-size-asian="9pt" style:font-size-complex="9pt"/>
    </style:style>
    <style:style style:name="P180" style:parent-style-name="Normal" style:family="paragraph">
      <style:paragraph-properties fo:text-align="center"/>
    </style:style>
    <style:style style:name="P181" style:parent-style-name="Normal" style:family="paragraph">
      <style:paragraph-properties fo:text-align="center"/>
      <style:text-properties fo:color="#000000" fo:font-size="9pt" style:font-size-asian="9pt" style:font-size-complex="9pt"/>
    </style:style>
    <style:style style:name="P182" style:parent-style-name="Normal" style:family="paragraph">
      <style:paragraph-properties fo:text-align="center"/>
      <style:text-properties fo:color="#000000" fo:font-size="9pt" style:font-size-asian="9pt" style:font-size-complex="9pt"/>
    </style:style>
    <style:style style:name="P183" style:parent-style-name="Normal" style:family="paragraph">
      <style:paragraph-properties fo:text-align="center"/>
      <style:text-properties fo:color="#000000" fo:font-size="9pt" style:font-size-asian="9pt" style:font-size-complex="9pt"/>
    </style:style>
    <style:style style:name="P184" style:parent-style-name="Normal" style:family="paragraph">
      <style:paragraph-properties fo:text-align="center"/>
      <style:text-properties fo:color="#000000" fo:font-size="9pt" style:font-size-asian="9pt" style:font-size-complex="9pt"/>
    </style:style>
    <style:style style:name="P185" style:parent-style-name="Normal" style:family="paragraph">
      <style:paragraph-properties fo:text-align="center"/>
      <style:text-properties fo:color="#000000" fo:font-size="9pt" style:font-size-asian="9pt" style:font-size-complex="9pt"/>
    </style:style>
    <style:style style:name="P186" style:parent-style-name="Normal" style:family="paragraph">
      <style:paragraph-properties fo:text-align="center"/>
      <style:text-properties fo:color="#000000"/>
    </style:style>
    <style:style style:name="P187" style:parent-style-name="Normal" style:family="paragraph">
      <style:text-properties fo:color="#000000" fo:font-size="9pt" style:font-size-asian="9pt" style:font-size-complex="9pt"/>
    </style:style>
    <style:style style:name="P188" style:parent-style-name="Normal" style:family="paragraph">
      <style:text-properties fo:color="#000000" fo:font-size="9pt" style:font-size-asian="9pt" style:font-size-complex="9pt"/>
    </style:style>
    <style:style style:name="P189" style:parent-style-name="Normal" style:family="paragraph">
      <style:paragraph-properties fo:text-align="center"/>
      <style:text-properties fo:color="#000000"/>
    </style:style>
    <style:style style:name="P190" style:parent-style-name="SBCparagraph" style:family="paragraph">
      <style:paragraph-properties fo:text-align="center" fo:text-indent="0.1972in"/>
      <style:text-properties fo:font-weight="bold" style:font-weight-asian="bold" style:font-weight-complex="bold"/>
    </style:style>
    <style:style style:name="P191" style:parent-style-name="SBCparagraph" style:family="paragraph">
      <style:paragraph-properties fo:text-indent="0.1972in"/>
    </style:style>
    <style:style style:name="P192" style:parent-style-name="SBCparagraph" style:family="paragraph">
      <style:paragraph-properties fo:text-indent="0.1972in"/>
    </style:style>
    <style:style style:name="P193" style:parent-style-name="SBCparagraph" style:family="paragraph">
      <style:paragraph-properties fo:text-align="center" fo:text-indent="0.1972in"/>
    </style:style>
    <style:style style:name="T194" style:parent-style-name="Tipodeletrapredefinidodoparágrafo" style:family="text">
      <style:text-properties fo:font-weight="bold" style:font-weight-asian="bold" style:font-weight-complex="bold"/>
    </style:style>
    <style:style style:name="P195" style:parent-style-name="SBCparagraph" style:family="paragraph">
      <style:paragraph-properties fo:text-align="center" fo:text-indent="0.1972in"/>
    </style:style>
    <style:style style:name="P196" style:parent-style-name="SBCtitle2" style:list-style-name="Outline" style:family="paragraph"/>
    <style:style style:name="P197" style:parent-style-name="SBCparagraphfirst" style:family="paragraph">
      <style:paragraph-properties fo:text-indent="0.1972in"/>
    </style:style>
    <style:style style:name="T198" style:parent-style-name="Tipodeletrapredefinidodoparágrafo" style:family="text">
      <style:text-properties fo:color="#4472C4"/>
    </style:style>
    <style:style style:name="T199" style:parent-style-name="Tipodeletrapredefinidodoparágrafo" style:family="text">
      <style:text-properties style:font-name="Calibri" fo:color="#4472C4"/>
    </style:style>
    <style:style style:name="T200" style:parent-style-name="Tipodeletrapredefinidodoparágrafo" style:family="text">
      <style:text-properties style:font-name="Calibri" fo:color="#4472C4"/>
    </style:style>
    <style:style style:name="P201" style:parent-style-name="SBCparagraphfirst" style:family="paragraph">
      <style:paragraph-properties fo:text-indent="0.1972in"/>
    </style:style>
    <style:style style:name="P202" style:parent-style-name="SBCparagraphfirst" style:family="paragraph">
      <style:paragraph-properties fo:text-indent="0.1972in"/>
    </style:style>
    <style:style style:name="P203" style:parent-style-name="SBCtitle2" style:list-style-name="Outline" style:family="paragraph"/>
    <style:style style:name="P204" style:parent-style-name="Normal" style:family="paragraph">
      <style:paragraph-properties fo:margin-top="0.1666in"/>
    </style:style>
    <style:style style:name="T205" style:parent-style-name="Tipodeletrapredefinidodoparágrafo" style:family="text">
      <style:text-properties style:font-name="Times"/>
    </style:style>
    <style:style style:name="T206" style:parent-style-name="Tipodeletrapredefinidodoparágrafo" style:family="text">
      <style:text-properties fo:color="#4472C4"/>
    </style:style>
    <style:style style:name="T207" style:parent-style-name="Tipodeletrapredefinidodoparágrafo" style:family="text">
      <style:text-properties style:font-name="Calibri" fo:color="#4472C4"/>
    </style:style>
    <style:style style:name="T208" style:parent-style-name="Tipodeletrapredefinidodoparágrafo" style:family="text">
      <style:text-properties style:font-name="Calibri" fo:color="#4472C4"/>
    </style:style>
    <style:style style:name="T209" style:parent-style-name="Tipodeletrapredefinidodoparágrafo" style:family="text">
      <style:text-properties style:font-name="Times"/>
    </style:style>
    <style:style style:name="P210" style:parent-style-name="Normal" style:family="paragraph">
      <style:paragraph-properties fo:margin-top="0.1666in"/>
      <style:text-properties style:font-name="Times"/>
    </style:style>
    <style:style style:name="P211" style:parent-style-name="ParágrafodaLista" style:list-style-name="LFO14" style:family="paragraph">
      <style:paragraph-properties fo:margin-top="0.1666in"/>
      <style:text-properties style:font-name="Times"/>
    </style:style>
    <style:style style:name="P212" style:parent-style-name="ParágrafodaLista" style:list-style-name="LFO14" style:family="paragraph">
      <style:paragraph-properties fo:margin-top="0.1666in"/>
      <style:text-properties style:font-name="Times"/>
    </style:style>
    <style:style style:name="P213" style:parent-style-name="Normal" style:family="paragraph">
      <style:paragraph-properties fo:margin-top="0.1666in"/>
      <style:text-properties style:font-name="Times"/>
    </style:style>
    <style:style style:name="P214" style:parent-style-name="ParágrafodaLista" style:list-style-name="LFO15" style:family="paragraph">
      <style:paragraph-properties fo:margin-top="0.1666in"/>
      <style:text-properties style:font-name="Times"/>
    </style:style>
    <style:style style:name="P215" style:parent-style-name="ParágrafodaLista" style:list-style-name="LFO15" style:family="paragraph">
      <style:paragraph-properties fo:margin-top="0.1666in"/>
    </style:style>
    <style:style style:name="T216" style:parent-style-name="Tipodeletrapredefinidodoparágrafo" style:family="text">
      <style:text-properties style:font-name="Times"/>
    </style:style>
    <style:style style:name="P217" style:parent-style-name="SBCtitle2" style:list-style-name="Outline" style:family="paragraph"/>
    <style:style style:name="P218" style:parent-style-name="Normal" style:family="paragraph">
      <style:paragraph-properties fo:text-align="center"/>
      <style:text-properties fo:color="#000000" fo:font-size="8pt" style:font-size-asian="8pt" style:font-size-complex="8pt"/>
    </style:style>
    <style:style style:name="P219" style:parent-style-name="Normal" style:family="paragraph">
      <style:paragraph-properties fo:text-align="center"/>
      <style:text-properties fo:color="#FFFFFF" fo:font-size="5pt" style:font-size-asian="5pt" style:font-size-complex="5pt"/>
    </style:style>
    <style:style style:name="P220" style:parent-style-name="Normal" style:family="paragraph">
      <style:paragraph-properties fo:text-align="center"/>
      <style:text-properties fo:color="#000000" fo:font-size="5pt" style:font-size-asian="5pt" style:font-size-complex="5pt"/>
    </style:style>
    <style:style style:name="P221" style:parent-style-name="Normal" style:family="paragraph">
      <style:paragraph-properties fo:text-align="center"/>
      <style:text-properties fo:color="#ED7D31" fo:font-size="7pt" style:font-size-asian="7pt" style:font-size-complex="7pt"/>
    </style:style>
    <style:style style:name="P222" style:parent-style-name="Normal" style:family="paragraph">
      <style:paragraph-properties fo:text-align="center"/>
      <style:text-properties fo:color="#FFFFFF" fo:font-size="5pt" style:font-size-asian="5pt" style:font-size-complex="5pt"/>
    </style:style>
    <style:style style:name="P223" style:parent-style-name="Normal" style:family="paragraph">
      <style:paragraph-properties fo:text-align="center"/>
      <style:text-properties fo:color="#FFFFFF" fo:font-size="5pt" style:font-size-asian="5pt" style:font-size-complex="5pt"/>
    </style:style>
    <style:style style:name="P224" style:parent-style-name="Normal" style:family="paragraph">
      <style:paragraph-properties fo:text-align="center"/>
      <style:text-properties fo:color="#000000" fo:font-size="7pt" style:font-size-asian="7pt" style:font-size-complex="7pt"/>
    </style:style>
    <style:style style:name="P225" style:parent-style-name="Normal" style:family="paragraph">
      <style:paragraph-properties fo:text-align="center"/>
      <style:text-properties fo:color="#000000"/>
    </style:style>
    <style:style style:name="P226" style:parent-style-name="Normal" style:family="paragraph">
      <style:paragraph-properties fo:text-align="center"/>
      <style:text-properties fo:color="#000000" fo:font-size="10pt" style:font-size-asian="10pt" style:font-size-complex="10pt"/>
    </style:style>
    <style:style style:name="P227" style:parent-style-name="Normal" style:family="paragraph">
      <style:paragraph-properties fo:text-align="center"/>
      <style:text-properties fo:color="#E7E6E6" fo:font-size="6pt" style:font-size-asian="6pt" style:font-size-complex="6pt"/>
    </style:style>
    <style:style style:name="P228" style:parent-style-name="Normal" style:family="paragraph">
      <style:paragraph-properties fo:text-align="center"/>
      <style:text-properties fo:color="#7030A0" fo:font-size="7pt" style:font-size-asian="7pt" style:font-size-complex="7pt"/>
    </style:style>
    <style:style style:name="P229" style:parent-style-name="Normal" style:family="paragraph">
      <style:paragraph-properties fo:text-align="center"/>
      <style:text-properties fo:color="#FFC000" fo:font-size="7pt" style:font-size-asian="7pt" style:font-size-complex="7pt"/>
    </style:style>
    <style:style style:name="P230" style:parent-style-name="Normal" style:family="paragraph">
      <style:paragraph-properties fo:text-align="center"/>
      <style:text-properties fo:color="#000000"/>
    </style:style>
    <style:style style:name="P231" style:parent-style-name="Normal" style:family="paragraph">
      <style:paragraph-properties fo:text-align="center"/>
      <style:text-properties fo:color="#E7E6E6" fo:font-size="7pt" style:font-size-asian="7pt" style:font-size-complex="7pt"/>
    </style:style>
    <style:style style:name="P232" style:parent-style-name="Normal" style:family="paragraph">
      <style:paragraph-properties fo:text-align="justify"/>
      <style:text-properties fo:color="#000000" fo:font-size="8pt" style:font-size-asian="8pt" style:font-size-complex="8pt"/>
    </style:style>
    <style:style style:name="P233" style:parent-style-name="ParágrafodaLista" style:list-style-name="LFO16" style:family="paragraph">
      <style:paragraph-properties fo:text-align="justify"/>
      <style:text-properties fo:color="#000000" fo:font-size="8pt" style:font-size-asian="8pt" style:font-size-complex="8pt"/>
    </style:style>
    <style:style style:name="P234" style:parent-style-name="ParágrafodaLista" style:list-style-name="LFO16" style:family="paragraph">
      <style:paragraph-properties fo:text-align="justify"/>
      <style:text-properties fo:color="#000000" fo:font-size="8pt" style:font-size-asian="8pt" style:font-size-complex="8pt"/>
    </style:style>
    <style:style style:name="P235" style:parent-style-name="ParágrafodaLista" style:list-style-name="LFO16" style:family="paragraph">
      <style:paragraph-properties fo:text-align="justify"/>
      <style:text-properties fo:color="#000000" fo:font-size="8pt" style:font-size-asian="8pt" style:font-size-complex="8pt"/>
    </style:style>
    <style:style style:name="P236" style:parent-style-name="Normal" style:family="paragraph">
      <style:paragraph-properties fo:text-align="justify"/>
      <style:text-properties fo:color="#000000" fo:font-size="8pt" style:font-size-asian="8pt" style:font-size-complex="8pt"/>
    </style:style>
    <style:style style:name="P237" style:parent-style-name="Normal" style:family="paragraph">
      <style:paragraph-properties fo:text-align="justify"/>
      <style:text-properties fo:color="#000000" fo:font-size="8pt" style:font-size-asian="8pt" style:font-size-complex="8pt"/>
    </style:style>
    <style:style style:name="P238" style:parent-style-name="ParágrafodaLista" style:list-style-name="LFO17" style:family="paragraph">
      <style:paragraph-properties fo:text-align="justify"/>
      <style:text-properties fo:color="#000000" fo:font-size="8pt" style:font-size-asian="8pt" style:font-size-complex="8pt"/>
    </style:style>
    <style:style style:name="P239" style:parent-style-name="ParágrafodaLista" style:list-style-name="LFO17" style:family="paragraph">
      <style:paragraph-properties fo:text-align="justify"/>
      <style:text-properties fo:color="#000000" fo:font-size="8pt" style:font-size-asian="8pt" style:font-size-complex="8pt"/>
    </style:style>
    <style:style style:name="P240" style:parent-style-name="ParágrafodaLista" style:list-style-name="LFO17" style:family="paragraph">
      <style:paragraph-properties fo:text-align="justify"/>
      <style:text-properties fo:color="#000000" fo:font-size="8pt" style:font-size-asian="8pt" style:font-size-complex="8pt"/>
    </style:style>
    <style:style style:name="P241" style:parent-style-name="Normal" style:family="paragraph">
      <style:paragraph-properties fo:text-align="justify"/>
      <style:text-properties fo:color="#000000" fo:font-size="8pt" style:font-size-asian="8pt" style:font-size-complex="8pt"/>
    </style:style>
    <style:style style:name="P242" style:parent-style-name="Normal" style:family="paragraph">
      <style:paragraph-properties fo:text-align="justify"/>
      <style:text-properties fo:color="#000000" fo:font-size="8pt" style:font-size-asian="8pt" style:font-size-complex="8pt"/>
    </style:style>
    <style:style style:name="P243" style:parent-style-name="Normal" style:family="paragraph">
      <style:paragraph-properties fo:text-align="center" fo:margin-top="0.1666in"/>
    </style:style>
    <style:style style:name="T244" style:parent-style-name="Tipodeletrapredefinidodoparágrafo" style:family="text">
      <style:text-properties fo:font-weight="bold" style:font-weight-asian="bold" style:font-weight-complex="bold"/>
    </style:style>
    <style:style style:name="P245" style:parent-style-name="SBCtitle2" style:list-style-name="Outline" style:family="paragraph"/>
    <style:style style:name="P246" style:parent-style-name="Normal" style:family="paragraph">
      <style:paragraph-properties fo:text-align="center"/>
      <style:text-properties fo:color="#000000" fo:font-size="8pt" style:font-size-asian="8pt" style:font-size-complex="8pt"/>
    </style:style>
    <style:style style:name="P247" style:parent-style-name="Normal" style:family="paragraph">
      <style:paragraph-properties fo:text-align="center"/>
      <style:text-properties fo:color="#FFFFFF" fo:font-size="5pt" style:font-size-asian="5pt" style:font-size-complex="5pt"/>
    </style:style>
    <style:style style:name="P248" style:parent-style-name="Normal" style:family="paragraph">
      <style:paragraph-properties fo:text-align="center"/>
      <style:text-properties fo:color="#000000" fo:font-size="5pt" style:font-size-asian="5pt" style:font-size-complex="5pt"/>
    </style:style>
    <style:style style:name="P249" style:parent-style-name="Normal" style:family="paragraph">
      <style:paragraph-properties fo:text-align="center"/>
      <style:text-properties fo:color="#FFFFFF" fo:font-size="5pt" style:font-size-asian="5pt" style:font-size-complex="5pt"/>
    </style:style>
    <style:style style:name="P250" style:parent-style-name="Normal" style:family="paragraph">
      <style:paragraph-properties fo:text-align="center"/>
      <style:text-properties fo:color="#FFFFFF" fo:font-size="5pt" style:font-size-asian="5pt" style:font-size-complex="5pt"/>
    </style:style>
    <style:style style:name="P251" style:parent-style-name="Normal" style:family="paragraph">
      <style:paragraph-properties fo:text-align="center"/>
      <style:text-properties fo:color="#000000" fo:font-size="7pt" style:font-size-asian="7pt" style:font-size-complex="7pt"/>
    </style:style>
    <style:style style:name="P252" style:parent-style-name="Normal" style:family="paragraph">
      <style:paragraph-properties fo:text-align="center"/>
      <style:text-properties fo:color="#000000"/>
    </style:style>
    <style:style style:name="P253" style:parent-style-name="Normal" style:family="paragraph">
      <style:paragraph-properties fo:text-align="center"/>
      <style:text-properties fo:color="#000000" fo:font-size="10pt" style:font-size-asian="10pt" style:font-size-complex="10pt"/>
    </style:style>
    <style:style style:name="P254" style:parent-style-name="Normal" style:family="paragraph">
      <style:paragraph-properties fo:text-align="center"/>
      <style:text-properties fo:color="#000000" fo:font-size="6pt" style:font-size-asian="6pt" style:font-size-complex="6pt"/>
    </style:style>
    <style:style style:name="P255" style:parent-style-name="Normal" style:family="paragraph">
      <style:paragraph-properties fo:text-align="center"/>
      <style:text-properties fo:color="#7030A0" fo:font-size="7pt" style:font-size-asian="7pt" style:font-size-complex="7pt"/>
    </style:style>
    <style:style style:name="P256" style:parent-style-name="Normal" style:family="paragraph">
      <style:paragraph-properties fo:text-align="center"/>
      <style:text-properties fo:color="#FFC000" fo:font-size="7pt" style:font-size-asian="7pt" style:font-size-complex="7pt"/>
    </style:style>
    <style:style style:name="P257" style:parent-style-name="Normal" style:family="paragraph">
      <style:paragraph-properties fo:text-align="center"/>
      <style:text-properties fo:color="#000000"/>
    </style:style>
    <style:style style:name="P258" style:parent-style-name="Normal" style:family="paragraph">
      <style:paragraph-properties fo:text-align="center"/>
      <style:text-properties fo:color="#000000" fo:font-size="7pt" style:font-size-asian="7pt" style:font-size-complex="7pt"/>
    </style:style>
    <style:style style:name="P259" style:parent-style-name="Normal" style:family="paragraph">
      <style:paragraph-properties fo:text-align="justify"/>
      <style:text-properties fo:color="#000000" fo:font-size="8pt" style:font-size-asian="8pt" style:font-size-complex="8pt"/>
    </style:style>
    <style:style style:name="P260" style:parent-style-name="ParágrafodaLista" style:list-style-name="LFO18" style:family="paragraph">
      <style:paragraph-properties fo:text-align="justify"/>
      <style:text-properties fo:color="#000000" fo:font-size="8pt" style:font-size-asian="8pt" style:font-size-complex="8pt"/>
    </style:style>
    <style:style style:name="P261" style:parent-style-name="ParágrafodaLista" style:list-style-name="LFO18" style:family="paragraph">
      <style:paragraph-properties fo:text-align="justify"/>
      <style:text-properties fo:color="#000000" fo:font-size="8pt" style:font-size-asian="8pt" style:font-size-complex="8pt"/>
    </style:style>
    <style:style style:name="P262" style:parent-style-name="ParágrafodaLista" style:list-style-name="LFO18" style:family="paragraph">
      <style:paragraph-properties fo:text-align="justify"/>
      <style:text-properties fo:color="#000000" fo:font-size="8pt" style:font-size-asian="8pt" style:font-size-complex="8pt"/>
    </style:style>
    <style:style style:name="P263" style:parent-style-name="ParágrafodaLista" style:list-style-name="LFO18" style:family="paragraph">
      <style:paragraph-properties fo:text-align="justify"/>
      <style:text-properties fo:color="#000000" fo:font-size="8pt" style:font-size-asian="8pt" style:font-size-complex="8pt"/>
    </style:style>
    <style:style style:name="P264" style:parent-style-name="Normal" style:family="paragraph">
      <style:paragraph-properties fo:text-align="justify"/>
      <style:text-properties fo:color="#000000" fo:font-size="8pt" style:font-size-asian="8pt" style:font-size-complex="8pt"/>
    </style:style>
    <style:style style:name="P265" style:parent-style-name="Normal" style:family="paragraph">
      <style:paragraph-properties fo:text-align="justify"/>
      <style:text-properties fo:color="#000000" fo:font-size="8pt" style:font-size-asian="8pt" style:font-size-complex="8pt"/>
    </style:style>
    <style:style style:name="P266" style:parent-style-name="ParágrafodaLista" style:list-style-name="LFO19" style:family="paragraph">
      <style:paragraph-properties fo:text-align="justify"/>
      <style:text-properties fo:color="#000000" fo:font-size="8pt" style:font-size-asian="8pt" style:font-size-complex="8pt"/>
    </style:style>
    <style:style style:name="P267" style:parent-style-name="ParágrafodaLista" style:list-style-name="LFO19" style:family="paragraph">
      <style:paragraph-properties fo:text-align="justify"/>
      <style:text-properties fo:color="#000000" fo:font-size="8pt" style:font-size-asian="8pt" style:font-size-complex="8pt"/>
    </style:style>
    <style:style style:name="P268" style:parent-style-name="ParágrafodaLista" style:list-style-name="LFO19" style:family="paragraph">
      <style:paragraph-properties fo:text-align="justify"/>
      <style:text-properties fo:color="#000000" fo:font-size="8pt" style:font-size-asian="8pt" style:font-size-complex="8pt"/>
    </style:style>
    <style:style style:name="P269" style:parent-style-name="Normal" style:family="paragraph">
      <style:paragraph-properties fo:text-align="justify"/>
      <style:text-properties fo:color="#000000" fo:font-size="8pt" style:font-size-asian="8pt" style:font-size-complex="8pt"/>
    </style:style>
    <style:style style:name="P270" style:parent-style-name="Normal" style:family="paragraph">
      <style:paragraph-properties fo:text-align="center" fo:margin-top="0.1666in"/>
    </style:style>
    <style:style style:name="T271" style:parent-style-name="Tipodeletrapredefinidodoparágrafo" style:family="text">
      <style:text-properties fo:font-weight="bold" style:font-weight-asian="bold" style:font-weight-complex="bold"/>
    </style:style>
    <style:style style:name="P272" style:parent-style-name="SBCtitle1" style:list-style-name="Outline" style:family="paragraph"/>
    <style:style style:name="P273" style:parent-style-name="SBCparagraphfirst" style:family="paragraph">
      <style:paragraph-properties fo:text-indent="0.1972in"/>
    </style:style>
    <style:style style:name="T274" style:parent-style-name="Tipodeletrapredefinidodoparágrafo" style:family="text">
      <style:text-properties fo:font-weight="bold" style:font-weight-asian="bold" style:font-weight-complex="bold"/>
    </style:style>
    <style:style style:name="P275" style:parent-style-name="SBCparagraph" style:family="paragraph">
      <style:paragraph-properties fo:text-indent="0.1972in"/>
    </style:style>
    <style:style style:name="P276" style:parent-style-name="SBCparagraph" style:list-style-name="LFO20" style:family="paragraph"/>
    <style:style style:name="P277" style:parent-style-name="SBCparagraph" style:list-style-name="LFO20" style:family="paragraph"/>
    <style:style style:name="P278" style:parent-style-name="SBCparagraph" style:list-style-name="LFO20" style:family="paragraph"/>
    <style:style style:name="P279" style:parent-style-name="SBCparagraph" style:list-style-name="LFO20" style:family="paragraph"/>
    <style:style style:name="P280" style:parent-style-name="SBCparagraph" style:list-style-name="LFO20" style:family="paragraph"/>
    <style:style style:name="T281" style:parent-style-name="DefaultParagraphFont" style:family="text">
      <style:text-properties fo:font-style="italic" style:font-style-asian="italic" style:font-style-complex="italic"/>
    </style:style>
    <style:style style:name="T282" style:parent-style-name="CommentReference" style:family="text">
      <style:text-properties style:font-name="Bitstream Vera Serif" style:font-name-asian="Bitstream Vera Sans" style:font-name-complex="Lucidasans" style:use-window-font-color="true"/>
    </style:style>
    <style:style style:name="P283" style:parent-style-name="SBCparagraph" style:list-style-name="LFO20" style:family="paragraph"/>
    <style:style style:name="P284" style:parent-style-name="SBCparagraph" style:list-style-name="LFO20" style:family="paragraph"/>
    <style:style style:name="P285" style:parent-style-name="SBCparagraph" style:list-style-name="LFO20" style:family="paragraph"/>
    <style:style style:name="T286" style:parent-style-name="DefaultParagraphFont" style:family="text">
      <style:text-properties fo:font-style="italic" style:font-style-asian="italic" style:font-style-complex="italic"/>
    </style:style>
    <style:style style:name="P287" style:parent-style-name="SBCparagraph" style:list-style-name="LFO20" style:family="paragraph"/>
    <style:style style:name="T288" style:parent-style-name="DefaultParagraphFont" style:family="text">
      <style:text-properties fo:font-style="italic" style:font-style-asian="italic" style:font-style-complex="italic"/>
    </style:style>
    <style:style style:name="P289" style:parent-style-name="SBCparagraph" style:list-style-name="LFO20" style:family="paragraph"/>
    <style:style style:name="P290" style:parent-style-name="SBCparagraph" style:list-style-name="LFO20" style:family="paragraph"/>
    <style:style style:name="P291" style:parent-style-name="SBCparagraph" style:list-style-name="LFO20" style:family="paragraph"/>
    <style:style style:name="P292" style:parent-style-name="SBCparagraph" style:list-style-name="LFO20" style:family="paragraph"/>
    <style:style style:name="P293" style:parent-style-name="SBCparagraph" style:family="paragraph">
      <style:paragraph-properties fo:text-indent="0in"/>
      <style:text-properties fo:font-weight="bold" style:font-weight-asian="bold" style:font-weight-complex="bold"/>
    </style:style>
    <style:style style:name="P294" style:parent-style-name="SBCparagraph" style:family="paragraph">
      <style:paragraph-properties fo:text-indent="0.1972in"/>
    </style:style>
    <style:style style:name="T295" style:parent-style-name="Tipodeletrapredefinidodoparágrafo" style:family="text">
      <style:text-properties fo:color="#4472C4"/>
    </style:style>
    <style:style style:name="P296" style:parent-style-name="SBCparagraph" style:family="paragraph">
      <style:paragraph-properties fo:text-indent="0.1972in"/>
    </style:style>
    <style:style style:name="T297" style:parent-style-name="Tipodeletrapredefinidodoparágrafo" style:family="text">
      <style:text-properties fo:color="#4472C4"/>
    </style:style>
    <style:style style:name="P298" style:parent-style-name="SBCparagraph" style:family="paragraph">
      <style:paragraph-properties fo:text-indent="0.1972in"/>
    </style:style>
    <style:style style:name="T299" style:parent-style-name="Tipodeletrapredefinidodoparágrafo" style:family="text">
      <style:text-properties fo:color="#4472C4"/>
    </style:style>
    <style:style style:name="P300" style:parent-style-name="SBCparagraph" style:family="paragraph">
      <style:paragraph-properties fo:text-indent="0.1972in"/>
    </style:style>
    <style:style style:name="T301" style:parent-style-name="Tipodeletrapredefinidodoparágrafo" style:family="text">
      <style:text-properties fo:color="#4472C4"/>
    </style:style>
    <style:style style:name="P302" style:parent-style-name="SBCtitle1" style:list-style-name="Outline" style:family="paragraph"/>
    <style:style style:name="P303" style:parent-style-name="SBCparagraph" style:family="paragraph">
      <style:paragraph-properties fo:text-indent="0.1972in"/>
    </style:style>
    <style:style style:name="T304" style:parent-style-name="Tipodeletrapredefinidodoparágrafo" style:family="text">
      <style:text-properties fo:color="#4472C4"/>
    </style:style>
    <style:style style:name="T305" style:parent-style-name="Tipodeletrapredefinidodoparágrafo" style:family="text">
      <style:text-properties fo:color="#4472C4"/>
    </style:style>
    <style:style style:name="P306" style:parent-style-name="SBCparagraph" style:family="paragraph">
      <style:paragraph-properties fo:text-indent="0.1972in"/>
    </style:style>
    <style:style style:name="P307" style:parent-style-name="SBCparagraph" style:family="paragraph">
      <style:paragraph-properties fo:text-indent="0.1972in"/>
    </style:style>
    <style:style style:name="T308" style:parent-style-name="Tipodeletrapredefinidodoparágrafo" style:family="text">
      <style:text-properties fo:color="#4472C4"/>
    </style:style>
    <style:style style:name="P309" style:parent-style-name="SBCparagraph" style:family="paragraph">
      <style:paragraph-properties fo:line-height="105%" fo:text-indent="0.1972in"/>
    </style:style>
    <style:style style:name="T310" style:parent-style-name="Tipodeletrapredefinidodoparágrafo" style:family="text">
      <style:text-properties fo:color="#4472C4"/>
    </style:style>
    <style:style style:name="P311" style:parent-style-name="SBCparagraph" style:family="paragraph">
      <style:paragraph-properties fo:text-indent="0.1972in"/>
    </style:style>
    <style:style style:name="T312" style:parent-style-name="Tipodeletrapredefinidodoparágrafo" style:family="text">
      <style:text-properties fo:color="#4472C4"/>
    </style:style>
    <style:style style:name="P313" style:parent-style-name="SBCparagraph" style:family="paragraph">
      <style:paragraph-properties fo:text-indent="0in"/>
    </style:style>
    <style:style style:name="T314" style:parent-style-name="Tipodeletrapredefinidodoparágrafo" style:family="text">
      <style:text-properties fo:font-weight="bold" style:font-weight-asian="bold" style:font-weight-complex="bold"/>
    </style:style>
    <style:style style:name="P315" style:parent-style-name="ParágrafodaLista" style:list-style-name="LFO22" style:family="paragraph">
      <style:text-properties style:font-name="Times" fo:font-weight="bold" style:font-weight-asian="bold" style:font-weight-complex="bold" fo:font-size="11pt" style:font-size-asian="11pt" style:font-size-complex="11pt" fo:language="en" fo:country="US"/>
    </style:style>
    <style:style style:name="T316" style:parent-style-name="Tipodeletrapredefinidodoparágrafo" style:family="text">
      <style:text-properties fo:font-weight="bold" style:font-weight-asian="bold" style:font-weight-complex="bold"/>
    </style:style>
    <style:style style:name="P317" style:parent-style-name="ParágrafodaLista" style:list-style-name="LFO22" style:family="paragraph">
      <style:text-properties style:font-name="Times" fo:font-weight="bold" style:font-weight-asian="bold" style:font-weight-complex="bold" fo:font-size="11pt" style:font-size-asian="11pt" style:font-size-complex="11pt" fo:language="en" fo:country="US"/>
    </style:style>
    <style:style style:name="T318" style:parent-style-name="Tipodeletrapredefinidodoparágrafo" style:family="text">
      <style:text-properties fo:font-weight="bold" style:font-weight-asian="bold" style:font-weight-complex="bold"/>
    </style:style>
    <style:style style:name="P319" style:parent-style-name="ParágrafodaLista" style:list-style-name="LFO22" style:family="paragraph">
      <style:text-properties style:font-name="Times" fo:font-weight="bold" style:font-weight-asian="bold" style:font-weight-complex="bold" fo:font-size="11pt" style:font-size-asian="11pt" style:font-size-complex="11pt" fo:language="en" fo:country="US"/>
    </style:style>
    <style:style style:name="P320"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21"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22"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23"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24" style:parent-style-name="Normal" style:family="paragraph">
      <style:paragraph-properties fo:text-align="end" fo:line-height="150%"/>
      <style:text-properties fo:font-size="6pt" style:font-size-asian="6pt" style:font-size-complex="6pt"/>
    </style:style>
    <style:style style:name="P325" style:parent-style-name="Normal" style:family="paragraph">
      <style:paragraph-properties fo:text-align="end" fo:line-height="150%"/>
      <style:text-properties fo:font-size="6pt" style:font-size-asian="6pt" style:font-size-complex="6pt"/>
    </style:style>
    <style:style style:name="P326" style:parent-style-name="Normal" style:family="paragraph">
      <style:paragraph-properties fo:text-align="end" fo:line-height="150%"/>
      <style:text-properties fo:font-size="6pt" style:font-size-asian="6pt" style:font-size-complex="6pt"/>
    </style:style>
    <style:style style:name="P327" style:parent-style-name="Normal" style:family="paragraph">
      <style:paragraph-properties fo:text-align="end" fo:line-height="150%"/>
      <style:text-properties fo:font-size="6pt" style:font-size-asian="6pt" style:font-size-complex="6pt"/>
    </style:style>
    <style:style style:name="P328" style:parent-style-name="Normal" style:family="paragraph">
      <style:paragraph-properties fo:text-align="end" fo:line-height="150%"/>
      <style:text-properties fo:font-size="6pt" style:font-size-asian="6pt" style:font-size-complex="6pt"/>
    </style:style>
    <style:style style:name="P329" style:parent-style-name="Normal" style:family="paragraph">
      <style:paragraph-properties fo:line-height="150%"/>
      <style:text-properties fo:font-weight="bold" style:font-weight-asian="bold" style:font-weight-complex="bold" fo:font-size="4pt" style:font-size-asian="4pt" style:font-size-complex="4pt"/>
    </style:style>
    <style:style style:name="P330" style:parent-style-name="Normal" style:family="paragraph">
      <style:paragraph-properties fo:line-height="150%"/>
      <style:text-properties fo:font-weight="bold" style:font-weight-asian="bold" style:font-weight-complex="bold" fo:font-size="4pt" style:font-size-asian="4pt" style:font-size-complex="4pt"/>
    </style:style>
    <style:style style:name="P331" style:parent-style-name="Normal" style:family="paragraph">
      <style:paragraph-properties fo:line-height="150%"/>
      <style:text-properties fo:font-weight="bold" style:font-weight-asian="bold" style:font-weight-complex="bold" fo:font-size="4pt" style:font-size-asian="4pt" style:font-size-complex="4pt"/>
    </style:style>
    <style:style style:name="P332" style:parent-style-name="Normal" style:family="paragraph">
      <style:paragraph-properties fo:line-height="150%"/>
      <style:text-properties fo:font-weight="bold" style:font-weight-asian="bold" style:font-weight-complex="bold" fo:font-size="4pt" style:font-size-asian="4pt" style:font-size-complex="4pt"/>
    </style:style>
    <style:style style:name="P333" style:parent-style-name="Normal" style:family="paragraph">
      <style:paragraph-properties fo:line-height="150%"/>
      <style:text-properties fo:font-weight="bold" style:font-weight-asian="bold" style:font-weight-complex="bold" fo:font-size="4pt" style:font-size-asian="4pt" style:font-size-complex="4pt"/>
    </style:style>
    <style:style style:name="P334" style:parent-style-name="Normal" style:family="paragraph">
      <style:paragraph-properties fo:line-height="150%"/>
      <style:text-properties fo:font-weight="bold" style:font-weight-asian="bold" style:font-weight-complex="bold" fo:font-size="4pt" style:font-size-asian="4pt" style:font-size-complex="4pt"/>
    </style:style>
    <style:style style:name="P335" style:parent-style-name="Normal" style:family="paragraph">
      <style:paragraph-properties fo:line-height="150%"/>
      <style:text-properties fo:font-weight="bold" style:font-weight-asian="bold" style:font-weight-complex="bold" fo:font-size="4pt" style:font-size-asian="4pt" style:font-size-complex="4pt"/>
    </style:style>
    <style:style style:name="P336" style:parent-style-name="Normal" style:family="paragraph">
      <style:paragraph-properties fo:line-height="150%"/>
      <style:text-properties fo:font-size="6pt" style:font-size-asian="6pt" style:font-size-complex="6pt"/>
    </style:style>
    <style:style style:name="P337"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38"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39" style:parent-style-name="Normal" style:family="paragraph">
      <style:paragraph-properties fo:text-align="center"/>
      <style:text-properties fo:font-weight="bold" style:font-weight-asian="bold" style:font-weight-complex="bold" fo:font-size="6pt" style:font-size-asian="6pt" style:font-size-complex="6pt"/>
    </style:style>
    <style:style style:name="P340"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41" style:parent-style-name="Normal" style:family="paragraph">
      <style:paragraph-properties fo:text-align="end" fo:line-height="115%"/>
      <style:text-properties fo:font-size="6pt" style:font-size-asian="6pt" style:font-size-complex="6pt"/>
    </style:style>
    <style:style style:name="P342" style:parent-style-name="Normal" style:family="paragraph">
      <style:paragraph-properties fo:text-align="end" fo:line-height="115%"/>
      <style:text-properties fo:font-size="6pt" style:font-size-asian="6pt" style:font-size-complex="6pt"/>
    </style:style>
    <style:style style:name="P343" style:parent-style-name="Normal" style:family="paragraph">
      <style:paragraph-properties fo:text-align="end" fo:line-height="115%"/>
      <style:text-properties fo:font-size="6pt" style:font-size-asian="6pt" style:font-size-complex="6pt"/>
    </style:style>
    <style:style style:name="P344" style:parent-style-name="Normal" style:family="paragraph">
      <style:paragraph-properties fo:text-align="end" fo:line-height="115%"/>
      <style:text-properties fo:font-size="6pt" style:font-size-asian="6pt" style:font-size-complex="6pt"/>
    </style:style>
    <style:style style:name="P345" style:parent-style-name="Normal" style:family="paragraph">
      <style:paragraph-properties fo:text-align="end" fo:line-height="115%"/>
      <style:text-properties fo:font-size="6pt" style:font-size-asian="6pt" style:font-size-complex="6pt"/>
    </style:style>
    <style:style style:name="P346" style:parent-style-name="Normal" style:family="paragraph">
      <style:paragraph-properties fo:text-align="end" fo:line-height="115%"/>
      <style:text-properties fo:font-size="6pt" style:font-size-asian="6pt" style:font-size-complex="6pt"/>
    </style:style>
    <style:style style:name="P347" style:parent-style-name="Normal" style:family="paragraph">
      <style:paragraph-properties fo:text-align="end" fo:line-height="115%"/>
      <style:text-properties fo:font-size="6pt" style:font-size-asian="6pt" style:font-size-complex="6pt"/>
    </style:style>
    <style:style style:name="P348" style:parent-style-name="Normal" style:family="paragraph">
      <style:paragraph-properties fo:line-height="150%"/>
      <style:text-properties fo:font-weight="bold" style:font-weight-asian="bold" style:font-weight-complex="bold" fo:font-size="4pt" style:font-size-asian="4pt" style:font-size-complex="4pt"/>
    </style:style>
    <style:style style:name="P349" style:parent-style-name="Normal" style:family="paragraph">
      <style:paragraph-properties fo:line-height="150%"/>
      <style:text-properties fo:font-weight="bold" style:font-weight-asian="bold" style:font-weight-complex="bold" fo:font-size="4pt" style:font-size-asian="4pt" style:font-size-complex="4pt"/>
    </style:style>
    <style:style style:name="P350" style:parent-style-name="Normal" style:family="paragraph">
      <style:paragraph-properties fo:line-height="150%"/>
      <style:text-properties fo:font-weight="bold" style:font-weight-asian="bold" style:font-weight-complex="bold" fo:font-size="4pt" style:font-size-asian="4pt" style:font-size-complex="4pt"/>
    </style:style>
    <style:style style:name="P351" style:parent-style-name="Normal" style:family="paragraph">
      <style:paragraph-properties fo:line-height="150%"/>
      <style:text-properties fo:font-weight="bold" style:font-weight-asian="bold" style:font-weight-complex="bold" fo:font-size="4pt" style:font-size-asian="4pt" style:font-size-complex="4pt"/>
    </style:style>
    <style:style style:name="P352" style:parent-style-name="Normal" style:family="paragraph">
      <style:paragraph-properties fo:line-height="150%"/>
      <style:text-properties fo:font-size="6pt" style:font-size-asian="6pt" style:font-size-complex="6pt"/>
    </style:style>
    <style:style style:name="P353"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54"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55" style:parent-style-name="Normal" style:family="paragraph">
      <style:paragraph-properties fo:text-align="center"/>
      <style:text-properties fo:font-weight="bold" style:font-weight-asian="bold" style:font-weight-complex="bold" fo:font-size="6pt" style:font-size-asian="6pt" style:font-size-complex="6pt"/>
    </style:style>
    <style:style style:name="P356"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57" style:parent-style-name="Normal" style:family="paragraph">
      <style:paragraph-properties fo:text-align="end" fo:line-height="115%"/>
      <style:text-properties fo:font-size="6pt" style:font-size-asian="6pt" style:font-size-complex="6pt" fo:language="en" fo:country="US"/>
    </style:style>
    <style:style style:name="P358" style:parent-style-name="Normal" style:family="paragraph">
      <style:paragraph-properties fo:text-align="end" fo:line-height="115%"/>
      <style:text-properties fo:font-size="6pt" style:font-size-asian="6pt" style:font-size-complex="6pt" fo:language="en" fo:country="US"/>
    </style:style>
    <style:style style:name="P359" style:parent-style-name="Normal" style:family="paragraph">
      <style:paragraph-properties fo:text-align="end" fo:line-height="115%"/>
      <style:text-properties fo:font-size="6pt" style:font-size-asian="6pt" style:font-size-complex="6pt" fo:language="en" fo:country="US"/>
    </style:style>
    <style:style style:name="P360" style:parent-style-name="Normal" style:family="paragraph">
      <style:paragraph-properties fo:text-align="end" fo:line-height="115%"/>
      <style:text-properties fo:font-size="6pt" style:font-size-asian="6pt" style:font-size-complex="6pt" fo:language="en" fo:country="US"/>
    </style:style>
    <style:style style:name="P361" style:parent-style-name="Normal" style:family="paragraph">
      <style:paragraph-properties fo:text-align="end" fo:line-height="115%"/>
    </style:style>
    <style:style style:name="T362" style:parent-style-name="Tipodeletrapredefinidodoparágrafo" style:family="text">
      <style:text-properties fo:font-size="6pt" style:font-size-asian="6pt" style:font-size-complex="6pt" fo:language="en" fo:country="US"/>
    </style:style>
    <style:style style:name="T363" style:parent-style-name="Tipodeletrapredefinidodoparágrafo" style:family="text">
      <style:text-properties fo:font-size="6pt" style:font-size-asian="6pt" style:font-size-complex="6pt"/>
    </style:style>
    <style:style style:name="T364" style:parent-style-name="Tipodeletrapredefinidodoparágrafo" style:family="text">
      <style:text-properties fo:font-size="6pt" style:font-size-asian="6pt" style:font-size-complex="6pt" fo:language="en" fo:country="US"/>
    </style:style>
    <style:style style:name="P365" style:parent-style-name="Normal" style:family="paragraph">
      <style:paragraph-properties fo:text-align="end" fo:line-height="115%"/>
    </style:style>
    <style:style style:name="T366" style:parent-style-name="Tipodeletrapredefinidodoparágrafo" style:family="text">
      <style:text-properties fo:font-size="6pt" style:font-size-asian="6pt" style:font-size-complex="6pt" fo:language="en" fo:country="US"/>
    </style:style>
    <style:style style:name="T367" style:parent-style-name="Tipodeletrapredefinidodoparágrafo" style:family="text">
      <style:text-properties fo:font-size="6pt" style:font-size-asian="6pt" style:font-size-complex="6pt"/>
    </style:style>
    <style:style style:name="T368" style:parent-style-name="Tipodeletrapredefinidodoparágrafo" style:family="text">
      <style:text-properties fo:font-size="6pt" style:font-size-asian="6pt" style:font-size-complex="6pt" fo:language="en" fo:country="US"/>
    </style:style>
    <style:style style:name="P369" style:parent-style-name="Normal" style:family="paragraph">
      <style:paragraph-properties fo:text-align="end" fo:line-height="115%"/>
    </style:style>
    <style:style style:name="T370" style:parent-style-name="Tipodeletrapredefinidodoparágrafo" style:family="text">
      <style:text-properties fo:font-size="6pt" style:font-size-asian="6pt" style:font-size-complex="6pt" fo:language="en" fo:country="US"/>
    </style:style>
    <style:style style:name="T371" style:parent-style-name="Tipodeletrapredefinidodoparágrafo" style:family="text">
      <style:text-properties fo:font-size="6pt" style:font-size-asian="6pt" style:font-size-complex="6pt"/>
    </style:style>
    <style:style style:name="T372" style:parent-style-name="Tipodeletrapredefinidodoparágrafo" style:family="text">
      <style:text-properties fo:font-size="6pt" style:font-size-asian="6pt" style:font-size-complex="6pt" fo:language="en" fo:country="US"/>
    </style:style>
    <style:style style:name="P373" style:parent-style-name="Normal" style:family="paragraph">
      <style:paragraph-properties fo:line-height="150%"/>
      <style:text-properties fo:font-weight="bold" style:font-weight-asian="bold" style:font-weight-complex="bold" fo:font-size="4pt" style:font-size-asian="4pt" style:font-size-complex="4pt"/>
    </style:style>
    <style:style style:name="P374" style:parent-style-name="Normal" style:family="paragraph">
      <style:paragraph-properties fo:line-height="150%"/>
      <style:text-properties fo:font-size="6pt" style:font-size-asian="6pt" style:font-size-complex="6pt"/>
    </style:style>
    <style:style style:name="P375" style:parent-style-name="Normal" style:family="paragraph">
      <style:paragraph-properties fo:text-align="center"/>
    </style:style>
    <style:style style:name="T376" style:parent-style-name="Tipodeletrapredefinidodoparágrafo" style:family="text">
      <style:text-properties fo:font-weight="bold" style:font-weight-asian="bold" style:font-weight-complex="bold"/>
    </style:style>
    <style:style style:name="P377" style:parent-style-name="SBCtitle1" style:list-style-name="Outline" style:family="paragraph"/>
    <style:style style:name="P378" style:parent-style-name="SBCparagraph" style:list-style-name="LFO23" style:family="paragraph">
      <style:paragraph-properties fo:text-align="start"/>
    </style:style>
    <style:style style:name="T379" style:parent-style-name="Tipodeletrapredefinidodoparágrafo" style:family="text">
      <style:text-properties style:font-name="Calibri" fo:font-weight="bold" style:font-weight-asian="bold" style:font-weight-complex="bold"/>
    </style:style>
    <style:style style:name="T380" style:parent-style-name="Tipodeletrapredefinidodoparágrafo" style:family="text">
      <style:text-properties style:font-name="Calibri"/>
    </style:style>
    <style:style style:name="T381" style:parent-style-name="Hiperligação" style:family="text">
      <style:text-properties style:font-name="Calibri"/>
    </style:style>
    <style:style style:name="T382" style:parent-style-name="Tipodeletrapredefinidodoparágrafo" style:family="text">
      <style:text-properties style:font-name="Calibri"/>
    </style:style>
    <style:style style:name="T383" style:parent-style-name="Hiperligação" style:family="text">
      <style:text-properties style:font-name="Calibri"/>
    </style:style>
    <style:style style:name="T384" style:parent-style-name="Hiperligação" style:family="text">
      <style:text-properties style:font-name="Calibri"/>
    </style:style>
    <style:style style:name="T385" style:parent-style-name="Hiperligação" style:family="text">
      <style:text-properties style:font-name="Calibri"/>
    </style:style>
    <style:style style:name="T386" style:parent-style-name="Tipodeletrapredefinidodoparágrafo" style:family="text">
      <style:text-properties style:font-name="Calibri"/>
    </style:style>
    <style:style style:name="P387" style:parent-style-name="SBCparagraph" style:list-style-name="LFO23" style:family="paragraph"/>
    <style:style style:name="T388" style:parent-style-name="Tipodeletrapredefinidodoparágrafo" style:family="text">
      <style:text-properties style:font-name="Calibri" fo:font-weight="bold" style:font-weight-asian="bold" style:font-weight-complex="bold"/>
    </style:style>
    <style:style style:name="T389" style:parent-style-name="Tipodeletrapredefinidodoparágrafo" style:family="text">
      <style:text-properties style:font-name="Calibri"/>
    </style:style>
    <style:style style:name="T390" style:parent-style-name="Hiperligação" style:family="text">
      <style:text-properties style:font-name="Calibri"/>
    </style:style>
    <style:style style:name="T391" style:parent-style-name="Tipodeletrapredefinidodoparágrafo" style:family="text">
      <style:text-properties style:font-name="Calibri"/>
    </style:style>
    <style:style style:name="P392" style:parent-style-name="SBCparagraph" style:list-style-name="LFO23" style:family="paragraph"/>
    <style:style style:name="T393" style:parent-style-name="Tipodeletrapredefinidodoparágrafo" style:family="text">
      <style:text-properties style:font-name="Calibri" fo:font-weight="bold" style:font-weight-asian="bold" style:font-weight-complex="bold"/>
    </style:style>
    <style:style style:name="T394" style:parent-style-name="Tipodeletrapredefinidodoparágrafo" style:family="text">
      <style:text-properties style:font-name="Calibri"/>
    </style:style>
    <style:style style:name="T395" style:parent-style-name="Hiperligação" style:family="text">
      <style:text-properties style:font-name="Calibri"/>
    </style:style>
    <style:style style:name="T396" style:parent-style-name="Tipodeletrapredefinidodoparágrafo" style:family="text">
      <style:text-properties style:font-name="Calibri"/>
    </style:style>
    <style:style style:name="T397" style:parent-style-name="Hiperligação" style:family="text">
      <style:text-properties style:font-name="Calibri"/>
    </style:style>
    <style:style style:name="T398" style:parent-style-name="Tipodeletrapredefinidodoparágrafo" style:family="text">
      <style:text-properties style:font-name="Calibri"/>
    </style:style>
    <style:style style:name="P399" style:parent-style-name="SBCparagraph" style:list-style-name="LFO23" style:family="paragraph"/>
    <style:style style:name="T400" style:parent-style-name="Tipodeletrapredefinidodoparágrafo" style:family="text">
      <style:text-properties style:font-name="Calibri" fo:font-weight="bold" style:font-weight-asian="bold" style:font-weight-complex="bold"/>
    </style:style>
    <style:style style:name="T401" style:parent-style-name="Tipodeletrapredefinidodoparágrafo" style:family="text">
      <style:text-properties style:font-name="Calibri"/>
    </style:style>
    <style:style style:name="T402" style:parent-style-name="Hiperligação" style:family="text">
      <style:text-properties style:font-name="Calibri"/>
    </style:style>
    <style:style style:name="T403" style:parent-style-name="Tipodeletrapredefinidodoparágrafo" style:family="text">
      <style:text-properties style:font-name="Calibri"/>
    </style:style>
    <style:style style:name="P404" style:parent-style-name="SBCparagraph" style:list-style-name="LFO23" style:family="paragraph"/>
    <style:style style:name="T405" style:parent-style-name="Tipodeletrapredefinidodoparágrafo" style:family="text">
      <style:text-properties style:font-name="Calibri" fo:font-weight="bold" style:font-weight-asian="bold" style:font-weight-complex="bold"/>
    </style:style>
    <style:style style:name="T406" style:parent-style-name="Tipodeletrapredefinidodoparágrafo" style:family="text">
      <style:text-properties style:font-name="Calibri"/>
    </style:style>
    <style:style style:name="T407" style:parent-style-name="Hiperligação" style:family="text">
      <style:text-properties style:font-name="Calibri"/>
    </style:style>
    <style:style style:name="T408" style:parent-style-name="Tipodeletrapredefinidodoparágrafo" style:family="text">
      <style:text-properties style:font-name="Calibri"/>
    </style:style>
    <style:style style:name="T409" style:parent-style-name="Hiperligação" style:family="text">
      <style:text-properties style:font-name="Calibri"/>
    </style:style>
    <style:style style:name="T410" style:parent-style-name="Tipodeletrapredefinidodoparágrafo" style:family="text">
      <style:text-properties style:font-name="Calibri"/>
    </style:style>
    <style:style style:name="P411" style:parent-style-name="SBCparagraph" style:list-style-name="LFO23" style:family="paragraph"/>
    <style:style style:name="T412" style:parent-style-name="Tipodeletrapredefinidodoparágrafo" style:family="text">
      <style:text-properties style:font-name="Calibri" fo:font-weight="bold" style:font-weight-asian="bold" style:font-weight-complex="bold"/>
    </style:style>
    <style:style style:name="T413" style:parent-style-name="Tipodeletrapredefinidodoparágrafo" style:family="text">
      <style:text-properties style:font-name="Calibri"/>
    </style:style>
    <style:style style:name="T414" style:parent-style-name="Hiperligação" style:family="text">
      <style:text-properties style:font-name="Calibri"/>
    </style:style>
    <style:style style:name="T415" style:parent-style-name="Tipodeletrapredefinidodoparágrafo" style:family="text">
      <style:text-properties style:font-name="Calibri"/>
    </style:style>
    <style:style style:name="T416" style:parent-style-name="Hiperligação" style:family="text">
      <style:text-properties style:font-name="Calibri"/>
    </style:style>
    <style:style style:name="T417" style:parent-style-name="Hiperligação" style:family="text">
      <style:text-properties style:font-name="Calibri"/>
    </style:style>
    <style:style style:name="T418" style:parent-style-name="Tipodeletrapredefinidodoparágrafo" style:family="text">
      <style:text-properties style:font-name="Calibri"/>
    </style:style>
    <style:style style:name="P419" style:parent-style-name="SBCparagraph" style:list-style-name="LFO23" style:family="paragraph"/>
    <style:style style:name="T420" style:parent-style-name="Tipodeletrapredefinidodoparágrafo" style:family="text">
      <style:text-properties style:font-name="Calibri" fo:font-weight="bold" style:font-weight-asian="bold" style:font-weight-complex="bold"/>
    </style:style>
    <style:style style:name="T421" style:parent-style-name="Tipodeletrapredefinidodoparágrafo" style:family="text">
      <style:text-properties style:font-name="Calibri"/>
    </style:style>
    <style:style style:name="P422" style:parent-style-name="SBCtitle1" style:list-style-name="Outline" style:family="paragraph"/>
    <style:style style:name="P423" style:parent-style-name="SBCparagraphfirst" style:list-style-name="LFO24" style:family="paragraph"/>
    <style:style style:name="T424" style:parent-style-name="Tipodeletrapredefinidodoparágrafo" style:family="text">
      <style:text-properties style:font-name="Calibri"/>
    </style:style>
    <style:style style:name="T425" style:parent-style-name="Tipodeletrapredefinidodoparágrafo" style:family="text">
      <style:text-properties style:font-name="Calibri"/>
    </style:style>
    <style:style style:name="P426" style:parent-style-name="SBCparagraph" style:list-style-name="LFO24" style:family="paragraph"/>
    <style:style style:name="T427" style:parent-style-name="Tipodeletrapredefinidodoparágrafo" style:family="text">
      <style:text-properties style:font-name="Calibri"/>
    </style:style>
    <style:style style:name="P428" style:parent-style-name="SBCtitle1" style:list-style-name="Outline" style:family="paragraph"/>
    <style:style style:name="P429" style:parent-style-name="SBCparagraphfirst" style:family="paragraph">
      <style:text-properties style:use-window-font-color="true"/>
    </style:style>
    <style:style style:name="P430" style:parent-style-name="SBCparagraphfirst" style:family="paragraph">
      <style:text-properties style:use-window-font-color="true"/>
    </style:style>
    <style:style style:name="P431" style:parent-style-name="SBCparagraphfirst" style:family="paragraph">
      <style:text-properties style:use-window-font-color="true"/>
    </style:style>
    <style:style style:name="P432" style:parent-style-name="SBCreferences" style:family="paragraph">
      <style:text-properties fo:language="en" fo:country="US"/>
    </style:style>
    <style:style style:name="P433" style:parent-style-name="SBCreference" style:list-style-name="LFO25" style:family="paragraph">
      <style:paragraph-properties fo:margin-left="0.3937in" fo:text-indent="-0.3937in">
        <style:tab-stops/>
      </style:paragraph-properties>
    </style:style>
    <style:style style:name="T434" style:parent-style-name="Tipodeletrapredefinidodoparágrafo" style:family="text">
      <style:text-properties fo:language="en" fo:country="US"/>
    </style:style>
    <style:style style:name="T435" style:parent-style-name="Hiperligação" style:family="text">
      <style:text-properties fo:language="en" fo:country="US"/>
    </style:style>
    <style:style style:name="T436" style:parent-style-name="Hiperligação" style:family="text">
      <style:text-properties fo:language="en" fo:country="US"/>
    </style:style>
    <style:style style:name="T437" style:parent-style-name="Hiperligação" style:family="text">
      <style:text-properties fo:language="en" fo:country="US"/>
    </style:style>
    <style:style style:name="P438" style:parent-style-name="SBCreference" style:list-style-name="LFO25" style:family="paragraph">
      <style:paragraph-properties fo:margin-left="0.3937in" fo:text-indent="-0.3937in">
        <style:tab-stops/>
      </style:paragraph-properties>
    </style:style>
    <style:style style:name="P439" style:parent-style-name="SBCreference" style:list-style-name="LFO25" style:family="paragraph">
      <style:paragraph-properties fo:margin-left="0.3937in" fo:text-indent="-0.3937in">
        <style:tab-stops/>
      </style:paragraph-properties>
    </style:style>
    <style:style style:name="T440" style:parent-style-name="Tipodeletrapredefinidodoparágrafo" style:family="text">
      <style:text-properties fo:language="en" fo:country="US"/>
    </style:style>
    <style:style style:name="P441" style:parent-style-name="SBCreference" style:list-style-name="LFO25" style:family="paragraph">
      <style:paragraph-properties fo:margin-left="0.3937in" fo:text-indent="-0.3937in">
        <style:tab-stops/>
      </style:paragraph-properties>
    </style:style>
    <style:style style:name="P442" style:parent-style-name="SBCreference" style:list-style-name="LFO25" style:family="paragraph">
      <style:paragraph-properties fo:margin-left="0.3937in" fo:text-indent="-0.3937in">
        <style:tab-stops/>
      </style:paragraph-properties>
    </style:style>
    <style:style style:name="T443" style:parent-style-name="Tipodeletrapredefinidodoparágrafo" style:family="text">
      <style:text-properties fo:language="en" fo:country="US"/>
    </style:style>
    <style:style style:name="T444" style:parent-style-name="Tipodeletrapredefinidodoparágrafo" style:family="text">
      <style:text-properties fo:language="en" fo:country="US"/>
    </style:style>
    <style:style style:name="T445" style:parent-style-name="Hiperligação" style:family="text">
      <style:text-properties fo:language="en" fo:country="US"/>
    </style:style>
    <style:style style:name="T446" style:parent-style-name="Hiperligação" style:family="text">
      <style:text-properties fo:language="en" fo:country="US"/>
    </style:style>
    <style:style style:name="T447" style:parent-style-name="Hiperligação" style:family="text">
      <style:text-properties fo:language="en" fo:country="US"/>
    </style:style>
    <style:style style:name="T448" style:parent-style-name="Tipodeletrapredefinidodoparágrafo" style:family="text">
      <style:text-properties fo:language="en" fo:country="US"/>
    </style:style>
    <style:style style:name="P449" style:parent-style-name="SBCreference" style:list-style-name="LFO25" style:family="paragraph">
      <style:paragraph-properties fo:margin-left="0.3937in" fo:text-indent="-0.3937in">
        <style:tab-stops/>
      </style:paragraph-properties>
    </style:style>
    <style:style style:name="P450" style:parent-style-name="SBCreference" style:list-style-name="LFO25" style:family="paragraph">
      <style:paragraph-properties fo:margin-left="0.3937in" fo:text-indent="-0.3937in">
        <style:tab-stops/>
      </style:paragraph-properties>
    </style:style>
    <style:style style:name="T451" style:parent-style-name="Tipodeletrapredefinidodoparágrafo" style:family="text">
      <style:text-properties fo:language="en" fo:country="US"/>
    </style:style>
    <style:style style:name="T452" style:parent-style-name="Hiperligação" style:family="text">
      <style:text-properties fo:language="en" fo:country="US"/>
    </style:style>
    <style:style style:name="T453" style:parent-style-name="Hiperligação" style:family="text">
      <style:text-properties fo:language="en" fo:country="US"/>
    </style:style>
    <style:style style:name="T454" style:parent-style-name="Hiperligação" style:family="text">
      <style:text-properties fo:language="en" fo:country="US"/>
    </style:style>
    <style:style style:name="T455" style:parent-style-name="Tipodeletrapredefinidodoparágrafo" style:family="text">
      <style:text-properties fo:language="en" fo:country="US"/>
    </style:style>
    <style:style style:name="P456" style:parent-style-name="SBCreference" style:list-style-name="LFO25" style:family="paragraph">
      <style:paragraph-properties fo:margin-left="0.3937in" fo:text-indent="-0.3937in">
        <style:tab-stops/>
      </style:paragraph-properties>
    </style:style>
    <style:style style:name="T457" style:parent-style-name="Tipodeletrapredefinidodoparágrafo" style:family="text">
      <style:text-properties fo:language="en" fo:country="US"/>
    </style:style>
    <style:style style:name="T458" style:parent-style-name="Tipodeletrapredefinidodoparágrafo" style:family="text">
      <style:text-properties fo:language="en" fo:country="US"/>
    </style:style>
    <style:style style:name="P459" style:parent-style-name="SBCreference" style:list-style-name="LFO25" style:family="paragraph">
      <style:paragraph-properties fo:margin-left="0.3937in" fo:text-indent="-0.3937in">
        <style:tab-stops/>
      </style:paragraph-properties>
    </style:style>
    <style:style style:name="T460" style:parent-style-name="Tipodeletrapredefinidodoparágrafo" style:family="text">
      <style:text-properties fo:language="en" fo:country="US"/>
    </style:style>
    <style:style style:name="T461" style:parent-style-name="Hiperligação" style:family="text">
      <style:text-properties fo:language="en" fo:country="US"/>
    </style:style>
    <style:style style:name="T462" style:parent-style-name="Hiperligação" style:family="text">
      <style:text-properties fo:language="en" fo:country="US"/>
    </style:style>
    <style:style style:name="T463" style:parent-style-name="Hiperligação" style:family="text">
      <style:text-properties fo:language="en" fo:country="US"/>
    </style:style>
    <style:style style:name="T464" style:parent-style-name="Hiperligação" style:family="text">
      <style:text-properties fo:language="en" fo:country="US"/>
    </style:style>
    <style:style style:name="T465" style:parent-style-name="Hiperligação" style:family="text">
      <style:text-properties fo:language="en" fo:country="US"/>
    </style:style>
    <style:style style:name="T466" style:parent-style-name="Tipodeletrapredefinidodoparágrafo" style:family="text">
      <style:text-properties fo:language="en" fo:country="US"/>
    </style:style>
    <style:style style:name="P467" style:parent-style-name="SBCreference" style:list-style-name="LFO25" style:family="paragraph">
      <style:paragraph-properties fo:margin-left="0.3937in" fo:text-indent="-0.3937in">
        <style:tab-stops/>
      </style:paragraph-properties>
    </style:style>
    <style:style style:name="T468" style:parent-style-name="Tipodeletrapredefinidodoparágrafo" style:family="text">
      <style:text-properties style:font-name-complex="Times"/>
    </style:style>
    <style:style style:name="T469" style:parent-style-name="Tipodeletrapredefinidodoparágrafo" style:family="text">
      <style:text-properties style:font-name="Cambria Math" style:font-name-complex="Cambria Math"/>
    </style:style>
    <style:style style:name="T470" style:parent-style-name="Tipodeletrapredefinidodoparágrafo" style:family="text">
      <style:text-properties style:font-name="Cambria Math" style:font-name-complex="Cambria Math"/>
    </style:style>
    <style:style style:name="T471" style:parent-style-name="Tipodeletrapredefinidodoparágrafo" style:family="text">
      <style:text-properties style:font-name-complex="Times"/>
    </style:style>
    <style:style style:name="T472" style:parent-style-name="Tipodeletrapredefinidodoparágrafo" style:family="text">
      <style:text-properties style:font-name="Cambria Math" style:font-name-complex="Cambria Math"/>
    </style:style>
    <style:style style:name="T473" style:parent-style-name="Tipodeletrapredefinidodoparágrafo" style:family="text">
      <style:text-properties style:font-name="Cambria Math" style:font-name-complex="Cambria Math"/>
    </style:style>
    <style:style style:name="T474" style:parent-style-name="Tipodeletrapredefinidodoparágrafo" style:family="text">
      <style:text-properties fo:language="en" fo:country="US"/>
    </style:style>
    <style:style style:name="T475" style:parent-style-name="Hiperligação" style:family="text">
      <style:text-properties fo:language="en" fo:country="US"/>
    </style:style>
    <style:style style:name="T476" style:parent-style-name="Hiperligação" style:family="text">
      <style:text-properties fo:language="en" fo:country="US"/>
    </style:style>
    <style:style style:name="T477" style:parent-style-name="Hiperligação" style:family="text">
      <style:text-properties fo:language="en" fo:country="US"/>
    </style:style>
    <style:style style:name="T478" style:parent-style-name="Tipodeletrapredefinidodoparágrafo" style:family="text">
      <style:text-properties fo:language="en" fo:country="US"/>
    </style:style>
    <style:style style:name="P479" style:parent-style-name="SBCreference" style:list-style-name="LFO25" style:family="paragraph">
      <style:paragraph-properties fo:margin-left="0.3937in" fo:text-indent="-0.3937in">
        <style:tab-stops/>
      </style:paragraph-properties>
      <style:text-properties fo:language="en" fo:country="US"/>
    </style:style>
    <style:style style:name="P480" style:parent-style-name="SBCreference" style:list-style-name="LFO25" style:family="paragraph">
      <style:paragraph-properties fo:margin-left="0.3937in" fo:text-indent="-0.3937in">
        <style:tab-stops/>
      </style:paragraph-properties>
    </style:style>
    <style:style style:name="T481" style:parent-style-name="Tipodeletrapredefinidodoparágrafo" style:family="text">
      <style:text-properties fo:language="en" fo:country="US"/>
    </style:style>
    <style:style style:name="T482" style:parent-style-name="Tipodeletrapredefinidodoparágrafo" style:family="text">
      <style:text-properties style:font-name="Cambria Math" style:font-name-complex="Cambria Math" fo:language="en" fo:country="US"/>
    </style:style>
    <style:style style:name="T483" style:parent-style-name="Tipodeletrapredefinidodoparágrafo" style:family="text">
      <style:text-properties fo:language="en" fo:country="US"/>
    </style:style>
    <style:style style:name="P484" style:parent-style-name="SBCreference" style:list-style-name="LFO25" style:family="paragraph">
      <style:paragraph-properties fo:margin-left="0.3937in" fo:text-indent="-0.3937in">
        <style:tab-stops/>
      </style:paragraph-properties>
    </style:style>
    <style:style style:name="T485" style:parent-style-name="Tipodeletrapredefinidodoparágrafo" style:family="text">
      <style:text-properties fo:language="en" fo:country="US"/>
    </style:style>
    <style:style style:name="T486" style:parent-style-name="Tipodeletrapredefinidodoparágrafo" style:family="text">
      <style:text-properties style:font-name="Cambria Math" style:font-name-complex="Cambria Math" fo:language="en" fo:country="US"/>
    </style:style>
    <style:style style:name="T487" style:parent-style-name="Tipodeletrapredefinidodoparágrafo" style:family="text">
      <style:text-properties fo:language="en" fo:country="US"/>
    </style:style>
    <style:style style:name="P488" style:parent-style-name="SBCreference" style:list-style-name="LFO25" style:family="paragraph">
      <style:paragraph-properties fo:margin-left="0.3937in" fo:text-indent="-0.3937in">
        <style:tab-stops/>
      </style:paragraph-properties>
    </style:style>
    <style:style style:name="T489" style:parent-style-name="Tipodeletrapredefinidodoparágrafo" style:family="text">
      <style:text-properties fo:language="en" fo:country="US"/>
    </style:style>
    <style:style style:name="T490" style:parent-style-name="Tipodeletrapredefinidodoparágrafo" style:family="text">
      <style:text-properties style:font-name="Calibri" fo:language="en" fo:country="US"/>
    </style:style>
    <style:style style:name="T491" style:parent-style-name="Hiperligação" style:family="text">
      <style:text-properties style:font-name="Calibri"/>
    </style:style>
    <style:style style:name="T492" style:parent-style-name="Tipodeletrapredefinidodoparágrafo" style:family="text">
      <style:text-properties style:font-name="Calibri"/>
    </style:style>
    <style:style style:name="P493" style:parent-style-name="SBCreference" style:list-style-name="LFO25" style:family="paragraph">
      <style:paragraph-properties fo:margin-left="0.3937in" fo:text-indent="-0.3937in">
        <style:tab-stops/>
      </style:paragraph-properties>
    </style:style>
    <style:style style:name="T494" style:parent-style-name="Tipodeletrapredefinidodoparágrafo" style:family="text">
      <style:text-properties style:font-name="Calibri"/>
    </style:style>
    <style:style style:name="T495" style:parent-style-name="Hiperligação" style:family="text">
      <style:text-properties style:font-name="Calibri"/>
    </style:style>
    <style:style style:name="T496" style:parent-style-name="Tipodeletrapredefinidodoparágrafo" style:family="text">
      <style:text-properties style:font-name="Calibri"/>
    </style:style>
    <style:style style:name="P497" style:parent-style-name="SBCreference" style:list-style-name="LFO25" style:family="paragraph">
      <style:paragraph-properties fo:margin-left="0.3937in" fo:text-indent="-0.3937in">
        <style:tab-stops/>
      </style:paragraph-properties>
    </style:style>
    <style:style style:name="T498" style:parent-style-name="Tipodeletrapredefinidodoparágrafo" style:family="text">
      <style:text-properties style:font-name="Calibri"/>
    </style:style>
    <style:style style:name="T499" style:parent-style-name="Hiperligação" style:family="text">
      <style:text-properties style:font-name="Calibri"/>
    </style:style>
    <style:style style:name="T500" style:parent-style-name="Tipodeletrapredefinidodoparágrafo" style:family="text">
      <style:text-properties style:font-name="Calibri"/>
    </style:style>
    <style:style style:name="P501" style:parent-style-name="SBCreference" style:list-style-name="LFO25" style:family="paragraph">
      <style:paragraph-properties fo:margin-left="0.3937in" fo:text-indent="-0.3937in">
        <style:tab-stops/>
      </style:paragraph-properties>
    </style:style>
    <style:style style:name="T502" style:parent-style-name="Tipodeletrapredefinidodoparágrafo" style:family="text">
      <style:text-properties style:font-name="Calibri" fo:language="en" fo:country="US"/>
    </style:style>
    <style:style style:name="T503" style:parent-style-name="Hiperligação" style:family="text">
      <style:text-properties style:font-name="Calibri" fo:language="en" fo:country="US"/>
    </style:style>
    <style:style style:name="T504" style:parent-style-name="Tipodeletrapredefinidodoparágrafo" style:family="text">
      <style:text-properties style:font-name="Calibri" fo:language="en" fo:country="US"/>
    </style:style>
    <style:style style:name="T505" style:parent-style-name="Tipodeletrapredefinidodoparágrafo" style:family="text">
      <style:text-properties style:font-name="Calibri" fo:language="en" fo:country="US"/>
    </style:style>
    <style:style style:name="P506" style:parent-style-name="SBCreference" style:list-style-name="LFO25" style:family="paragraph">
      <style:paragraph-properties fo:margin-left="0.3937in" fo:text-indent="-0.3937in">
        <style:tab-stops/>
      </style:paragraph-properties>
    </style:style>
    <style:style style:name="T507" style:parent-style-name="Tipodeletrapredefinidodoparágrafo" style:family="text">
      <style:text-properties style:font-name="Calibri" fo:language="en" fo:country="US"/>
    </style:style>
    <style:style style:name="T508" style:parent-style-name="Tipodeletrapredefinidodoparágrafo" style:family="text">
      <style:text-properties fo:language="en" fo:country="US"/>
    </style:style>
    <style:style style:name="T509" style:parent-style-name="Tipodeletrapredefinidodoparágrafo" style:family="text">
      <style:text-properties style:font-name="Calibri"/>
    </style:style>
    <style:style style:name="T510" style:parent-style-name="Tipodeletrapredefinidodoparágrafo" style:family="text">
      <style:text-properties fo:language="en" fo:country="US"/>
    </style:style>
    <style:style style:name="P511" style:parent-style-name="SBCreference" style:list-style-name="LFO25" style:family="paragraph">
      <style:paragraph-properties fo:margin-left="0.3937in" fo:text-indent="-0.3937in">
        <style:tab-stops/>
      </style:paragraph-properties>
    </style:style>
    <style:style style:name="T512" style:parent-style-name="Tipodeletrapredefinidodoparágrafo" style:family="text">
      <style:text-properties style:font-name="Calibri"/>
    </style:style>
    <style:style style:name="T513" style:parent-style-name="Tipodeletrapredefinidodoparágrafo" style:family="text">
      <style:text-properties fo:language="en" fo:country="US"/>
    </style:style>
    <style:style style:name="T514" style:parent-style-name="Tipodeletrapredefinidodoparágrafo" style:family="text">
      <style:text-properties fo:language="en" fo:country="US"/>
    </style:style>
    <style:style style:family="graphic" style:name="a95">
      <style:graphic-properties draw:fill="none" draw:stroke="dash" draw:stroke-dash="a94" svg:stroke-width="0.02083in" svg:stroke-color="#000000" svg:stroke-opacity="100%" draw:stroke-linejoin="miter" svg:stroke-linecap="butt"/>
    </style:style>
    <style:style style:family="graphic" style:name="a179"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97">
      <style:graphic-properties draw:fill="none" draw:stroke="dash" draw:stroke-dash="a96" svg:stroke-width="0.02083in" svg:stroke-color="#000000" svg:stroke-opacity="100%" draw:stroke-linejoin="miter" svg:stroke-linecap="butt"/>
    </style:style>
    <style:style style:family="graphic" style:name="a99">
      <style:graphic-properties draw:fill="none" draw:stroke="dash" draw:stroke-dash="a98" svg:stroke-width="0.02083in" svg:stroke-color="#000000" svg:stroke-opacity="100%" draw:stroke-linejoin="miter" svg:stroke-linecap="butt"/>
    </style:style>
    <style:style style:family="graphic" style:name="a180"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8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draw:fill="solid" draw:fill-color="#ffffff" draw:opacity="100%" draw:stroke="solid" svg:stroke-width="0.01389in" svg:stroke-color="#70ad47" svg:stroke-opacity="100%" draw:stroke-linejoin="miter" svg:stroke-linecap="butt"/>
    </style:style>
    <style:style style:family="graphic" style:name="a184">
      <style:graphic-properties draw:fill="bitmap" draw:fill-image-name="a183" style:repeat="repeat" draw:fill-image-ref-point="top-left" draw:opacity="100%" draw:stroke="solid" svg:stroke-width="0.01389in" svg:stroke-color="#000000" svg:stroke-opacity="100%" draw:stroke-linejoin="miter" svg:stroke-linecap="butt"/>
    </style:style>
    <style:style style:family="graphic" style:name="a185">
      <style:graphic-properties draw:fill="solid" draw:fill-color="#c55a11" draw:opacity="100%" draw:stroke="solid" svg:stroke-width="0.01389in" svg:stroke-color="#000000" svg:stroke-opacity="100%" draw:stroke-linejoin="miter" svg:stroke-linecap="butt"/>
    </style:style>
    <style:style style:family="graphic" style:name="a200">
      <style:graphic-properties draw:fill="solid" draw:fill-color="#ffffff" draw:opacity="100%" draw:stroke="solid" svg:stroke-width="0.01389in" svg:stroke-color="#70ad47" svg:stroke-opacity="100%" draw:stroke-linejoin="miter" svg:stroke-linecap="butt"/>
    </style:style>
    <style:style style:family="graphic" style:name="a187">
      <style:graphic-properties draw:fill="bitmap" draw:fill-image-name="a186" style:repeat="repeat" draw:fill-image-ref-point="top-left" draw:opacity="100%" draw:stroke="solid" svg:stroke-width="0.01389in" svg:stroke-color="#000000" svg:stroke-opacity="100%" draw:stroke-linejoin="miter" svg:stroke-linecap="butt"/>
    </style:style>
    <style:style style:family="graphic" style:name="a188">
      <style:graphic-properties draw:fill="solid" draw:fill-color="#ffffff" draw:opacity="100%" draw:stroke="solid" svg:stroke-width="0.01389in" svg:stroke-color="#70ad47" svg:stroke-opacity="100%" draw:stroke-linejoin="miter" svg:stroke-linecap="butt"/>
    </style:style>
    <style:style style:family="graphic" style:name="a202">
      <style:graphic-properties draw:fill="bitmap" draw:fill-image-name="a201" style:repeat="repeat" draw:fill-image-ref-point="top-left" draw:opacity="100%" draw:stroke="solid" svg:stroke-width="0.01389in" svg:stroke-color="#000000" svg:stroke-opacity="100%" draw:stroke-linejoin="miter" svg:stroke-linecap="butt"/>
    </style:style>
    <style:style style:family="graphic" style:name="a203">
      <style:graphic-properties draw:fill="none" draw:stroke="solid" svg:stroke-width="0.01389in" svg:stroke-color="#000000" svg:stroke-opacity="100%" draw:stroke-linejoin="miter" svg:stroke-linecap="butt"/>
    </style:style>
    <style:style style:family="graphic" style:name="a204">
      <style:graphic-properties draw:fill="solid" draw:fill-color="#c55a11" draw:opacity="100%" draw:stroke="solid" svg:stroke-width="0.01389in" svg:stroke-color="#000000" svg:stroke-opacity="100%" draw:stroke-linejoin="miter" svg:stroke-linecap="butt"/>
    </style:style>
    <style:style style:family="graphic" style:name="a206">
      <style:graphic-properties draw:fill="bitmap" draw:fill-image-name="a205" style:repeat="repeat" draw:fill-image-ref-point="top-left" draw:opacity="100%" draw:stroke="solid" svg:stroke-width="0.01389in" svg:stroke-color="#000000" svg:stroke-opacity="100%" draw:stroke-linejoin="miter" svg:stroke-linecap="butt"/>
    </style:style>
    <style:style style:family="graphic" style:name="a207">
      <style:graphic-properties draw:fill="none" draw:stroke="solid" svg:stroke-width="0.01389in" svg:stroke-color="#000000" svg:stroke-opacity="100%" draw:stroke-linejoin="miter" svg:stroke-linecap="butt"/>
    </style:style>
    <style:style style:family="graphic" style:name="a208">
      <style:graphic-properties draw:fill="none" draw:stroke="solid" svg:stroke-width="0.01389in" svg:stroke-color="#000000" svg:stroke-opacity="100%" draw:stroke-linejoin="miter" svg:stroke-linecap="butt"/>
    </style:style>
    <style:style style:family="graphic" style:name="a209">
      <style:graphic-properties draw:fill="none" draw:stroke="solid" svg:stroke-width="0.01389in" svg:stroke-color="#000000" svg:stroke-opacity="100%" draw:stroke-linejoin="miter" svg:stroke-linecap="butt"/>
    </style:style>
    <style:style style:family="graphic" style:name="a190">
      <style:graphic-properties draw:fill="bitmap" draw:fill-image-name="a189" style:repeat="repeat" draw:fill-image-ref-point="top-left" draw:opacity="100%" draw:stroke="solid" svg:stroke-width="0.01389in" svg:stroke-color="#000000" svg:stroke-opacity="100%" draw:stroke-linejoin="miter" svg:stroke-linecap="butt"/>
    </style:style>
    <style:style style:family="graphic" style:name="a191">
      <style:graphic-properties draw:fill="solid" draw:fill-color="#c55a11" draw:opacity="100%" draw:stroke="solid" svg:stroke-width="0.01389in" svg:stroke-color="#000000" svg:stroke-opacity="100%" draw:stroke-linejoin="miter" svg:stroke-linecap="butt"/>
    </style:style>
    <style:style style:family="graphic" style:name="a193">
      <style:graphic-properties draw:fill="bitmap" draw:fill-image-name="a192" style:repeat="repeat" draw:fill-image-ref-point="top-left" draw:opacity="100%" draw:stroke="solid" svg:stroke-width="0.01389in" svg:stroke-color="#000000" svg:stroke-opacity="100%" draw:stroke-linejoin="miter" svg:stroke-linecap="butt"/>
    </style:style>
    <style:style style:family="graphic" style:name="a194">
      <style:graphic-properties draw:fill="solid" draw:fill-color="#ffffff" draw:opacity="100%" draw:stroke="solid" svg:stroke-width="0.01389in" svg:stroke-color="#70ad47" svg:stroke-opacity="100%" draw:stroke-linejoin="miter" svg:stroke-linecap="butt"/>
    </style:style>
    <style:style style:family="graphic" style:name="a196">
      <style:graphic-properties draw:fill="bitmap" draw:fill-image-name="a195" style:repeat="repeat" draw:fill-image-ref-point="top-left" draw:opacity="100%" draw:stroke="solid" svg:stroke-width="0.01389in" svg:stroke-color="#000000" svg:stroke-opacity="100%" draw:stroke-linejoin="miter" svg:stroke-linecap="butt"/>
    </style:style>
    <style:style style:family="graphic" style:name="a210">
      <style:graphic-properties draw:fill="none" draw:stroke="solid" svg:stroke-width="0.01389in" svg:stroke-color="#000000" svg:stroke-opacity="100%" draw:stroke-linejoin="miter" svg:stroke-linecap="butt"/>
    </style:style>
    <style:style style:family="graphic" style:name="a197">
      <style:graphic-properties draw:fill="solid" draw:fill-color="#c55a11" draw:opacity="100%" draw:stroke="solid" svg:stroke-width="0.01389in" svg:stroke-color="#000000" svg:stroke-opacity="100%" draw:stroke-linejoin="miter" svg:stroke-linecap="butt"/>
    </style:style>
    <style:style style:family="graphic" style:name="a211">
      <style:graphic-properties draw:fill="none" draw:stroke="solid" svg:stroke-width="0.01389in" svg:stroke-color="#000000" svg:stroke-opacity="100%" draw:stroke-linejoin="miter" svg:stroke-linecap="butt"/>
    </style:style>
    <style:style style:family="graphic" style:name="a212">
      <style:graphic-properties draw:fill="none" draw:stroke="solid" svg:stroke-width="0.01389in" svg:stroke-color="#000000" svg:stroke-opacity="100%" draw:stroke-linejoin="miter" svg:stroke-linecap="butt"/>
    </style:style>
    <style:style style:family="graphic" style:name="a199">
      <style:graphic-properties draw:fill="bitmap" draw:fill-image-name="a198" style:repeat="repeat" draw:fill-image-ref-point="top-left" draw:opacity="100%" draw:stroke="solid" svg:stroke-width="0.01389in" svg:stroke-color="#000000" svg:stroke-opacity="100%" draw:stroke-linejoin="miter" svg:stroke-linecap="butt"/>
    </style:style>
    <style:style style:family="graphic" style:name="a213">
      <style:graphic-properties draw:fill="none" draw:stroke="solid" svg:stroke-width="0.01389in" svg:stroke-color="#000000" svg:stroke-opacity="100%" draw:stroke-linejoin="miter" svg:stroke-linecap="butt"/>
    </style:style>
    <style:style style:family="graphic" style:name="a214">
      <style:graphic-properties draw:fill="none" draw:stroke="solid" svg:stroke-width="0.01389in" svg:stroke-color="#000000" svg:stroke-opacity="100%" draw:stroke-linejoin="miter" svg:stroke-linecap="butt"/>
    </style:style>
    <style:style style:family="graphic" style:name="a215">
      <style:graphic-properties draw:fill="none" draw:stroke="solid" svg:stroke-width="0.01389in" svg:stroke-color="#000000" svg:stroke-opacity="100%" draw:stroke-linejoin="miter" svg:stroke-linecap="butt"/>
    </style:style>
    <style:style style:family="graphic" style:name="a216">
      <style:graphic-properties draw:fill="none" draw:stroke="solid" svg:stroke-width="0.01389in" svg:stroke-color="#000000" svg:stroke-opacity="100%" draw:stroke-linejoin="miter" svg:stroke-linecap="butt"/>
    </style:style>
    <style:style style:family="graphic" style:name="a217">
      <style:graphic-properties draw:fill="none" draw:stroke="solid" svg:stroke-width="0.01389in" svg:stroke-color="#000000" svg:stroke-opacity="100%" draw:stroke-linejoin="miter" svg:stroke-linecap="butt"/>
    </style:style>
    <style:style style:family="graphic" style:name="a218">
      <style:graphic-properties draw:fill="none" draw:stroke="solid" svg:stroke-width="0.01389in" svg:stroke-color="#000000" svg:stroke-opacity="100%" draw:stroke-linejoin="miter" svg:stroke-linecap="butt"/>
    </style:style>
    <style:style style:family="graphic" style:name="a219"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2">
      <style:graphic-properties draw:fill="solid" draw:fill-color="#ffffff" draw:opacity="100%" draw:stroke="solid" svg:stroke-width="0.01389in" svg:stroke-color="#70ad47" svg:stroke-opacity="100%" draw:stroke-linejoin="round" svg:stroke-linecap="round"/>
    </style:style>
    <style:style style:family="graphic" style:name="a223">
      <style:graphic-properties draw:fill="solid" draw:fill-color="#c55a11" draw:opacity="100%" draw:stroke="solid" svg:stroke-width="0.01389in" svg:stroke-color="#000000" svg:stroke-opacity="100%" draw:stroke-linejoin="round" svg:stroke-linecap="round"/>
    </style:style>
    <style:style style:family="graphic" style:name="a225">
      <style:graphic-properties draw:fill="bitmap" draw:fill-image-name="a224" style:repeat="repeat" draw:fill-image-ref-point="top-left" draw:opacity="100%" draw:stroke="solid" svg:stroke-width="0.01389in" svg:stroke-color="#000000" svg:stroke-opacity="100%" draw:stroke-linejoin="round" svg:stroke-linecap="round"/>
    </style:style>
    <style:style style:family="graphic" style:name="a227">
      <style:graphic-properties draw:fill="bitmap" draw:fill-image-name="a226" style:repeat="repeat" draw:fill-image-ref-point="top-left" draw:opacity="100%" draw:stroke="solid" svg:stroke-width="0.01389in" svg:stroke-color="#000000" svg:stroke-opacity="100%" draw:stroke-linejoin="round" svg:stroke-linecap="round"/>
    </style:style>
    <style:style style:family="graphic" style:name="a228"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9"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6"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7">
      <style:graphic-properties draw:fill="solid" draw:fill-color="#ffffff" draw:opacity="100%" draw:stroke="solid" svg:stroke-width="0.01389in" svg:stroke-color="#70ad47" svg:stroke-opacity="100%" draw:stroke-linejoin="miter" svg:stroke-linecap="butt"/>
    </style:style>
    <style:style style:family="graphic" style:name="a239">
      <style:graphic-properties draw:fill="bitmap" draw:fill-image-name="a238" style:repeat="repeat" draw:fill-image-ref-point="top-left" draw:opacity="100%" draw:stroke="solid" svg:stroke-width="0.01389in" svg:stroke-color="#000000" svg:stroke-opacity="100%" draw:stroke-linejoin="miter" svg:stroke-linecap="butt"/>
    </style:style>
    <style:style style:family="graphic" style:name="a10">
      <style:graphic-properties draw:fill="none" draw:stroke="solid" svg:stroke-width="0.02083in" svg:stroke-color="#000000" draw:marker-end="a9" svg:stroke-opacity="100%" draw:stroke-linejoin="miter" svg:stroke-linecap="butt"/>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12">
      <style:graphic-properties draw:fill="none" draw:stroke="solid" svg:stroke-width="0.02083in" svg:stroke-color="#000000" svg:stroke-opacity="100%" draw:stroke-linejoin="miter" svg:stroke-linecap="butt"/>
    </style:style>
    <style:style style:family="graphic" style:name="a13">
      <style:graphic-properties draw:fill="none" draw:stroke="solid" svg:stroke-width="0.02083in" svg:stroke-color="#000000" svg:stroke-opacity="100%" draw:stroke-linejoin="miter" svg:stroke-linecap="butt"/>
    </style:style>
    <style:style style:family="graphic" style:name="a14">
      <style:graphic-properties draw:fill="none" draw:stroke="solid" svg:stroke-width="0.02083in" svg:stroke-color="#000000" svg:stroke-opacity="100%" draw:stroke-linejoin="miter" svg:stroke-linecap="butt"/>
    </style:style>
    <style:style style:family="graphic" style:name="a16">
      <style:graphic-properties draw:fill="none" draw:stroke="solid" svg:stroke-width="0.02083in" svg:stroke-color="#000000" draw:marker-end="a15" svg:stroke-opacity="100%" draw:stroke-linejoin="miter" svg:stroke-linecap="butt"/>
    </style:style>
    <style:style style:family="graphic" style:name="a17">
      <style:graphic-properties style:wrap="run-through" style:run-through="foreground" style:horizontal-rel="paragraph" style:vertical-rel="paragraph" style:horizontal-pos="from-left" style:vertical-pos="from-top"/>
    </style:style>
    <style:style style:family="graphic" style:name="a18">
      <style:graphic-properties draw:fill="none" draw:stroke="solid" svg:stroke-width="0.02083in" svg:stroke-color="#000000" svg:stroke-opacity="100%" draw:stroke-linejoin="miter" svg:stroke-linecap="butt"/>
    </style:style>
    <style:style style:family="graphic" style:name="a19">
      <style:graphic-properties draw:fill="none" draw:stroke="solid" svg:stroke-width="0.02083in" svg:stroke-color="#000000" svg:stroke-opacity="100%" draw:stroke-linejoin="miter" svg:stroke-linecap="butt"/>
    </style:style>
    <style:style style:family="graphic" style:name="a241">
      <style:graphic-properties draw:fill="bitmap" draw:fill-image-name="a240" style:repeat="repeat" draw:fill-image-ref-point="top-left" draw:opacity="100%" draw:stroke="solid" svg:stroke-width="0.01389in" svg:stroke-color="#000000" svg:stroke-opacity="100%" draw:stroke-linejoin="miter" svg:stroke-linecap="butt"/>
    </style:style>
    <style:style style:family="graphic" style:name="a242">
      <style:graphic-properties draw:fill="solid" draw:fill-color="#c55a11" draw:opacity="100%" draw:stroke="solid" svg:stroke-width="0.01389in" svg:stroke-color="#000000" svg:stroke-opacity="100%" draw:stroke-linejoin="miter" svg:stroke-linecap="butt"/>
    </style:style>
    <style:style style:family="graphic" style:name="a243">
      <style:graphic-properties draw:fill="solid" draw:fill-color="#ffffff" draw:opacity="100%" draw:stroke="solid" svg:stroke-width="0.01389in" svg:stroke-color="#70ad47" svg:stroke-opacity="100%" draw:stroke-linejoin="miter" svg:stroke-linecap="butt"/>
    </style:style>
    <style:style style:family="graphic" style:name="a245">
      <style:graphic-properties draw:fill="bitmap" draw:fill-image-name="a244" style:repeat="repeat" draw:fill-image-ref-point="top-left" draw:opacity="100%" draw:stroke="solid" svg:stroke-width="0.01389in" svg:stroke-color="#000000" svg:stroke-opacity="100%" draw:stroke-linejoin="miter" svg:stroke-linecap="butt"/>
    </style:style>
    <style:style style:family="graphic" style:name="a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247">
      <style:graphic-properties draw:fill="bitmap" draw:fill-image-name="a246" style:repeat="repeat" draw:fill-image-ref-point="top-left" draw:opacity="100%" draw:stroke="solid" svg:stroke-width="0.01389in" svg:stroke-color="#000000" svg:stroke-opacity="100%" draw:stroke-linejoin="miter" svg:stroke-linecap="butt"/>
    </style:style>
    <style:style style:family="graphic" style:name="a248">
      <style:graphic-properties draw:fill="solid" draw:fill-color="#c55a11" draw:opacity="100%" draw:stroke="solid" svg:stroke-width="0.01389in" svg:stroke-color="#000000" svg:stroke-opacity="100%" draw:stroke-linejoin="miter" svg:stroke-linecap="butt"/>
    </style:style>
    <style:style style:family="graphic" style:name="a102">
      <style:graphic-properties draw:fill="none" draw:stroke="solid" svg:stroke-width="0.00694in" svg:stroke-color="#000000" draw:marker-end="a101" svg:stroke-opacity="100%" draw:stroke-linejoin="miter" svg:stroke-linecap="butt"/>
    </style:style>
    <style:style style:family="graphic" style:name="a249">
      <style:graphic-properties draw:fill="solid" draw:fill-color="#ffffff" draw:opacity="100%" draw:stroke="solid" svg:stroke-width="0.01389in" svg:stroke-color="#70ad47" svg:stroke-opacity="100%" draw:stroke-linejoin="miter" svg:stroke-linecap="butt"/>
    </style:style>
    <style:style style:family="graphic" style:name="a20">
      <style:graphic-properties draw:fill="none" draw:stroke="solid" svg:stroke-width="0.02083in" svg:stroke-color="#000000" svg:stroke-opacity="100%" draw:stroke-linejoin="miter" svg:stroke-linecap="butt"/>
    </style:style>
    <style:style style:family="graphic" style:name="a104">
      <style:graphic-properties draw:fill="none" draw:stroke="solid" svg:stroke-width="0.00694in" svg:stroke-color="#000000" draw:marker-end="a103" svg:stroke-opacity="100%" draw:stroke-linejoin="miter" svg:stroke-linecap="butt"/>
    </style:style>
    <style:style style:family="graphic" style:name="a22">
      <style:graphic-properties draw:fill="none" draw:stroke="solid" svg:stroke-width="0.02083in" svg:stroke-color="#000000" draw:marker-end="a21" svg:stroke-opacity="100%" draw:stroke-linejoin="miter" svg:stroke-linecap="butt"/>
    </style:style>
    <style:style style:family="graphic" style:name="a106">
      <style:graphic-properties draw:fill="none" draw:stroke="solid" svg:stroke-width="0.00694in" svg:stroke-color="#000000" draw:marker-end="a105" svg:stroke-opacity="100%" draw:stroke-linejoin="miter" svg:stroke-linecap="butt"/>
    </style:style>
    <style:style style:family="graphic" style:name="a23">
      <style:graphic-properties draw:fill="none" draw:stroke="solid" svg:stroke-width="0.02083in" svg:stroke-color="#000000" svg:stroke-opacity="100%" draw:stroke-linejoin="miter" svg:stroke-linecap="butt"/>
    </style:style>
    <style:style style:family="graphic" style:name="a24">
      <style:graphic-properties draw:fill="none" draw:stroke="solid" svg:stroke-width="0.02083in" svg:stroke-color="#000000" svg:stroke-opacity="100%" draw:stroke-linejoin="miter" svg:stroke-linecap="butt"/>
    </style:style>
    <style:style style:family="graphic" style:name="a108">
      <style:graphic-properties draw:fill="none" draw:stroke="solid" svg:stroke-width="0.00694in" svg:stroke-color="#000000" draw:marker-end="a107" svg:stroke-opacity="100%" draw:stroke-linejoin="miter" svg:stroke-linecap="butt"/>
    </style:style>
    <style:style style:family="graphic" style:name="a25">
      <style:graphic-properties draw:fill="none" draw:stroke="solid" svg:stroke-width="0.02083in" svg:stroke-color="#000000" svg:stroke-opacity="100%" draw:stroke-linejoin="miter" svg:stroke-linecap="butt"/>
    </style:style>
    <style:style style:family="graphic" style:name="a26">
      <style:graphic-properties draw:fill="none" draw:stroke="solid" svg:stroke-width="0.02083in" svg:stroke-color="#000000" svg:stroke-opacity="100%" draw:stroke-linejoin="miter" svg:stroke-linecap="butt"/>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9">
      <style:graphic-properties style:wrap="run-through" style:run-through="foreground" draw:fill="none" draw:stroke="solid" svg:stroke-width="0.02083in" svg:stroke-color="#000000" draw:marker-end="a28" svg:stroke-opacity="100%" draw:stroke-linejoin="miter" svg:stroke-linecap="butt" style:horizontal-rel="paragraph" style:vertical-rel="paragraph" style:horizontal-pos="from-left" style:vertical-pos="from-top"/>
    </style:style>
    <style:style style:family="graphic" style:name="a251">
      <style:graphic-properties draw:fill="bitmap" draw:fill-image-name="a250" style:repeat="repeat" draw:fill-image-ref-point="top-left" draw:opacity="100%" draw:stroke="solid" svg:stroke-width="0.01389in" svg:stroke-color="#000000" svg:stroke-opacity="100%" draw:stroke-linejoin="miter" svg:stroke-linecap="butt"/>
    </style:style>
    <style:style style:family="graphic" style:name="a253">
      <style:graphic-properties draw:fill="bitmap" draw:fill-image-name="a252" style:repeat="repeat" draw:fill-image-ref-point="top-left" draw:opacity="100%" draw:stroke="solid" svg:stroke-width="0.01389in" svg:stroke-color="#000000" svg:stroke-opacity="100%" draw:stroke-linejoin="miter" svg:stroke-linecap="butt"/>
    </style:style>
    <style:style style:family="graphic" style:name="a254">
      <style:graphic-properties draw:fill="solid" draw:fill-color="#c55a11" draw:opacity="100%" draw:stroke="solid" svg:stroke-width="0.01389in" svg:stroke-color="#000000" svg:stroke-opacity="100%" draw:stroke-linejoin="miter" svg:stroke-linecap="butt"/>
    </style:style>
    <style:style style:family="graphic" style:name="a255">
      <style:graphic-properties draw:fill="solid" draw:fill-color="#ffffff" draw:opacity="100%" draw:stroke="solid" svg:stroke-width="0.01389in" svg:stroke-color="#70ad47" svg:stroke-opacity="100%" draw:stroke-linejoin="miter" svg:stroke-linecap="butt"/>
    </style:style>
    <style:style style:family="graphic" style:name="a110">
      <style:graphic-properties draw:fill="none" draw:stroke="solid" svg:stroke-width="0.00694in" svg:stroke-color="#000000" draw:marker-end="a109" svg:stroke-opacity="100%" draw:stroke-linejoin="miter" svg:stroke-linecap="butt"/>
    </style:style>
    <style:style style:family="graphic" style:name="a257">
      <style:graphic-properties draw:fill="bitmap" draw:fill-image-name="a256" style:repeat="repeat" draw:fill-image-ref-point="top-left" draw:opacity="100%" draw:stroke="solid" svg:stroke-width="0.01389in" svg:stroke-color="#000000" svg:stroke-opacity="100%" draw:stroke-linejoin="miter" svg:stroke-linecap="butt"/>
    </style:style>
    <style:style style:family="graphic" style:name="a111">
      <style:graphic-properties/>
    </style:style>
    <style:style style:family="graphic" style:name="a258">
      <style:graphic-properties draw:fill="none" draw:stroke="solid" svg:stroke-width="0.01389in" svg:stroke-color="#000000" svg:stroke-opacity="100%" draw:stroke-linejoin="miter" svg:stroke-linecap="butt"/>
    </style:style>
    <style:style style:family="graphic" style:name="a112" style:parent-style-name="Graphics">
      <style:graphic-properties fo:border="0.01042in none" fo:background-color="transparent" fo:clip="rect(0in, 0in, 0in, 0in)"/>
    </style:style>
    <style:style style:family="graphic" style:name="a113">
      <style:graphic-properties draw:fill="solid" draw:fill-color="#c5e0b4" draw:opacity="100%" draw:stroke="solid" svg:stroke-width="0.01389in" svg:stroke-color="#548235" svg:stroke-opacity="100%" draw:stroke-linejoin="miter" svg:stroke-linecap="butt"/>
    </style:style>
    <style:style style:family="graphic" style:name="a114">
      <style:graphic-properties draw:fill="solid" draw:fill-color="#bdd7ee" draw:opacity="100%" draw:stroke="solid" svg:stroke-width="0.01389in" svg:stroke-color="#2e75b6" svg:stroke-opacity="100%" draw:stroke-linejoin="miter" svg:stroke-linecap="butt"/>
    </style:style>
    <style:style style:family="graphic" style:name="a31">
      <style:graphic-properties style:wrap="run-through" style:run-through="foreground" draw:fill="none" draw:stroke="solid" svg:stroke-width="0.02083in" svg:stroke-color="#000000" draw:marker-end="a30" svg:stroke-opacity="100%" draw:stroke-linejoin="miter" svg:stroke-linecap="butt" style:horizontal-rel="paragraph" style:vertical-rel="paragraph" style:horizontal-pos="from-left" style:vertical-pos="from-top"/>
    </style:style>
    <style:style style:family="graphic" style:name="a11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11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17">
      <style:graphic-properties fo:wrap-option="wrap" fo:padding-top="0.05in" fo:padding-bottom="0.05in" fo:padding-left="0.1in" fo:padding-right="0.1in" draw:textarea-vertical-align="top" draw:textarea-horizontal-align="left" draw:fill="solid" draw:fill-color="#f8cbad" draw:opacity="100%" draw:stroke="solid" svg:stroke-width="0.01389in" svg:stroke-color="#c55a11" svg:stroke-opacity="100%" draw:stroke-linejoin="miter" svg:stroke-linecap="butt"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7">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a9d18e" draw:opacity="100%" draw:stroke="none"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bfbfb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0">
      <style:graphic-properties draw:fill="bitmap" draw:fill-image-name="a259" style:repeat="repeat" draw:fill-image-ref-point="top-left" draw:opacity="100%" draw:stroke="solid" svg:stroke-width="0.01389in" svg:stroke-color="#000000" svg:stroke-opacity="100%" draw:stroke-linejoin="miter" svg:stroke-linecap="butt"/>
    </style:style>
    <style:style style:family="graphic" style:name="a261">
      <style:graphic-properties draw:fill="solid" draw:fill-color="#c55a11" draw:opacity="100%" draw:stroke="solid" svg:stroke-width="0.01389in" svg:stroke-color="#000000" svg:stroke-opacity="100%" draw:stroke-linejoin="miter" svg:stroke-linecap="butt"/>
    </style:style>
    <style:style style:family="graphic" style:name="a262">
      <style:graphic-properties draw:fill="none" draw:stroke="solid" svg:stroke-width="0.01389in" svg:stroke-color="#000000" svg:stroke-opacity="100%" draw:stroke-linejoin="miter" svg:stroke-linecap="butt"/>
    </style:style>
    <style:style style:family="graphic" style:name="a263">
      <style:graphic-properties draw:fill="none" draw:stroke="solid" svg:stroke-width="0.01389in" svg:stroke-color="#000000" svg:stroke-opacity="100%" draw:stroke-linejoin="miter" svg:stroke-linecap="butt"/>
    </style:style>
    <style:style style:family="graphic" style:name="a264">
      <style:graphic-properties draw:fill="none" draw:stroke="solid" svg:stroke-width="0.01389in" svg:stroke-color="#000000" svg:stroke-opacity="100%" draw:stroke-linejoin="miter" svg:stroke-linecap="butt"/>
    </style:style>
    <style:style style:family="graphic" style:name="a265">
      <style:graphic-properties draw:fill="none" draw:stroke="solid" svg:stroke-width="0.01389in" svg:stroke-color="#000000" svg:stroke-opacity="100%" draw:stroke-linejoin="miter" svg:stroke-linecap="butt"/>
    </style:style>
    <style:style style:family="graphic" style:name="a266">
      <style:graphic-properties draw:fill="none" draw:stroke="solid" svg:stroke-width="0.01389in" svg:stroke-color="#000000" svg:stroke-opacity="100%" draw:stroke-linejoin="miter" svg:stroke-linecap="butt"/>
    </style:style>
    <style:style style:family="graphic" style:name="a12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7">
      <style:graphic-properties draw:fill="none" draw:stroke="solid" svg:stroke-width="0.01389in" svg:stroke-color="#000000" svg:stroke-opacity="100%" draw:stroke-linejoin="miter" svg:stroke-linecap="butt"/>
    </style:style>
    <style:style style:family="graphic" style:name="a12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8">
      <style:graphic-properties draw:fill="none" draw:stroke="solid" svg:stroke-width="0.01389in" svg:stroke-color="#000000" svg:stroke-opacity="100%" draw:stroke-linejoin="miter" svg:stroke-linecap="butt"/>
    </style:style>
    <style:style style:family="graphic" style:name="a1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9">
      <style:graphic-properties draw:fill="none" draw:stroke="solid" svg:stroke-width="0.01389in" svg:stroke-color="#000000" svg:stroke-opacity="100%" draw:stroke-linejoin="miter" svg:stroke-linecap="butt"/>
    </style:style>
    <style:style style:family="graphic" style:name="a1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solid" draw:fill-color="#203864" draw:opacity="100%" draw:stroke="none"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843c0c" draw:opacity="100%" draw:stroke="none"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
      <style:graphic-properties draw:fill="none" draw:stroke="solid" svg:stroke-width="0.00694in" svg:stroke-color="#262626" svg:stroke-opacity="100%" draw:stroke-linejoin="miter" svg:stroke-linecap="butt"/>
    </style:style>
    <style:style style:family="graphic"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
      <style:graphic-properties draw:fill="none" draw:stroke="solid" svg:stroke-width="0.01389in" svg:stroke-color="#181717" draw:marker-end="a48" svg:stroke-opacity="100%" draw:stroke-linejoin="miter" svg:stroke-linecap="butt"/>
    </style:style>
    <style:style style:family="graphic" style:name="a270">
      <style:graphic-properties draw:fill="none" draw:stroke="solid" svg:stroke-width="0.01389in" svg:stroke-color="#000000" svg:stroke-opacity="100%" draw:stroke-linejoin="miter" svg:stroke-linecap="butt"/>
    </style:style>
    <style:style style:family="graphic" style:name="a27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draw:fill="solid" draw:fill-color="#ffffff" draw:opacity="100%" draw:stroke="solid" svg:stroke-width="0.01389in" svg:stroke-color="#70ad47" svg:stroke-opacity="100%" draw:stroke-linejoin="round" svg:stroke-linecap="round"/>
    </style:style>
    <style:style style:family="graphic" style:name="a276">
      <style:graphic-properties draw:fill="bitmap" draw:fill-image-name="a275" style:repeat="repeat" draw:fill-image-ref-point="top-left" draw:opacity="100%" draw:stroke="solid" svg:stroke-width="0.01389in" svg:stroke-color="#000000" svg:stroke-opacity="100%" draw:stroke-linejoin="round" svg:stroke-linecap="round"/>
    </style:style>
    <style:style style:family="graphic" style:name="a130">
      <style:graphic-properties draw:fill="none" draw:stroke="solid" svg:stroke-width="0.00694in" svg:stroke-color="#000000" draw:marker-end="a129" svg:stroke-opacity="100%" draw:stroke-linejoin="miter" svg:stroke-linecap="butt"/>
    </style:style>
    <style:style style:family="graphic" style:name="a278">
      <style:graphic-properties draw:fill="bitmap" draw:fill-image-name="a277" style:repeat="repeat" draw:fill-image-ref-point="top-left" draw:opacity="100%" draw:stroke="solid" svg:stroke-width="0.01389in" svg:stroke-color="#000000" svg:stroke-opacity="100%" draw:stroke-linejoin="round" svg:stroke-linecap="round"/>
    </style:style>
    <style:style style:family="graphic" style:name="a132">
      <style:graphic-properties draw:fill="none" draw:stroke="solid" svg:stroke-width="0.00694in" svg:stroke-color="#ed7d31" draw:marker-end="a131" svg:stroke-opacity="100%" draw:stroke-linejoin="miter" svg:stroke-linecap="butt"/>
    </style:style>
    <style:style style:family="graphic" style:name="a279">
      <style:graphic-properties draw:fill="solid" draw:fill-color="#c55a11" draw:opacity="100%" draw:stroke="solid" svg:stroke-width="0.01389in" svg:stroke-color="#000000" svg:stroke-opacity="100%" draw:stroke-linejoin="round" svg:stroke-linecap="round"/>
    </style:style>
    <style:style style:family="graphic" style:name="a134">
      <style:graphic-properties draw:fill="none" draw:stroke="solid" svg:stroke-width="0.00694in" svg:stroke-color="#a5a5a5" draw:marker-end="a133" svg:stroke-opacity="100%" draw:stroke-linejoin="miter" svg:stroke-linecap="butt"/>
    </style:style>
    <style:style style:family="graphic" style:name="a136">
      <style:graphic-properties fo:wrap-option="wrap" fo:padding-top="0.05in" fo:padding-bottom="0.05in" fo:padding-left="0.1in" fo:padding-right="0.1in" draw:textarea-vertical-align="middle" draw:textarea-horizontal-align="left" draw:fill="none" draw:stroke="dash" draw:stroke-dash="a135" svg:stroke-width="0.01389in" svg:stroke-color="#767171" svg:stroke-opacity="100%" draw:stroke-linejoin="miter" svg:stroke-linecap="butt" draw:auto-grow-width="false" draw:auto-grow-height="false"/>
      <style:paragraph-properties style:font-independent-line-spacing="true" style:writing-mode="lr-tb"/>
    </style:style>
    <style:style style:family="graphic" style:name="a52">
      <style:graphic-properties draw:fill="none" draw:stroke="solid" svg:stroke-width="0.01389in" svg:stroke-color="#181717" draw:marker-start="a50" draw:marker-end="a51" svg:stroke-opacity="100%" draw:stroke-linejoin="miter" svg:stroke-linecap="butt"/>
    </style:style>
    <style:style style:family="graphic" style:name="a138">
      <style:graphic-properties draw:fill="none" draw:stroke="solid" svg:stroke-width="0.00694in" svg:stroke-color="#000000" draw:marker-end="a137" svg:stroke-opacity="100%" draw:stroke-linejoin="miter" svg:stroke-linecap="butt"/>
    </style:style>
    <style:style style:family="graphic" style:name="a55">
      <style:graphic-properties draw:fill="none" draw:stroke="solid" svg:stroke-width="0.01389in" svg:stroke-color="#181717" draw:marker-start="a53" draw:marker-end="a54" svg:stroke-opacity="100%" draw:stroke-linejoin="miter" svg:stroke-linecap="butt"/>
    </style:style>
    <style:style style:family="graphic" style:name="a57">
      <style:graphic-properties draw:fill="none" draw:stroke="solid" svg:stroke-width="0.01389in" svg:stroke-color="#181717" draw:marker-end="a56" svg:stroke-opacity="100%" draw:stroke-linejoin="miter" svg:stroke-linecap="butt"/>
    </style:style>
    <style:style style:family="graphic" style:name="a59">
      <style:graphic-properties draw:fill="none" draw:stroke="solid" svg:stroke-width="0.01389in" svg:stroke-color="#181717" draw:marker-end="a58" svg:stroke-opacity="100%" draw:stroke-linejoin="miter" svg:stroke-linecap="butt"/>
    </style:style>
    <style:style style:family="graphic" style:name="a28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6">
      <style:graphic-properties draw:fill="solid" draw:fill-color="#ffffff" draw:opacity="100%" draw:stroke="solid" svg:stroke-width="0.01389in" svg:stroke-color="#70ad47" svg:stroke-opacity="100%" draw:stroke-linejoin="miter" svg:stroke-linecap="butt"/>
    </style:style>
    <style:style style:family="graphic" style:name="a140">
      <style:graphic-properties draw:fill="none" draw:stroke="solid" svg:stroke-width="0.00694in" svg:stroke-color="#7030a0" draw:marker-end="a139" svg:stroke-opacity="100%" draw:stroke-linejoin="miter" svg:stroke-linecap="butt"/>
    </style:style>
    <style:style style:family="graphic" style:name="a300">
      <style:graphic-properties draw:fill="bitmap" draw:fill-image-name="a299" style:repeat="repeat" draw:fill-image-ref-point="top-left" draw:opacity="100%" draw:stroke="solid" svg:stroke-width="0.01389in" svg:stroke-color="#000000" svg:stroke-opacity="100%" draw:stroke-linejoin="miter" svg:stroke-linecap="butt"/>
    </style:style>
    <style:style style:family="graphic" style:name="a288">
      <style:graphic-properties draw:fill="bitmap" draw:fill-image-name="a287" style:repeat="repeat" draw:fill-image-ref-point="top-left" draw:opacity="100%" draw:stroke="solid" svg:stroke-width="0.01389in" svg:stroke-color="#000000" svg:stroke-opacity="100%" draw:stroke-linejoin="miter" svg:stroke-linecap="butt"/>
    </style:style>
    <style:style style:family="graphic" style:name="a142">
      <style:graphic-properties draw:fill="none" draw:stroke="solid" svg:stroke-width="0.00694in" svg:stroke-color="#ffc000" draw:marker-end="a141" svg:stroke-opacity="100%" draw:stroke-linejoin="miter" svg:stroke-linecap="butt"/>
    </style:style>
    <style:style style:family="graphic" style:name="a302">
      <style:graphic-properties draw:fill="bitmap" draw:fill-image-name="a301" style:repeat="repeat" draw:fill-image-ref-point="top-left" draw:opacity="100%" draw:stroke="solid" svg:stroke-width="0.01389in" svg:stroke-color="#000000" svg:stroke-opacity="100%" draw:stroke-linejoin="miter" svg:stroke-linecap="butt"/>
    </style:style>
    <style:style style:family="graphic" style:name="a60">
      <style:graphic-properties/>
    </style:style>
    <style:style style:family="graphic" style:name="a303">
      <style:graphic-properties draw:fill="solid" draw:fill-color="#c55a11" draw:opacity="100%" draw:stroke="solid" svg:stroke-width="0.01389in" svg:stroke-color="#000000" svg:stroke-opacity="100%" draw:stroke-linejoin="miter" svg:stroke-linecap="butt"/>
    </style:style>
    <style:style style:family="graphic" style:name="a144">
      <style:graphic-properties draw:fill="none" draw:stroke="dash" draw:stroke-dash="a143" svg:stroke-width="0.00694in" svg:stroke-color="#afabab" svg:stroke-opacity="100%" draw:stroke-linejoin="miter" svg:stroke-linecap="butt"/>
    </style:style>
    <style:style style:family="graphic" style:name="a61" style:parent-style-name="Graphics">
      <style:graphic-properties fo:border="0.01042in none" fo:background-color="transparent" fo:clip="rect(0in, 0in, 0in, 0in)"/>
    </style:style>
    <style:style style:family="graphic" style:name="a304">
      <style:graphic-properties draw:fill="solid" draw:fill-color="#ffffff" draw:opacity="100%" draw:stroke="solid" svg:stroke-width="0.01389in" svg:stroke-color="#70ad47" svg:stroke-opacity="100%" draw:stroke-linejoin="miter" svg:stroke-linecap="butt"/>
    </style:style>
    <style:style style:family="graphic" style:name="a1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parent-style-name="Graphics">
      <style:graphic-properties fo:border="0.01042in none" fo:background-color="transparent" style:wrap="parallel" style:wrap-contour="false" fo:clip="rect(0.02227in, 0in, 0.02227in, 0in)" style:horizontal-rel="page-content" style:vertical-rel="paragraph" style:horizontal-pos="right" style:vertical-pos="from-top"/>
    </style:style>
    <style:style style:family="graphic" style:name="a146">
      <style:graphic-properties style:wrap="parallel" style:wrap-contour="false" style:horizontal-rel="page-content" style:vertical-rel="paragraph" style:horizontal-pos="right" style:vertical-pos="from-top"/>
    </style:style>
    <style:style style:family="graphic" style:name="a63">
      <style:graphic-properties draw:fill="none" draw:stroke="solid" svg:stroke-width="0.01389in" svg:stroke-color="#172c51" svg:stroke-opacity="100%" draw:stroke-linejoin="miter" svg:stroke-linecap="butt"/>
    </style:style>
    <style:style style:family="graphic" style:name="a306">
      <style:graphic-properties draw:fill="bitmap" draw:fill-image-name="a305" style:repeat="repeat" draw:fill-image-ref-point="top-left" draw:opacity="100%" draw:stroke="solid" svg:stroke-width="0.01389in" svg:stroke-color="#000000" svg:stroke-opacity="100%" draw:stroke-linejoin="miter" svg:stroke-linecap="butt"/>
    </style:style>
    <style:style style:family="graphic" style:name="a147">
      <style:graphic-properties draw:fill="solid" draw:fill-color="#c5e0b4" draw:opacity="100%" draw:stroke="solid" svg:stroke-width="0.01389in" svg:stroke-color="#548235" svg:stroke-opacity="100%" draw:stroke-linejoin="miter" svg:stroke-linecap="butt"/>
    </style:style>
    <style:style style:family="graphic" style:name="a64">
      <style:graphic-properties draw:fill="none" draw:stroke="solid" svg:stroke-width="0.01389in" svg:stroke-color="#172c51" svg:stroke-opacity="100%" draw:stroke-linejoin="miter" svg:stroke-linecap="butt"/>
    </style:style>
    <style:style style:family="graphic" style:name="a307">
      <style:graphic-properties draw:fill="none" draw:stroke="solid" svg:stroke-width="0.01389in" svg:stroke-color="#000000" svg:stroke-opacity="100%" draw:stroke-linejoin="miter" svg:stroke-linecap="butt"/>
    </style:style>
    <style:style style:family="graphic" style:name="a148">
      <style:graphic-properties draw:fill="solid" draw:fill-color="#bdd7ee" draw:opacity="100%" draw:stroke="solid" svg:stroke-width="0.01389in" svg:stroke-color="#2e75b6" svg:stroke-opacity="100%" draw:stroke-linejoin="miter" svg:stroke-linecap="butt"/>
    </style:style>
    <style:style style:family="graphic" style:name="a65">
      <style:graphic-properties draw:fill="none" draw:stroke="solid" svg:stroke-width="0.01389in" svg:stroke-color="#172c51" svg:stroke-opacity="100%" draw:stroke-linejoin="miter" svg:stroke-linecap="butt"/>
    </style:style>
    <style:style style:family="graphic" style:name="a14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6">
      <style:graphic-properties draw:fill="none" draw:stroke="solid" svg:stroke-width="0.01389in" svg:stroke-color="#172c51" svg:stroke-opacity="100%" draw:stroke-linejoin="miter" svg:stroke-linecap="butt"/>
    </style:style>
    <style:style style:family="graphic" style:name="a309">
      <style:graphic-properties draw:fill="bitmap" draw:fill-image-name="a308" style:repeat="repeat" draw:fill-image-ref-point="top-left" draw:opacity="100%" draw:stroke="solid" svg:stroke-width="0.01389in" svg:stroke-color="#000000" svg:stroke-opacity="100%" draw:stroke-linejoin="miter" svg:stroke-linecap="butt"/>
    </style:style>
    <style:style style:family="graphic" style:name="a67">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8">
      <style:graphic-properties draw:fill="none" draw:stroke="solid" svg:stroke-width="0.01389in" svg:stroke-color="#172c51" svg:stroke-opacity="100%" draw:stroke-linejoin="miter" svg:stroke-linecap="butt"/>
    </style:style>
    <style:style style:family="graphic" style:name="a69">
      <style:graphic-properties draw:fill="none" draw:stroke="solid" svg:stroke-width="0.01389in" svg:stroke-color="#172c51" svg:stroke-opacity="100%" draw:stroke-linejoin="miter" svg:stroke-linecap="butt"/>
    </style:style>
    <style:style style:family="graphic" style:name="a290">
      <style:graphic-properties draw:fill="bitmap" draw:fill-image-name="a289" style:repeat="repeat" draw:fill-image-ref-point="top-left" draw:opacity="100%" draw:stroke="solid" svg:stroke-width="0.01389in" svg:stroke-color="#000000" svg:stroke-opacity="100%" draw:stroke-linejoin="miter" svg:stroke-linecap="butt"/>
    </style:style>
    <style:style style:family="graphic" style:name="a291">
      <style:graphic-properties draw:fill="solid" draw:fill-color="#c55a11" draw:opacity="100%" draw:stroke="solid" svg:stroke-width="0.01389in" svg:stroke-color="#000000" svg:stroke-opacity="100%" draw:stroke-linejoin="miter" svg:stroke-linecap="butt"/>
    </style:style>
    <style:style style:family="graphic" style:name="a292">
      <style:graphic-properties draw:fill="solid" draw:fill-color="#ffffff" draw:opacity="100%" draw:stroke="solid" svg:stroke-width="0.01389in" svg:stroke-color="#70ad47" svg:stroke-opacity="100%" draw:stroke-linejoin="miter" svg:stroke-linecap="butt"/>
    </style:style>
    <style:style style:family="graphic" style:name="a294">
      <style:graphic-properties draw:fill="bitmap" draw:fill-image-name="a293" style:repeat="repeat" draw:fill-image-ref-point="top-left" draw:opacity="100%" draw:stroke="solid" svg:stroke-width="0.01389in" svg:stroke-color="#000000" svg:stroke-opacity="100%" draw:stroke-linejoin="miter" svg:stroke-linecap="butt"/>
    </style:style>
    <style:style style:family="graphic" style:name="a296">
      <style:graphic-properties draw:fill="bitmap" draw:fill-image-name="a295" style:repeat="repeat" draw:fill-image-ref-point="top-left" draw:opacity="100%" draw:stroke="solid" svg:stroke-width="0.01389in" svg:stroke-color="#000000" svg:stroke-opacity="100%" draw:stroke-linejoin="miter" svg:stroke-linecap="butt"/>
    </style:style>
    <style:style style:family="graphic" style:name="a15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10">
      <style:graphic-properties draw:fill="solid" draw:fill-color="#c55a11" draw:opacity="100%" draw:stroke="solid" svg:stroke-width="0.01389in" svg:stroke-color="#000000" svg:stroke-opacity="100%" draw:stroke-linejoin="miter" svg:stroke-linecap="butt"/>
    </style:style>
    <style:style style:family="graphic" style:name="a15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7">
      <style:graphic-properties draw:fill="solid" draw:fill-color="#c55a11" draw:opacity="100%" draw:stroke="solid" svg:stroke-width="0.01389in" svg:stroke-color="#000000" svg:stroke-opacity="100%" draw:stroke-linejoin="miter" svg:stroke-linecap="butt"/>
    </style:style>
    <style:style style:family="graphic" style:name="a311">
      <style:graphic-properties draw:fill="none" draw:stroke="solid" svg:stroke-width="0.01389in" svg:stroke-color="#000000" svg:stroke-opacity="100%" draw:stroke-linejoin="miter" svg:stroke-linecap="butt"/>
    </style:style>
    <style:style style:family="graphic" style:name="a15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8">
      <style:graphic-properties draw:fill="solid" draw:fill-color="#ffffff" draw:opacity="100%" draw:stroke="solid" svg:stroke-width="0.01389in" svg:stroke-color="#70ad47" svg:stroke-opacity="100%" draw:stroke-linejoin="miter" svg:stroke-linecap="butt"/>
    </style:style>
    <style:style style:family="graphic" style:name="a312">
      <style:graphic-properties draw:fill="none" draw:stroke="solid" svg:stroke-width="0.01389in" svg:stroke-color="#000000" svg:stroke-opacity="100%" draw:stroke-linejoin="miter" svg:stroke-linecap="butt"/>
    </style:style>
    <style:style style:family="graphic" style:name="a15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13">
      <style:graphic-properties draw:fill="none" draw:stroke="solid" svg:stroke-width="0.01389in" svg:stroke-color="#000000" svg:stroke-opacity="100%" draw:stroke-linejoin="miter" svg:stroke-linecap="butt"/>
    </style:style>
    <style:style style:family="graphic" style:name="a15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70">
      <style:graphic-properties draw:fill="none" draw:stroke="solid" svg:stroke-width="0.01389in" svg:stroke-color="#172c51" svg:stroke-opacity="100%" draw:stroke-linejoin="miter" svg:stroke-linecap="butt"/>
    </style:style>
    <style:style style:family="graphic" style:name="a314">
      <style:graphic-properties draw:fill="none" draw:stroke="solid" svg:stroke-width="0.01389in" svg:stroke-color="#000000" svg:stroke-opacity="100%" draw:stroke-linejoin="miter" svg:stroke-linecap="butt"/>
    </style:style>
    <style:style style:family="graphic" style:name="a1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draw:fill="none" draw:stroke="solid" svg:stroke-width="0.01389in" svg:stroke-color="#000000" svg:stroke-opacity="100%" draw:stroke-linejoin="miter" svg:stroke-linecap="butt"/>
    </style:style>
    <style:style style:family="graphic" style:name="a1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6">
      <style:graphic-properties draw:fill="none" draw:stroke="solid" svg:stroke-width="0.01389in" svg:stroke-color="#000000" svg:stroke-opacity="100%" draw:stroke-linejoin="miter" svg:stroke-linecap="butt"/>
    </style:style>
    <style:style style:family="graphic" style:name="a157">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draw:fill="none" draw:stroke="solid" svg:stroke-width="0.01389in" svg:stroke-color="#000000" svg:stroke-opacity="100%" draw:stroke-linejoin="miter" svg:stroke-linecap="butt"/>
    </style:style>
    <style:style style:family="graphic" style:name="a158">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8">
      <style:graphic-properties draw:fill="none" draw:stroke="solid" svg:stroke-width="0.01389in" svg:stroke-color="#000000" svg:stroke-opacity="100%" draw:stroke-linejoin="miter" svg:stroke-linecap="butt"/>
    </style:style>
    <style:style style:family="graphic" style:name="a159">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9">
      <style:graphic-properties draw:fill="none" draw:stroke="solid" svg:stroke-width="0.01389in" svg:stroke-color="#000000" svg:stroke-opacity="100%" draw:stroke-linejoin="miter" svg:stroke-linecap="butt"/>
    </style:style>
    <style:style style:family="graphic"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6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0">
      <style:graphic-properties draw:fill="none" draw:stroke="solid" svg:stroke-width="0.01389in" svg:stroke-color="#000000" svg:stroke-opacity="100%" draw:stroke-linejoin="miter" svg:stroke-linecap="butt"/>
    </style:style>
    <style:style style:family="graphic" style:name="a161">
      <style:graphic-properties draw:fill="none" draw:stroke="solid" svg:stroke-width="0.00694in" svg:stroke-color="#262626" svg:stroke-opacity="100%" draw:stroke-linejoin="miter" svg:stroke-linecap="butt"/>
    </style:style>
    <style:style style:family="graphic" style:name="a321">
      <style:graphic-properties draw:fill="none" draw:stroke="solid" svg:stroke-width="0.01389in" svg:stroke-color="#000000" svg:stroke-opacity="100%" draw:stroke-linejoin="miter" svg:stroke-linecap="butt"/>
    </style:style>
    <style:style style:family="graphic" style:name="a322">
      <style:graphic-properties draw:fill="none" draw:stroke="solid" svg:stroke-width="0.01389in" svg:stroke-color="#000000" svg:stroke-opacity="100%" draw:stroke-linejoin="miter" svg:stroke-linecap="butt"/>
    </style:style>
    <style:style style:family="graphic" style:name="a163">
      <style:graphic-properties draw:fill="none" draw:stroke="solid" svg:stroke-width="0.00694in" svg:stroke-color="#000000" draw:marker-end="a162" svg:stroke-opacity="100%" draw:stroke-linejoin="miter" svg:stroke-linecap="butt"/>
    </style:style>
    <style:style style:family="graphic" style:name="a32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draw:fill="none" draw:stroke="solid" svg:stroke-width="0.01389in" svg:stroke-color="#172c51" svg:stroke-opacity="100%" draw:stroke-linejoin="miter" svg:stroke-linecap="butt"/>
    </style:style>
    <style:style style:family="graphic" style:name="a32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65">
      <style:graphic-properties draw:fill="none" draw:stroke="solid" svg:stroke-width="0.00694in" svg:stroke-color="#ed7d31" draw:marker-end="a164" svg:stroke-opacity="100%" draw:stroke-linejoin="miter" svg:stroke-linecap="butt"/>
    </style:style>
    <style:style style:family="graphic" style:name="a81">
      <style:graphic-properties draw:fill="none" draw:stroke="solid" svg:stroke-width="0.01389in" svg:stroke-color="#172c51" svg:stroke-opacity="100%" draw:stroke-linejoin="miter" svg:stroke-linecap="butt"/>
    </style:style>
    <style:style style:family="graphic" style:name="a32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draw:fill="none" draw:stroke="solid" svg:stroke-width="0.01389in" svg:stroke-color="#172c51" svg:stroke-opacity="100%" draw:stroke-linejoin="miter" svg:stroke-linecap="butt"/>
    </style:style>
    <style:style style:family="graphic" style:name="a326">
      <style:graphic-properties draw:fill="solid" draw:fill-color="#ffffff" draw:opacity="100%" draw:stroke="solid" svg:stroke-width="0.01389in" svg:stroke-color="#70ad47" svg:stroke-opacity="100%" draw:stroke-linejoin="round" svg:stroke-linecap="round"/>
    </style:style>
    <style:style style:family="graphic" style:name="a167">
      <style:graphic-properties draw:fill="none" draw:stroke="solid" svg:stroke-width="0.00694in" svg:stroke-color="#a5a5a5" draw:marker-end="a166" svg:stroke-opacity="100%" draw:stroke-linejoin="miter" svg:stroke-linecap="butt"/>
    </style:style>
    <style:style style:family="graphic" style:name="a83">
      <style:graphic-properties draw:fill="none" draw:stroke="solid" svg:stroke-width="0.01389in" svg:stroke-color="#172c51" svg:stroke-opacity="100%" draw:stroke-linejoin="miter" svg:stroke-linecap="butt"/>
    </style:style>
    <style:style style:family="graphic" style:name="a327">
      <style:graphic-properties draw:fill="solid" draw:fill-color="#c55a11" draw:opacity="100%" draw:stroke="solid" svg:stroke-width="0.01389in" svg:stroke-color="#000000" svg:stroke-opacity="100%" draw:stroke-linejoin="round" svg:stroke-linecap="round"/>
    </style:style>
    <style:style style:family="graphic" style:name="a16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bitmap" draw:fill-image-name="a328" style:repeat="repeat" draw:fill-image-ref-point="top-left" draw:opacity="100%" draw:stroke="solid" svg:stroke-width="0.01389in" svg:stroke-color="#000000" svg:stroke-opacity="100%" draw:stroke-linejoin="round" svg:stroke-linecap="round"/>
    </style:style>
    <style:style style:family="graphic"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0">
      <style:graphic-properties style:wrap="run-through" style:run-through="foreground" draw:fill="solid" draw:fill-color="#c00000"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7f7f7f"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000000" draw:marker-end="a4" svg:stroke-opacity="100%" draw:stroke-linejoin="miter" svg:stroke-linecap="butt" style:horizontal-rel="paragraph" style:vertical-rel="paragraph" style:horizontal-pos="from-left" style:vertical-pos="from-top"/>
    </style:style>
    <style:style style:family="graphic" style:name="a6">
      <style:graphic-properties draw:fill="none" draw:stroke="solid" svg:stroke-width="0.02083in" svg:stroke-color="#000000" svg:stroke-opacity="100%" draw:stroke-linejoin="miter" svg:stroke-linecap="butt"/>
    </style:style>
    <style:style style:family="graphic" style:name="a7">
      <style:graphic-properties draw:fill="none" draw:stroke="solid" svg:stroke-width="0.02083in" svg:stroke-color="#000000" svg:stroke-opacity="100%" draw:stroke-linejoin="miter" svg:stroke-linecap="butt"/>
    </style:style>
    <style:style style:family="graphic" style:name="a8">
      <style:graphic-properties draw:fill="none" draw:stroke="solid" svg:stroke-width="0.02083in" svg:stroke-color="#000000" svg:stroke-opacity="100%" draw:stroke-linejoin="miter" svg:stroke-linecap="butt"/>
    </style:style>
    <style:style style:family="graphic" style:name="a170">
      <style:graphic-properties draw:fill="none" draw:stroke="solid" svg:stroke-width="0.00694in" svg:stroke-color="#000000" draw:marker-end="a169" svg:stroke-opacity="100%" draw:stroke-linejoin="miter" svg:stroke-linecap="butt"/>
    </style:style>
    <style:style style:family="graphic" style:name="a331">
      <style:graphic-properties draw:fill="bitmap" draw:fill-image-name="a330" style:repeat="repeat" draw:fill-image-ref-point="top-left" draw:opacity="100%" draw:stroke="solid" svg:stroke-width="0.01389in" svg:stroke-color="#000000" svg:stroke-opacity="100%" draw:stroke-linejoin="round" svg:stroke-linecap="round"/>
    </style:style>
    <style:style style:family="graphic" style:name="a172">
      <style:graphic-properties draw:fill="none" draw:stroke="solid" svg:stroke-width="0.00694in" svg:stroke-color="#7030a0" draw:marker-end="a171" svg:stroke-opacity="100%" draw:stroke-linejoin="miter" svg:stroke-linecap="butt"/>
    </style:style>
    <style:style style:family="graphic" style:name="a33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3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graphic-properties draw:fill="none" draw:stroke="solid" svg:stroke-width="0.00694in" svg:stroke-color="#ffc000" draw:marker-end="a173" svg:stroke-opacity="100%" draw:stroke-linejoin="miter" svg:stroke-linecap="butt"/>
    </style:style>
    <style:style style:family="graphic" style:name="a90">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34">
      <style:graphic-properties draw:fill="none" draw:stroke="solid" svg:stroke-width="0.01389in" svg:stroke-color="#000000" svg:stroke-opacity="100%" draw:stroke-linejoin="miter" svg:stroke-linecap="butt"/>
    </style:style>
    <style:style style:family="graphic" style:name="a175">
      <style:graphic-properties draw:fill="none" draw:stroke="solid" svg:stroke-width="0.00694in" svg:stroke-color="#0d0d0d" svg:stroke-opacity="100%" draw:stroke-linejoin="miter" svg:stroke-linecap="butt"/>
    </style:style>
    <style:style style:family="graphic" style:name="a17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5">
      <style:graphic-properties style:wrap="parallel" style:wrap-contour="false" style:horizontal-rel="page-content" style:vertical-rel="paragraph" style:horizontal-pos="right" style:vertical-pos="from-top"/>
    </style:style>
    <style:style style:family="graphic" style:name="a93">
      <style:graphic-properties draw:fill="none" draw:stroke="dash" draw:stroke-dash="a92" svg:stroke-width="0.02083in" svg:stroke-color="#000000" svg:stroke-opacity="100%" draw:stroke-linejoin="miter" svg:stroke-linecap="butt"/>
    </style:style>
    <style:style style:family="graphic" style:name="a177">
      <style:graphic-properties style:wrap="parallel" style:wrap-contour="false" style:horizontal-rel="page-content" style:vertical-rel="paragraph" style:horizontal-pos="left" style:vertical-pos="from-top"/>
    </style:style>
    <style:style style:family="graphic" style:name="a178"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Título do Trabalho: Estudo de Caso sobre o Sistema Operacional Gramine SGX<text:span text:style-name="Ref.denotaderodapé"><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text:span text:style-name="Tipodeletrapredefinidodoparágrafo">Gustavo Borges Peres da Silva</text:span><text:span text:style-name="T2">1</text:span></text:p>
      <text:p text:style-name="SBCinstitution"><text:span text:style-name="T3">1</text:span>Departamento de Ciência da Computação – Universidade Federal de Catalão (UFCAT)</text:p>
      <text:p text:style-name="SBCemail">gustavo.silva@discente.ufcat.edu.br</text:p>
      <text:p text:style-name="P4"><text:span text:style-name="T5">Resumo.</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 provavelmente explora implementações específicas do Gramine SGX, destacando benefícios tangíveis em segurança e confidencialidade de dados. Exemplos práticos podem ser fornecidos, demonstrando sua aplicação eficaz em setores como finanças e seguros, militares, comércio, saúde e assistência soucial ou em contextos que exigem uma camada robusta de proteção de informações.</text:p>
      <text:list text:style-name="Outline" text:continue-numbering="true">
        <text:list-item>
          <text:p text:style-name="P6">Introdução</text:p>
        </text:list-item>
      </text:list>
      <text:p text:style-name="P7">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8"><text:bookmark-ref text:ref-name="_Ref148643999" text:reference-format="text">[8]</text:bookmark-ref></text:span>. Essa tecnologia introduziu um conjunto inovador de instruções de CPU, permitindo que as aplicações utilizem regiões encriptadas de memória chamadas "enclaves".</text:p>
      <text:p text:style-name="P9">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0"><text:bookmark-ref text:ref-name="_Ref148643966" text:reference-format="text">[4]</text:bookmark-ref></text:span>.</text:p>
      <text:p text:style-name="P11">A eficácia do enclave SGX repousa na alocação de parte da memória física (RAM) para enclaves, conhecida como EPC (Enclave Page Cache). Essa memória é encriptada para evitar ataques por hardware, e a chave criptográfica é armazenada de maneira segura<text:s/><text:soft-page-break/>dentro da CPU, mudando aleatoriamente a cada ciclo de energia<text:s/><text:span text:style-name="T12">[</text:span><text:span text:style-name="T13"><text:bookmark-ref text:ref-name="_Ref148644700" text:reference-format="text">1</text:bookmark-ref></text:span><text:span text:style-name="T14">,<text:s/></text:span><text:span text:style-name="T15"><text:bookmark-ref text:ref-name="_Ref148644708" text:reference-format="text">12</text:bookmark-ref></text:span><text:span text:style-name="T16">]<text:s/></text:span>.</text:p>
      <text:p text:style-name="P17">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18">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19"><text:bookmark-ref text:ref-name="_Ref148643966" text:reference-format="text">[4]</text:bookmark-ref></text:span>.</text:p>
      <text:p text:style-name="P20">A diferença crucial entre um Trusted Execution Environment (TEE) e a tecnologia Intel Software Guard Extensions (SGX) reside na abordagem de isolamento e proteção.</text:p>
      <text:p text:style-name="P21">O TEE é um ambiente seguro e isolado dentro do processador principal, projetado para proteger dados e código confidenciais contra acessos não autorizados e alterações. Ele opera 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2"><text:bookmark-ref text:ref-name="_Ref148643921" text:reference-format="text">[9]</text:bookmark-ref></text:span>.</text:p>
      <text:p text:style-name="P23">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4">[</text:span><text:bookmark-start text:name="_Hlt148645342"/><text:span text:style-name="T25"><text:bookmark-ref text:ref-name="_Ref148643966" text:reference-format="text">4</text:bookmark-ref></text:span><text:bookmark-end text:name="_Hlt148645342"/><text:span text:style-name="T26">,<text:s/></text:span><text:bookmark-start text:name="_Hlt148645353"/><text:span text:style-name="T27"><text:bookmark-ref text:ref-name="_Ref148643999" text:reference-format="text">8</text:bookmark-ref></text:span><text:bookmark-end text:name="_Hlt148645353"/><text:span text:style-name="T28">]</text:span>.</text:p>
      <text:p text:style-name="P29">A utiliza<text:span text:style-name="T30">ção</text:span><text:s/>do Intel SGX pode ter um impacto dramático no design e implementação de 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1">[</text:span><text:span text:style-name="T32"><text:bookmark-ref text:ref-name="_Ref148643921" text:reference-format="text">9</text:bookmark-ref></text:span><text:span text:style-name="T33">,<text:s/></text:span><text:span text:style-name="T34"><text:bookmark-ref text:ref-name="_Ref148644037" text:reference-format="text">10</text:bookmark-ref></text:span><text:span text:style-name="T35">,<text:s/></text:span><text:span text:style-name="T36"><text:bookmark-ref text:ref-name="_Ref148644073" text:reference-format="text">11</text:bookmark-ref></text:span><text:span text:style-name="T37">]</text:span>. Isso é uma das barreiras fundamentais para a inovação e pesquisa de software sobre o SGX, especialmente em sua fase inicial.<text:s/></text:p>
      <text:p text:style-name="P38">Um adendo também bastante importante, é que o Gramine SGX era conhecido como Graphene SGX, mas por conta de questões organizacionais, a equipe optou por mudar o nome para Gramine <text:s/>SGX e mudar sua localização para um novo repositório do Github na qual todo o desenvolvimento continuará.</text:p>
      <text:list text:style-name="Outline" text:continue-numbering="true">
        <text:list-item>
          <text:p text:style-name="P39">Questões relacionadas a proteção do SO</text:p>
        </text:list-item>
      </text:list>
      <text:p text:style-name="P40">No contexto da evolução das ameaças cibernéticas, o Sistema Operacional Gramine SGX destaca-se como uma solução robusta. Sua base reside na tecnologia revolucionária<text:s/><text:soft-page-break/>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 como o kernel, sistema operacional e a BIOS.</text:p>
      <text:p text:style-name="P41">Além disso, de acordo com Mona Vij (Engenheira principal da Intel Labs), no epsodio aberto da Intel podcast<text:s/><text:span text:style-name="T42"><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43">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 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44">Questões relacionadas a modularidade do S.O</text:p>
        </text:list-item>
      </text:list>
      <text:p text:style-name="P45">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46">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 de isolamento e interconexão<text:s/><text:span text:style-name="T47"><text:bookmark-ref text:ref-name="_Ref148901522" text:reference-format="text">[13]</text:bookmark-ref></text:span>.</text:p>
      <text:p text:style-name="P48">O Gramine, ao automatizar a criação de enclaves e facilitar a execução de aplicativos dentro desses ambientes protegidos, contribui para a modularidade ao simplificar o desenvolvimento. Ao isolar automaticamente o código do aplicativo em um enclave, o Gramine elimina a necessidade de extensivas modificações no código existente, demonstrando uma abordagem modular e eficiente<text:s/><text:bookmark-ref text:ref-name="_Ref148901522" text:reference-format="text">[12, 13]</text:bookmark-ref>.</text:p>
      <text:p text:style-name="P49">É relevante notar que a adesão do Gramine ao Confidential Computing Consortium<text:s/><text:soft-page-break/>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 garantir a segurança e a confidencialidade dos dados em um nível fundamental do sistema operacional. Est<text:span text:style-name="T50">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51"><text:bookmark-ref text:ref-name="_Ref148901522" text:reference-format="text">[ 13]</text:bookmark-ref></text:span>.</text:p>
      <text:p text:style-name="P52">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53">Questões relacionadas a generalidade do S.O.</text:p>
        </text:list-item>
      </text:list>
      <text:p text:style-name="P54">O Sistema Operacional Gramine SGX representa um ambiente seguro e inovador que utiliza a tecnologia Intel Software Guard Extensions (SGX) para proporcionar isolamento e proteção a dados sensíveis em sistemas computacionais. Este sistema é projetado com a capacidade de criar "enclaves" seguros diretamente na CPU, onde operações críticas podem ser executadas sem risco de acesso não autorizado<text:s/><text:span text:style-name="T55"><text:bookmark-ref text:ref-name="_Ref148643999" text:reference-format="text">[8</text:bookmark-ref></text:span><text:span text:style-name="T56">,<text:s/></text:span><text:span text:style-name="T57"><text:bookmark-ref text:ref-name="_Ref150119837" text:reference-format="text">14]</text:bookmark-ref></text:span>.</text:p>
      <text:list text:style-name="Outline" text:continue-numbering="true">
        <text:list-item>
          <text:list>
            <text:list-item>
              <text:p text:style-name="P58">Implementação e Estruturas Fundamentais do Intel SGX</text:p>
            </text:list-item>
          </text:list>
        </text:list-item>
      </text:list>
      <text:p text:style-name="P59">O Intel SGX (Software Guard Extensions) propõe uma abordagem revolucionária para a implementação de ambientes de execução segura, introduzindo conceitos fundamentais que redefinem a segurança em sistemas computacionais modernos<text:s/><text:span text:style-name="T60"><text:bookmark-ref text:ref-name="_Ref148643999" text:reference-format="text">[8</text:bookmark-ref></text:span><text:span text:style-name="T61">,<text:s/></text:span><text:span text:style-name="T62"><text:bookmark-ref text:ref-name="_Ref150119837" text:reference-format="text">14]</text:bookmark-ref></text:span>.</text:p>
      <text:p text:style-name="SBCparagraph">Em relação ao processo de como a tecnologia SGX funciona protegendo contra ataques de software, abaixo temos a visualização do processo (Figura 1). Esse processo funciona da seguinte forma:</text:p>
      <text:list text:style-name="LFO12" text:continue-numbering="true">
        <text:list-item>
          <text:p text:style-name="P63">O aplicativo é construído com partes confiáveis e não confiáveis.</text:p>
        </text:list-item>
        <text:list-item>
          <text:p text:style-name="P64">O aplicativo é executado e cria um enclave, que é colocado na memória confiável.</text:p>
        </text:list-item>
        <text:list-item>
          <text:p text:style-name="P65">Uma função confiável é chamada; o código em execução dentro do enclave visualiza dados sem criptografia; o acesso externo aos dados é negado.</text:p>
        </text:list-item>
        <text:list-item>
          <text:p text:style-name="P66">A função retorna; os dados do enclave permanecem na memória confiável.</text:p>
        </text:list-item>
      </text:list>
      <text:soft-page-break/>
      <text:p text:style-name="P67"><draw:custom-shape svg:x="3.87222in" svg:y="2.61736in" svg:width="0.79167in" svg:height="0.79167in" draw:z-index="251654144" draw:id="id0" draw:style-name="a0" draw:name="&quot;Not Allowed&quot; Symbol 3" text:anchor-type="paragraph"><svg:title/><svg:desc/><draw:enhanced-geometry draw:path-stretchpoint-x="21600" draw:path-stretchpoint-y="21600" draw:type="non-primitive" svg:viewBox="0 0 21600 21600" draw:enhanced-path="M ?f11 ?f31 A ?f151 ?f152 ?f153 ?f154 ?f11 ?f31 ?f148 ?f150  W ?f155 ?f156 ?f157 ?f158 ?f11 ?f31 ?f148 ?f150 Z M ?f108 ?f109 A ?f191 ?f192 ?f193 ?f194 ?f108 ?f109 ?f188 ?f190  W ?f195 ?f196 ?f197 ?f198 ?f108 ?f109 ?f188 ?f190 Z M ?f110 ?f111 A ?f234 ?f235 ?f236 ?f237 ?f110 ?f111 ?f231 ?f233  W ?f238 ?f239 ?f240 ?f241 ?f110 ?f111 ?f231 ?f233 Z N" draw:text-areas="?f59 ?f61 ?f60 ?f62" draw:glue-points="?f59 ?f61 ?f59 ?f62 ?f60 ?f62 ?f60 ?f61"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0"/><draw:equation draw:name="f13" draw:formula="0 - 10800000"/><draw:equation draw:name="f14" draw:formula="18750"/><draw:equation draw:name="f15" draw:formula="2700000 + ?f1"/><draw:equation draw:name="f16" draw:formula="?f15 - ?f1"/><draw:equation draw:name="f17" draw:formula="?f7 / 21600"/><draw:equation draw:name="f18" draw:formula="?f6 / 21600"/><draw:equation draw:name="f19" draw:formula="21600 * ?f7"/><draw:equation draw:name="f20" draw:formula="21600 * ?f6"/><draw:equation draw:name="f21" draw:formula="min(?f18, ?f17)"/><draw:equation draw:name="f22" draw:formula="?f19 / ?f8"/><draw:equation draw:name="f23" draw:formula="?f20 / ?f8"/><draw:equation draw:name="f24" draw:formula="?f23 - ?f11"/><draw:equation draw:name="f25" draw:formula="?f22 - ?f11"/><draw:equation draw:name="f26" draw:formula="?f24 / 2"/><draw:equation draw:name="f27" draw:formula="?f25 / 2"/><draw:equation draw:name="f28" draw:formula="min(?f25, ?f24)"/><draw:equation draw:name="f29" draw:formula="0 - ?f25"/><draw:equation draw:name="f30" draw:formula="0 - ?f24"/><draw:equation draw:name="f31" draw:formula="?f11 + ?f26"/><draw:equation draw:name="f32" draw:formula="?f11 + ?f27"/><draw:equation draw:name="f33" draw:formula="?f28 * ?f14"/><draw:equation draw:name="f34" draw:formula="?f27 * ?f21"/><draw:equation draw:name="f35" draw:formula="?f26 * ?f21"/><draw:equation draw:name="f36" draw:formula="?f33 / 100000"/><draw:equation draw:name="f37" draw:formula="atan2(?f29, ?f30)"/><draw:equation draw:name="f38" draw:formula="0 - ?f37"/><draw:equation draw:name="f39" draw:formula="?f38 * ?f0 / ?f9"/><draw:equation draw:name="f40" draw:formula="?f39 - ?f1"/><draw:equation draw:name="f41" draw:formula="?f27 - ?f36"/><draw:equation draw:name="f42" draw:formula="?f26 - ?f36"/><draw:equation draw:name="f43" draw:formula="?f36 / 2"/><draw:equation draw:name="f44" draw:formula="?f16 + ?f1"/><draw:equation draw:name="f45" draw:formula="?f44 * ?f9 / ?f0"/><draw:equation draw:name="f46" draw:formula="0 - ?f45"/><draw:equation draw:name="f47" draw:formula="sin(?f46)"/><draw:equation draw:name="f48" draw:formula="0 - ?f47"/><draw:equation draw:name="f49" draw:formula="?f48"/><draw:equation draw:name="f50" draw:formula="cos(?f46)"/><draw:equation draw:name="f51" draw:formula="0 - ?f50"/><draw:equation draw:name="f52" draw:formula="?f51"/><draw:equation draw:name="f53" draw:formula="?f41 * ?f42"/><draw:equation draw:name="f54" draw:formula="0 - ?f43"/><draw:equation draw:name="f55" draw:formula="?f41 * ?f21"/><draw:equation draw:name="f56" draw:formula="?f42 * ?f21"/><draw:equation draw:name="f57" draw:formula="?f49 * ?f27"/><draw:equation draw:name="f58" draw:formula="?f52 * ?f26"/><draw:equation draw:name="f59" draw:formula="?f32 - ?f57"/><draw:equation draw:name="f60" draw:formula="?f32 + ?f57"/><draw:equation draw:name="f61" draw:formula="?f31 - ?f58"/><draw:equation draw:name="f62" draw:formula="?f31 + ?f58"/><draw:equation draw:name="f63" draw:formula="?f40 + ?f1"/><draw:equation draw:name="f64" draw:formula="?f63 * ?f9 / ?f0"/><draw:equation draw:name="f65" draw:formula="0 - ?f64"/><draw:equation draw:name="f66" draw:formula="sin(?f65)"/><draw:equation draw:name="f67" draw:formula="0 - ?f66"/><draw:equation draw:name="f68" draw:formula="?f67"/><draw:equation draw:name="f69" draw:formula="cos(?f65)"/><draw:equation draw:name="f70" draw:formula="0 - ?f69"/><draw:equation draw:name="f71" draw:formula="?f70"/><draw:equation draw:name="f72" draw:formula="?f68 * ?f42"/><draw:equation draw:name="f73" draw:formula="?f71 * ?f41"/><draw:equation draw:name="f74" draw:formula="?f72 * ?f72"/><draw:equation draw:name="f75" draw:formula="?f73 * ?f73"/><draw:equation draw:name="f76" draw:formula="?f74 + ?f75"/><draw:equation draw:name="f77" draw:formula="?f76 + ?f12"/><draw:equation draw:name="f78" draw:formula="sqrt(?f77)"/><draw:equation draw:name="f79" draw:formula="?f53 / ?f78"/><draw:equation draw:name="f80" draw:formula="0 - ?f79"/><draw:equation draw:name="f81" draw:formula="atan2(?f80, ?f54)"/><draw:equation draw:name="f82" draw:formula="0 - ?f81"/><draw:equation draw:name="f83" draw:formula="?f82 * ?f0 / ?f9"/><draw:equation draw:name="f84" draw:formula="?f83 - ?f1"/><draw:equation draw:name="f85" draw:formula="?f84 * 2"/><draw:equation draw:name="f86" draw:formula="?f40 - ?f84"/><draw:equation draw:name="f87" draw:formula="?f13 + ?f85"/><draw:equation draw:name="f88" draw:formula="?f86 - ?f0"/><draw:equation draw:name="f89" draw:formula="?f86 + ?f1"/><draw:equation draw:name="f90" draw:formula="?f89 * ?f9 / ?f0"/><draw:equation draw:name="f91" draw:formula="0 - ?f90"/><draw:equation draw:name="f92" draw:formula="sin(?f91)"/><draw:equation draw:name="f93" draw:formula="0 - ?f92"/><draw:equation draw:name="f94" draw:formula="?f93"/><draw:equation draw:name="f95" draw:formula="cos(?f91)"/><draw:equation draw:name="f96" draw:formula="0 - ?f95"/><draw:equation draw:name="f97" draw:formula="?f96"/><draw:equation draw:name="f98" draw:formula="?f94 * ?f42"/><draw:equation draw:name="f99" draw:formula="?f97 * ?f41"/><draw:equation draw:name="f100" draw:formula="?f98 * ?f98"/><draw:equation draw:name="f101" draw:formula="?f99 * ?f99"/><draw:equation draw:name="f102" draw:formula="?f100 + ?f101"/><draw:equation draw:name="f103" draw:formula="?f102 + ?f12"/><draw:equation draw:name="f104" draw:formula="sqrt(?f103)"/><draw:equation draw:name="f105" draw:formula="?f53 / ?f104"/><draw:equation draw:name="f106" draw:formula="?f94 * ?f105"/><draw:equation draw:name="f107" draw:formula="?f97 * ?f105"/><draw:equation draw:name="f108" draw:formula="?f32 + ?f106"/><draw:equation draw:name="f109" draw:formula="?f31 + ?f107"/><draw:equation draw:name="f110" draw:formula="?f32 - ?f106"/><draw:equation draw:name="f111" draw:formula="?f31 - ?f107"/><draw:equation draw:name="f112" draw:formula="21550000 - ?f10"/><draw:equation draw:name="f113" draw:formula="if(?f112, ?f10, 21550000)"/><draw:equation draw:name="f114" draw:formula="-21550000 - ?f113"/><draw:equation draw:name="f115" draw:formula="if(?f114, -21550000, ?f113)"/><draw:equation draw:name="f116" draw:formula="?f0 + ?f115"/><draw:equation draw:name="f117" draw:formula="?f0 + ?f1"/><draw:equation draw:name="f118" draw:formula="?f117 * ?f9 / ?f0"/><draw:equation draw:name="f119" draw:formula="0 - ?f118"/><draw:equation draw:name="f120" draw:formula="cos(?f119)"/><draw:equation draw:name="f121" draw:formula="0 - ?f120"/><draw:equation draw:name="f122" draw:formula="?f121 * ?f34"/><draw:equation draw:name="f123" draw:formula="sin(?f119)"/><draw:equation draw:name="f124" draw:formula="0 - ?f123"/><draw:equation draw:name="f125" draw:formula="?f124 * ?f35"/><draw:equation draw:name="f126" draw:formula="sqrt(?f122 * ?f122 + ?f125 * ?f125 + 0 * 0)"/><draw:equation draw:name="f127" draw:formula="?f34 * ?f35 / ?f126"/><draw:equation draw:name="f128" draw:formula="?f124 * ?f127"/><draw:equation draw:name="f129" draw:formula="?f11 - ?f128"/><draw:equation draw:name="f130" draw:formula="?f121 * ?f127"/><draw:equation draw:name="f131" draw:formula="?f31 - ?f130"/><draw:equation draw:name="f132" draw:formula="?f129 - ?f34"/><draw:equation draw:name="f133" draw:formula="?f131 - ?f35"/><draw:equation draw:name="f134" draw:formula="?f129 + ?f34"/><draw:equation draw:name="f135" draw:formula="?f131 + ?f35"/><draw:equation draw:name="f136" draw:formula="?f116 + ?f1"/><draw:equation draw:name="f137" draw:formula="?f136 * ?f9 / ?f0"/><draw:equation draw:name="f138" draw:formula="0 - ?f137"/><draw:equation draw:name="f139" draw:formula="cos(?f138)"/><draw:equation draw:name="f140" draw:formula="0 - ?f139"/><draw:equation draw:name="f141" draw:formula="?f140 * ?f34"/><draw:equation draw:name="f142" draw:formula="sin(?f138)"/><draw:equation draw:name="f143" draw:formula="0 - ?f142"/><draw:equation draw:name="f144" draw:formula="?f143 * ?f35"/><draw:equation draw:name="f145" draw:formula="sqrt(?f141 * ?f141 + ?f144 * ?f144 + 0 * 0)"/><draw:equation draw:name="f146" draw:formula="?f34 * ?f35 / ?f145"/><draw:equation draw:name="f147" draw:formula="?f143 * ?f146"/><draw:equation draw:name="f148" draw:formula="?f129 + ?f147"/><draw:equation draw:name="f149" draw:formula="?f140 * ?f146"/><draw:equation draw:name="f150" draw:formula="?f131 + ?f149"/><draw:equation draw:name="f151" draw:formula="if(?f115, ?f11, ?f132)"/><draw:equation draw:name="f152" draw:formula="if(?f115, ?f31, ?f133)"/><draw:equation draw:name="f153" draw:formula="if(?f115, ?f11, ?f134)"/><draw:equation draw:name="f154" draw:formula="if(?f115, ?f31, ?f135)"/><draw:equation draw:name="f155" draw:formula="if(?f115, ?f132, ?f148)"/><draw:equation draw:name="f156" draw:formula="if(?f115, ?f133, ?f150)"/><draw:equation draw:name="f157" draw:formula="if(?f115, ?f134, ?f148)"/><draw:equation draw:name="f158" draw:formula="if(?f115, ?f135, ?f150)"/><draw:equation draw:name="f159" draw:formula="21550000 - ?f87"/><draw:equation draw:name="f160" draw:formula="if(?f159, ?f87, 21550000)"/><draw:equation draw:name="f161" draw:formula="-21550000 - ?f160"/><draw:equation draw:name="f162" draw:formula="if(?f161, -21550000, ?f160)"/><draw:equation draw:name="f163" draw:formula="?f86 + ?f162"/><draw:equation draw:name="f164" draw:formula="?f96 * ?f55"/><draw:equation draw:name="f165" draw:formula="?f93 * ?f56"/><draw:equation draw:name="f166" draw:formula="sqrt(?f164 * ?f164 + ?f165 * ?f165 + 0 * 0)"/><draw:equation draw:name="f167" draw:formula="?f55 * ?f56 / ?f166"/><draw:equation draw:name="f168" draw:formula="?f93 * ?f167"/><draw:equation draw:name="f169" draw:formula="?f108 - ?f168"/><draw:equation draw:name="f170" draw:formula="?f96 * ?f167"/><draw:equation draw:name="f171" draw:formula="?f109 - ?f170"/><draw:equation draw:name="f172" draw:formula="?f169 - ?f55"/><draw:equation draw:name="f173" draw:formula="?f171 - ?f56"/><draw:equation draw:name="f174" draw:formula="?f169 + ?f55"/><draw:equation draw:name="f175" draw:formula="?f171 + ?f56"/><draw:equation draw:name="f176" draw:formula="?f163 + ?f1"/><draw:equation draw:name="f177" draw:formula="?f176 * ?f9 / ?f0"/><draw:equation draw:name="f178" draw:formula="0 - ?f177"/><draw:equation draw:name="f179" draw:formula="cos(?f178)"/><draw:equation draw:name="f180" draw:formula="0 - ?f179"/><draw:equation draw:name="f181" draw:formula="?f180 * ?f55"/><draw:equation draw:name="f182" draw:formula="sin(?f178)"/><draw:equation draw:name="f183" draw:formula="0 - ?f182"/><draw:equation draw:name="f184" draw:formula="?f183 * ?f56"/><draw:equation draw:name="f185" draw:formula="sqrt(?f181 * ?f181 + ?f184 * ?f184 + 0 * 0)"/><draw:equation draw:name="f186" draw:formula="?f55 * ?f56 / ?f185"/><draw:equation draw:name="f187" draw:formula="?f183 * ?f186"/><draw:equation draw:name="f188" draw:formula="?f169 + ?f187"/><draw:equation draw:name="f189" draw:formula="?f180 * ?f186"/><draw:equation draw:name="f190" draw:formula="?f171 + ?f189"/><draw:equation draw:name="f191" draw:formula="if(?f162, ?f108, ?f172)"/><draw:equation draw:name="f192" draw:formula="if(?f162, ?f109, ?f173)"/><draw:equation draw:name="f193" draw:formula="if(?f162, ?f108, ?f174)"/><draw:equation draw:name="f194" draw:formula="if(?f162, ?f109, ?f175)"/><draw:equation draw:name="f195" draw:formula="if(?f162, ?f172, ?f188)"/><draw:equation draw:name="f196" draw:formula="if(?f162, ?f173, ?f190)"/><draw:equation draw:name="f197" draw:formula="if(?f162, ?f174, ?f188)"/><draw:equation draw:name="f198" draw:formula="if(?f162, ?f175, ?f190)"/><draw:equation draw:name="f199" draw:formula="?f88 + ?f162"/><draw:equation draw:name="f200" draw:formula="?f88 + ?f1"/><draw:equation draw:name="f201" draw:formula="?f200 * ?f9 / ?f0"/><draw:equation draw:name="f202" draw:formula="0 - ?f201"/><draw:equation draw:name="f203" draw:formula="cos(?f202)"/><draw:equation draw:name="f204" draw:formula="0 - ?f203"/><draw:equation draw:name="f205" draw:formula="?f204 * ?f55"/><draw:equation draw:name="f206" draw:formula="sin(?f202)"/><draw:equation draw:name="f207" draw:formula="0 - ?f206"/><draw:equation draw:name="f208" draw:formula="?f207 * ?f56"/><draw:equation draw:name="f209" draw:formula="sqrt(?f205 * ?f205 + ?f208 * ?f208 + 0 * 0)"/><draw:equation draw:name="f210" draw:formula="?f55 * ?f56 / ?f209"/><draw:equation draw:name="f211" draw:formula="?f207 * ?f210"/><draw:equation draw:name="f212" draw:formula="?f110 - ?f211"/><draw:equation draw:name="f213" draw:formula="?f204 * ?f210"/><draw:equation draw:name="f214" draw:formula="?f111 - ?f213"/><draw:equation draw:name="f215" draw:formula="?f212 - ?f55"/><draw:equation draw:name="f216" draw:formula="?f214 - ?f56"/><draw:equation draw:name="f217" draw:formula="?f212 + ?f55"/><draw:equation draw:name="f218" draw:formula="?f214 + ?f56"/><draw:equation draw:name="f219" draw:formula="?f199 + ?f1"/><draw:equation draw:name="f220" draw:formula="?f219 * ?f9 / ?f0"/><draw:equation draw:name="f221" draw:formula="0 - ?f220"/><draw:equation draw:name="f222" draw:formula="cos(?f221)"/><draw:equation draw:name="f223" draw:formula="0 - ?f222"/><draw:equation draw:name="f224" draw:formula="?f223 * ?f55"/><draw:equation draw:name="f225" draw:formula="sin(?f221)"/><draw:equation draw:name="f226" draw:formula="0 - ?f225"/><draw:equation draw:name="f227" draw:formula="?f226 * ?f56"/><draw:equation draw:name="f228" draw:formula="sqrt(?f224 * ?f224 + ?f227 * ?f227 + 0 * 0)"/><draw:equation draw:name="f229" draw:formula="?f55 * ?f56 / ?f228"/><draw:equation draw:name="f230" draw:formula="?f226 * ?f229"/><draw:equation draw:name="f231" draw:formula="?f212 + ?f230"/><draw:equation draw:name="f232" draw:formula="?f223 * ?f229"/><draw:equation draw:name="f233" draw:formula="?f214 + ?f232"/><draw:equation draw:name="f234" draw:formula="if(?f162, ?f110, ?f215)"/><draw:equation draw:name="f235" draw:formula="if(?f162, ?f111, ?f216)"/><draw:equation draw:name="f236" draw:formula="if(?f162, ?f110, ?f217)"/><draw:equation draw:name="f237" draw:formula="if(?f162, ?f111, ?f218)"/><draw:equation draw:name="f238" draw:formula="if(?f162, ?f215, ?f231)"/><draw:equation draw:name="f239" draw:formula="if(?f162, ?f216, ?f233)"/><draw:equation draw:name="f240" draw:formula="if(?f162, ?f217, ?f231)"/><draw:equation draw:name="f241" draw:formula="if(?f162, ?f218, ?f233)"/></draw:enhanced-geometry></draw:custom-shape><draw:custom-shape svg:width="0.69792in" svg:height="1.42431in" draw:z-index="251653120" draw:id="id1" draw:style-name="a1" draw:transform="translate(-0.34896in -0.71215in) rotate(-3.14159) translate(4.27812in 2.94266in)" draw:name="Arrow: Down 2"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630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onnector draw:type="line" svg:x1="4.20764in" svg:y1="1.15139in" svg:x2="4.21389in" svg:y2="1.56042in" draw:z-index="251658240" draw:id="id2" draw:style-name="a3" draw:name="Straight Arrow Connector 5" text:anchor-type="paragraph"><svg:title/><svg:desc/></draw:connector><draw:connector draw:type="line" svg:x1="3.89028in" svg:y1="1.87639in" svg:x2="2.91111in" svg:y2="2.10278in" draw:z-index="251655168" draw:id="id3" draw:style-name="a5" draw:name="Straight Arrow Connector 4" text:anchor-type="paragraph"><svg:title/><svg:desc/></draw:connector><draw:g draw:z-index="251669504" draw:name="Group 9" draw:id="id8" draw:style-name="a11" text:anchor-type="paragraph"><svg:title/><svg:desc/><draw:connector draw:type="line" svg:x1="2.10898in" svg:y1="0.82014in" svg:x2="2.22357in" svg:y2="0.95631in" draw:id="id4" draw:style-name="a6" draw:name="Straight Connector 6"><svg:title/><svg:desc/></draw:connector><draw:connector draw:type="line" svg:x1="2.10898in" svg:y1="1.08548in" svg:x2="2.22357in" svg:y2="0.94931in" draw:id="id5" draw:style-name="a7" draw:name="Straight Connector 6"><svg:title/><svg:desc/></draw:connector><draw:connector draw:type="line" svg:x1="2.10898in" svg:y1="1.07222in" svg:x2="2.22357in" svg:y2="1.2084in" draw:id="id6" draw:style-name="a8" draw:name="Straight Connector 6"><svg:title/><svg:desc/></draw:connector><draw:connector draw:type="line" svg:x1="2.22148in" svg:y1="1.20347in" svg:x2="2.14232in" svg:y2="1.28889in" draw:id="id7" draw:style-name="a10" draw:name="Straight Arrow Connector 8"><svg:title/><svg:desc/></draw:connector></draw:g><draw:g draw:z-index="251671552" draw:name="Group 9" draw:id="id13" draw:style-name="a17" text:anchor-type="paragraph"><svg:title/><svg:desc/><draw:connector draw:type="line" svg:x1="2.12014in" svg:y1="1.55903in" svg:x2="2.23472in" svg:y2="1.6952in" draw:id="id9" draw:style-name="a12" draw:name="Straight Connector 6"><svg:title/><svg:desc/></draw:connector><draw:connector draw:type="line" svg:x1="2.12014in" svg:y1="1.82437in" svg:x2="2.23472in" svg:y2="1.68819in" draw:id="id10" draw:style-name="a13" draw:name="Straight Connector 6"><svg:title/><svg:desc/></draw:connector><draw:connector draw:type="line" svg:x1="2.12014in" svg:y1="1.81111in" svg:x2="2.23472in" svg:y2="1.94729in" draw:id="id11" draw:style-name="a14" draw:name="Straight Connector 6"><svg:title/><svg:desc/></draw:connector><draw:connector draw:type="line" svg:x1="2.23264in" svg:y1="1.94236in" svg:x2="2.15347in" svg:y2="2.02778in" draw:id="id12" draw:style-name="a16" draw:name="Straight Arrow Connector 8"><svg:title/><svg:desc/></draw:connector></draw:g><draw:g draw:z-index="251680768" draw:name="Group 10" draw:id="id23" draw:style-name="a27" text:anchor-type="paragraph"><svg:title/><svg:desc/><draw:g draw:name="Group 9" draw:id="id18"><svg:title/><svg:desc/><draw:connector draw:type="line" svg:x1="2.10675in" svg:y1="2.84564in" svg:x2="2.22134in" svg:y2="2.98182in" draw:id="id14" draw:style-name="a18" draw:name="Straight Connector 6"><svg:title/><svg:desc/></draw:connector><draw:connector draw:type="line" svg:x1="2.10675in" svg:y1="3.11098in" svg:x2="2.22134in" svg:y2="2.97481in" draw:id="id15" draw:style-name="a19" draw:name="Straight Connector 6"><svg:title/><svg:desc/></draw:connector><draw:connector draw:type="line" svg:x1="2.10675in" svg:y1="3.09772in" svg:x2="2.22134in" svg:y2="3.2339in" draw:id="id16" draw:style-name="a20" draw:name="Straight Connector 6"><svg:title/><svg:desc/></draw:connector><draw:connector draw:type="line" svg:x1="2.21925in" svg:y1="3.22897in" svg:x2="2.14009in" svg:y2="3.31439in" draw:id="id17" draw:style-name="a22" draw:name="Straight Arrow Connector 8"><svg:title/><svg:desc/></draw:connector></draw:g><draw:connector draw:type="line" svg:x1="2.10625in" svg:y1="2.59382in" svg:x2="2.22083in" svg:y2="2.72993in" draw:id="id19" draw:style-name="a23" draw:name="Straight Connector 6"><svg:title/><svg:desc/></draw:connector><draw:connector draw:type="line" svg:x1="2.10625in" svg:y1="2.85833in" svg:x2="2.22083in" svg:y2="2.72215in" draw:id="id20" draw:style-name="a24" draw:name="Straight Connector 6"><svg:title/><svg:desc/></draw:connector><draw:connector draw:type="line" svg:x1="2.11109in" svg:y1="2.3299in" svg:x2="2.22568in" svg:y2="2.46601in" draw:id="id21" draw:style-name="a25" draw:name="Straight Connector 6"><svg:title/><svg:desc/></draw:connector><draw:connector draw:type="line" svg:x1="2.11109in" svg:y1="2.59676in" svg:x2="2.22568in" svg:y2="2.46065in" draw:id="id22" draw:style-name="a26" draw:name="Straight Connector 6"><svg:title/><svg:desc/></draw:connector></draw:g><draw:connector draw:type="line" svg:x1="3.38273in" svg:y1="1.04656in" svg:x2="3.80426in" svg:y2="1.04656in" draw:z-index="251681792" draw:id="id24" draw:style-name="a29" draw:name="Straight Arrow Connector 13" text:anchor-type="paragraph"><svg:title/><svg:desc/></draw:connector><draw:connector draw:type="line" svg:x1="2.82818in" svg:y1="2.02249in" svg:x2="3.19485in" svg:y2="1.25582in" draw:z-index="251657216" draw:id="id25" draw:style-name="a31" draw:name="Straight Arrow Connector 4" text:anchor-type="paragraph"><svg:title/><svg:desc/></draw:connector><text:span text:style-name="T68"><draw:frame draw:style-name="a32" draw:name="Picture 1" text:anchor-type="as-char" svg:x="0in" svg:y="0in" svg:width="4.16981in" svg:height="4.16981in" style:rel-width="scale" style:rel-height="scale"><draw:image xlink:href="media/image1.png" xlink:type="simple" xlink:show="embed" xlink:actuate="onLoad"/><svg:title/><svg:desc>A diagram of a computer system

Description automatically generated</svg:desc></draw:frame></text:span></text:p>
      <text:p text:style-name="P69">Figura 1. Visualização do Processo.</text:p>
      <text:list text:style-name="Outline" text:continue-numbering="true">
        <text:list-item>
          <text:list>
            <text:list-item>
              <text:p text:style-name="P70">Divisão de Aplicativos: Partes Seguras e Não Seguras</text:p>
            </text:list-item>
          </text:list>
        </text:list-item>
      </text:list>
      <text:p text:style-name="P71">O SGX reorganiza a arquitetura de aplicativos, segregando-os em duas partes distintas: uma parte segura e outra não segura. A parte segura, conhecida como enclave, é um ambiente isolado na CPU, enquanto a parte não segura mantém as operações convencionais. Essa divisão permite isolar operações críticas em enclaves seguros, protegendo-as contra acessos não autorizados e garantindo que apenas o código interno ao enclave tenha visibilidade sobre seus dados<text:s/><text:span text:style-name="T72"><text:bookmark-ref text:ref-name="_Ref148643999" text:reference-format="text">[8</text:bookmark-ref></text:span><text:span text:style-name="T73">,<text:s/></text:span><text:span text:style-name="T74"><text:bookmark-ref text:ref-name="_Ref150119837" text:reference-format="text">14]</text:bookmark-ref></text:span>.</text:p>
      <text:list text:style-name="Outline" text:continue-numbering="true">
        <text:list-item>
          <text:list>
            <text:list-item>
              <text:p text:style-name="P75">Lançamento de Enclaves em Memória Protegida</text:p>
            </text:list-item>
          </text:list>
        </text:list-item>
      </text:list>
      <text:p text:style-name="P76">O processo de lançamento de enclaves envolve a alocação de memória protegida, denominada Enclave Page Cache (EPC). Essa região de memória é criptografada pelo Memory Encryption Engine (MEE), uma unidade dedicada, assegurando a confidencialidade e integridade dos dados do enclave. A EPC atua como um cofre digital, garantindo que dados sensíveis permaneçam inacessíveis a qualquer entidade não autorizada<text:s/><text:span text:style-name="T77"><text:bookmark-ref text:ref-name="_Ref148643999" text:reference-format="text">[8</text:bookmark-ref></text:span><text:span text:style-name="T78">,<text:s/></text:span><text:span text:style-name="T79"><text:bookmark-ref text:ref-name="_Ref150119837" text:reference-format="text">14]</text:bookmark-ref></text:span>.</text:p>
      <text:list text:style-name="Outline" text:continue-numbering="true">
        <text:list-item>
          <text:list>
            <text:list-item>
              <text:p text:style-name="P80">Execução de Funções de Enclave com Acesso Restrito</text:p>
            </text:list-item>
          </text:list>
        </text:list-item>
      </text:list>
      <text:p text:style-name="P81">Ao chamar funções dentro de um enclave, apenas o código interno ao enclave pode acessar seus dados. Isso implica que operações críticas são realizadas com acesso restrito, protegendo a confidencialidade das operações executadas. Qualquer tentativa de acesso externo é rigorosamente negada, garantindo a segurança das operações realizadas dentro do enclave<text:s/><text:span text:style-name="T82"><text:bookmark-ref text:ref-name="_Ref148643999" text:reference-format="text">[8</text:bookmark-ref></text:span><text:span text:style-name="T83">,<text:s/></text:span><text:span text:style-name="T84"><text:bookmark-ref text:ref-name="_Ref150119837" text:reference-format="text">14]</text:bookmark-ref></text:span>.</text:p>
      <text:soft-page-break/>
      <text:list text:style-name="Outline" text:continue-numbering="true">
        <text:list-item>
          <text:list>
            <text:list-item>
              <text:p text:style-name="P85">Estrutura do Ambiente de Execução Seguro (TEE) do SGX Integrado</text:p>
            </text:list-item>
          </text:list>
        </text:list-item>
      </text:list>
      <text:p text:style-name="P86">O ambiente de execução seguro (TEE) do SGX é integrado ao processo do host, com o aplicativo contendo seu próprio código e dados, enquanto o enclave mantém sua própria cópia isolada. Essa estrutura proporciona uma camada adicional de segurança, protegendo não apenas o enclave, mas também garantindo que o código do aplicativo não possa comprometer as operações seguras do enclave<text:s/><text:span text:style-name="T87"><text:bookmark-ref text:ref-name="_Ref148643999" text:reference-format="text">[8</text:bookmark-ref></text:span><text:span text:style-name="T88">,<text:s/></text:span><text:span text:style-name="T89"><text:bookmark-ref text:ref-name="_Ref150119837" text:reference-format="text">14]</text:bookmark-ref></text:span>.</text:p>
      <text:p text:style-name="P90">Sendo assim, abaixo na Figura 2, veremos a visão geral de alto nível de hardware/software do SGX para termos uma base de como funciona.</text:p>
      <text:p text:style-name="P91"><draw:g draw:name="Canvas 14" draw:id="id46" draw:style-name="a60" text:anchor-type="as-char"><svg:title/><svg:desc/><draw:custom-shape svg:x="1.04057in" svg:y="1.7356in" svg:width="3.09375in" svg:height="0.51021in" draw:id="id26" draw:style-name="a33" draw:name="Rectangle 2044752498"><svg:title/><svg:desc/><text:p text:style-name="P92">SGX<text:s/></text:p><text:p text:style-name="P93"><text:span text:style-name="T94">Módulo</text:span></text:p><draw:enhanced-geometry draw:type="non-primitive" svg:viewBox="0 0 21600 21600" draw:enhanced-path="M 0 0 L 21600 0 21600 21600 0 21600 Z N"/></draw:custom-shape><draw:custom-shape svg:x="1.53762in" svg:y="0.12221in" svg:width="0.97917in" svg:height="0.41767in" draw:id="id27" draw:style-name="a34" draw:name="Rectangle 2010633657"><svg:title/><svg:desc/><text:p text:style-name="P95">Enclave</text:p><draw:enhanced-geometry draw:type="non-primitive" svg:viewBox="0 0 21600 21600" draw:enhanced-path="M 0 0 L 21600 0 21600 21600 0 21600 Z N"/></draw:custom-shape><draw:custom-shape svg:x="2.69281in" svg:y="0.12221in" svg:width="0.97917in" svg:height="0.4173in" draw:id="id28" draw:style-name="a35" draw:name="Rectangle 1983118253"><svg:title/><svg:desc/><text:p text:style-name="P96">Enclave</text:p><draw:enhanced-geometry draw:type="non-primitive" svg:viewBox="0 0 21600 21600" draw:enhanced-path="M 0 0 L 21600 0 21600 21600 0 21600 Z N"/></draw:custom-shape><draw:custom-shape svg:x="1.52614in" svg:y="0.85874in" svg:width="0.97917in" svg:height="0.501in" draw:id="id29" draw:style-name="a36" draw:name="Rectangle 1680747670"><svg:title/><svg:desc/><text:p text:style-name="P97">SGX User Runtime</text:p><draw:enhanced-geometry draw:type="non-primitive" svg:viewBox="0 0 21600 21600" draw:enhanced-path="M 0 0 L 21600 0 21600 21600 0 21600 Z N"/></draw:custom-shape><draw:custom-shape svg:x="2.69281in" svg:y="0.85874in" svg:width="0.97917in" svg:height="0.50062in" draw:id="id30" draw:style-name="a37" draw:name="Rectangle 216901580"><svg:title/><svg:desc/><text:p text:style-name="P98">SGX User Runtime</text:p><draw:enhanced-geometry draw:type="non-primitive" svg:viewBox="0 0 21600 21600" draw:enhanced-path="M 0 0 L 21600 0 21600 21600 0 21600 Z N"/></draw:custom-shape><draw:custom-shape svg:x="1.09434in" svg:y="1.77419in" svg:width="0.80315in" svg:height="0.44276in" draw:id="id31" draw:style-name="a38" draw:name="Rectangle 1489552879"><svg:title/><svg:desc/><text:p text:style-name="P99">Page Tables</text:p><draw:enhanced-geometry draw:type="non-primitive" svg:viewBox="0 0 21600 21600" draw:enhanced-path="M 0 0 L 21600 0 21600 21600 0 21600 Z N"/></draw:custom-shape><draw:custom-shape svg:x="0.96353in" svg:y="2.72562in" svg:width="3.26415in" svg:height="1.04829in" draw:id="id32" draw:style-name="a39" draw:name="Rectangle 1073638864"><svg:title/><svg:desc/><text:p text:style-name="P100">Plataforma</text:p><text:p text:style-name="P101"/><text:p text:style-name="P102"/><draw:enhanced-geometry draw:type="non-primitive" svg:viewBox="0 0 21600 21600" draw:enhanced-path="M 0 0 L 21600 0 21600 21600 0 21600 Z N"/></draw:custom-shape><draw:custom-shape svg:x="1.04057in" svg:y="3.13122in" svg:width="2.35692in" svg:height="0.4423in" draw:id="id33" draw:style-name="a40" draw:name="Rectangle 1910473625"><svg:title/><svg:desc/><text:p text:style-name="P103">EPC</text:p><draw:enhanced-geometry draw:type="non-primitive" svg:viewBox="0 0 21600 21600" draw:enhanced-path="M 0 0 L 21600 0 21600 21600 0 21600 Z N"/></draw:custom-shape><draw:custom-shape svg:x="3.46226in" svg:y="3.12892in" svg:width="0.69938in" svg:height="0.4423in" draw:id="id34" draw:style-name="a41" draw:name="Rectangle 464356606"><svg:title/><svg:desc/><text:p text:style-name="P104">EPCM</text:p><draw:enhanced-geometry draw:type="non-primitive" svg:viewBox="0 0 21600 21600" draw:enhanced-path="M 0 0 L 21600 0 21600 21600 0 21600 Z N"/></draw:custom-shape><draw:custom-shape svg:x="0.0107in" svg:y="1.7351in" svg:width="1.16986in" svg:height="0.56548in" draw:id="id35" draw:style-name="a42" draw:name="Rectangle 1295921685"><svg:title/><svg:desc/><text:p text:style-name="P105">Ambiente Privilegiado</text:p><draw:enhanced-geometry draw:type="non-primitive" svg:viewBox="0 0 21600 21600" draw:enhanced-path="M 0 0 L 21600 0 21600 21600 0 21600 Z N"/></draw:custom-shape><draw:custom-shape svg:x="0in" svg:y="0.39576in" svg:width="1.16418in" svg:height="0.70111in" draw:id="id36" draw:style-name="a43" draw:name="Rectangle 1706121972"><svg:title/><svg:desc/><text:p text:style-name="P106">Ambiente de Aplicação</text:p><draw:enhanced-geometry draw:type="non-primitive" svg:viewBox="0 0 21600 21600" draw:enhanced-path="M 0 0 L 21600 0 21600 21600 0 21600 Z N"/></draw:custom-shape><draw:custom-shape svg:x="0in" svg:y="3.0369in" svg:width="0.99852in" svg:height="0.50062in" draw:id="id37" draw:style-name="a44" draw:name="Rectangle 1785196883"><svg:title/><svg:desc/><text:p text:style-name="P107">Hardware Exposto</text:p><draw:enhanced-geometry draw:type="non-primitive" svg:viewBox="0 0 21600 21600" draw:enhanced-path="M 0 0 L 21600 0 21600 21600 0 21600 Z N"/></draw:custom-shape><draw:custom-shape svg:x="4.26866in" svg:y="0in" svg:width="1.63433in" svg:height="1.53259in" draw:id="id38" draw:style-name="a45" draw:name="Rectangle 1839542248"><svg:title/><svg:desc/><text:p text:style-name="P108">Instruções</text:p><text:p text:style-name="P109">EEXIT</text:p><text:p text:style-name="P110">EGETKEY</text:p><text:p text:style-name="P111">EREPORT</text:p><text:p text:style-name="P112">EENTER</text:p><text:p text:style-name="P113">ERESUME</text:p><draw:enhanced-geometry draw:type="non-primitive" svg:viewBox="0 0 21600 21600" draw:enhanced-path="M 0 0 L 21600 0 21600 21600 0 21600 Z N"/></draw:custom-shape><draw:custom-shape svg:x="4.26866in" svg:y="0.95763in" svg:width="1.63433in" svg:height="1.88497in" draw:id="id39" draw:style-name="a46" draw:name="Rectangle 1504420053"><svg:title/><svg:desc/><text:p text:style-name="P114">Instruções</text:p><text:p text:style-name="P115">EADD <text:s text:c="15"/>ELDB</text:p><text:p text:style-name="P116">EBLOCK <text:s text:c="10"/>ELDU</text:p><text:p text:style-name="P117">ECREATE <text:s text:c="8"/>EPA</text:p><text:p text:style-name="P118">EDBGRD <text:s text:c="9"/>EREMOVE</text:p><text:p text:style-name="P119">EBDGWR <text:s text:c="8"/>ETRACE</text:p><text:p text:style-name="P120">EINIT <text:s text:c="15"/>EWB</text:p><text:p text:style-name="P121">EEXTEND</text:p><draw:enhanced-geometry draw:type="non-primitive" svg:viewBox="0 0 21600 21600" draw:enhanced-path="M 0 0 L 21600 0 21600 21600 0 21600 Z N"/></draw:custom-shape><draw:custom-shape svg:x="4.25437in" svg:y="2.72561in" svg:width="1.64861in" svg:height="1.06284in" draw:id="id40" draw:style-name="a47" draw:name="Rectangle 1835910391"><svg:title/><svg:desc/><text:p text:style-name="P122">Estrutura de<text:s/></text:p><text:p text:style-name="Normal"><text:span text:style-name="T123">Dados de Hardware</text:span></text:p><text:p text:style-name="Normal"><text:span text:style-name="T124">Hardware</text:span></text:p><text:p text:style-name="P125">Runtime</text:p><text:p text:style-name="P126">Application</text:p><text:p text:style-name="P127">OS Data structure</text:p><text:p text:style-name="P128"/><draw:enhanced-geometry draw:type="non-primitive" svg:viewBox="0 0 21600 21600" draw:enhanced-path="M 0 0 L 21600 0 21600 21600 0 21600 Z N"/></draw:custom-shape><draw:connector draw:type="line" svg:x1="2.58745in" svg:y1="2.2455in" svg:x2="2.5956in" svg:y2="2.72523in" draw:id="id41" draw:style-name="a49" draw:name="Straight Arrow Connector 2015725941"><svg:title/><svg:desc/></draw:connector><draw:connector draw:type="line" svg:x1="2.02312in" svg:y1="0.55593in" svg:x2="2.01572in" svg:y2="0.85862in" draw:id="id42" draw:style-name="a52" draw:name="Straight Arrow Connector 1059003063"><svg:title/><svg:desc/></draw:connector><draw:connector draw:type="line" svg:x1="3.19653in" svg:y1="0.5398in" svg:x2="3.18239in" svg:y2="0.85862in" draw:id="id43" draw:style-name="a55" draw:name="Straight Arrow Connector 2020216379"><svg:title/><svg:desc/></draw:connector><draw:connector draw:type="line" svg:x1="2.00578in" svg:y1="1.37085in" svg:x2="2.00578in" svg:y2="1.73535in" draw:id="id44" draw:style-name="a57" draw:name="Straight Arrow Connector 129768291"><svg:title/><svg:desc/></draw:connector><draw:connector draw:type="line" svg:x1="3.18239in" svg:y1="1.35917in" svg:x2="3.18239in" svg:y2="1.7351in" draw:id="id45" draw:style-name="a59" draw:name="Straight Arrow Connector 1119326872"><svg:title/><svg:desc/></draw:connector></draw:g></text:p>
      <text:p text:style-name="P129">Figura 2. Arquitetura SGX.</text:p>
      <text:p text:style-name="P130">Segundo a Intel, o ponto chave dessa perspectiva arquitetural é que a tradução básica de virtual para físico ocorria por meio dessas tabelas de páginas. No entanto, a enclave possui seu próprio espaço de memória restrito, e é por isso que existe essa estrutura adicional (Plataforma retângulo de cor cinza).</text:p>
      <text:p text:style-name="P131">Essencialmente, chamamos isso de Enclave Page Cache (EPC) e Enclave Page Cache Manager (EPCM), que supervisiona todas as páginas alocadas para o enclave.</text:p>
      <text:p text:style-name="P132">Imagine um programa no qual algumas informações confidenciais não podem ser comprometidas, como dados cruciais. Para garantir a confidencialidade de seus próprios dados, você pode recorrer ao Ambiente de Execução SGX.</text:p>
      <text:p text:style-name="P133">Dentro desse ambiente SGX, utilizamos as páginas do EPC e do gerenciador do EPC para monitorar quantas páginas foram designadas para o enclave.</text:p>
      <text:list text:style-name="Outline" text:continue-numbering="true">
        <text:list-item>
          <text:list>
            <text:list-item>
              <text:p text:style-name="P134">Instruções do Intel SGX</text:p>
            </text:list-item>
          </text:list>
        </text:list-item>
      </text:list>
      <text:p text:style-name="P135">O SGX introduz 18 novas instruções, divididas entre o supervisor e o usuário. Essas instruções, como EADD, EENTER, EEXIT, EREPORT e EGETKEY, desempenham papéis cruciais na criação, entrada e saída de enclaves, bem como na obtenção de chaves<text:s/><text:soft-page-break/>e relatórios de atestação. Elas são os blocos de construção fundamentais que capacitam a operação segura dos enclaves<text:s/><text:span text:style-name="T136"><text:bookmark-ref text:ref-name="_Ref148643999" text:reference-format="text">[8</text:bookmark-ref></text:span><text:span text:style-name="T137">,<text:s/></text:span><text:span text:style-name="T138"><text:bookmark-ref text:ref-name="_Ref150119837" text:reference-format="text">14]</text:bookmark-ref></text:span>.</text:p>
      <text:p text:style-name="P139"><text:span text:style-name="T140">Tabela 1. Instruções do Intel SGX em destaque.</text:span></text:p>
      <text:p text:style-name="P141"><draw:frame draw:style-name="a61" draw:name="Picture 1" text:anchor-type="as-char" svg:x="0in" svg:y="0in" svg:width="5.90556in" svg:height="2.51042in" style:rel-width="scale" style:rel-height="scale"><draw:image xlink:href="media/image2.emf" xlink:type="simple" xlink:show="embed" xlink:actuate="onLoad"/><svg:title/><svg:desc/></draw:frame></text:p>
      <text:list text:style-name="Outline" text:continue-numbering="true">
        <text:list-item>
          <text:list>
            <text:list-item>
              <text:p text:style-name="P142">Estruturas de Controle de Enclave</text:p>
            </text:list-item>
          </text:list>
        </text:list-item>
      </text:list>
      <text:p text:style-name="P143">O SGX define 13 novas estruturas de dados, essenciais para o gerenciamento de enclaves. Essas estruturas, incluindo SGX Enclave Control Structure (SECS), Thread Control Structure (TCS) e Version Array (VA), desempenham papéis vitais na criação, execução e salvamento de estados do enclave. Cada estrutura é projetada para garantir a integridade e confidencialidade dos dados contidos nos enclaves<text:s/><text:span text:style-name="T144"><text:bookmark-ref text:ref-name="_Ref148643999" text:reference-format="text">[8</text:bookmark-ref></text:span><text:span text:style-name="T145">,<text:s/></text:span><text:span text:style-name="T146"><text:bookmark-ref text:ref-name="_Ref150119837" text:reference-format="text">14]</text:bookmark-ref></text:span>.</text:p>
      <text:list text:style-name="LFO13" text:continue-numbering="true">
        <text:list-item>
          <text:p text:style-name="P147">SGX Enclave Control Structure (SECS): Metadados sobre o enclave.</text:p>
        </text:list-item>
        <text:list-item>
          <text:p text:style-name="P148">Thread Control Structure (TCS): Ponto de execução no enclave.</text:p>
        </text:list-item>
        <text:list-item>
          <text:p text:style-name="P149">State State Area (SSA): Salva o estado do processador durante exceções.</text:p>
        </text:list-item>
        <text:list-item>
          <text:p text:style-name="P150">Page Information (PAGEINFO): Fornece informações sobre uma página.</text:p>
        </text:list-item>
        <text:list-item>
          <text:p text:style-name="P151">Security Information (SECINFO): Armazena metadados de página.</text:p>
        </text:list-item>
        <text:list-item>
          <text:p text:style-name="P152">Paging Crypto MetaData (PCMD): Rastreia metadados de página evitada.</text:p>
        </text:list-item>
        <text:list-item>
          <text:p text:style-name="P153">Version Array (VA): Armazena versões de páginas evitadas.</text:p>
        </text:list-item>
        <text:list-item>
          <text:p text:style-name="P154">Enclave Page Cache Map (EPCM): Armazena o estado das páginas no EPC.</text:p>
        </text:list-item>
        <text:list-item>
          <text:p text:style-name="P155">Enclave Signature Structure (SIGSTRUCT): Contém a medida do enclave e informações de assinatura.</text:p>
        </text:list-item>
        <text:list-item>
          <text:p text:style-name="P156">EINIT Token Structure (EINITTOKEN): Usado para verificar a autorização do enclave.</text:p>
        </text:list-item>
        <text:list-item>
          <text:p text:style-name="P157">Report (REPORT): Saída autenticada da instrução EREPORT.</text:p>
        </text:list-item>
        <text:list-item>
          <text:p text:style-name="P158">Report Target Info (TARGETINFO): Identifica o enclave destinatário.</text:p>
        </text:list-item>
        <text:list-item>
          <text:p text:style-name="P159">Key Request (KEYREQUEST): Usado para obter chaves específicas.</text:p>
        </text:list-item>
      </text:list>
      <text:soft-page-break/>
      <text:list text:style-name="Outline" text:continue-numbering="true">
        <text:list-item>
          <text:list>
            <text:list-item>
              <text:p text:style-name="P160">Memória: Enclave Page Cache (EPC) e Enclave Page Cache Map (EPCM)</text:p>
            </text:list-item>
          </text:list>
        </text:list-item>
      </text:list>
      <text:p text:style-name="P161">A memória desempenha um papel crítico no SGX, com o EPC servindo como área dedicada ao enclave e o EPCM mapeando o estado das páginas. O conteúdo do EPC é protegido contra leituras externas, garantindo a segurança das informações. A EPCM é responsável por rastrear o estado das páginas, garantindo que somente páginas alocadas e apropriadas para o enclave sejam acessíveis<text:s/><text:span text:style-name="T162"><text:bookmark-ref text:ref-name="_Ref148643999" text:reference-format="text">[8</text:bookmark-ref></text:span><text:span text:style-name="T163">,<text:s/></text:span><text:span text:style-name="T164"><text:bookmark-ref text:ref-name="_Ref150119837" text:reference-format="text">14]</text:bookmark-ref></text:span>.</text:p>
      <text:p text:style-name="P165"><draw:frame draw:z-index="251682816" draw:style-name="a62" draw:name="Picture 11" text:anchor-type="paragraph" svg:x="0in" svg:y="1.71947in" svg:width="5.90556in" svg:height="4.65625in" style:rel-width="scale" style:rel-height="scale"><draw:image xlink:href="media/image3.png" xlink:type="simple" xlink:show="embed" xlink:actuate="onLoad"/><svg:title/><svg:desc/></draw:frame>A memória EPC é definida pela BIOS e possui um tamanho limitado. O SGX tem um método para remover uma página da EPC, colocá-la na memória desprotegida e restaurá-la posteriormente. As páginas mantêm as mesmas propriedades de segurança graças às instruções de gerenciamento de páginas da EPC, que permitem criptografar uma página e produzir metadados adicionais. Uma página não pode ser removida até que todas as entradas de cache referentes a essa página sejam removidas de todos os núcleos lógicos do processador. O conteúdo é exportado ou importado com uma granularidade de uma página (que é 4 KB).</text:p>
      <text:p text:style-name="P166">Figura 3. Memória – Caminho da página do Enclave</text:p>
      <text:p text:style-name="P167">Os conteúdos das enclaves e as estruturas de dados associadas são armazenados no Enclave Page Cache (EPC), que é um subconjunto do PRM (Memória Reservada do Processador).</text:p>
      <text:p text:style-name="P168">O design do SGX suporta a existência de várias enclaves em um sistema ao mesmo tempo, o que é uma necessidade em ambientes de vários processos. Isso é alcançado dividindo o EPC em páginas de 4 KB que podem ser atribuídas a diferentes enclaves. O<text:s/><text:soft-page-break/>EPC utiliza o mesmo tamanho de página que o recurso de tradução de endereço da arquitetura.</text:p>
      <text:p text:style-name="P169">O EPC é gerenciado pelo mesmo software do sistema que gerencia o restante da memória física do computador. O software do sistema, que pode ser um hipervisor ou um kernel de sistema operacional, utiliza instruções SGX para alocar páginas não utilizadas para enclaves e liberar páginas do EPC previamente alocadas. O software não relacionado às enclaves não pode acessar diretamente o EPC, pois está contido no PRM conforme na Figura 4 abaixo.</text:p>
      <text:p text:style-name="P170"><draw:g draw:name="Canvas 15" draw:id="id86" draw:style-name="a111" text:anchor-type="as-char"><svg:title/><svg:desc/><draw:custom-shape svg:x="0in" svg:y="0.02269in" svg:width="1.1791in" svg:height="1.76119in" draw:id="id47" draw:style-name="a63" draw:name="Rectangle: Rounded Corners 116846412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8789in" svg:y="0.02269in" svg:width="1.17847in" svg:height="1.76111in" draw:id="id48" draw:style-name="a64" draw:name="Rectangle: Rounded Corners 220884537"><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24163in" svg:y="0.02269in" svg:width="1.17847in" svg:height="1.76111in" draw:id="id49" draw:style-name="a65" draw:name="Rectangle: Rounded Corners 187262844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33353in" svg:width="0.99472in" svg:height="0.17038in" draw:id="id50" draw:style-name="a66" draw:name="Rectangle: Rounded Corners 29062934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50391in" svg:width="0.99444in" svg:height="0.16997in" draw:id="id51" draw:style-name="a67" draw:name="Rectangle: Rounded Corners 746676740"><svg:title/><svg:desc/><text:p text:style-name="P171"/><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321in" svg:y="0.67364in" svg:width="0.99444in" svg:height="0.16997in" draw:id="id52" draw:style-name="a68" draw:name="Rectangle: Rounded Corners 1076379600"><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26115in" svg:width="0.99444in" svg:height="0.16997in" draw:id="id53" draw:style-name="a69" draw:name="Rectangle: Rounded Corners 122504718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43181in" svg:width="0.99444in" svg:height="0.16997in" draw:id="id54" draw:style-name="a70" draw:name="Rectangle: Rounded Corners 99919943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34964in" svg:width="0.99444in" svg:height="0.32967in" draw:id="id55" draw:style-name="a71" draw:name="Rectangle 797500506"><svg:title/><svg:desc/><text:p text:style-name="P172">Entrada</text:p><draw:enhanced-geometry draw:type="non-primitive" svg:viewBox="0 0 21600 21600" draw:enhanced-path="M 0 0 L 21600 0 21600 21600 0 21600 Z N"/></draw:custom-shape><draw:custom-shape svg:x="4.91597in" svg:y="0.24221in" svg:width="0.99444in" svg:height="0.32917in" draw:id="id56" draw:style-name="a72" draw:name="Rectangle 1209550937"><svg:title/><svg:desc/><text:p text:style-name="P173">Entrada</text:p><draw:enhanced-geometry draw:type="non-primitive" svg:viewBox="0 0 21600 21600" draw:enhanced-path="M 0 0 L 21600 0 21600 21600 0 21600 Z N"/></draw:custom-shape><draw:custom-shape svg:x="4.91597in" svg:y="0.40066in" svg:width="0.99444in" svg:height="0.32917in" draw:id="id57" draw:style-name="a73" draw:name="Rectangle 641885352"><svg:title/><svg:desc/><text:p text:style-name="P174">Entrada</text:p><draw:enhanced-geometry draw:type="non-primitive" svg:viewBox="0 0 21600 21600" draw:enhanced-path="M 0 0 L 21600 0 21600 21600 0 21600 Z N"/></draw:custom-shape><draw:custom-shape svg:x="4.91597in" svg:y="0.57901in" svg:width="0.99444in" svg:height="0.32917in" draw:id="id58" draw:style-name="a74" draw:name="Rectangle 1460268968"><svg:title/><svg:desc/><text:p text:style-name="P175">Entrada</text:p><draw:enhanced-geometry draw:type="non-primitive" svg:viewBox="0 0 21600 21600" draw:enhanced-path="M 0 0 L 21600 0 21600 21600 0 21600 Z N"/></draw:custom-shape><draw:custom-shape svg:x="4.91597in" svg:y="1.17141in" svg:width="0.99444in" svg:height="0.32917in" draw:id="id59" draw:style-name="a75" draw:name="Rectangle 1836787484"><svg:title/><svg:desc/><text:p text:style-name="P176">Entrada</text:p><draw:enhanced-geometry draw:type="non-primitive" svg:viewBox="0 0 21600 21600" draw:enhanced-path="M 0 0 L 21600 0 21600 21600 0 21600 Z N"/></draw:custom-shape><draw:custom-shape svg:x="3.02652in" svg:y="0.0055in" svg:width="0.99444in" svg:height="0.32917in" draw:id="id60" draw:style-name="a76" draw:name="Rectangle 839673701"><svg:title/><svg:desc/><text:p text:style-name="P177">EPC</text:p><draw:enhanced-geometry draw:type="non-primitive" svg:viewBox="0 0 21600 21600" draw:enhanced-path="M 0 0 L 21600 0 21600 21600 0 21600 Z N"/></draw:custom-shape><draw:custom-shape svg:x="1.2463in" svg:y="0in" svg:width="0.99444in" svg:height="0.32917in" draw:id="id61" draw:style-name="a77" draw:name="Rectangle 1600535250"><svg:title/><svg:desc/><text:p text:style-name="P178">PRM</text:p><draw:enhanced-geometry draw:type="non-primitive" svg:viewBox="0 0 21600 21600" draw:enhanced-path="M 0 0 L 21600 0 21600 21600 0 21600 Z N"/></draw:custom-shape><draw:custom-shape svg:x="0in" svg:y="0.01004in" svg:width="0.62609in" svg:height="0.32917in" draw:id="id62" draw:style-name="a78" draw:name="Rectangle 1049021572"><svg:title/><svg:desc/><text:p text:style-name="P179">DRAM</text:p><draw:enhanced-geometry draw:type="non-primitive" svg:viewBox="0 0 21600 21600" draw:enhanced-path="M 0 0 L 21600 0 21600 21600 0 21600 Z N"/></draw:custom-shape><draw:custom-shape svg:x="3.31868in" svg:y="0.33467in" svg:width="1.04395in" svg:height="0.16971in" draw:id="id63" draw:style-name="a79" draw:name="Rectangle 1179471069"><svg:title/><svg:desc/><text:p text:style-name="P180"/><draw:enhanced-geometry draw:type="non-primitive" svg:viewBox="0 0 21600 21600" draw:enhanced-path="M 0 0 L 21600 0 21600 21600 0 21600 Z N"/></draw:custom-shape><draw:custom-shape svg:x="3.31868in" svg:y="0.50437in" svg:width="1.04375in" svg:height="0.16944in" draw:id="id64" draw:style-name="a80" draw:name="Rectangle 9692940"><svg:title/><svg:desc/><draw:enhanced-geometry draw:type="non-primitive" svg:viewBox="0 0 21600 21600" draw:enhanced-path="M 0 0 L 21600 0 21600 21600 0 21600 Z N"/></draw:custom-shape><draw:custom-shape svg:x="3.31889in" svg:y="0.6742in" svg:width="1.04375in" svg:height="0.16944in" draw:id="id65" draw:style-name="a81" draw:name="Rectangle 885407973"><svg:title/><svg:desc/><draw:enhanced-geometry draw:type="non-primitive" svg:viewBox="0 0 21600 21600" draw:enhanced-path="M 0 0 L 21600 0 21600 21600 0 21600 Z N"/></draw:custom-shape><draw:custom-shape svg:x="3.32389in" svg:y="1.26261in" svg:width="1.04375in" svg:height="0.16944in" draw:id="id66" draw:style-name="a82" draw:name="Rectangle 17566906"><svg:title/><svg:desc/><draw:enhanced-geometry draw:type="non-primitive" svg:viewBox="0 0 21600 21600" draw:enhanced-path="M 0 0 L 21600 0 21600 21600 0 21600 Z N"/></draw:custom-shape><draw:custom-shape svg:x="3.32389in" svg:y="1.43199in" svg:width="1.04375in" svg:height="0.16944in" draw:id="id67" draw:style-name="a83" draw:name="Rectangle 317112904"><svg:title/><svg:desc/><draw:enhanced-geometry draw:type="non-primitive" svg:viewBox="0 0 21600 21600" draw:enhanced-path="M 0 0 L 21600 0 21600 21600 0 21600 Z N"/></draw:custom-shape><draw:custom-shape svg:x="3.36156in" svg:y="0.25504in" svg:width="0.97631in" svg:height="0.30646in" draw:id="id68" draw:style-name="a84" draw:name="Rectangle 1506428893"><svg:title/><svg:desc/><text:p text:style-name="P181">4kb página</text:p><draw:enhanced-geometry draw:type="non-primitive" svg:viewBox="0 0 21600 21600" draw:enhanced-path="M 0 0 L 21600 0 21600 21600 0 21600 Z N"/></draw:custom-shape><draw:custom-shape svg:x="3.34994in" svg:y="0.40066in" svg:width="0.99444in" svg:height="0.36061in" draw:id="id69" draw:style-name="a85" draw:name="Rectangle 1123060661"><svg:title/><svg:desc/><text:p text:style-name="P182">4kb página</text:p><draw:enhanced-geometry draw:type="non-primitive" svg:viewBox="0 0 21600 21600" draw:enhanced-path="M 0 0 L 21600 0 21600 21600 0 21600 Z N"/></draw:custom-shape><draw:custom-shape svg:x="3.34994in" svg:y="0.58852in" svg:width="0.99444in" svg:height="0.32917in" draw:id="id70" draw:style-name="a86" draw:name="Rectangle 1258270931"><svg:title/><svg:desc/><text:p text:style-name="P183">4kb página</text:p><draw:enhanced-geometry draw:type="non-primitive" svg:viewBox="0 0 21600 21600" draw:enhanced-path="M 0 0 L 21600 0 21600 21600 0 21600 Z N"/></draw:custom-shape><draw:custom-shape svg:x="3.34994in" svg:y="1.17141in" svg:width="0.99444in" svg:height="0.32917in" draw:id="id71" draw:style-name="a87" draw:name="Rectangle 200210307"><svg:title/><svg:desc/><text:p text:style-name="P184">4kb página</text:p><draw:enhanced-geometry draw:type="non-primitive" svg:viewBox="0 0 21600 21600" draw:enhanced-path="M 0 0 L 21600 0 21600 21600 0 21600 Z N"/></draw:custom-shape><draw:custom-shape svg:x="3.34994in" svg:y="1.33894in" svg:width="0.99444in" svg:height="0.32917in" draw:id="id72" draw:style-name="a88" draw:name="Rectangle 1921778867"><svg:title/><svg:desc/><text:p text:style-name="P185">4kb página</text:p><draw:enhanced-geometry draw:type="non-primitive" svg:viewBox="0 0 21600 21600" draw:enhanced-path="M 0 0 L 21600 0 21600 21600 0 21600 Z N"/></draw:custom-shape><draw:custom-shape svg:x="3.41368in" svg:y="0.87499in" svg:width="0.96979in" svg:height="0.32917in" draw:id="id73" draw:style-name="a89" draw:name="Rectangle 1332505350"><svg:title/><svg:desc/><text:p text:style-name="P186">...</text:p><draw:enhanced-geometry draw:type="non-primitive" svg:viewBox="0 0 21600 21600" draw:enhanced-path="M 0 0 L 21600 0 21600 21600 0 21600 Z N"/></draw:custom-shape><draw:custom-shape svg:x="1.56167in" svg:y="0.6955in" svg:width="1.04375in" svg:height="0.71205in" draw:id="id74" draw:style-name="a90" draw:name="Rectangle 1252158810"><svg:title/><svg:desc/><text:p text:style-name="P187">EPC</text:p><draw:enhanced-geometry draw:type="non-primitive" svg:viewBox="0 0 21600 21600" draw:enhanced-path="M 0 0 L 21600 0 21600 21600 0 21600 Z N"/></draw:custom-shape><draw:custom-shape svg:x="0.06982in" svg:y="0.68932in" svg:width="1.04375in" svg:height="0.40901in" draw:id="id75" draw:style-name="a91" draw:name="Rectangle 82657654"><svg:title/><svg:desc/><text:p text:style-name="P188">PRM</text:p><draw:enhanced-geometry draw:type="non-primitive" svg:viewBox="0 0 21600 21600" draw:enhanced-path="M 0 0 L 21600 0 21600 21600 0 21600 Z N"/></draw:custom-shape><draw:connector draw:type="line" svg:x1="1.11357in" svg:y1="0.68932in" svg:x2="1.51792in" svg:y2="0.1244in" draw:id="id76" draw:style-name="a93" draw:name="Straight Connector 365123092"><svg:title/><svg:desc/></draw:connector><draw:connector draw:type="line" svg:x1="1.50814in" svg:y1="1.63254in" svg:x2="1.12193in" svg:y2="1.09323in" draw:id="id77" draw:style-name="a95" draw:name="Straight Connector 1766329955"><svg:title/><svg:desc/></draw:connector><draw:connector draw:type="line" svg:x1="3.36156in" svg:y1="1.76935in" svg:x2="2.5975in" svg:y2="1.38639in" draw:id="id78" draw:style-name="a97" draw:name="Straight Connector 224777670"><svg:title/><svg:desc/></draw:connector><draw:connector draw:type="line" svg:x1="3.33551in" svg:y1="0.04622in" svg:x2="2.60912in" svg:y2="0.68932in" draw:id="id79" draw:style-name="a99" draw:name="Straight Connector 1690904062"><svg:title/><svg:desc/></draw:connector><draw:custom-shape svg:x="5.07047in" svg:y="0.83018in" svg:width="0.83995in" svg:height="0.32917in" draw:id="id80" draw:style-name="a100" draw:name="Rectangle 1132929376"><svg:title/><svg:desc/><text:p text:style-name="P189">...</text:p><draw:enhanced-geometry draw:type="non-primitive" svg:viewBox="0 0 21600 21600" draw:enhanced-path="M 0 0 L 21600 0 21600 21600 0 21600 Z N"/></draw:custom-shape><draw:connector draw:type="line" svg:x1="4.91569in" svg:y1="0.41872in" svg:x2="4.36264in" svg:y2="0.41952in" draw:id="id81" draw:style-name="a102" draw:name="Straight Arrow Connector 2069598626"><svg:title/><svg:desc/></draw:connector><draw:connector draw:type="line" svg:x1="4.91569in" svg:y1="0.5889in" svg:x2="4.36243in" svg:y2="0.5891in" draw:id="id82" draw:style-name="a104" draw:name="Straight Arrow Connector 330989565"><svg:title/><svg:desc/></draw:connector><draw:connector draw:type="line" svg:x1="4.91321in" svg:y1="0.75862in" svg:x2="4.36264in" svg:y2="0.75892in" draw:id="id83" draw:style-name="a106" draw:name="Straight Arrow Connector 2113445522"><svg:title/><svg:desc/></draw:connector><draw:connector draw:type="line" svg:x1="4.91597in" svg:y1="1.34614in" svg:x2="4.36764in" svg:y2="1.34734in" draw:id="id84" draw:style-name="a108" draw:name="Straight Arrow Connector 1825601399"><svg:title/><svg:desc/></draw:connector><draw:connector draw:type="line" svg:x1="4.90554in" svg:y1="1.51841in" svg:x2="4.36764in" svg:y2="1.51672in" draw:id="id85" draw:style-name="a110" draw:name="Straight Arrow Connector 711467765"><svg:title/><svg:desc/></draw:connector></draw:g></text:p>
      <text:p text:style-name="P190">Figura 4. Memória – Cache de página enclave (EPC) no PRM<text:s/></text:p>
      <text:p text:style-name="P191">O design do SGX espera que o software do sistema aloque as páginas do EPC para as enclaves. No entanto, como o software do sistema não é confiável, os processadores SGX verificam a correção das decisões de alocação do software do sistema e recusam-se a executar qualquer ação que comprometa as garantias de segurança do SGX. Por exemplo, se o software do sistema tentar alocar a mesma página do EPC para duas enclaves, a instrução SGX usada para realizar a alocação falhará.</text:p>
      <text:p text:style-name="P192">Para realizar suas verificações de segurança, o SGX registra algumas informações sobre as decisões de alocação do software do sistema para cada página do EPC no Enclave Page Cache Map (EPCM). O EPCM é uma matriz com uma entrada por página do EPC, portanto, calcular o endereço da entrada do EPCM de uma página requer apenas uma operação de deslocamento de bits e uma adição. (Assim como a Tabela 2 abaixo)</text:p>
      <text:p text:style-name="P193"><text:span text:style-name="T194">Tabela 2. EPCM - Tabela de páginas em um SO regular</text:span></text:p>
      <text:p text:style-name="P195"><draw:frame draw:style-name="a112" draw:name="Picture 2" text:anchor-type="as-char" svg:x="0in" svg:y="0in" svg:width="4.13542in" svg:height="0.84375in" style:rel-width="scale" style:rel-height="scale"><draw:image xlink:href="media/image4.emf" xlink:type="simple" xlink:show="embed" xlink:actuate="onLoad"/><svg:title/><svg:desc/></draw:frame></text:p>
      <text:list text:style-name="Outline" text:continue-numbering="true">
        <text:list-item>
          <text:list>
            <text:list-item>
              <text:p text:style-name="P196">Troca de Páginas do EPC</text:p>
            </text:list-item>
          </text:list>
        </text:list-item>
      </text:list>
      <text:p text:style-name="P197">A troca de páginas no Enclave Page Cache (EPC) é uma operação crucial no Intel SGX, que visa gerenciar eficientemente o espaço de memória seguro. A memória EPC, configurada pelo BIOS e limitada em tamanho, requer um mecanismo para remover páginas do EPC, colocá-las em memória não protegida e, posteriormente, restaurá-las. Esse processo é fundamental para garantir que as páginas de enclave mantenham suas propriedades de segurança, como confidencialidade, anti-replay e integridade, mesmo após a restauração <text:s/><text:span text:style-name="T198"><text:bookmark-ref text:ref-name="_Ref148643999" text:reference-format="text">[8</text:bookmark-ref></text:span><text:span text:style-name="T199">,<text:s/></text:span><text:span text:style-name="T200"><text:bookmark-ref text:ref-name="_Ref150119837" text:reference-format="text">14]</text:bookmark-ref></text:span>.</text:p>
      <text:soft-page-break/>
      <text:p text:style-name="P201">As instruções de paginação do EPC desempenham um papel vital nesse cenário, proporcionando a capacidade de criptografar páginas e gerar os metadados necessários para atender aos requisitos de segurança. Uma consideração importante é que uma página de enclave só deve ser removida do EPC após todas as traduções em cache para essa página terem sido eliminadas de todos os processadores lógicos.</text:p>
      <text:p text:style-name="P202">A troca de conteúdo ocorre com uma granularidade de páginas de 4 KB, onde cada página de EPC de 4 KB produz 4 KB de conteúdo criptografado e 128 bytes de metadados (PCMD). Essa abordagem visa equilibrar a segurança e a eficiência, garantindo que as operações de troca de páginas sejam precisas e eficazes no ambiente protegido pelo SGX.</text:p>
      <text:list text:style-name="Outline" text:continue-numbering="true">
        <text:list-item>
          <text:list>
            <text:list-item>
              <text:list>
                <text:list-item>
                  <text:p text:style-name="P203"><text:bookmark-start text:name="_Hlk150122192"/>Operações de Paginação em High Level</text:p>
                </text:list-item>
              </text:list>
            </text:list-item>
          </text:list>
        </text:list-item>
      </text:list>
      <text:p text:style-name="P204"><text:bookmark-end text:name="_Hlk150122192"/><text:span text:style-name="T205">As operações de paginação em um nível elevado no Intel SGX seguem um processo preciso<text:s/></text:span><text:s/><text:span text:style-name="T206"><text:bookmark-ref text:ref-name="_Ref148643999" text:reference-format="text">[8</text:bookmark-ref></text:span><text:span text:style-name="T207">,<text:s/></text:span><text:span text:style-name="T208"><text:bookmark-ref text:ref-name="_Ref150119837" text:reference-format="text">14]</text:bookmark-ref></text:span><text:span text:style-name="T209">.</text:span></text:p>
      <text:p text:style-name="P210">Quando uma página é removida do Enclave Page Cache (EPC):</text:p>
      <text:list text:style-name="LFO14" text:continue-numbering="true">
        <text:list-item>
          <text:p text:style-name="P211">Recebe um número de versão exclusivo, registrado na nova página do EPC chamada matriz de versões (VA).</text:p>
        </text:list-item>
        <text:list-item>
          <text:p text:style-name="P212">A página criptografada, os metadados e as informações do EPCM são gravados na memória do sistema.</text:p>
        </text:list-item>
      </text:list>
      <text:p text:style-name="P213">Ao recarregar a página:</text:p>
      <text:list text:style-name="LFO15" text:continue-numbering="true">
        <text:list-item>
          <text:p text:style-name="P214">O processador descriptografa e verifica a integridade da página usando metadados criptográficos.</text:p>
        </text:list-item>
        <text:list-item>
          <text:p text:style-name="P215"><text:span text:style-name="T216">O processador confirma se a versão é a mesma que foi gravada pela última vez. Essa abordagem garante a consistência e a segurança das operações de troca de páginas no ambiente protegido pelo SGX.</text:span></text:p>
        </text:list-item>
      </text:list>
      <text:soft-page-break/>
      <text:list text:style-name="Outline" text:continue-numbering="true">
        <text:list-item>
          <text:list>
            <text:list-item>
              <text:list>
                <text:list-item>
                  <text:p text:style-name="P217"><draw:g draw:z-index="251683840" draw:name="Canvas 1" draw:id="id113" draw:style-name="a146" text:anchor-type="paragraph"><svg:title/><svg:desc/><draw:custom-shape svg:x="0in" svg:y="1.29074in" svg:width="0.86794in" svg:height="2.02366in" draw:id="id87" draw:style-name="a113" draw:name="Rectangle 1901396833"><svg:title/><svg:desc/><draw:enhanced-geometry draw:type="non-primitive" svg:viewBox="0 0 21600 21600" draw:enhanced-path="M 0 0 L 21600 0 21600 21600 0 21600 Z N"/></draw:custom-shape><draw:custom-shape svg:x="2.18685in" svg:y="1.29074in" svg:width="0.86774in" svg:height="2.0331in" draw:id="id88" draw:style-name="a114" draw:name="Rectangle 1023102237"><svg:title/><svg:desc/><draw:enhanced-geometry draw:type="non-primitive" svg:viewBox="0 0 21600 21600" draw:enhanced-path="M 0 0 L 21600 0 21600 21600 0 21600 Z N"/></draw:custom-shape><draw:custom-shape svg:x="0.00193in" svg:y="1.40956in" svg:width="0.86518in" svg:height="0.30872in" draw:id="id89" draw:style-name="a115" draw:name="Rectangle 237769428"><svg:title/><svg:desc/><text:p text:style-name="P218">SECS</text:p><draw:enhanced-geometry draw:type="non-primitive" svg:viewBox="0 0 21600 21600" draw:enhanced-path="M 0 0 L 21600 0 21600 21600 0 21600 Z N"/></draw:custom-shape><draw:custom-shape svg:x="0.00305in" svg:y="2.02833in" svg:width="0.86409in" svg:height="0.12569in" draw:id="id90" draw:style-name="a116" draw:name="Rectangle 2064618075"><svg:title/><svg:desc/><text:p text:style-name="P219"> </text:p><draw:enhanced-geometry draw:type="non-primitive" svg:viewBox="0 0 21600 21600" draw:enhanced-path="M 0 0 L 21600 0 21600 21600 0 21600 Z N"/></draw:custom-shape><draw:g draw:name="Group 1834943945" draw:id="id93"><svg:title/><svg:desc/><draw:custom-shape svg:x="0.00218in" svg:y="1.90203in" svg:width="0.86479in" svg:height="0.1263in" draw:id="id91" draw:style-name="a117" draw:name="Rectangle 814306441"><svg:title/><svg:desc/><text:p text:style-name="P220"/><draw:enhanced-geometry draw:type="non-primitive" svg:viewBox="0 0 21600 21600" draw:enhanced-path="M 0 0 L 21600 0 21600 21600 0 21600 Z N"/></draw:custom-shape><draw:frame draw:id="id92" draw:style-name="a118" draw:name="Text Box 1395268214" svg:x="0.22571in" svg:y="1.85021in" svg:width="0.4512in" svg:height="0.20806in" style:rel-width="scale" style:rel-height="scale"><draw:text-box><text:p text:style-name="P221">VER</text:p></draw:text-box><svg:title/><svg:desc/></draw:frame></draw:g><draw:custom-shape svg:x="0.00396in" svg:y="2.15467in" svg:width="0.8634in" svg:height="0.12569in" draw:id="id94" draw:style-name="a119" draw:name="Rectangle 1764090809"><svg:title/><svg:desc/><text:p text:style-name="P222"> </text:p><draw:enhanced-geometry draw:type="non-primitive" svg:viewBox="0 0 21600 21600" draw:enhanced-path="M 0 0 L 21600 0 21600 21600 0 21600 Z N"/></draw:custom-shape><draw:custom-shape svg:x="0.00396in" svg:y="2.28086in" svg:width="0.8634in" svg:height="0.12569in" draw:id="id95" draw:style-name="a120" draw:name="Rectangle 45909139"><svg:title/><svg:desc/><text:p text:style-name="P223"> </text:p><draw:enhanced-geometry draw:type="non-primitive" svg:viewBox="0 0 21600 21600" draw:enhanced-path="M 0 0 L 21600 0 21600 21600 0 21600 Z N"/></draw:custom-shape><draw:custom-shape svg:x="0.00018in" svg:y="2.93964in" svg:width="0.86736in" svg:height="0.26528in" draw:id="id96" draw:style-name="a121" draw:name="Rectangle 2010365813"><svg:title/><svg:desc/><text:p text:style-name="P224">Página enclave</text:p><draw:enhanced-geometry draw:type="non-primitive" svg:viewBox="0 0 21600 21600" draw:enhanced-path="M 0 0 L 21600 0 21600 21600 0 21600 Z N"/></draw:custom-shape><draw:frame draw:id="id97" draw:style-name="a122" draw:name="Text Box 1" svg:x="0.00389in" svg:y="1.00735in" svg:width="0.86382in" svg:height="0.38762in" style:rel-width="scale" style:rel-height="scale"><draw:text-box><text:p text:style-name="P225">EPC</text:p></draw:text-box><svg:title/><svg:desc/></draw:frame><draw:frame draw:id="id98" draw:style-name="a123" draw:name="Text Box 1" svg:x="2.17797in" svg:y="0.85833in" svg:width="0.87479in" svg:height="0.47944in" style:rel-width="scale" style:rel-height="scale"><draw:text-box><text:p text:style-name="P226">Mémoria do sistema</text:p></draw:text-box><svg:title/><svg:desc/></draw:frame><draw:custom-shape svg:x="2.18714in" svg:y="2.33497in" svg:width="0.86667in" svg:height="0.31581in" draw:id="id99" draw:style-name="a124" draw:name="Rectangle 1528959532"><svg:title/><svg:desc/><text:p text:style-name="P227">Página criptografada</text:p><draw:enhanced-geometry draw:type="non-primitive" svg:viewBox="0 0 21600 21600" draw:enhanced-path="M 0 0 L 21600 0 21600 21600 0 21600 Z N"/></draw:custom-shape><draw:custom-shape svg:x="2.18734in" svg:y="2.71563in" svg:width="0.8657in" svg:height="0.20715in" draw:id="id100" draw:style-name="a125" draw:name="Rectangle 1337755158"><svg:title/><svg:desc/><text:p text:style-name="P228">PCMD</text:p><draw:enhanced-geometry draw:type="non-primitive" svg:viewBox="0 0 21600 21600" draw:enhanced-path="M 0 0 L 21600 0 21600 21600 0 21600 Z N"/></draw:custom-shape><draw:custom-shape svg:x="2.18723in" svg:y="2.99776in" svg:width="0.8657in" svg:height="0.20715in" draw:id="id101" draw:style-name="a126" draw:name="Rectangle 1032176191"><svg:title/><svg:desc/><text:p text:style-name="P229">SECINFO</text:p><draw:enhanced-geometry draw:type="non-primitive" svg:viewBox="0 0 21600 21600" draw:enhanced-path="M 0 0 L 21600 0 21600 21600 0 21600 Z N"/></draw:custom-shape><draw:frame draw:id="id102" draw:style-name="a127" draw:name="Text Box 1" svg:x="0.77353in" svg:y="0.53656in" svg:width="1.51102in" svg:height="0.3875in" style:rel-width="scale" style:rel-height="scale"><draw:text-box><text:p text:style-name="P230">EWB (instrução)</text:p></draw:text-box><svg:title/><svg:desc/></draw:frame><draw:connector draw:type="curve" svg:x1="0.00191in" svg:y1="1.56392in" svg:x2="0.00216in" svg:y2="1.96518in" draw:id="id103" draw:style-name="a128" draw:transform="translate(-0.00203in -1.76455in) rotate(-3.14159) translate(0.00203in 1.76455in)" draw:name="Connector: Curved 435863680"><svg:title/><svg:desc/></draw:connector><draw:connector draw:type="curve" svg:x1="0.00189in" svg:y1="1.56391in" svg:x2="0.00014in" svg:y2="3.07227in" draw:id="id104" draw:style-name="a130" draw:transform="translate(-0.00101in -2.31809in) rotate(-3.14159) translate(0.00101in 2.31809in)" draw:name="Connector: Curved 62845298"><svg:title/><svg:desc/></draw:connector><draw:connector draw:type="curve" svg:x1="0.67741in" svg:y1="1.11358in" svg:x2="1.71854in" svg:y2="1.77565in" draw:id="id105" draw:style-name="a132" draw:transform="translate(-1.19797in -1.44462in) rotate(-1.5708) translate(1.19797in 1.44462in)" draw:name="Connector: Curved 623276361"><svg:title/><svg:desc/></draw:connector><draw:connector draw:type="curve" svg:x1="2.64251in" svg:y1="1.3794in" svg:x2="1.07368in" svg:y2="2.03751in" draw:id="id106" draw:style-name="a134" draw:transform="translate(-1.85809in -1.70845in) rotate(-4.71239) translate(1.85809in 1.70845in)" draw:name="Connector: Curved 55854742"><svg:title/><svg:desc/></draw:connector><draw:custom-shape svg:x="0.00018in" svg:y="2.56047in" svg:width="0.86736in" svg:height="0.26528in" draw:id="id107" draw:style-name="a136" draw:name="Rectangle 726402687"><svg:title/><svg:desc/><text:p text:style-name="P231">Página enclave</text:p><draw:enhanced-geometry draw:type="non-primitive" svg:viewBox="0 0 21600 21600" draw:enhanced-path="M 0 0 L 21600 0 21600 21600 0 21600 Z N"/></draw:custom-shape><draw:connector draw:type="curve" svg:x1="0.31377in" svg:y1="1.4778in" svg:x2="2.08281in" svg:y2="2.13929in" draw:id="id108" draw:style-name="a138" draw:transform="translate(-1.19829in -1.80854in) rotate(-1.5708) translate(1.19829in 1.80854in)" draw:name="Connector: Curved 1074830831"><svg:title/><svg:desc/></draw:connector><draw:connector draw:type="curve" svg:x1="2.80367in" svg:y1="1.54966in" svg:x2="0.9178in" svg:y2="2.20285in" draw:id="id109" draw:style-name="a140" draw:transform="translate(-1.86073in -1.87625in) rotate(-4.71239) translate(1.86073in 1.87625in)" draw:name="Connector: Curved 1098137737"><svg:title/><svg:desc/></draw:connector><draw:connector draw:type="curve" svg:x1="2.94677in" svg:y1="1.6836in" svg:x2="0.76949in" svg:y2="2.3418in" draw:id="id110" draw:style-name="a142" draw:transform="translate(-1.85813in -2.0127in) rotate(-4.71239) translate(1.85813in 2.0127in)" draw:name="Connector: Curved 270260746"><svg:title/><svg:desc/></draw:connector><draw:connector draw:type="curve" svg:x1="0.00189in" svg:y1="1.56388in" svg:x2="0.00014in" svg:y2="2.69307in" draw:id="id111" draw:style-name="a144" draw:transform="translate(-0.00101in -2.12847in) rotate(-3.14159) translate(0.00101in 2.12847in)" draw:name="Connector: Curved 1282511803"><svg:title/><svg:desc/></draw:connector><draw:frame draw:id="id112" draw:style-name="a145" draw:name="Text Box 1" svg:x="3.1597in" svg:y="1.08152in" svg:width="2.44459in" svg:height="2.28167in" style:rel-width="scale" style:rel-height="scale"><draw:text-box><text:p text:style-name="P232">Parâmetros do EWB:</text:p><text:list text:style-name="LFO16" text:continue-numbering="true"><text:list-item><text:p text:style-name="P233">Ponteiro para a página do EPC que precisa ser paginada;</text:p></text:list-item><text:list-item><text:p text:style-name="P234">Ponteiro para o slot de versão vazio;</text:p></text:list-item><text:list-item><text:p text:style-name="P235">Ponteiros fora da localização do EPC.</text:p></text:list-item></text:list><text:p text:style-name="P236"/><text:p text:style-name="P237">Operação do EWB:</text:p><text:list text:style-name="LFO17" text:continue-numbering="true"><text:list-item><text:p text:style-name="P238">Remover a página do EPC;</text:p></text:list-item><text:list-item><text:p text:style-name="P239">Preencher o slot de versão;</text:p></text:list-item><text:list-item><text:p text:style-name="P240">Escrever a versão criptografada para fora.</text:p></text:list-item></text:list><text:p text:style-name="P241"/><text:p text:style-name="P242">Todas as páginas, incluindo SECS e Matriz de Versões, podem ser páginadas.</text:p></draw:text-box><svg:title/><svg:desc/></draw:frame></draw:g>Exemplo de page-out</text:p>
                </text:list-item>
              </text:list>
            </text:list-item>
          </text:list>
        </text:list-item>
      </text:list>
      <text:p text:style-name="P243"><text:span text:style-name="T244">Figura 5. Gerenciamento de Páginas – Page-out</text:span></text:p>
      <text:list text:style-name="Outline" text:continue-numbering="true">
        <text:list-item>
          <text:list>
            <text:list-item>
              <text:list>
                <text:list-item>
                  <text:p text:style-name="P245"><draw:g draw:z-index="251685888" draw:name="Canvas 311488419" draw:id="id138" draw:style-name="a177" text:anchor-type="paragraph"><svg:title/><svg:desc/><draw:custom-shape svg:x="0in" svg:y="1.17685in" svg:width="0.86794in" svg:height="2.02366in" draw:id="id114" draw:style-name="a147" draw:name="Rectangle 506204811"><svg:title/><svg:desc/><draw:enhanced-geometry draw:type="non-primitive" svg:viewBox="0 0 21600 21600" draw:enhanced-path="M 0 0 L 21600 0 21600 21600 0 21600 Z N"/></draw:custom-shape><draw:custom-shape svg:x="2.18685in" svg:y="1.17685in" svg:width="0.86774in" svg:height="2.0331in" draw:id="id115" draw:style-name="a148" draw:name="Rectangle 336312789"><svg:title/><svg:desc/><draw:enhanced-geometry draw:type="non-primitive" svg:viewBox="0 0 21600 21600" draw:enhanced-path="M 0 0 L 21600 0 21600 21600 0 21600 Z N"/></draw:custom-shape><draw:custom-shape svg:x="0.00193in" svg:y="1.29567in" svg:width="0.86518in" svg:height="0.30872in" draw:id="id116" draw:style-name="a149" draw:name="Rectangle 238365676"><svg:title/><svg:desc/><text:p text:style-name="P246">SECS</text:p><draw:enhanced-geometry draw:type="non-primitive" svg:viewBox="0 0 21600 21600" draw:enhanced-path="M 0 0 L 21600 0 21600 21600 0 21600 Z N"/></draw:custom-shape><draw:custom-shape svg:x="0.00305in" svg:y="1.91444in" svg:width="0.86409in" svg:height="0.12569in" draw:id="id117" draw:style-name="a150" draw:name="Rectangle 1985362657"><svg:title/><svg:desc/><text:p text:style-name="P247"> </text:p><draw:enhanced-geometry draw:type="non-primitive" svg:viewBox="0 0 21600 21600" draw:enhanced-path="M 0 0 L 21600 0 21600 21600 0 21600 Z N"/></draw:custom-shape><draw:custom-shape svg:x="0.00218in" svg:y="1.78815in" svg:width="0.86479in" svg:height="0.1263in" draw:id="id118" draw:style-name="a151" draw:name="Rectangle 1934316361"><svg:title/><svg:desc/><text:p text:style-name="P248"/><draw:enhanced-geometry draw:type="non-primitive" svg:viewBox="0 0 21600 21600" draw:enhanced-path="M 0 0 L 21600 0 21600 21600 0 21600 Z N"/></draw:custom-shape><draw:custom-shape svg:x="0.00396in" svg:y="2.04078in" svg:width="0.8634in" svg:height="0.12569in" draw:id="id119" draw:style-name="a152" draw:name="Rectangle 147177217"><svg:title/><svg:desc/><text:p text:style-name="P249"> </text:p><draw:enhanced-geometry draw:type="non-primitive" svg:viewBox="0 0 21600 21600" draw:enhanced-path="M 0 0 L 21600 0 21600 21600 0 21600 Z N"/></draw:custom-shape><draw:custom-shape svg:x="0.00396in" svg:y="2.16697in" svg:width="0.8634in" svg:height="0.12569in" draw:id="id120" draw:style-name="a153" draw:name="Rectangle 404020616"><svg:title/><svg:desc/><text:p text:style-name="P250"> </text:p><draw:enhanced-geometry draw:type="non-primitive" svg:viewBox="0 0 21600 21600" draw:enhanced-path="M 0 0 L 21600 0 21600 21600 0 21600 Z N"/></draw:custom-shape><draw:custom-shape svg:x="0.00018in" svg:y="2.82575in" svg:width="0.86736in" svg:height="0.26528in" draw:id="id121" draw:style-name="a154" draw:name="Rectangle 582311303"><svg:title/><svg:desc/><text:p text:style-name="P251">Página enclave</text:p><draw:enhanced-geometry draw:type="non-primitive" svg:viewBox="0 0 21600 21600" draw:enhanced-path="M 0 0 L 21600 0 21600 21600 0 21600 Z N"/></draw:custom-shape><draw:frame draw:id="id122" draw:style-name="a155" draw:name="Text Box 1" svg:x="0.00389in" svg:y="0.89346in" svg:width="0.86382in" svg:height="0.38762in" style:rel-width="scale" style:rel-height="scale"><draw:text-box><text:p text:style-name="P252">EPC</text:p></draw:text-box><svg:title/><svg:desc/></draw:frame><draw:frame draw:id="id123" draw:style-name="a156" draw:name="Text Box 1" svg:x="2.17797in" svg:y="0.74444in" svg:width="0.87479in" svg:height="0.47944in" style:rel-width="scale" style:rel-height="scale"><draw:text-box><text:p text:style-name="P253">Mémoria do sistema</text:p></draw:text-box><svg:title/><svg:desc/></draw:frame><draw:custom-shape svg:x="2.18714in" svg:y="2.22108in" svg:width="0.86667in" svg:height="0.31581in" draw:id="id124" draw:style-name="a157" draw:name="Rectangle 1194481451"><svg:title/><svg:desc/><text:p text:style-name="P254">Página criptografada</text:p><draw:enhanced-geometry draw:type="non-primitive" svg:viewBox="0 0 21600 21600" draw:enhanced-path="M 0 0 L 21600 0 21600 21600 0 21600 Z N"/></draw:custom-shape><draw:custom-shape svg:x="2.18734in" svg:y="2.60174in" svg:width="0.8657in" svg:height="0.20715in" draw:id="id125" draw:style-name="a158" draw:name="Rectangle 415280522"><svg:title/><svg:desc/><text:p text:style-name="P255">PCMD</text:p><draw:enhanced-geometry draw:type="non-primitive" svg:viewBox="0 0 21600 21600" draw:enhanced-path="M 0 0 L 21600 0 21600 21600 0 21600 Z N"/></draw:custom-shape><draw:custom-shape svg:x="2.18723in" svg:y="2.88387in" svg:width="0.8657in" svg:height="0.20715in" draw:id="id126" draw:style-name="a159" draw:name="Rectangle 911414468"><svg:title/><svg:desc/><text:p text:style-name="P256">SECINFO</text:p><draw:enhanced-geometry draw:type="non-primitive" svg:viewBox="0 0 21600 21600" draw:enhanced-path="M 0 0 L 21600 0 21600 21600 0 21600 Z N"/></draw:custom-shape><draw:frame draw:id="id127" draw:style-name="a160" draw:name="Text Box 1" svg:x="0.77353in" svg:y="0.42267in" svg:width="1.51102in" svg:height="0.3875in" style:rel-width="scale" style:rel-height="scale"><draw:text-box><text:p text:style-name="P257">ELD (instrução)</text:p></draw:text-box><svg:title/><svg:desc/></draw:frame><draw:connector draw:type="curve" svg:x1="0.00191in" svg:y1="1.45003in" svg:x2="0.00216in" svg:y2="1.85129in" draw:id="id128" draw:style-name="a161" draw:transform="translate(-0.00203in -1.65066in) rotate(-3.14159) translate(0.00203in 1.65066in)" draw:name="Connector: Curved 1211177496"><svg:title/><svg:desc/></draw:connector><draw:connector draw:type="curve" svg:x1="0.00189in" svg:y1="1.44999in" svg:x2="0.00014in" svg:y2="2.95834in" draw:id="id129" draw:style-name="a163" draw:transform="translate(-0.00101in -2.20416in) rotate(-3.14159) translate(0.00101in 2.20416in)" draw:name="Connector: Curved 1562157636"><svg:title/><svg:desc/></draw:connector><draw:connector draw:type="curve" svg:x1="0.6774in" svg:y1="0.9997in" svg:x2="1.71853in" svg:y2="1.66177in" draw:id="id130" draw:style-name="a165" draw:transform="translate(-1.19796in -1.33073in) rotate(-1.5708) translate(1.19796in 1.33073in)" draw:name="Connector: Curved 1557515761"><svg:title/><svg:desc/></draw:connector><draw:connector draw:type="curve" svg:x1="2.64251in" svg:y1="1.26551in" svg:x2="1.07368in" svg:y2="1.92362in" draw:id="id131" draw:style-name="a167" draw:transform="translate(-1.85809in -1.59456in) rotate(-4.71239) translate(1.85809in 1.59456in)" draw:name="Connector: Curved 1388910192"><svg:title/><svg:desc/></draw:connector><draw:custom-shape svg:x="0.00018in" svg:y="2.44658in" svg:width="0.86736in" svg:height="0.26528in" draw:id="id132" draw:style-name="a168" draw:name="Rectangle 1013346317"><svg:title/><svg:desc/><text:p text:style-name="P258">Página enclave</text:p><draw:enhanced-geometry draw:type="non-primitive" svg:viewBox="0 0 21600 21600" draw:enhanced-path="M 0 0 L 21600 0 21600 21600 0 21600 Z N"/></draw:custom-shape><draw:connector draw:type="curve" svg:x1="0.31373in" svg:y1="1.36394in" svg:x2="2.08278in" svg:y2="2.02543in" draw:id="id133" draw:style-name="a170" draw:transform="translate(-1.19825in -1.69469in) rotate(-1.5708) translate(1.19825in 1.69469in)" draw:name="Connector: Curved 1139280605"><svg:title/><svg:desc/></draw:connector><draw:connector draw:type="curve" svg:x1="2.80367in" svg:y1="1.43577in" svg:x2="0.9178in" svg:y2="2.08896in" draw:id="id134" draw:style-name="a172" draw:transform="translate(-1.86073in -1.76236in) rotate(-4.71239) translate(1.86073in 1.76236in)" draw:name="Connector: Curved 772968406"><svg:title/><svg:desc/></draw:connector><draw:connector draw:type="curve" svg:x1="2.94677in" svg:y1="1.56971in" svg:x2="0.76949in" svg:y2="2.22791in" draw:id="id135" draw:style-name="a174" draw:transform="translate(-1.85813in -1.89881in) rotate(-4.71239) translate(1.85813in 1.89881in)" draw:name="Connector: Curved 561095954"><svg:title/><svg:desc/></draw:connector><draw:connector draw:type="curve" svg:x1="0.00189in" svg:y1="1.44999in" svg:x2="0.00014in" svg:y2="2.57918in" draw:id="id136" draw:style-name="a175" draw:transform="translate(-0.00101in -2.01458in) rotate(-3.14159) translate(0.00101in 2.01458in)" draw:name="Connector: Curved 1503554424"><svg:title/><svg:desc/></draw:connector><draw:frame draw:id="id137" draw:style-name="a176" draw:name="Text Box 1" svg:x="3.18168in" svg:y="1.37986in" svg:width="2.42261in" svg:height="1.86944in" style:rel-width="scale" style:rel-height="scale"><draw:text-box><text:p text:style-name="P259">Parâmetros de ELD:</text:p><text:list text:style-name="LFO18" text:continue-numbering="true"><text:list-item><text:p text:style-name="P260">Página criptografada;</text:p></text:list-item><text:list-item><text:p text:style-name="P261">Página EPC livre;</text:p></text:list-item><text:list-item><text:p text:style-name="P262">SECS (para uma página de enclave);</text:p></text:list-item><text:list-item><text:p text:style-name="P263">Slot de versão preenchido.</text:p></text:list-item></text:list><text:p text:style-name="P264"/><text:p text:style-name="P265">Operação de ELD:</text:p><text:list text:style-name="LFO19" text:continue-numbering="true"><text:list-item><text:p text:style-name="P266">Verificar e descriptografar a página usando a versão;</text:p></text:list-item><text:list-item><text:p text:style-name="P267">Preencher o slot EPC;</text:p></text:list-item><text:list-item><text:p text:style-name="P268">Liberar o slot de versão.</text:p></text:list-item></text:list><text:p text:style-name="P269"/></draw:text-box><svg:title/><svg:desc/></draw:frame></draw:g>Exemplo de page-in</text:p>
                </text:list-item>
              </text:list>
            </text:list-item>
          </text:list>
        </text:list-item>
      </text:list>
      <text:p text:style-name="P270"><text:span text:style-name="T271">Figura 6. Gerenciamento de Páginas – Page-in</text:span></text:p>
      <text:list text:style-name="Outline" text:continue-numbering="true">
        <text:list-item>
          <text:p text:style-name="P272">Desempenho frente a SOs tradicionais<text:s/></text:p>
        </text:list-item>
      </text:list>
      <text:p text:style-name="P273">O Gramine é um sistema operacional convidado leve, projetado para executar um único aplicativo Linux com requisitos mínimos de host. O Gramine pode executar aplicativos em um ambiente isolado com benefícios<text:s/><text:span text:style-name="T274">comparáveis</text:span><text:s/>aos da execução de um sistema operacional completo em uma máquina virtual, incluindo personalização do convidado, facilidade de portabilidade para diferentes sistemas operacionais host e migração de processos.</text:p>
      <text:p text:style-name="P275">Suas<text:s/>características<text:s/>em comparações aos SOs tradicionais em geral são:</text:p>
      <text:soft-page-break/>
      <text:list text:style-name="LFO20" text:continue-numbering="true">
        <text:list-item>
          <text:p text:style-name="P276">Executar<text:s/>aplicativos Linux nativos e não modificados em qualquer plataforma.</text:p>
        </text:list-item>
        <text:list-item>
          <text:p text:style-name="P277">Oferecer suporte<text:s/>à<text:s/>segurança, especialmente protegendo contra um sistema operacional host malicioso.</text:p>
        </text:list-item>
        <text:list-item>
          <text:p text:style-name="P278">Intercepta todas as solicitações de aplicativos ao sistema operacional host.</text:p>
        </text:list-item>
        <text:list-item>
          <text:p text:style-name="P279">Processa algumas dessas solicitações internamente, enquanto outras passam por uma API fina para o sistema operacional host.</text:p>
        </text:list-item>
        <text:list-item>
          <text:p text:style-name="P280">Verifica cada solicitação de aplicativo e cada resposta do host quanto à correção e consistência, mantendo um estado interno "<text:span text:style-name="T281">shadow</text:span>" para defesa contra ataques<text:s/><office:annotation office:name="0" xml:id="1386225957"><dc:creator>Dalton Tavares</dc:creator><dc:date>2023-11-20T07:57:00</dc:date><text:p text:style-name="CommentText">?</text:p></office:annotation>Iago<text:span text:style-name="T282"><office:annotation-end office:name="0"/></text:span>.</text:p>
        </text:list-item>
        <text:list-item>
          <text:p text:style-name="P283">Busca ser 100% compatível com o kernel<text:s/>do<text:s/>Linux, mesmo quando há desvios de padrões com o POSIX.</text:p>
        </text:list-item>
        <text:list-item>
          <text:p text:style-name="P284">É minimalista, implementando apenas o conjunto mais importante de funcionalidades do Linux,<text:s/>para executar aplicativos portáteis e independentes de hardware.</text:p>
        </text:list-item>
        <text:list-item>
          <text:p text:style-name="P285">Atualmente, possui dois<text:s/><text:span text:style-name="T286">backends</text:span>: execução no sistema operacional host Linux (gramine-direct) e execução dentro de um enclave Intel SGX (gramine-sgx).</text:p>
        </text:list-item>
        <text:list-item>
          <text:p text:style-name="P287">Diferenças e peculiaridades em alguns recursos são descritas explicitamente dependendo do<text:s/><text:span text:style-name="T288">backend</text:span>.</text:p>
        </text:list-item>
        <text:list-item>
          <text:p text:style-name="P289">Classifica os recursos em termos de funcionalidades do Linux e funcionalidades específicas do Gramine.</text:p>
        </text:list-item>
        <text:list-item>
          <text:p text:style-name="P290">Indica se uma funcionalidade é implementada, parcialmente implementada ou não implementada, com detalhes adicionais quando parcialmente implementada.</text:p>
        </text:list-item>
        <text:list-item>
          <text:p text:style-name="P291">Algumas funcionalidades não são implementadas por design, devido ao aumento desproporcional da Base de Confiabilidade do Gramine, ou por não poderem ser implementadas com segurança.</text:p>
        </text:list-item>
        <text:list-item>
          <text:p text:style-name="P292">Outras funcionalidades não são implementadas porque são pouco usadas ou obsoletas.</text:p>
        </text:list-item>
      </text:list>
      <text:p text:style-name="P293"/>
      <text:p text:style-name="P294">Além disso, de acordo com a empresa PhoenixNAP Bare Metal Cloud especializada em servidores com suporte ao Intel SGX, diz que o SGX oferece uma série de benefícios significativos, destacando-se pela elevação da segurança de dados sensíveis e críticos para a missão<text:s/><text:span text:style-name="T295"><text:bookmark-ref text:ref-name="_Ref150132981" text:reference-format="text">[17]</text:bookmark-ref></text:span>.</text:p>
      <text:p text:style-name="P296">Um benefício notável é a capacidade de armazenar informações que requerem verificação diretamente na máquina, em vez de enviá-las para um servidor remoto. Isso engloba dados biométricos e outras informações de autenticação, proporcionando uma camada adicional de segurança. O SGX da Intel age como uma defesa contra ameaças avançadas, protegendo contra comprometimentos no BIOS, nos componentes do sistema e nos perfis de usuário com permissões de root<text:s/><text:span text:style-name="T297"><text:bookmark-ref text:ref-name="_Ref150132981" text:reference-format="text">[17]</text:bookmark-ref></text:span>.</text:p>
      <text:p text:style-name="P298">A selagem de dados é outra característica valiosa, oferecendo proteção à propriedade<text:s/><text:soft-page-break/>intelectual mesmo fora dos enclaves. A chave para decodificar dados confidenciais reside na memória confiável, bloqueando assim o acesso não autorizado externo<text:s/><text:span text:style-name="T299"><text:bookmark-ref text:ref-name="_Ref150132981" text:reference-format="text">[17]</text:bookmark-ref></text:span>.</text:p>
      <text:p text:style-name="P300">Além disso, o modelo permite um dimensionamento horizontal contínuo. Conforme as demandas empresariais crescem, novas máquinas podem integrar-se ao conjunto sem interrupções. Antes de se tornarem parte do cluster de servidores confiáveis, os nós são verificados para garantir o nível adequado de segurança. Esses benefícios coletivos fortalecem a infraestrutura e a proteção de dados em ambientes dinâmicos e em expansão<text:s/><text:span text:style-name="T301"><text:bookmark-ref text:ref-name="_Ref150132981" text:reference-format="text">[17]</text:bookmark-ref></text:span>.</text:p>
      <text:list text:style-name="Outline" text:continue-numbering="true">
        <text:list-item>
          <text:list>
            <text:list-item>
              <text:p text:style-name="P302">Análise do Overhead de Desempenho Gramine SGX e Linux</text:p>
            </text:list-item>
          </text:list>
        </text:list-item>
      </text:list>
      <text:p text:style-name="P303">De acordo com uma<text:s/>análise<text:s/>realizada pela associação USENIX<text:s/><text:span text:style-name="T304"><text:bookmark-ref text:ref-name="_Ref150144105" text:reference-format="text">[19]</text:bookmark-ref></text:span>, foram avaliadas operações de sistema impactadas no Gramine SGX. Foram<text:s/>realizadas<text:s/>as medidas de chamadas open, read e fork com o LMbench 2.5<text:s/><text:span text:style-name="T305"><text:bookmark-ref text:ref-name="_Ref150144037" text:reference-format="text">[18]</text:bookmark-ref></text:span>. As técnicas criptográficas protegem aplicativos, com custos em tempo de execução.</text:p>
      <text:p text:style-name="P306">Custos significativos vêm da saída do enclave para chamadas do sistema host e manipulação de memória no EPC. O Gramine-SGX mantém segurança sem comprometer drasticamente o desempenho, sendo aplicável a uma variedade de casos de uso.</text:p>
      <text:p text:style-name="P307">A Figura 7(a) mostra a sobrecarga para autenticar arquivos no open. Dependendo do tamanho do arquivo, a latência do open no Gramine-SGX varia de 383 µs (arquivo de 64 KB) a 21 ms (arquivo de 4 MB), enquanto no Linux, a latência é constante em 0,85 µs. Observe-se que os enclaves estão em desvantagem, já que o open normalmente não precisa ler o conteúdo do arquivo. Enquanto<text:s/>que, no<text:s/>Gramine-SGX, o open é usado como um ponto para validar o conteúdo do arquivo. Para um open subsequente, quando a árvore de Merkle já está gerada, a sobrecarga de simplesmente sair do enclave para open e procurar na lista de arquivos no manifesto é cerca de 9 vezes<text:s/><text:span text:style-name="T308"><text:bookmark-ref text:ref-name="_Ref150144105" text:reference-format="text">[19]</text:bookmark-ref></text:span>.</text:p>
      <text:p text:style-name="P309">A Figura 7(b) mostra a sobrecarga para autenticar arquivos no read, que é menor do que no open. Uma vez que o arquivo inteiro foi verificado no open, a leitura sequencial verifica apenas os fragmentos dos arquivos que está lendo da memória não confiável. Dependendo do tamanho dos blocos lidos, a latência no Gramine-SGX varia de 0,5 µs (leitura de 64 bytes) a 16,9 µs (leitura de 4 KB). A latência de read no Linux é de aproximadamente 0,1 µs para qualquer tamanho de bloco abaixo de 4 KB. Se o arquivo não for autenticado, o Gramine-SGX apenas copia o conteúdo do arquivo para o buffer, e a sobrecarga reduz para 48% (leitura de 64 bytes) a 83% (leitura de 4 KB)<text:s/><text:span text:style-name="T310"><text:bookmark-ref text:ref-name="_Ref150144105" text:reference-format="text">[19]</text:bookmark-ref></text:span>.</text:p>
      <text:p text:style-name="P311">A Figura 7(c) mostra a sobrecarga de fork de um processo. A latência de fork no Gramine-SGX é afetada por três fatores: criação de um novo enclave, atestação local da integridade e duplicação do estado do processo por meio de uma transmissão RPC criptografada. Combinando esses fatores, fork é uma das chamadas mais caras no<text:s/><text:soft-page-break/>Gramine-SGX. O tamanho padrão do enclave é de 256 MB. A avaliação realizada mostra que a latência para forking de um processo varia de aproximadamente 0,8s (processo de 16 MB) a 2,7s (processo de 128 MB), mas pode ser mais cara se o processo pai usar mais memória. A tendência corresponde ao desempenho do Gramine sem a otimização de IPC em massa<text:s/><text:span text:style-name="T312"><text:bookmark-ref text:ref-name="_Ref150144105" text:reference-format="text">[19]</text:bookmark-ref></text:span>.</text:p>
      <text:p text:style-name="P313"><text:span text:style-name="T314"><draw:frame draw:id="id139" draw:style-name="a178" draw:name="Text Box 2" text:anchor-type="as-char" svg:x="0in" svg:y="0in" svg:width="1.93681in" svg:height="0.37639in" style:rel-width="scale" style:rel-height="scale"><draw:text-box><text:list text:style-name="LFO22" text:continue-numbering="true"><text:list-item><text:p text:style-name="P315">Abrir um arquivo</text:p></text:list-item></text:list></draw:text-box><svg:title/><svg:desc/></draw:frame></text:span><text:span text:style-name="T316"><draw:frame draw:id="id140" draw:style-name="a179" draw:name="Text Box 2" text:anchor-type="as-char" svg:x="0in" svg:y="0in" svg:width="1.94028in" svg:height="0.37639in" style:rel-width="scale" style:rel-height="scale"><draw:text-box><text:list text:style-name="LFO22" text:continue-numbering="true"><text:list-item><text:p text:style-name="P317">Ler um arquivo</text:p></text:list-item></text:list></draw:text-box><svg:title/><svg:desc/></draw:frame></text:span><text:span text:style-name="T318"><draw:frame draw:id="id141" draw:style-name="a180" draw:name="Text Box 2" text:anchor-type="as-char" svg:x="0in" svg:y="0in" svg:width="1.93681in" svg:height="0.37639in" style:rel-width="scale" style:rel-height="scale"><draw:text-box><text:list text:style-name="LFO22" text:continue-numbering="true"><text:list-item><text:p text:style-name="P319">Criar um processo</text:p></text:list-item></text:list></draw:text-box><svg:title/><svg:desc/></draw:frame></text:span><draw:g draw:z-index="251686912" draw:name="Canvas 5" draw:id="id266" draw:style-name="a335" text:anchor-type="paragraph"><svg:title/><svg:desc/><draw:frame draw:id="id142" draw:style-name="a181" draw:name="Text Box 2" svg:x="0.47905in" svg:y="0.38742in" svg:width="1.84758in" svg:height="0.30922in" style:rel-width="scale" style:rel-height="scale"><draw:text-box><text:p text:style-name="P320">Linux<text:tab/><text:s text:c="30"/>Graphene</text:p><text:p text:style-name="P321">Graphene-SGX (sem buffer) <text:s text:c="12"/>Graphene-SGX (com buffer)</text:p></draw:text-box><svg:title/><svg:desc/></draw:frame><draw:custom-shape svg:x="1.24863in" svg:y="1.31657in" svg:width="0.06894in" svg:height="0.14474in" draw:id="id143" draw:style-name="a182" draw:name="Rectangle 1610129260"><svg:title/><svg:desc/><draw:enhanced-geometry draw:type="non-primitive" svg:viewBox="0 0 21600 21600" draw:enhanced-path="M 0 0 L 21600 0 21600 21600 0 21600 Z N"/></draw:custom-shape><draw:custom-shape svg:x="1.31803in" svg:y="1.24546in" svg:width="0.06772in" svg:height="0.21584in" draw:id="id144" draw:style-name="a184" draw:name="Rectangle 1241264649"><svg:title/><svg:desc/><draw:enhanced-geometry draw:type="non-primitive" svg:viewBox="0 0 21600 21600" draw:enhanced-path="M 0 0 L 21600 0 21600 21600 0 21600 Z N"/></draw:custom-shape><draw:custom-shape svg:x="1.38575in" svg:y="0.86425in" svg:width="0.06942in" svg:height="0.59705in" draw:id="id145" draw:style-name="a185" draw:name="Rectangle 566995462"><svg:title/><svg:desc/><draw:enhanced-geometry draw:type="non-primitive" svg:viewBox="0 0 21600 21600" draw:enhanced-path="M 0 0 L 21600 0 21600 21600 0 21600 Z N"/></draw:custom-shape><draw:custom-shape svg:x="1.45348in" svg:y="1.20314in" svg:width="0.0728in" svg:height="0.25817in" draw:id="id146" draw:style-name="a187" draw:name="Rectangle 1009037957"><svg:title/><svg:desc/><draw:enhanced-geometry draw:type="non-primitive" svg:viewBox="0 0 21600 21600" draw:enhanced-path="M 0 0 L 21600 0 21600 21600 0 21600 Z N"/></draw:custom-shape><draw:custom-shape svg:x="1.64945in" svg:y="1.31657in" svg:width="0.06894in" svg:height="0.14474in" draw:id="id147" draw:style-name="a188" draw:name="Rectangle 944906231"><svg:title/><svg:desc/><draw:enhanced-geometry draw:type="non-primitive" svg:viewBox="0 0 21600 21600" draw:enhanced-path="M 0 0 L 21600 0 21600 21600 0 21600 Z N"/></draw:custom-shape><draw:custom-shape svg:x="1.71885in" svg:y="1.24546in" svg:width="0.06772in" svg:height="0.21584in" draw:id="id148" draw:style-name="a190" draw:name="Rectangle 476134765"><svg:title/><svg:desc/><draw:enhanced-geometry draw:type="non-primitive" svg:viewBox="0 0 21600 21600" draw:enhanced-path="M 0 0 L 21600 0 21600 21600 0 21600 Z N"/></draw:custom-shape><draw:custom-shape svg:x="1.78657in" svg:y="0.82671in" svg:width="0.06942in" svg:height="0.63459in" draw:id="id149" draw:style-name="a191" draw:name="Rectangle 2106761589"><svg:title/><svg:desc/><draw:enhanced-geometry draw:type="non-primitive" svg:viewBox="0 0 21600 21600" draw:enhanced-path="M 0 0 L 21600 0 21600 21600 0 21600 Z N"/></draw:custom-shape><draw:custom-shape svg:x="1.85428in" svg:y="1.20314in" svg:width="0.0728in" svg:height="0.25817in" draw:id="id150" draw:style-name="a193" draw:name="Rectangle 472008189"><svg:title/><svg:desc/><draw:enhanced-geometry draw:type="non-primitive" svg:viewBox="0 0 21600 21600" draw:enhanced-path="M 0 0 L 21600 0 21600 21600 0 21600 Z N"/></draw:custom-shape><draw:custom-shape svg:x="2.02182in" svg:y="1.31657in" svg:width="0.06894in" svg:height="0.14474in" draw:id="id151" draw:style-name="a194" draw:name="Rectangle 825499566"><svg:title/><svg:desc/><draw:enhanced-geometry draw:type="non-primitive" svg:viewBox="0 0 21600 21600" draw:enhanced-path="M 0 0 L 21600 0 21600 21600 0 21600 Z N"/></draw:custom-shape><draw:custom-shape svg:x="2.09122in" svg:y="1.24546in" svg:width="0.06772in" svg:height="0.21584in" draw:id="id152" draw:style-name="a196" draw:name="Rectangle 1328915334"><svg:title/><svg:desc/><draw:enhanced-geometry draw:type="non-primitive" svg:viewBox="0 0 21600 21600" draw:enhanced-path="M 0 0 L 21600 0 21600 21600 0 21600 Z N"/></draw:custom-shape><draw:custom-shape svg:x="2.15894in" svg:y="0.69679in" svg:width="0.06942in" svg:height="0.76451in" draw:id="id153" draw:style-name="a197" draw:name="Rectangle 538274215"><svg:title/><svg:desc/><draw:enhanced-geometry draw:type="non-primitive" svg:viewBox="0 0 21600 21600" draw:enhanced-path="M 0 0 L 21600 0 21600 21600 0 21600 Z N"/></draw:custom-shape><draw:custom-shape svg:x="2.22667in" svg:y="1.20314in" svg:width="0.0728in" svg:height="0.25817in" draw:id="id154" draw:style-name="a199" draw:name="Rectangle 1140623058"><svg:title/><svg:desc/><draw:enhanced-geometry draw:type="non-primitive" svg:viewBox="0 0 21600 21600" draw:enhanced-path="M 0 0 L 21600 0 21600 21600 0 21600 Z N"/></draw:custom-shape><draw:custom-shape svg:x="0.8892in" svg:y="1.31657in" svg:width="0.06894in" svg:height="0.14474in" draw:id="id155" draw:style-name="a200" draw:name="Rectangle 2009505448"><svg:title/><svg:desc/><draw:enhanced-geometry draw:type="non-primitive" svg:viewBox="0 0 21600 21600" draw:enhanced-path="M 0 0 L 21600 0 21600 21600 0 21600 Z N"/></draw:custom-shape><draw:custom-shape svg:x="0.95859in" svg:y="1.24546in" svg:width="0.06772in" svg:height="0.21584in" draw:id="id156" draw:style-name="a202" draw:name="Rectangle 713524362"><svg:title/><svg:desc/><draw:enhanced-geometry draw:type="non-primitive" svg:viewBox="0 0 21600 21600" draw:enhanced-path="M 0 0 L 21600 0 21600 21600 0 21600 Z N"/></draw:custom-shape><draw:connector draw:type="line" svg:x1="0.85455in" svg:y1="0.62865in" svg:x2="0.85455in" svg:y2="1.46453in" draw:id="id157" draw:style-name="a203" draw:name="Straight Connector 305326362"><svg:title/><svg:desc/></draw:connector><draw:custom-shape svg:x="1.02632in" svg:y="0.94243in" svg:width="0.06942in" svg:height="0.51888in" draw:id="id158" draw:style-name="a204" draw:name="Rectangle 930845960"><svg:title/><svg:desc/><draw:enhanced-geometry draw:type="non-primitive" svg:viewBox="0 0 21600 21600" draw:enhanced-path="M 0 0 L 21600 0 21600 21600 0 21600 Z N"/></draw:custom-shape><draw:custom-shape svg:x="1.09403in" svg:y="1.20314in" svg:width="0.0728in" svg:height="0.25817in" draw:id="id159" draw:style-name="a206" draw:name="Rectangle 1072744594"><svg:title/><svg:desc/><draw:enhanced-geometry draw:type="non-primitive" svg:viewBox="0 0 21600 21600" draw:enhanced-path="M 0 0 L 21600 0 21600 21600 0 21600 Z N"/></draw:custom-shape><draw:connector draw:type="line" svg:x1="0.84773in" svg:y1="1.4613in" svg:x2="2.33842in" svg:y2="1.4613in" draw:id="id160" draw:style-name="a207" draw:name="Straight Connector 1175134061"><svg:title/><svg:desc/></draw:connector><draw:connector draw:type="line" svg:x1="0.83331in" svg:y1="1.4613in" svg:x2="0.85338in" svg:y2="1.4613in" draw:id="id161" draw:style-name="a208" draw:name="Straight Connector 1846076452"><svg:title/><svg:desc/></draw:connector><draw:connector draw:type="line" svg:x1="0.83331in" svg:y1="0.89034in" svg:x2="0.85338in" svg:y2="0.89034in" draw:id="id162" draw:style-name="a209" draw:name="Straight Connector 1197414398"><svg:title/><svg:desc/></draw:connector><draw:connector draw:type="line" svg:x1="0.83331in" svg:y1="1.03485in" svg:x2="0.84773in" svg:y2="1.03485in" draw:id="id163" draw:style-name="a210" draw:name="Straight Connector 1382846456"><svg:title/><svg:desc/></draw:connector><draw:connector draw:type="line" svg:x1="0.83331in" svg:y1="1.1767in" svg:x2="0.85338in" svg:y2="1.1767in" draw:id="id164" draw:style-name="a211" draw:name="Straight Connector 1042062557"><svg:title/><svg:desc/></draw:connector><draw:connector draw:type="line" svg:x1="0.83331in" svg:y1="1.32121in" svg:x2="0.85716in" svg:y2="1.32121in" draw:id="id165" draw:style-name="a212" draw:name="Straight Connector 1337356875"><svg:title/><svg:desc/></draw:connector><draw:connector draw:type="line" svg:x1="0.83331in" svg:y1="0.75777in" svg:x2="0.85338in" svg:y2="0.75777in" draw:id="id166" draw:style-name="a213" draw:name="Straight Connector 1007056993"><svg:title/><svg:desc/></draw:connector><draw:connector draw:type="line" svg:x1="0.84334in" svg:y1="1.47788in" svg:x2="0.86343in" svg:y2="1.47788in" draw:id="id167" draw:style-name="a214" draw:transform="translate(-0.85338in -1.47788in) rotate(-1.5708) translate(0.85338in 1.47788in)" draw:name="Straight Connector 307568547"><svg:title/><svg:desc/></draw:connector><draw:connector draw:type="line" svg:x1="1.1875in" svg:y1="1.47787in" svg:x2="1.20757in" svg:y2="1.47787in" draw:id="id168" draw:style-name="a215" draw:transform="translate(-1.19753in -1.47787in) rotate(-1.5708) translate(1.19753in 1.47787in)" draw:name="Straight Connector 338960021"><svg:title/><svg:desc/></draw:connector><draw:connector draw:type="line" svg:x1="1.57185in" svg:y1="1.47787in" svg:x2="1.59193in" svg:y2="1.47787in" draw:id="id169" draw:style-name="a216" draw:transform="translate(-1.58189in -1.47787in) rotate(-1.5708) translate(1.58189in 1.47787in)" draw:name="Straight Connector 599946297"><svg:title/><svg:desc/></draw:connector><draw:connector draw:type="line" svg:x1="1.97679in" svg:y1="1.47787in" svg:x2="1.99688in" svg:y2="1.47787in" draw:id="id170" draw:style-name="a217" draw:transform="translate(-1.98684in -1.47787in) rotate(-1.5708) translate(1.98684in 1.47787in)" draw:name="Straight Connector 1407658025"><svg:title/><svg:desc/></draw:connector><draw:connector draw:type="line" svg:x1="2.32097in" svg:y1="1.47783in" svg:x2="2.34104in" svg:y2="1.47783in" draw:id="id171" draw:style-name="a218" draw:transform="translate(-2.33101in -1.47783in) rotate(-1.5708) translate(2.33101in 1.47783in)" draw:name="Straight Connector 1420169976"><svg:title/><svg:desc/></draw:connector><draw:frame draw:id="id172" draw:style-name="a219" draw:name="Text Box 2" svg:x="0.9923in" svg:y="1.58559in" svg:width="1.20509in" svg:height="0.16093in" style:rel-width="scale" style:rel-height="scale"><draw:text-box><text:p text:style-name="P322">Tamanho do arquivo aberto</text:p></draw:text-box><svg:title/><svg:desc/></draw:frame><draw:frame draw:id="id173" draw:style-name="a220" draw:transform="translate(-0.47311in -0.07398in) rotate(-4.71239) translate(0.47311in 1.08983in)" draw:name="Text Box 2" svg:width="0.94622in" svg:height="0.14797in" style:rel-width="scale" style:rel-height="scale"><draw:text-box><text:p text:style-name="P323">System call latência</text:p></draw:text-box><svg:title/><svg:desc/></draw:frame><draw:frame draw:id="id174" draw:style-name="a221" draw:name="Text Box 2" svg:x="0.47495in" svg:y="0.67415in" svg:width="0.35595in" svg:height="0.8295in" style:rel-width="scale" style:rel-height="scale"><draw:text-box><text:p text:style-name="P324">10ms</text:p><text:p text:style-name="P325">1ms</text:p><text:p text:style-name="P326">100μs</text:p><text:p text:style-name="P327">10μs</text:p><text:p text:style-name="P328">1μs</text:p></draw:text-box><svg:title/><svg:desc/></draw:frame><draw:custom-shape svg:x="0.46823in" svg:y="0.428in" svg:width="0.04043in" svg:height="0.04043in" draw:id="id175" draw:style-name="a222" draw:name="Rectangle 99088818"><svg:title/><svg:desc/><draw:enhanced-geometry draw:type="non-primitive" svg:viewBox="0 0 21600 21600" draw:enhanced-path="M 0 0 L 21600 0 21600 21600 0 21600 Z N"/></draw:custom-shape><draw:custom-shape svg:x="0.46844in" svg:y="0.53074in" svg:width="0.0402in" svg:height="0.0402in" draw:id="id176" draw:style-name="a223" draw:name="Rectangle 1515128681"><svg:title/><svg:desc/><draw:enhanced-geometry draw:type="non-primitive" svg:viewBox="0 0 21600 21600" draw:enhanced-path="M 0 0 L 21600 0 21600 21600 0 21600 Z N"/></draw:custom-shape><draw:custom-shape svg:x="1.33128in" svg:y="0.42823in" svg:width="0.0402in" svg:height="0.0402in" draw:id="id177" draw:style-name="a225" draw:name="Rectangle 479129517"><svg:title/><svg:desc/><draw:enhanced-geometry draw:type="non-primitive" svg:viewBox="0 0 21600 21600" draw:enhanced-path="M 0 0 L 21600 0 21600 21600 0 21600 Z N"/></draw:custom-shape><draw:custom-shape svg:x="1.33128in" svg:y="0.52934in" svg:width="0.0402in" svg:height="0.0402in" draw:id="id178" draw:style-name="a227" draw:name="Rectangle 1402079690"><svg:title/><svg:desc/><draw:enhanced-geometry draw:type="non-primitive" svg:viewBox="0 0 21600 21600" draw:enhanced-path="M 0 0 L 21600 0 21600 21600 0 21600 Z N"/></draw:custom-shape><draw:frame draw:id="id179" draw:style-name="a228" draw:name="Text Box 2" svg:x="0.89448in" svg:y="0.82387in" svg:width="0.31278in" svg:height="0.14478in" style:rel-width="scale" style:rel-height="scale"><draw:text-box><text:p text:style-name="P329"><text:s text:c="3"/>383μs</text:p></draw:text-box><svg:title/><svg:desc/></draw:frame><draw:frame draw:id="id180" draw:style-name="a229" draw:name="Text Box 2" svg:x="1.02192in" svg:y="1.09089in" svg:width="0.31278in" svg:height="0.14478in" style:rel-width="scale" style:rel-height="scale"><draw:text-box><text:p text:style-name="P330"><text:s text:c="3"/>8.4μs</text:p></draw:text-box><svg:title/><svg:desc/></draw:frame><draw:frame draw:id="id181" draw:style-name="a230" draw:name="Text Box 2" svg:x="1.38863in" svg:y="1.09089in" svg:width="0.31278in" svg:height="0.14478in" style:rel-width="scale" style:rel-height="scale"><draw:text-box><text:p text:style-name="P331"><text:s text:c="3"/>8.4μs</text:p></draw:text-box><svg:title/><svg:desc/></draw:frame><draw:frame draw:id="id182" draw:style-name="a231" draw:name="Text Box 2" svg:x="1.78377in" svg:y="1.08828in" svg:width="0.31278in" svg:height="0.14478in" style:rel-width="scale" style:rel-height="scale"><draw:text-box><text:p text:style-name="P332"><text:s text:c="3"/>8.4μs</text:p></draw:text-box><svg:title/><svg:desc/></draw:frame><draw:frame draw:id="id183" draw:style-name="a232" draw:name="Text Box 2" svg:x="1.26247in" svg:y="0.75033in" svg:width="0.31278in" svg:height="0.14478in" style:rel-width="scale" style:rel-height="scale"><draw:text-box><text:p text:style-name="P333"><text:s text:c="3"/>2ms</text:p></draw:text-box><svg:title/><svg:desc/></draw:frame><draw:frame draw:id="id184" draw:style-name="a233" draw:name="Text Box 2" svg:x="1.66643in" svg:y="0.71242in" svg:width="0.31278in" svg:height="0.14478in" style:rel-width="scale" style:rel-height="scale"><draw:text-box><text:p text:style-name="P334"><text:s text:c="3"/>5ms</text:p></draw:text-box><svg:title/><svg:desc/></draw:frame><draw:frame draw:id="id185" draw:style-name="a234" draw:name="Text Box 2" svg:x="2.03641in" svg:y="0.58561in" svg:width="0.31278in" svg:height="0.14478in" style:rel-width="scale" style:rel-height="scale"><draw:text-box><text:p text:style-name="P335"><text:s text:c="3"/>21ms</text:p></draw:text-box><svg:title/><svg:desc/></draw:frame><draw:frame draw:id="id186" draw:style-name="a235" draw:name="Text Box 2" svg:x="0.83089in" svg:y="1.46024in" svg:width="1.51763in" svg:height="0.161in" style:rel-width="scale" style:rel-height="scale"><draw:text-box><text:p text:style-name="P336"><text:s text:c="3"/>64k <text:s text:c="13"/>246k <text:s text:c="12"/>1m <text:s text:c="13"/>4m</text:p></draw:text-box><svg:title/><svg:desc/></draw:frame><draw:frame draw:id="id187" draw:style-name="a236" draw:name="Text Box 2" svg:x="2.45164in" svg:y="0.38742in" svg:width="1.84758in" svg:height="0.24684in" style:rel-width="scale" style:rel-height="scale"><draw:text-box><text:p text:style-name="P337">Linux<text:tab/><text:s text:c="31"/>Graphene</text:p><text:p text:style-name="P338">Graphene-SGX (inseguro) <text:s text:c="17"/>Graphene-SGX (seguro)</text:p></draw:text-box><svg:title/><svg:desc/></draw:frame><draw:custom-shape svg:x="3.22123in" svg:y="1.4113in" svg:width="0.06894in" svg:height="0.05in" draw:id="id188" draw:style-name="a237" draw:name="Rectangle 1215363718"><svg:title/><svg:desc/><draw:enhanced-geometry draw:type="non-primitive" svg:viewBox="0 0 21600 21600" draw:enhanced-path="M 0 0 L 21600 0 21600 21600 0 21600 Z N"/></draw:custom-shape><draw:custom-shape svg:x="3.29064in" svg:y="1.36574in" svg:width="0.06772in" svg:height="0.09556in" draw:id="id189" draw:style-name="a239" draw:name="Rectangle 1871139735"><svg:title/><svg:desc/><draw:enhanced-geometry draw:type="non-primitive" svg:viewBox="0 0 21600 21600" draw:enhanced-path="M 0 0 L 21600 0 21600 21600 0 21600 Z N"/></draw:custom-shape><draw:custom-shape svg:x="3.35837in" svg:y="1.34954in" svg:width="0.06942in" svg:height="0.11177in" draw:id="id190" draw:style-name="a241" draw:name="Rectangle 656509995"><svg:title/><svg:desc/><draw:enhanced-geometry draw:type="non-primitive" svg:viewBox="0 0 21600 21600" draw:enhanced-path="M 0 0 L 21600 0 21600 21600 0 21600 Z N"/></draw:custom-shape><draw:custom-shape svg:x="3.42608in" svg:y="1.09722in" svg:width="0.0728in" svg:height="0.36408in" draw:id="id191" draw:style-name="a242" draw:name="Rectangle 387522373"><svg:title/><svg:desc/><draw:enhanced-geometry draw:type="non-primitive" svg:viewBox="0 0 21600 21600" draw:enhanced-path="M 0 0 L 21600 0 21600 21600 0 21600 Z N"/></draw:custom-shape><draw:custom-shape svg:x="3.62205in" svg:y="1.4113in" svg:width="0.06894in" svg:height="0.05in" draw:id="id192" draw:style-name="a243" draw:name="Rectangle 715705271"><svg:title/><svg:desc/><draw:enhanced-geometry draw:type="non-primitive" svg:viewBox="0 0 21600 21600" draw:enhanced-path="M 0 0 L 21600 0 21600 21600 0 21600 Z N"/></draw:custom-shape><draw:custom-shape svg:x="3.69146in" svg:y="1.36574in" svg:width="0.06772in" svg:height="0.09556in" draw:id="id193" draw:style-name="a245" draw:name="Rectangle 1757542854"><svg:title/><svg:desc/><draw:enhanced-geometry draw:type="non-primitive" svg:viewBox="0 0 21600 21600" draw:enhanced-path="M 0 0 L 21600 0 21600 21600 0 21600 Z N"/></draw:custom-shape><draw:custom-shape svg:x="3.75918in" svg:y="1.33796in" svg:width="0.06942in" svg:height="0.12334in" draw:id="id194" draw:style-name="a247" draw:name="Rectangle 1754413381"><svg:title/><svg:desc/><draw:enhanced-geometry draw:type="non-primitive" svg:viewBox="0 0 21600 21600" draw:enhanced-path="M 0 0 L 21600 0 21600 21600 0 21600 Z N"/></draw:custom-shape><draw:custom-shape svg:x="3.82691in" svg:y="0.9537in" svg:width="0.0728in" svg:height="0.5076in" draw:id="id195" draw:style-name="a248" draw:name="Rectangle 668215847"><svg:title/><svg:desc/><draw:enhanced-geometry draw:type="non-primitive" svg:viewBox="0 0 21600 21600" draw:enhanced-path="M 0 0 L 21600 0 21600 21600 0 21600 Z N"/></draw:custom-shape><draw:custom-shape svg:x="3.99442in" svg:y="1.4113in" svg:width="0.06894in" svg:height="0.05in" draw:id="id196" draw:style-name="a249" draw:name="Rectangle 1175479798"><svg:title/><svg:desc/><draw:enhanced-geometry draw:type="non-primitive" svg:viewBox="0 0 21600 21600" draw:enhanced-path="M 0 0 L 21600 0 21600 21600 0 21600 Z N"/></draw:custom-shape><draw:custom-shape svg:x="4.06383in" svg:y="1.36574in" svg:width="0.06772in" svg:height="0.09556in" draw:id="id197" draw:style-name="a251" draw:name="Rectangle 1899759216"><svg:title/><svg:desc/><draw:enhanced-geometry draw:type="non-primitive" svg:viewBox="0 0 21600 21600" draw:enhanced-path="M 0 0 L 21600 0 21600 21600 0 21600 Z N"/></draw:custom-shape><draw:custom-shape svg:x="4.13155in" svg:y="1.32121in" svg:width="0.06942in" svg:height="0.14009in" draw:id="id198" draw:style-name="a253" draw:name="Rectangle 308041848"><svg:title/><svg:desc/><draw:enhanced-geometry draw:type="non-primitive" svg:viewBox="0 0 21600 21600" draw:enhanced-path="M 0 0 L 21600 0 21600 21600 0 21600 Z N"/></draw:custom-shape><draw:custom-shape svg:x="4.19927in" svg:y="0.69663in" svg:width="0.0728in" svg:height="0.76467in" draw:id="id199" draw:style-name="a254" draw:name="Rectangle 1584465339"><svg:title/><svg:desc/><draw:enhanced-geometry draw:type="non-primitive" svg:viewBox="0 0 21600 21600" draw:enhanced-path="M 0 0 L 21600 0 21600 21600 0 21600 Z N"/></draw:custom-shape><draw:custom-shape svg:x="2.86178in" svg:y="1.4113in" svg:width="0.06894in" svg:height="0.05in" draw:id="id200" draw:style-name="a255" draw:name="Rectangle 1603018950"><svg:title/><svg:desc/><draw:enhanced-geometry draw:type="non-primitive" svg:viewBox="0 0 21600 21600" draw:enhanced-path="M 0 0 L 21600 0 21600 21600 0 21600 Z N"/></draw:custom-shape><draw:custom-shape svg:x="2.9312in" svg:y="1.36574in" svg:width="0.06772in" svg:height="0.09556in" draw:id="id201" draw:style-name="a257" draw:name="Rectangle 79757344"><svg:title/><svg:desc/><draw:enhanced-geometry draw:type="non-primitive" svg:viewBox="0 0 21600 21600" draw:enhanced-path="M 0 0 L 21600 0 21600 21600 0 21600 Z N"/></draw:custom-shape><draw:connector draw:type="line" svg:x1="2.82716in" svg:y1="0.62865in" svg:x2="2.82716in" svg:y2="1.46453in" draw:id="id202" draw:style-name="a258" draw:name="Straight Connector 1107014247"><svg:title/><svg:desc/></draw:connector><draw:custom-shape svg:x="2.99892in" svg:y="1.35185in" svg:width="0.06942in" svg:height="0.10945in" draw:id="id203" draw:style-name="a260" draw:name="Rectangle 1622380894"><svg:title/><svg:desc/><draw:enhanced-geometry draw:type="non-primitive" svg:viewBox="0 0 21600 21600" draw:enhanced-path="M 0 0 L 21600 0 21600 21600 0 21600 Z N"/></draw:custom-shape><draw:custom-shape svg:x="3.06663in" svg:y="1.28704in" svg:width="0.0728in" svg:height="0.17427in" draw:id="id204" draw:style-name="a261" draw:name="Rectangle 256632527"><svg:title/><svg:desc/><draw:enhanced-geometry draw:type="non-primitive" svg:viewBox="0 0 21600 21600" draw:enhanced-path="M 0 0 L 21600 0 21600 21600 0 21600 Z N"/></draw:custom-shape><draw:connector draw:type="line" svg:x1="2.82032in" svg:y1="1.4613in" svg:x2="4.31101in" svg:y2="1.4613in" draw:id="id205" draw:style-name="a262" draw:name="Straight Connector 1773735474"><svg:title/><svg:desc/></draw:connector><draw:connector draw:type="line" svg:x1="2.80592in" svg:y1="1.4613in" svg:x2="2.82601in" svg:y2="1.4613in" draw:id="id206" draw:style-name="a263" draw:name="Straight Connector 623504646"><svg:title/><svg:desc/></draw:connector><draw:connector draw:type="line" svg:x1="2.80592in" svg:y1="1.12101in" svg:x2="2.82601in" svg:y2="1.12101in" draw:id="id207" draw:style-name="a264" draw:name="Straight Connector 1526875004"><svg:title/><svg:desc/></draw:connector><draw:connector draw:type="line" svg:x1="2.80592in" svg:y1="0.75777in" svg:x2="2.82601in" svg:y2="0.75777in" draw:id="id208" draw:style-name="a265" draw:name="Straight Connector 966444802"><svg:title/><svg:desc/></draw:connector><draw:connector draw:type="line" svg:x1="2.81597in" svg:y1="1.47783in" svg:x2="2.83604in" svg:y2="1.47783in" draw:id="id209" draw:style-name="a266" draw:transform="translate(-2.82601in -1.47783in) rotate(-1.5708) translate(2.82601in 1.47783in)" draw:name="Straight Connector 529700814"><svg:title/><svg:desc/></draw:connector><draw:connector draw:type="line" svg:x1="3.16011in" svg:y1="1.47787in" svg:x2="3.18019in" svg:y2="1.47787in" draw:id="id210" draw:style-name="a267" draw:transform="translate(-3.17015in -1.47787in) rotate(-1.5708) translate(3.17015in 1.47787in)" draw:name="Straight Connector 1810017444"><svg:title/><svg:desc/></draw:connector><draw:connector draw:type="line" svg:x1="3.54445in" svg:y1="1.47788in" svg:x2="3.56454in" svg:y2="1.47788in" draw:id="id211" draw:style-name="a268" draw:transform="translate(-3.55449in -1.47788in) rotate(-1.5708) translate(3.55449in 1.47788in)" draw:name="Straight Connector 10345126"><svg:title/><svg:desc/></draw:connector><draw:connector draw:type="line" svg:x1="3.94941in" svg:y1="1.47787in" svg:x2="3.96948in" svg:y2="1.47787in" draw:id="id212" draw:style-name="a269" draw:transform="translate(-3.95945in -1.47787in) rotate(-1.5708) translate(3.95945in 1.47787in)" draw:name="Straight Connector 337925128"><svg:title/><svg:desc/></draw:connector><draw:connector draw:type="line" svg:x1="4.29355in" svg:y1="1.47788in" svg:x2="4.31364in" svg:y2="1.47788in" draw:id="id213" draw:style-name="a270" draw:transform="translate(-4.30359in -1.47788in) rotate(-1.5708) translate(4.30359in 1.47788in)" draw:name="Straight Connector 967951532"><svg:title/><svg:desc/></draw:connector><draw:frame draw:id="id214" draw:style-name="a271" draw:name="Text Box 2" svg:x="2.82056in" svg:y="1.57904in" svg:width="1.46008in" svg:height="0.26301in" style:rel-width="scale" style:rel-height="scale"><draw:text-box><text:p text:style-name="P339">Tamanho do bloco do arquivo de leitura</text:p></draw:text-box><svg:title/><svg:desc/></draw:frame><draw:frame draw:id="id215" draw:style-name="a272" draw:transform="translate(-0.47311in -0.07398in) rotate(-4.71239) translate(2.48688in 1.08983in)" draw:name="Text Box 2" svg:width="0.94622in" svg:height="0.14797in" style:rel-width="scale" style:rel-height="scale"><draw:text-box><text:p text:style-name="P340">System call latência</text:p></draw:text-box><svg:title/><svg:desc/></draw:frame><draw:frame draw:id="id216" draw:style-name="a273" draw:name="Text Box 2" svg:x="2.44105in" svg:y="0.6875in" svg:width="0.37928in" svg:height="0.86806in" style:rel-width="scale" style:rel-height="scale"><draw:text-box><text:p text:style-name="P341">10μs</text:p><text:p text:style-name="P342"/><text:p text:style-name="P343"/><text:p text:style-name="P344">1μs</text:p><text:p text:style-name="P345"/><text:p text:style-name="P346"/><text:p text:style-name="P347">0.1μs</text:p></draw:text-box><svg:title/><svg:desc/></draw:frame><draw:custom-shape svg:x="2.44082in" svg:y="0.428in" svg:width="0.04043in" svg:height="0.04043in" draw:id="id217" draw:style-name="a274" draw:name="Rectangle 1313188752"><svg:title/><svg:desc/><draw:enhanced-geometry draw:type="non-primitive" svg:viewBox="0 0 21600 21600" draw:enhanced-path="M 0 0 L 21600 0 21600 21600 0 21600 Z N"/></draw:custom-shape><draw:custom-shape svg:x="2.44105in" svg:y="0.53074in" svg:width="0.0402in" svg:height="0.0402in" draw:id="id218" draw:style-name="a276" draw:name="Rectangle 1943216611"><svg:title/><svg:desc/><draw:enhanced-geometry draw:type="non-primitive" svg:viewBox="0 0 21600 21600" draw:enhanced-path="M 0 0 L 21600 0 21600 21600 0 21600 Z N"/></draw:custom-shape><draw:custom-shape svg:x="3.30387in" svg:y="0.42823in" svg:width="0.0402in" svg:height="0.0402in" draw:id="id219" draw:style-name="a278" draw:name="Rectangle 1446954648"><svg:title/><svg:desc/><draw:enhanced-geometry draw:type="non-primitive" svg:viewBox="0 0 21600 21600" draw:enhanced-path="M 0 0 L 21600 0 21600 21600 0 21600 Z N"/></draw:custom-shape><draw:custom-shape svg:x="3.30387in" svg:y="0.52934in" svg:width="0.0402in" svg:height="0.0402in" draw:id="id220" draw:style-name="a279" draw:name="Rectangle 1081661994"><svg:title/><svg:desc/><draw:enhanced-geometry draw:type="non-primitive" svg:viewBox="0 0 21600 21600" draw:enhanced-path="M 0 0 L 21600 0 21600 21600 0 21600 Z N"/></draw:custom-shape><draw:frame draw:id="id221" draw:style-name="a280" draw:name="Text Box 2" svg:x="2.9575in" svg:y="1.16497in" svg:width="0.31278in" svg:height="0.14478in" style:rel-width="scale" style:rel-height="scale"><draw:text-box><text:p text:style-name="P348"><text:s text:c="3"/>0.4μs</text:p></draw:text-box><svg:title/><svg:desc/></draw:frame><draw:frame draw:id="id222" draw:style-name="a281" draw:name="Text Box 2" svg:x="3.32188in" svg:y="0.97978in" svg:width="0.31278in" svg:height="0.14478in" style:rel-width="scale" style:rel-height="scale"><draw:text-box><text:p text:style-name="P349"><text:s text:c="3"/>1.2μs</text:p></draw:text-box><svg:title/><svg:desc/></draw:frame><draw:frame draw:id="id223" draw:style-name="a282" draw:name="Text Box 2" svg:x="3.71531in" svg:y="0.835in" svg:width="0.31278in" svg:height="0.14478in" style:rel-width="scale" style:rel-height="scale"><draw:text-box><text:p text:style-name="P350"><text:s text:c="3"/>4.4μs</text:p></draw:text-box><svg:title/><svg:desc/></draw:frame><draw:frame draw:id="id224" draw:style-name="a283" draw:name="Text Box 2" svg:x="4.07845in" svg:y="0.58561in" svg:width="0.31278in" svg:height="0.14478in" style:rel-width="scale" style:rel-height="scale"><draw:text-box><text:p text:style-name="P351"><text:s text:c="3"/>16.9μs</text:p></draw:text-box><svg:title/><svg:desc/></draw:frame><draw:frame draw:id="id225" draw:style-name="a284" draw:name="Text Box 2" svg:x="2.80351in" svg:y="1.46024in" svg:width="1.52504in" svg:height="0.161in" style:rel-width="scale" style:rel-height="scale"><draw:text-box><text:p text:style-name="P352"><text:s text:c="3"/>64b <text:s text:c="12"/>256b <text:s text:c="13"/>1k <text:s text:c="14"/>4k</text:p></draw:text-box><svg:title/><svg:desc/></draw:frame><draw:frame draw:id="id226" draw:style-name="a285" draw:name="Text Box 2" svg:x="4.42228in" svg:y="0.38742in" svg:width="1.84758in" svg:height="0.30922in" style:rel-width="scale" style:rel-height="scale"><draw:text-box><text:p text:style-name="P353">Linux<text:tab/><text:s text:c="36"/>Graphene (sobre RPC)</text:p><text:p text:style-name="P354">Graphene-SGX (IPC em massa) <text:s text:c="12"/>Graphene-SGX</text:p></draw:text-box><svg:title/><svg:desc/></draw:frame><draw:custom-shape svg:x="5.19186in" svg:y="1.19722in" svg:width="0.06894in" svg:height="0.26408in" draw:id="id227" draw:style-name="a286" draw:name="Rectangle 856937333"><svg:title/><svg:desc/><draw:enhanced-geometry draw:type="non-primitive" svg:viewBox="0 0 21600 21600" draw:enhanced-path="M 0 0 L 21600 0 21600 21600 0 21600 Z N"/></draw:custom-shape><draw:custom-shape svg:x="5.26128in" svg:y="0.97978in" svg:width="0.06772in" svg:height="0.48152in" draw:id="id228" draw:style-name="a288" draw:name="Rectangle 205269597"><svg:title/><svg:desc/><draw:enhanced-geometry draw:type="non-primitive" svg:viewBox="0 0 21600 21600" draw:enhanced-path="M 0 0 L 21600 0 21600 21600 0 21600 Z N"/></draw:custom-shape><draw:custom-shape svg:x="5.32899in" svg:y="1.08264in" svg:width="0.06942in" svg:height="0.37866in" draw:id="id229" draw:style-name="a290" draw:name="Rectangle 391804709"><svg:title/><svg:desc/><draw:enhanced-geometry draw:type="non-primitive" svg:viewBox="0 0 21600 21600" draw:enhanced-path="M 0 0 L 21600 0 21600 21600 0 21600 Z N"/></draw:custom-shape><draw:custom-shape svg:x="5.3967in" svg:y="0.74097in" svg:width="0.0728in" svg:height="0.72033in" draw:id="id230" draw:style-name="a291" draw:name="Rectangle 2068808360"><svg:title/><svg:desc/><draw:enhanced-geometry draw:type="non-primitive" svg:viewBox="0 0 21600 21600" draw:enhanced-path="M 0 0 L 21600 0 21600 21600 0 21600 Z N"/></draw:custom-shape><draw:custom-shape svg:x="5.59268in" svg:y="1.18889in" svg:width="0.06894in" svg:height="0.27241in" draw:id="id231" draw:style-name="a292" draw:name="Rectangle 738497794"><svg:title/><svg:desc/><draw:enhanced-geometry draw:type="non-primitive" svg:viewBox="0 0 21600 21600" draw:enhanced-path="M 0 0 L 21600 0 21600 21600 0 21600 Z N"/></draw:custom-shape><draw:custom-shape svg:x="5.6621in" svg:y="0.92639in" svg:width="0.06772in" svg:height="0.53492in" draw:id="id232" draw:style-name="a294" draw:name="Rectangle 179168919"><svg:title/><svg:desc/><draw:enhanced-geometry draw:type="non-primitive" svg:viewBox="0 0 21600 21600" draw:enhanced-path="M 0 0 L 21600 0 21600 21600 0 21600 Z N"/></draw:custom-shape><draw:custom-shape svg:x="5.72983in" svg:y="1.04931in" svg:width="0.06942in" svg:height="0.412in" draw:id="id233" draw:style-name="a296" draw:name="Rectangle 1653787607"><svg:title/><svg:desc/><draw:enhanced-geometry draw:type="non-primitive" svg:viewBox="0 0 21600 21600" draw:enhanced-path="M 0 0 L 21600 0 21600 21600 0 21600 Z N"/></draw:custom-shape><draw:custom-shape svg:x="5.79753in" svg:y="0.69663in" svg:width="0.0728in" svg:height="0.76467in" draw:id="id234" draw:style-name="a297" draw:name="Rectangle 1506875743"><svg:title/><svg:desc/><draw:enhanced-geometry draw:type="non-primitive" svg:viewBox="0 0 21600 21600" draw:enhanced-path="M 0 0 L 21600 0 21600 21600 0 21600 Z N"/></draw:custom-shape><draw:custom-shape svg:x="5.96505in" svg:y="1.18264in" svg:width="0.06894in" svg:height="0.27866in" draw:id="id235" draw:style-name="a298" draw:name="Rectangle 1797056101"><svg:title/><svg:desc/><draw:enhanced-geometry draw:type="non-primitive" svg:viewBox="0 0 21600 21600" draw:enhanced-path="M 0 0 L 21600 0 21600 21600 0 21600 Z N"/></draw:custom-shape><draw:custom-shape svg:x="6.03448in" svg:y="0.89034in" svg:width="0.06772in" svg:height="0.57096in" draw:id="id236" draw:style-name="a300" draw:name="Rectangle 574135836"><svg:title/><svg:desc/><draw:enhanced-geometry draw:type="non-primitive" svg:viewBox="0 0 21600 21600" draw:enhanced-path="M 0 0 L 21600 0 21600 21600 0 21600 Z N"/></draw:custom-shape><draw:custom-shape svg:x="6.10219in" svg:y="1.02014in" svg:width="0.06942in" svg:height="0.44117in" draw:id="id237" draw:style-name="a302" draw:name="Rectangle 684957979"><svg:title/><svg:desc/><draw:enhanced-geometry draw:type="non-primitive" svg:viewBox="0 0 21600 21600" draw:enhanced-path="M 0 0 L 21600 0 21600 21600 0 21600 Z N"/></draw:custom-shape><draw:custom-shape svg:x="6.1699in" svg:y="0.66806in" svg:width="0.0728in" svg:height="0.79325in" draw:id="id238" draw:style-name="a303" draw:name="Rectangle 1768228538"><svg:title/><svg:desc/><draw:enhanced-geometry draw:type="non-primitive" svg:viewBox="0 0 21600 21600" draw:enhanced-path="M 0 0 L 21600 0 21600 21600 0 21600 Z N"/></draw:custom-shape><draw:custom-shape svg:x="4.83242in" svg:y="1.21597in" svg:width="0.06894in" svg:height="0.24533in" draw:id="id239" draw:style-name="a304" draw:name="Rectangle 1760879369"><svg:title/><svg:desc/><draw:enhanced-geometry draw:type="non-primitive" svg:viewBox="0 0 21600 21600" draw:enhanced-path="M 0 0 L 21600 0 21600 21600 0 21600 Z N"/></draw:custom-shape><draw:custom-shape svg:x="4.90184in" svg:y="0.99931in" svg:width="0.06772in" svg:height="0.462in" draw:id="id240" draw:style-name="a306" draw:name="Rectangle 1918249400"><svg:title/><svg:desc/><draw:enhanced-geometry draw:type="non-primitive" svg:viewBox="0 0 21600 21600" draw:enhanced-path="M 0 0 L 21600 0 21600 21600 0 21600 Z N"/></draw:custom-shape><draw:connector draw:type="line" svg:x1="4.7978in" svg:y1="0.62865in" svg:x2="4.7978in" svg:y2="1.46453in" draw:id="id241" draw:style-name="a307" draw:name="Straight Connector 405825040"><svg:title/><svg:desc/></draw:connector><draw:custom-shape svg:x="4.96955in" svg:y="1.10764in" svg:width="0.06942in" svg:height="0.35367in" draw:id="id242" draw:style-name="a309" draw:name="Rectangle 1778572231"><svg:title/><svg:desc/><draw:enhanced-geometry draw:type="non-primitive" svg:viewBox="0 0 21600 21600" draw:enhanced-path="M 0 0 L 21600 0 21600 21600 0 21600 Z N"/></draw:custom-shape><draw:custom-shape svg:x="5.03726in" svg:y="0.76597in" svg:width="0.0728in" svg:height="0.69533in" draw:id="id243" draw:style-name="a310" draw:name="Rectangle 771875495"><svg:title/><svg:desc/><draw:enhanced-geometry draw:type="non-primitive" svg:viewBox="0 0 21600 21600" draw:enhanced-path="M 0 0 L 21600 0 21600 21600 0 21600 Z N"/></draw:custom-shape><draw:connector draw:type="line" svg:x1="4.79095in" svg:y1="1.4613in" svg:x2="6.28165in" svg:y2="1.4613in" draw:id="id244" draw:style-name="a311" draw:name="Straight Connector 609827934"><svg:title/><svg:desc/></draw:connector><draw:connector draw:type="line" svg:x1="4.77656in" svg:y1="1.4613in" svg:x2="4.79663in" svg:y2="1.4613in" draw:id="id245" draw:style-name="a312" draw:name="Straight Connector 1213207967"><svg:title/><svg:desc/></draw:connector><draw:connector draw:type="line" svg:x1="4.77656in" svg:y1="0.98617in" svg:x2="4.79663in" svg:y2="0.98617in" draw:id="id246" draw:style-name="a313" draw:name="Straight Connector 2065085605"><svg:title/><svg:desc/></draw:connector><draw:connector draw:type="line" svg:x1="4.77656in" svg:y1="1.1036in" svg:x2="4.79095in" svg:y2="1.1036in" draw:id="id247" draw:style-name="a314" draw:name="Straight Connector 246120660"><svg:title/><svg:desc/></draw:connector><draw:connector draw:type="line" svg:x1="4.77656in" svg:y1="1.21212in" svg:x2="4.79663in" svg:y2="1.21212in" draw:id="id248" draw:style-name="a315" draw:name="Straight Connector 293312649"><svg:title/><svg:desc/></draw:connector><draw:connector draw:type="line" svg:x1="4.77656in" svg:y1="1.32955in" svg:x2="4.80039in" svg:y2="1.32955in" draw:id="id249" draw:style-name="a316" draw:name="Straight Connector 2062213022"><svg:title/><svg:desc/></draw:connector><draw:connector draw:type="line" svg:x1="4.77656in" svg:y1="0.87589in" svg:x2="4.79663in" svg:y2="0.87589in" draw:id="id250" draw:style-name="a317" draw:name="Straight Connector 351886873"><svg:title/><svg:desc/></draw:connector><draw:connector draw:type="line" svg:x1="4.78658in" svg:y1="1.47787in" svg:x2="4.80667in" svg:y2="1.47787in" draw:id="id251" draw:style-name="a318" draw:transform="translate(-4.79663in -1.47787in) rotate(-1.5708) translate(4.79663in 1.47787in)" draw:name="Straight Connector 1420660062"><svg:title/><svg:desc/></draw:connector><draw:connector draw:type="line" svg:x1="5.13074in" svg:y1="1.47788in" svg:x2="5.15081in" svg:y2="1.47788in" draw:id="id252" draw:style-name="a319" draw:transform="translate(-5.14078in -1.47788in) rotate(-1.5708) translate(5.14078in 1.47788in)" draw:name="Straight Connector 71479141"><svg:title/><svg:desc/></draw:connector><draw:connector draw:type="line" svg:x1="5.5151in" svg:y1="1.47787in" svg:x2="5.53517in" svg:y2="1.47787in" draw:id="id253" draw:style-name="a320" draw:transform="translate(-5.52513in -1.47787in) rotate(-1.5708) translate(5.52513in 1.47787in)" draw:name="Straight Connector 267901368"><svg:title/><svg:desc/></draw:connector><draw:connector draw:type="line" svg:x1="5.92004in" svg:y1="1.47787in" svg:x2="5.94012in" svg:y2="1.47787in" draw:id="id254" draw:style-name="a321" draw:transform="translate(-5.93008in -1.47787in) rotate(-1.5708) translate(5.93008in 1.47787in)" draw:name="Straight Connector 2114624221"><svg:title/><svg:desc/></draw:connector><draw:connector draw:type="line" svg:x1="6.26419in" svg:y1="1.47788in" svg:x2="6.28426in" svg:y2="1.47788in" draw:id="id255" draw:style-name="a322" draw:transform="translate(-6.27422in -1.47788in) rotate(-1.5708) translate(6.27422in 1.47788in)" draw:name="Straight Connector 986789549"><svg:title/><svg:desc/></draw:connector><draw:frame draw:id="id256" draw:style-name="a323" draw:name="Text Box 2" svg:x="4.86325in" svg:y="1.58559in" svg:width="1.34963in" svg:height="0.25934in" style:rel-width="scale" style:rel-height="scale"><draw:text-box><text:p text:style-name="P355">Espaço ocupado pela memória do processo</text:p></draw:text-box><svg:title/><svg:desc/></draw:frame><draw:frame draw:id="id257" draw:style-name="a324" draw:transform="translate(-0.47311in -0.07398in) rotate(-4.71239) translate(4.41635in 1.08983in)" draw:name="Text Box 2" svg:width="0.94622in" svg:height="0.14797in" style:rel-width="scale" style:rel-height="scale"><draw:text-box><text:p text:style-name="P356">System call latência</text:p></draw:text-box><svg:title/><svg:desc/></draw:frame><draw:frame draw:id="id258" draw:style-name="a325" draw:name="Text Box 2" svg:x="4.36464in" svg:y="0.67414in" svg:width="0.375in" svg:height="0.83511in" style:rel-width="scale" style:rel-height="scale"><draw:text-box><text:p text:style-name="P357">1s</text:p><text:p text:style-name="P358">100ms</text:p><text:p text:style-name="P359">10ms</text:p><text:p text:style-name="P360">1ms</text:p><text:p text:style-name="P361"><text:span text:style-name="T362">100</text:span><text:span text:style-name="T363">μ</text:span><text:span text:style-name="T364">s</text:span></text:p><text:p text:style-name="P365"><text:span text:style-name="T366">10</text:span><text:span text:style-name="T367">μ</text:span><text:span text:style-name="T368">s</text:span></text:p><text:p text:style-name="P369"><text:span text:style-name="T370">1</text:span><text:span text:style-name="T371">μ</text:span><text:span text:style-name="T372">s</text:span></text:p></draw:text-box><svg:title/><svg:desc/></draw:frame><draw:custom-shape svg:x="4.41146in" svg:y="0.428in" svg:width="0.04043in" svg:height="0.04043in" draw:id="id259" draw:style-name="a326" draw:name="Rectangle 1834983412"><svg:title/><svg:desc/><draw:enhanced-geometry draw:type="non-primitive" svg:viewBox="0 0 21600 21600" draw:enhanced-path="M 0 0 L 21600 0 21600 21600 0 21600 Z N"/></draw:custom-shape><draw:custom-shape svg:x="4.4117in" svg:y="0.53074in" svg:width="0.0402in" svg:height="0.0402in" draw:id="id260" draw:style-name="a327" draw:name="Rectangle 547345"><svg:title/><svg:desc/><draw:enhanced-geometry draw:type="non-primitive" svg:viewBox="0 0 21600 21600" draw:enhanced-path="M 0 0 L 21600 0 21600 21600 0 21600 Z N"/></draw:custom-shape><draw:custom-shape svg:x="5.33521in" svg:y="0.42823in" svg:width="0.0402in" svg:height="0.0402in" draw:id="id261" draw:style-name="a329" draw:name="Rectangle 325295787"><svg:title/><svg:desc/><draw:enhanced-geometry draw:type="non-primitive" svg:viewBox="0 0 21600 21600" draw:enhanced-path="M 0 0 L 21600 0 21600 21600 0 21600 Z N"/></draw:custom-shape><draw:custom-shape svg:x="5.33521in" svg:y="0.52934in" svg:width="0.0402in" svg:height="0.0402in" draw:id="id262" draw:style-name="a331" draw:name="Rectangle 1059840193"><svg:title/><svg:desc/><draw:enhanced-geometry draw:type="non-primitive" svg:viewBox="0 0 21600 21600" draw:enhanced-path="M 0 0 L 21600 0 21600 21600 0 21600 Z N"/></draw:custom-shape><draw:frame draw:id="id263" draw:style-name="a332" draw:name="Text Box 2" svg:x="4.85839in" svg:y="0.82387in" svg:width="0.29208in" svg:height="0.14478in" style:rel-width="scale" style:rel-height="scale"><draw:text-box><text:p text:style-name="P373"><text:s text:c="3"/>383μs</text:p></draw:text-box><svg:title/><svg:desc/></draw:frame><draw:frame draw:id="id264" draw:style-name="a333" draw:name="Text Box 2" svg:x="4.77656in" svg:y="1.46024in" svg:width="1.51522in" svg:height="0.161in" style:rel-width="scale" style:rel-height="scale"><draw:text-box><text:p text:style-name="P374"><text:s text:c="3"/>16M <text:s text:c="11"/>32M <text:s text:c="13"/>64M <text:s text:c="8"/>128M</text:p></draw:text-box><svg:title/><svg:desc/></draw:frame><draw:connector draw:type="line" svg:x1="4.77656in" svg:y1="0.75506in" svg:x2="4.79663in" svg:y2="0.75506in" draw:id="id265" draw:style-name="a334" draw:name="Straight Connector 1617934163"><svg:title/><svg:desc/></draw:connector></draw:g></text:p>
      <text:p text:style-name="P375"><text:span text:style-name="T376">Figura 7. Latência de algumas chamadas de sistema caras no Gramine-SGX, incluindo a abertura e a leitura de um arquivo seguro (autenticado) e a bifurcação de um novo processo. Os resultados são comparados com o Linux nativo e o Gramine.</text:span></text:p>
      <text:list text:style-name="Outline" text:continue-numbering="true">
        <text:list-item>
          <text:p text:style-name="P377">Imagens</text:p>
        </text:list-item>
      </text:list>
      <text:p text:style-name="SBCparagraphfirst">Todas as imagens foram reproduzidas por mim (autor) algumas foram traduzidas, portanto, deixei os crédito abaixo.</text:p>
      <text:list text:style-name="LFO23" text:continue-numbering="true">
        <text:list-item>
          <text:p text:style-name="P378"><text:span text:style-name="T379">Figura 1</text:span><text:span text:style-name="T380">: Visualização do Processo. Disponível em: &lt;</text:span><text:a xlink:href="https://blog.quarkslab.com/overview-of-intel-sgx-part-1-sgx-internals.html" office:target-frame-name="_top" xlink:show="replace"><text:span text:style-name="T381">https://blog.quarkslab.com/overview-of-intel-sgx-part-1-sgx-internals.html</text:span></text:a><text:span text:style-name="T382">&gt;,&lt;</text:span><text:a xlink:href="https://community.intel.com/legacyfs/online/drupal_files/332680-002.pdf" office:target-frame-name="_top" xlink:show="replace"><text:span text:style-name="T383">https://community.intel.com/legacy</text:span><text:bookmark-start text:name="_Hlt150128551"/><text:bookmark-start text:name="_Hlt150128552"/><text:span text:style-name="T384">f</text:span><text:bookmark-end text:name="_Hlt150128551"/><text:bookmark-end text:name="_Hlt150128552"/><text:span text:style-name="T385">s/online/drupal_files/332680-002.pdf</text:span></text:a><text:span text:style-name="T386">&gt;;<text:s/></text:span></text:p>
        </text:list-item>
        <text:list-item>
          <text:p text:style-name="P387"><text:span text:style-name="T388">Figura 2</text:span><text:span text:style-name="T389">: Arquitetura SGX. Disponível em: &lt;</text:span><text:a xlink:href="https://community.intel.com/legacyfs/online/drupal_files/332680-002.pdf" office:target-frame-name="_top" xlink:show="replace"><text:span text:style-name="T390">https://community.intel.com/legacyfs/online/drupal_files/332680-002.pdf</text:span></text:a><text:span text:style-name="T391">&gt;;<text:s/></text:span></text:p>
        </text:list-item>
        <text:list-item>
          <text:p text:style-name="P392"><text:span text:style-name="T393">Figura 3:<text:s/></text:span><text:span text:style-name="T394">Memória – Caminho da página do Enclave. Disponível em: &lt;</text:span><text:a xlink:href="https://blog.quarkslab.com/overview-of-intel-sgx-part-1-sgx-internals.html" office:target-frame-name="_top" xlink:show="replace"><text:span text:style-name="T395">https://blog.quarkslab.com/overview-of-intel-sgx-part-1-sgx-internals.html</text:span></text:a><text:span text:style-name="T396">&gt;,&lt;</text:span><text:a xlink:href="https://community.intel.com/legacyfs/online/drupal_files/332680-002.pdf" office:target-frame-name="_top" xlink:show="replace"><text:span text:style-name="T397">https://community.intel.com/legacyfs/online/drupal_files/332680-002.pdf</text:span></text:a><text:span text:style-name="T398">&gt;;</text:span></text:p>
        </text:list-item>
        <text:list-item>
          <text:p text:style-name="P399"><text:span text:style-name="T400">Figura 4:</text:span><text:span text:style-name="T401"><text:s/>Memória – Cache de página enclave (EPC) no PRM. Disponivel em: &lt;</text:span><text:a xlink:href="https://sgx101.gitbook.io/sgx101/sgx-bootstrap/enclave" office:target-frame-name="_top" xlink:show="replace"><text:span text:style-name="T402">https://sgx101.gitbook.io/sgx101/sgx-bootstrap/enclave</text:span></text:a><text:span text:style-name="T403">&gt;.</text:span></text:p>
        </text:list-item>
        <text:list-item>
          <text:p text:style-name="P404"><text:span text:style-name="T405">Figura 5:</text:span><text:span text:style-name="T406"><text:s/>Gerenciamento de Páginas – Page-out. Disponivel em: &lt;</text:span><text:a xlink:href="https://blog.quarkslab.com/overview-of-intel-sgx-part-1-sgx-internals.html" office:target-frame-name="_top" xlink:show="replace"><text:span text:style-name="T407">https://blog.quarkslab.com/overview-of-intel-sgx-part-1-sgx-internals.html</text:span></text:a><text:span text:style-name="T408">&gt;,&lt;</text:span><text:a xlink:href="https://community.intel.com/legacyfs/online/drupal_files/332680-002.pdf" office:target-frame-name="_top" xlink:show="replace"><text:span text:style-name="T409">https://community.intel.com/legacyfs/online/drupal_files/332680-002.pdf</text:span></text:a><text:span text:style-name="T410">&gt;;</text:span></text:p>
        </text:list-item>
        <text:list-item>
          <text:p text:style-name="P411"><text:span text:style-name="T412">Figura 6:</text:span><text:span text:style-name="T413"><text:s/>Gerenciamento de Páginas – Page-in. Disponivel em: &lt;</text:span><text:a xlink:href="https://blog.quarkslab.com/overview-of-intel-sgx-part-1-sgx-internals.html" office:target-frame-name="_top" xlink:show="replace"><text:span text:style-name="T414">https://blog.quarkslab.com/overview-of-intel-sgx-part-1-sgx-internals.html</text:span></text:a><text:span text:style-name="T415">&gt;,&lt;</text:span><text:a xlink:href="https://community.intel.com/legacyfs/online/drupal_files/332680-002.pdf" office:target-frame-name="_top" xlink:show="replace"><text:span text:style-name="T416">https://community.intel.com/legacyfs/online/drupal_files/332</text:span><text:soft-page-break/><text:span text:style-name="T417">680-002.pdf</text:span></text:a><text:span text:style-name="T418">&gt;;</text:span></text:p>
        </text:list-item>
        <text:list-item>
          <text:p text:style-name="P419"><text:span text:style-name="T420">Figura 7:</text:span><text:s/>Latência de algumas chamadas de sistema [...]<text:span text:style-name="T421">. Disponivel em: &lt;</text:span><text:a xlink:href="https://www.usenix.org/system/files/conference/atc17/atc17-tsai.pdf" office:target-frame-name="_top" xlink:show="replace"><text:span text:style-name="Hiperligação">https://www.usenix.org/system/files/conference/atc17/atc17-tsai.pdf</text:span></text:a>&gt;.</text:p>
        </text:list-item>
      </text:list>
      <text:list text:style-name="Outline" text:continue-numbering="true">
        <text:list-item>
          <text:p text:style-name="P422">Tabelas</text:p>
        </text:list-item>
      </text:list>
      <text:list text:style-name="LFO24" text:continue-numbering="true">
        <text:list-item>
          <text:p text:style-name="P423">Tabela 1: Instruções do Intel SGX em destaque. Dispon<text:span text:style-name="T424">ível em:<text:s/></text:span><text:a xlink:href="https://blog.quarkslab.com/overview-of-intel-sgx-part-1-sgx-internals.html" office:target-frame-name="_top" xlink:show="replace"><text:span text:style-name="Hiperligação">https://blog.quarkslab.com/overview-of-intel-sgx-part-1-sgx-internals.html</text:span></text:a><text:span text:style-name="T425">;<text:s/></text:span></text:p>
        </text:list-item>
        <text:list-item>
          <text:p text:style-name="P426">Tabela 2: EPCM - Tabela de páginas em um SO regular. Dispon<text:span text:style-name="T427">ível em:<text:s/></text:span><text:a xlink:href="https://sgx101.gitbook.io/sgx101/sgx-bootstrap/enclave" office:target-frame-name="_top" xlink:show="replace"><text:span text:style-name="Hiperligação">https://sgx101.gitbook.io/sgx101/sgx-bootstrap/enclave</text:span></text:a>.<text:s/></text:p>
        </text:list-item>
      </text:list>
      <text:list text:style-name="Outline" text:continue-numbering="true">
        <text:list-item>
          <text:p text:style-name="P428">Conclusão</text:p>
        </text:list-item>
      </text:list>
      <text:p text:style-name="P429">Neste contexto mais amplo, o Gramine-SGX emerge como uma solução viável para superar os desafios associados à execução de aplicativos não modificados em ambientes SGX, utilizando um sistema operacional de biblioteca. O custo adicional dessa abordagem em comparação com soluções mais finas (shims) é considerado marginal, com os principais desafios ainda relacionados às limitações de hardware intrínsecas ao SGX.</text:p>
      <text:p text:style-name="P430">A análise de desempenho revela que o Gramine-SGX, mesmo com suas características de sistema operacional de biblioteca, apresenta overheads comparáveis a aplicações modificadas para utilizar camadas mais finas. Os gargalos significativos residem nas limitações de hardware do SGX, apontando para a necessidade contínua de avanços nessa tecnologia.</text:p>
      <text:p text:style-name="P431">Além disso, a conclusão destaca que, à medida que SGX e tecnologias similares amadurecem, escolhas de design podem ganhar maior relevância. O Gramine-SGX, como uma ferramenta de código aberto, oferece uma solução prática para rápida implementação de aplicações existentes em ambientes SGX. O processo incremental de adaptação do código proporciona melhorias contínuas no desempenho e na segurança, alinhando-se às demandas dinâmicas desse cenário tecnológico em evolução.</text:p>
      <text:p text:style-name="P432">Referências</text:p>
      <text:list text:style-name="LFO25" text:continue-numbering="true">
        <text:list-item>
          <text:p text:style-name="P433"><text:bookmark-start text:name="_Ref148644700"/><text:span text:style-name="T434">[J. Rutkowska 2013]. Thoughts on Intel’s upcoming Software Guard Extensions (Part 1), Aug.<text:s/></text:span><text:a xlink:href="http://theinvisiblethings.blogspot.com/2013/08/thoughts-on-intels-upcoming-software.html" office:target-frame-name="_top" xlink:show="replace"><text:span text:style-name="T435">http://theinvisiblethings.blogspot.com/2013/08/thoughts-on-intels-upcoming-software.h</text:span><text:bookmark-start text:name="_Hlt148640179"/><text:bookmark-start text:name="_Hlt148640180"/><text:span text:style-name="T436">t</text:span><text:bookmark-end text:name="_Hlt148640179"/><text:bookmark-end text:name="_Hlt148640180"/><text:span text:style-name="T437">ml</text:span></text:a><text:bookmark-end text:name="_Ref148644700"/></text:p>
        </text:list-item>
        <text:list-item>
          <text:p text:style-name="P438">[Lucas Andrade, Edson Borin 2021)]. Projeto final de graduação: “Análise de desempenho do uso de Enclaves com Intel SGX”,<text:s/><text:a xlink:href="https://www.ic.unicamp.br/~reltech/PFG/2021/PFG-21-15.pdf" office:target-frame-name="_top" xlink:show="replace"><text:span text:style-name="Hiperligação">https://www.ic.unicamp.</text:span><text:bookmark-start text:name="_Hlt148644130"/><text:span text:style-name="Hiperligação">b</text:span><text:bookmark-end text:name="_Hlt148644130"/><text:span text:style-name="Hiperligação">r/~reltech/PFG/2021/PFG-21-15.p</text:span><text:bookmark-start text:name="_Hlt148640274"/><text:bookmark-start text:name="_Hlt148640275"/><text:span text:style-name="Hiperligação">d</text:span><text:bookmark-end text:name="_Hlt148640274"/><text:bookmark-end text:name="_Hlt148640275"/><text:span text:style-name="Hiperligação">f</text:span></text:a>, Dezembro.</text:p>
        </text:list-item>
        <text:list-item>
          <text:p text:style-name="P439"><text:span text:style-name="T440">[Sergio Prado 2020]. Trusted Execution Environment e ARM TrustZone.<text:s/></text:span><text:a xlink:href="https://sergioprado.org/trusted-execution-environment-e-arm-trustzone" office:target-frame-name="_top" xlink:show="replace"><text:span text:style-name="Hiperligação">https://sergioprado.org/trusted-execution-environment-e-arm-trustzone</text:span></text:a>. Março.</text:p>
        </text:list-item>
        <text:list-item>
          <text:p text:style-name="P441"><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iperligação">https://www.acervodigital.ufpr.br/bitstream/handle/1884/53489/R%20-%20D%20-%20RAFAEL%20CAMPRA%20REIS%20CONDE.pdf?sequence=1&amp;isAllowed=y</text:span></text:a><text:bookmark-end text:name="_Ref148643966"/>.<text:s/></text:p>
        </text:list-item>
        <text:list-item>
          <text:p text:style-name="P442"><text:span text:style-name="T443">IBM. (2023)<text:s/></text:span><text:bookmark-start text:name="trusted_comp_base__title__1"/><text:bookmark-end text:name="trusted_comp_base__title__1"/><text:span text:style-name="T444">Trusted Computing Base.<text:s/></text:span><text:a xlink:href="https://www.ibm.com/docs/pt-br/aix/7.3?topic=configuration-trusted-computing-base" office:target-frame-name="_top" xlink:show="replace"><text:span text:style-name="T445">https://www.ibm.com/docs/pt-br/aix/7.3?topic=configuration-trusted-computing-ba</text:span><text:bookmark-start text:name="_Hlt148644176"/><text:bookmark-start text:name="_Hlt148644177"/><text:span text:style-name="T446">s</text:span><text:bookmark-end text:name="_Hlt148644176"/><text:bookmark-end text:name="_Hlt148644177"/><text:span text:style-name="T447">e</text:span></text:a><text:span text:style-name="T448">. Março.</text:span></text:p>
        </text:list-item>
        <text:list-item>
          <text:p text:style-name="P449">Gramine (2023) Gramine documentation.<text:s/><text:a xlink:href="https://gramine.readthedocs.io/en/stable/" office:target-frame-name="_top" xlink:show="replace"><text:span text:style-name="Hiperligação">https://gramine.readthedoc</text:span><text:bookmark-start text:name="_Hlt148900924"/><text:bookmark-start text:name="_Hlt148900925"/><text:span text:style-name="Hiperligação">s</text:span><text:bookmark-end text:name="_Hlt148900924"/><text:bookmark-end text:name="_Hlt148900925"/><text:span text:style-name="Hiperligação">.io/en/stable/</text:span></text:a>.<text:s/></text:p>
        </text:list-item>
        <text:list-item>
          <text:p text:style-name="P450"><text:span text:style-name="T451">Gramine (2023) Introduction to SGX.<text:s/></text:span><text:a xlink:href="https://gramine.readthedocs.io/en/stable/sgx-intro.html" office:target-frame-name="_top" xlink:show="replace"><text:span text:style-name="T452">https://gramine.rea</text:span><text:bookmark-start text:name="_Hlt148900929"/><text:bookmark-start text:name="_Hlt148900930"/><text:span text:style-name="T453">d</text:span><text:bookmark-end text:name="_Hlt148900929"/><text:bookmark-end text:name="_Hlt148900930"/><text:span text:style-name="T454">thedocs.io/en/stable/sgx-intro.html</text:span></text:a><text:span text:style-name="T455">.<text:s/></text:span></text:p>
        </text:list-item>
        <text:list-item>
          <text:p text:style-name="P456"><text:bookmark-start text:name="_Ref148643999"/><text:span text:style-name="T457">Quarkslab’s website, [Alexandre Adamski 2018]. Overview of Intel SGX - Part 1, SGX Internals.<text:s/></text:span><text:a xlink:href="https://blog.quarkslab.com/overview-of-intel-sgx-part-1-sgx-internals.html" office:target-frame-name="_top" xlink:show="replace"><text:span text:style-name="Hiperligação">https://blog.quarkslab.com/overview-of-intel-sgx-part-1-sgx-internals.htm</text:span><text:bookmark-start text:name="_Hlt148644218"/><text:bookmark-start text:name="_Hlt148644219"/><text:span text:style-name="Hiperligação">l</text:span><text:bookmark-end text:name="_Hlt148644218"/><text:bookmark-end text:name="_Hlt148644219"/></text:a>.<text:s/><text:span text:style-name="T458">Julho.</text:span><text:bookmark-end text:name="_Ref148643999"/></text:p>
        </text:list-item>
        <text:list-item>
          <text:p text:style-name="P459"><text:bookmark-start text:name="_Ref148643921"/><text:span text:style-name="T460">[Ensar Seker (Medium website) 2021]. Trusted Execution Environment (TEE), Implementations, Drawbacks.<text:s/></text:span><text:a xlink:href="https://taesoo.kim/pubs/2016/jain:opensgx.pdf" office:target-frame-name="_top" xlink:show="replace"><text:span text:style-name="T461">https://ta</text:span><text:bookmark-start text:name="_Hlt148644525"/><text:bookmark-start text:name="_Hlt148644526"/><text:span text:style-name="T462">e</text:span><text:bookmark-end text:name="_Hlt148644525"/><text:bookmark-end text:name="_Hlt148644526"/><text:span text:style-name="T463">soo.</text:span><text:bookmark-start text:name="_Hlt148644223"/><text:bookmark-start text:name="_Hlt148644224"/><text:span text:style-name="T464">k</text:span><text:bookmark-end text:name="_Hlt148644223"/><text:bookmark-end text:name="_Hlt148644224"/><text:span text:style-name="T465">im/pubs/2016/jain:opensgx.pdf</text:span></text:a><text:span text:style-name="T466">, Junho.</text:span><text:bookmark-end text:name="_Ref148643921"/></text:p>
        </text:list-item>
        <text:list-item>
          <text:p text:style-name="P467"><text:bookmark-start text:name="_Ref148644037"/>[Prerit Jain, Soham Desai, Seongmin Kim, Ming-Wei Shih<text:span text:style-name="T468">,</text:span><text:s/>JaeHyuk Leek, Changho Choi<text:span text:style-name="T469">,</text:span><text:s/>Youjung Shin<text:span text:style-name="T470">,</text:span><text:s/>Taesoo Kim<text:span text:style-name="T471">,</text:span><text:s/>Brent Byunghoon Kang<text:span text:style-name="T472">,</text:span><text:s/>Dongsu Han<text:span text:style-name="T473"><text:s/></text:span>2016].<text:s/><text:span text:style-name="T474">OpenSGX: An Open Platform for SGX Research, Implementations, Drawbacks.<text:s/></text:span><text:a xlink:href="https://medium.com/geekculture/trusted-execution-environment-tee-implementations-drawbacks-8a434301d679" office:target-frame-name="_top" xlink:show="replace"><text:span text:style-name="T475">https://medium.com/geekculture/trusted-execution-environment-tee-implementations-drawbacks-</text:span><text:bookmark-start text:name="_Hlt148644516"/><text:bookmark-start text:name="_Hlt148644517"/><text:span text:style-name="T476">8</text:span><text:bookmark-end text:name="_Hlt148644516"/><text:bookmark-end text:name="_Hlt148644517"/><text:span text:style-name="T477">a434301d679</text:span></text:a><text:span text:style-name="T478">, Junho.</text:span><text:bookmark-end text:name="_Ref148644037"/></text:p>
        </text:list-item>
        <text:list-item>
          <text:p text:style-name="P479"><text:bookmark-start text:name="_Ref148644073"/>[A. Baumann, M. Peinado, and G. Hunt 2014]. Shielding applications from an untrusted cloud with haven. In Proceedings of the 11th Symposium on Operating Systems 15 Design and Implementation (OSDI), pages 267–283, Broomfield, Colorado, Outubro.<text:bookmark-end text:name="_Ref148644073"/></text:p>
        </text:list-item>
        <text:list-item>
          <text:p text:style-name="P480"><text:bookmark-start text:name="_Ref148644708"/><text:span text:style-name="T481">[Tobias Konopik</text:span><text:span text:style-name="T482"><text:s/></text:span><text:span text:style-name="T483">2023]. Securing Whole Applications with SGX.<text:s/></text:span><text:a xlink:href="https://sys.cs.fau.de/extern/lehre/ws22/akss/material/gramine-scone.pdf" office:target-frame-name="_top" xlink:show="replace"><text:span text:style-name="Hiperligação">https://sys.cs.fau.de/extern/lehre/ws22/akss/material/gramine-scone.pdf</text:span></text:a>, Janeiro.<text:bookmark-end text:name="_Ref148644708"/></text:p>
        </text:list-item>
        <text:list-item>
          <text:p text:style-name="P484"><text:bookmark-start text:name="_Ref148901522"/><text:span text:style-name="T485">[Katherine Druckman, Mona Vij</text:span><text:span text:style-name="T486"><text:s/></text:span><text:span text:style-name="T487">2023]. Securing Applications with Gramine.<text:s/></text:span><text:a xlink:href="https://www.intel.com/content/www/us/en/developer/articles/community/securing-applications-with-gramine.html?wapkw=Gramine%20SGX" office:target-frame-name="_top" xlink:show="replace"><text:span text:style-name="Hiperligação">https://www.intel.com/content/www/us/en/deve</text:span><text:bookmark-start text:name="_Hlt149264380"/><text:bookmark-start text:name="_Hlt149264381"/><text:span text:style-name="Hiperligação">l</text:span><text:bookmark-end text:name="_Hlt149264380"/><text:bookmark-end text:name="_Hlt149264381"/><text:span text:style-name="Hiperligação">oper/articles/community/securing-applications-with-gramine.html?wapkw=Gramine%20SGX</text:span></text:a>.<text:bookmark-end text:name="_Ref148901522"/></text:p>
        </text:list-item>
        <text:list-item>
          <text:p text:style-name="P488"><text:bookmark-start text:name="_Ref150119837"/><text:span text:style-name="T489">Intel Corporation (2015</text:span><text:span text:style-name="T490">). Intel Software Guard Extensions (Intel SGX).<text:s/></text:span><text:a xlink:href="https://community.intel.com/legacyfs/online/drupal_files/332680-002.pdf" office:target-frame-name="_top" xlink:show="replace"><text:span text:style-name="T491">https://community.intel.com/legacyfs/online/drupal_files/332680-002.pdf</text:span></text:a><text:span text:style-name="T492">, Junho.</text:span><text:bookmark-end text:name="_Ref150119837"/></text:p>
        </text:list-item>
        <text:list-item>
          <text:p text:style-name="P493"><text:span text:style-name="T494">SGX 101 (2019). Bootstrap SGX – Enclave.<text:s/></text:span><text:a xlink:href="https://sgx101.gitbook.io/sgx101/sgx-bootstrap/enclave" office:target-frame-name="_top" xlink:show="replace"><text:span text:style-name="T495">https://sgx101.gitbook.io/sgx101/sgx-bootstrap/enclave</text:span></text:a><text:span text:style-name="T496">. Outubro.<text:s/></text:span></text:p>
        </text:list-item>
        <text:list-item>
          <text:p text:style-name="P497"><text:span text:style-name="T498">SGX 101 (2019). Bootstrap SGX – Enclave.<text:s/></text:span><text:a xlink:href="https://sgx101.gitbook.io/sgx101/sgx-bootstrap/enclave" office:target-frame-name="_top" xlink:show="replace"><text:span text:style-name="T499">https://sgx101.gitbook.io/sgx101/sgx-bootstrap/enclave</text:span></text:a><text:span text:style-name="T500">. Outubro.<text:s/></text:span></text:p>
        </text:list-item>
        <text:list-item>
          <text:p text:style-name="P501"><text:bookmark-start text:name="_Ref150132981"/><text:span text:style-name="T502">[Goran Jevtic 2021]. What is Intel SGX and What are the Benefits?<text:s/></text:span><text:a xlink:href="https://phoenixnap.com/kb/intel-sgx" office:target-frame-name="_top" xlink:show="replace"><text:span text:style-name="T503">https://phoenixnap.com/kb/intel-sgx</text:span></text:a><text:span text:style-name="T504">. Julho.</text:span><text:bookmark-end text:name="_Ref150132981"/><text:span text:style-name="T505"><text:s/></text:span></text:p>
        </text:list-item>
        <text:list-item>
          <text:p text:style-name="P506"><text:bookmark-start text:name="_Ref150144037"/><text:span text:style-name="T507">[</text:span><text:span text:style-name="T508">L. McVoy, C. Staelin 1996]. lmbench: Portable tools for performance analysis. In Proceedings of the USENIX Annual Technical Conference, p</text:span><text:span text:style-name="T509">áginas</text:span><text:span text:style-name="T510"><text:s/>23–23.</text:span><text:bookmark-start text:name="_Ref150134218"/><text:bookmark-end text:name="_Ref150144037"/></text:p>
        </text:list-item>
        <text:list-item>
          <text:p text:style-name="P511"><text:bookmark-start text:name="_Ref150144105"/><text:span text:style-name="T512">[</text:span>Chia-Che Tsai, Donald E. Porter, Mona Vij 2017].<text:bookmark-end text:name="_Ref150134218"/><text:s/><text:span text:style-name="T513">Graphene-SGX: A Practical Library OS for Unmodified Applications on SGX.<text:s/></text:span><text:a xlink:href="https://www.usenix.org/system/files/conference/atc17/atc17-tsai.pdf" office:target-frame-name="_top" xlink:show="replace"><text:span text:style-name="Hiperligação">https://www.usenix.org/system/files/conference/atc17/atc17-tsai.pdf</text:span></text:a><text:span text:style-name="Tipodeletrapredefinidodoparágrafo">.<text:s/></text:span><text:span text:style-name="Tipodeletrapredefinidodoparágrafo"><text:line-break/></text:span><text:span text:style-name="T514">Julho.</text:span><text:bookmark-end text:name="_Ref15014410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podeletrapredefinidodoparágrafo" style:display-name="Tipo de letra predefinido do parágrafo" style:family="text"/>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1.4729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Ref.denotaderodapé" style:display-name="Ref. de nota de rodapé" style:family="text" style:parent-style-name="Tipodeletrapredefinidodoparágrafo">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Revision" style:display-name="Revision" style:family="paragraph">
      <style:paragraph-properties fo:widows="2" fo:orphans="2" style:vertical-align="auto"/>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otnoteReference" style:display-name="Footnote Reference" style:family="text" style:parent-style-name="DefaultParagraphFont">
      <style:text-properties style:text-position="super 66.6%"/>
    </style: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SBCnumberlist" style:display-name="SBC:number:list">
      <text:list-level-style-bullet text:level="1" text:style-name="WW_CharLFO1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1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1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1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1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1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1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1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8">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224" xlink:href="media/image5.png" xlink:show="embed" xlink:actuate="onLoad"/>
    <draw:fill-image draw:name="a330" xlink:href="media/image6.png" xlink:show="embed" xlink:actuate="onLoad"/>
    <draw:fill-image draw:name="a192" xlink:href="media/image6.png" xlink:show="embed" xlink:actuate="onLoad"/>
    <draw:fill-image draw:name="a226" xlink:href="media/image6.png" xlink:show="embed" xlink:actuate="onLoad"/>
    <draw:fill-image draw:name="a195" xlink:href="media/image7.png" xlink:show="embed" xlink:actuate="onLoad"/>
    <draw:fill-image draw:name="a198" xlink:href="media/image6.png" xlink:show="embed" xlink:actuate="onLoad"/>
    <draw:fill-image draw:name="a250" xlink:href="media/image7.png" xlink:show="embed" xlink:actuate="onLoad"/>
    <draw:fill-image draw:name="a183" xlink:href="media/image7.png" xlink:show="embed" xlink:actuate="onLoad"/>
    <draw:fill-image draw:name="a252" xlink:href="media/image6.png" xlink:show="embed" xlink:actuate="onLoad"/>
    <draw:fill-image draw:name="a186" xlink:href="media/image6.png" xlink:show="embed" xlink:actuate="onLoad"/>
    <draw:fill-image draw:name="a256" xlink:href="media/image7.png" xlink:show="embed" xlink:actuate="onLoad"/>
    <draw:fill-image draw:name="a293" xlink:href="media/image7.png" xlink:show="embed" xlink:actuate="onLoad"/>
    <draw:fill-image draw:name="a189" xlink:href="media/image7.png" xlink:show="embed" xlink:actuate="onLoad"/>
    <draw:fill-image draw:name="a295" xlink:href="media/image8.png" xlink:show="embed" xlink:actuate="onLoad"/>
    <draw:fill-image draw:name="a201" xlink:href="media/image7.png" xlink:show="embed" xlink:actuate="onLoad"/>
    <draw:fill-image draw:name="a259" xlink:href="media/image6.png" xlink:show="embed" xlink:actuate="onLoad"/>
    <draw:fill-image draw:name="a328" xlink:href="media/image5.png" xlink:show="embed" xlink:actuate="onLoad"/>
    <draw:fill-image draw:name="a240" xlink:href="media/image6.png" xlink:show="embed" xlink:actuate="onLoad"/>
    <draw:fill-image draw:name="a205" xlink:href="media/image6.png" xlink:show="embed" xlink:actuate="onLoad"/>
    <draw:fill-image draw:name="a299" xlink:href="media/image7.png" xlink:show="embed" xlink:actuate="onLoad"/>
    <draw:fill-image draw:name="a244" xlink:href="media/image7.png" xlink:show="embed" xlink:actuate="onLoad"/>
    <draw:fill-image draw:name="a246" xlink:href="media/image6.png" xlink:show="embed" xlink:actuate="onLoad"/>
    <draw:fill-image draw:name="a287" xlink:href="media/image7.png" xlink:show="embed" xlink:actuate="onLoad"/>
    <draw:fill-image draw:name="a289" xlink:href="media/image8.png" xlink:show="embed" xlink:actuate="onLoad"/>
    <draw:fill-image draw:name="a301" xlink:href="media/image8.png" xlink:show="embed" xlink:actuate="onLoad"/>
    <draw:fill-image draw:name="a305" xlink:href="media/image7.png" xlink:show="embed" xlink:actuate="onLoad"/>
    <draw:fill-image draw:name="a238" xlink:href="media/image7.png" xlink:show="embed" xlink:actuate="onLoad"/>
    <draw:fill-image draw:name="a275" xlink:href="media/image6.png" xlink:show="embed" xlink:actuate="onLoad"/>
    <draw:fill-image draw:name="a308" xlink:href="media/image8.png" xlink:show="embed" xlink:actuate="onLoad"/>
    <draw:fill-image draw:name="a277" xlink:href="media/image5.png" xlink:show="embed" xlink:actuate="onLoad"/>
    <draw:marker draw:name="a51" svg:viewBox="0 0 20 30" svg:d="m10 0-10 30h20z"/>
    <draw:marker draw:name="a169" svg:viewBox="0 0 20 30" svg:d="m10 0-10 30h20z"/>
    <draw:marker draw:name="a133" svg:viewBox="0 0 20 30" svg:d="m10 0-10 30h20z"/>
    <draw:marker draw:name="a53" svg:viewBox="0 0 20 30" svg:d="m10 0-10 30h20z"/>
    <draw:marker draw:name="a54" svg:viewBox="0 0 20 30" svg:d="m10 0-10 30h20z"/>
    <draw:marker draw:name="a137" svg:viewBox="0 0 20 30" svg:d="m10 0-10 30h20z"/>
    <draw:marker draw:name="a56" svg:viewBox="0 0 20 30" svg:d="m10 0-10 30h20z"/>
    <draw:marker draw:name="a101" svg:viewBox="0 0 20 30" svg:d="m10 0-10 30h20z"/>
    <draw:marker draw:name="a21" svg:viewBox="0 0 20 30" svg:d="m10 0-10 30h20z"/>
    <draw:marker draw:name="a139" svg:viewBox="0 0 20 30" svg:d="m10 0-10 30h20z"/>
    <draw:marker draw:name="a58" svg:viewBox="0 0 20 30" svg:d="m10 0-10 30h20z"/>
    <draw:marker draw:name="a103" svg:viewBox="0 0 20 30" svg:d="m10 0-10 30h20z"/>
    <draw:marker draw:name="a105" svg:viewBox="0 0 20 30" svg:d="m10 0-10 30h20z"/>
    <draw:marker draw:name="a107" svg:viewBox="0 0 20 30" svg:d="m10 0-10 30h20z"/>
    <draw:marker draw:name="a28" svg:viewBox="0 0 20 30" svg:d="m10 0-10 30h20z"/>
    <draw:marker draw:name="a109" svg:viewBox="0 0 20 30" svg:d="m10 0-10 30h20z"/>
    <draw:marker draw:name="a2" svg:viewBox="0 0 20 30" svg:d="m10 0-10 30h20z"/>
    <draw:marker draw:name="a4" svg:viewBox="0 0 20 30" svg:d="m10 0-10 30h20z"/>
    <draw:marker draw:name="a9" svg:viewBox="0 0 20 30" svg:d="m10 0-10 30h20z"/>
    <draw:marker draw:name="a171" svg:viewBox="0 0 20 30" svg:d="m10 0-10 30h20z"/>
    <draw:marker draw:name="a48" svg:viewBox="0 0 20 30" svg:d="m10 0-10 30h20z"/>
    <draw:marker draw:name="a173" svg:viewBox="0 0 20 30" svg:d="m10 0-10 30h20z"/>
    <draw:marker draw:name="a129" svg:viewBox="0 0 20 30" svg:d="m10 0-10 30h20z"/>
    <draw:marker draw:name="a15" svg:viewBox="0 0 20 30" svg:d="m10 0-10 30h20z"/>
    <draw:marker draw:name="a141" svg:viewBox="0 0 20 30" svg:d="m10 0-10 30h20z"/>
    <draw:marker draw:name="a30" svg:viewBox="0 0 20 30" svg:d="m10 0-10 30h20z"/>
    <draw:marker draw:name="a162" svg:viewBox="0 0 20 30" svg:d="m10 0-10 30h20z"/>
    <draw:marker draw:name="a164" svg:viewBox="0 0 20 30" svg:d="m10 0-10 30h20z"/>
    <draw:marker draw:name="a166" svg:viewBox="0 0 20 30" svg:d="m10 0-10 30h20z"/>
    <draw:marker draw:name="a50" svg:viewBox="0 0 20 30" svg:d="m10 0-10 30h20z"/>
    <draw:marker draw:name="a131" svg:viewBox="0 0 20 30" svg:d="m10 0-10 30h20z"/>
    <draw:stroke-dash draw:name="a98" draw:style="rect" draw:dots1="1" draw:dots1-length="0.02083in" draw:distance="0.02083in"/>
    <draw:stroke-dash draw:name="a135" draw:style="rect" draw:dots1="1" draw:dots1-length="0.01389in" draw:distance="0.01389in"/>
    <draw:stroke-dash draw:name="a92" draw:style="rect" draw:dots1="1" draw:dots1-length="0.02083in" draw:distance="0.02083in"/>
    <draw:stroke-dash draw:name="a94" draw:style="rect" draw:dots1="1" draw:dots1-length="0.02083in" draw:distance="0.02083in"/>
    <draw:stroke-dash draw:name="a143" draw:style="rect" draw:dots1="1" draw:dots1-length="0.02083in" draw:distance="0.02083in"/>
    <draw:stroke-dash draw:name="a96" draw:style="rect" draw:dots1="1" draw:dots1-length="0.02083in" draw:distance="0.02083in"/>
  </office:styles>
  <office:automatic-styles>
    <text:list-style style:name="LFO12">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number text:level="1" text:style-name="WW_CharLFO22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ustavo Borges</meta:initial-creator>
    <dc:creator>Dalton Tavares</dc:creator>
    <meta:creation-date>2023-11-06T11:15:00Z</meta:creation-date>
    <dc:date>2023-11-20T11:10:00Z</dc:date>
    <meta:template xlink:href="Normal" xlink:type="simple"/>
    <meta:editing-cycles>31</meta:editing-cycles>
    <meta:editing-duration>PT1020S</meta:editing-duration>
    <meta:user-defined meta:name="Info 1"/>
    <meta:user-defined meta:name="Info 2"/>
    <meta:user-defined meta:name="Info 3"/>
    <meta:user-defined meta:name="Info 4"/>
    <meta:document-statistic meta:page-count="16" meta:paragraph-count="76" meta:word-count="6011" meta:character-count="38395" meta:row-count="270" meta:non-whitespace-character-count="32460"/>
  </office:meta>
</office:document-meta>
</file>