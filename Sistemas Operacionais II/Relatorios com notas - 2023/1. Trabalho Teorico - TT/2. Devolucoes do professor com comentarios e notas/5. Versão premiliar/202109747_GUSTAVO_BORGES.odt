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png" manifest:media-type="image/png"/>
  <manifest:file-entry manifest:full-path="media/image4.e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3">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3">
      <text:list-level-style-number text:level="1" text:style-name="WW_CharLFO23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P1" style:parent-style-name="SBCtitle" style:master-page-name="MP0" style:family="paragraph">
      <style:paragraph-properties fo:break-before="page"/>
    </style:style>
    <style:style style:name="T2" style:parent-style-name="CommentReference" style:family="text">
      <style:text-properties style:font-name="Bitstream Vera Serif" style:font-name-asian="Bitstream Vera Sans" style:font-name-complex="Lucidasans" fo:font-weight="normal" style:font-weight-asian="normal"/>
    </style:style>
    <style:style style:name="T3" style:parent-style-name="Tipodeletrapredefinidodoparágrafo" style:family="text">
      <style:text-properties style:text-position="super 66.6%"/>
    </style:style>
    <style:style style:name="T4" style:parent-style-name="Tipodeletrapredefinidodoparágrafo" style:family="text">
      <style:text-properties style:text-position="super 66.6%"/>
    </style:style>
    <style:style style:name="P5" style:parent-style-name="SBCresumo" style:family="paragraph">
      <style:paragraph-properties fo:margin-left="0in">
        <style:tab-stops/>
      </style:paragraph-properties>
    </style:style>
    <style:style style:name="T6" style:parent-style-name="Tipodeletrapredefinidodoparágrafo" style:family="text">
      <style:text-properties fo:font-weight="bold" style:font-weight-asian="bold" style:font-weight-complex="bold"/>
    </style:style>
    <style:style style:name="T7" style:parent-style-name="CommentReference" style:family="text">
      <style:text-properties style:font-name="Bitstream Vera Serif" style:font-name-asian="Bitstream Vera Sans" style:font-name-complex="Lucidasans" fo:font-style="normal" style:font-style-asian="normal"/>
    </style:style>
    <style:style style:name="T8" style:parent-style-name="Tipodeletrapredefinidodoparágrafo" style:family="text">
      <style:text-properties fo:font-weight="bold" style:font-weight-asian="bold" style:font-weight-complex="bold"/>
    </style:style>
    <style:style style:name="T9" style:parent-style-name="CommentReference" style:family="text">
      <style:text-properties style:font-name="Bitstream Vera Serif" style:font-name-asian="Bitstream Vera Sans" style:font-name-complex="Lucidasans" fo:font-style="normal" style:font-style-asian="normal"/>
    </style:style>
    <style:style style:name="P10" style:parent-style-name="SBCtitle1" style:list-style-name="Outline" style:family="paragraph"/>
    <style:style style:name="P11" style:parent-style-name="SBCparagraph" style:family="paragraph">
      <style:paragraph-properties fo:text-indent="0.1972in"/>
    </style:style>
    <style:style style:name="T12" style:parent-style-name="Tipodeletrapredefinidodoparágrafo" style:family="text">
      <style:text-properties fo:color="#0070C0"/>
    </style:style>
    <style:style style:name="T13" style:parent-style-name="CommentReference" style:family="text">
      <style:text-properties style:font-name="Bitstream Vera Serif" style:font-name-asian="Bitstream Vera Sans" style:font-name-complex="Lucidasans" style:use-window-font-color="true"/>
    </style:style>
    <style:style style:name="P14" style:parent-style-name="SBCparagraph" style:family="paragraph">
      <style:paragraph-properties fo:text-indent="0.1972in"/>
    </style:style>
    <style:style style:name="T15" style:parent-style-name="Tipodeletrapredefinidodoparágrafo" style:family="text">
      <style:text-properties fo:color="#0070C0"/>
    </style:style>
    <style:style style:name="P16" style:parent-style-name="SBCparagraph" style:family="paragraph">
      <style:paragraph-properties fo:text-indent="0.1972in"/>
    </style:style>
    <style:style style:name="T17" style:parent-style-name="Tipodeletrapredefinidodoparágrafo" style:family="text">
      <style:text-properties fo:color="#0070C0"/>
    </style:style>
    <style:style style:name="T18" style:parent-style-name="Tipodeletrapredefinidodoparágrafo" style:family="text">
      <style:text-properties fo:color="#0070C0"/>
    </style:style>
    <style:style style:name="T19" style:parent-style-name="Tipodeletrapredefinidodoparágrafo" style:family="text">
      <style:text-properties fo:color="#0070C0"/>
    </style:style>
    <style:style style:name="T20" style:parent-style-name="Tipodeletrapredefinidodoparágrafo" style:family="text">
      <style:text-properties fo:color="#0070C0"/>
    </style:style>
    <style:style style:name="T21" style:parent-style-name="Tipodeletrapredefinidodoparágrafo" style:family="text">
      <style:text-properties fo:color="#0070C0"/>
    </style:style>
    <style:style style:name="P22" style:parent-style-name="SBCparagraph" style:family="paragraph">
      <style:paragraph-properties fo:text-indent="0.1972in"/>
    </style:style>
    <style:style style:name="P23" style:parent-style-name="SBCparagraph" style:family="paragraph">
      <style:paragraph-properties fo:text-indent="0.1972in"/>
    </style:style>
    <style:style style:name="T24" style:parent-style-name="Tipodeletrapredefinidodoparágrafo" style:family="text">
      <style:text-properties fo:color="#0070C0"/>
    </style:style>
    <style:style style:name="P25" style:parent-style-name="SBCparagraph" style:family="paragraph">
      <style:paragraph-properties fo:text-indent="0.1972in"/>
    </style:style>
    <style:style style:name="P26" style:parent-style-name="SBCparagraph" style:family="paragraph">
      <style:paragraph-properties fo:text-indent="0.1972in"/>
    </style:style>
    <style:style style:name="T27" style:parent-style-name="Tipodeletrapredefinidodoparágrafo" style:family="text">
      <style:text-properties fo:color="#0070C0"/>
    </style:style>
    <style:style style:name="P28" style:parent-style-name="SBCparagraph" style:family="paragraph">
      <style:paragraph-properties fo:text-indent="0.1972in"/>
    </style:style>
    <style:style style:name="T29" style:parent-style-name="Tipodeletrapredefinidodoparágrafo" style:family="text">
      <style:text-properties fo:color="#0070C0"/>
    </style:style>
    <style:style style:name="T30" style:parent-style-name="Tipodeletrapredefinidodoparágrafo" style:family="text">
      <style:text-properties fo:color="#0070C0"/>
    </style:style>
    <style:style style:name="T31" style:parent-style-name="Tipodeletrapredefinidodoparágrafo" style:family="text">
      <style:text-properties fo:color="#0070C0"/>
    </style:style>
    <style:style style:name="T32" style:parent-style-name="Tipodeletrapredefinidodoparágrafo" style:family="text">
      <style:text-properties fo:color="#0070C0"/>
    </style:style>
    <style:style style:name="T33" style:parent-style-name="Tipodeletrapredefinidodoparágrafo" style:family="text">
      <style:text-properties fo:color="#0070C0"/>
    </style:style>
    <style:style style:name="P34" style:parent-style-name="SBCparagraph" style:family="paragraph">
      <style:paragraph-properties fo:text-indent="0.1972in"/>
    </style:style>
    <style:style style:name="T35" style:parent-style-name="Tipodeletrapredefinidodoparágrafo" style:family="text">
      <style:text-properties style:font-name="Calibri"/>
    </style:style>
    <style:style style:name="T36" style:parent-style-name="Tipodeletrapredefinidodoparágrafo" style:family="text">
      <style:text-properties fo:color="#0070C0"/>
    </style:style>
    <style:style style:name="T37" style:parent-style-name="Tipodeletrapredefinidodoparágrafo" style:family="text">
      <style:text-properties fo:color="#0070C0"/>
    </style:style>
    <style:style style:name="T38" style:parent-style-name="Tipodeletrapredefinidodoparágrafo" style:family="text">
      <style:text-properties fo:color="#0070C0"/>
    </style:style>
    <style:style style:name="T39" style:parent-style-name="Tipodeletrapredefinidodoparágrafo" style:family="text">
      <style:text-properties fo:color="#0070C0"/>
    </style:style>
    <style:style style:name="T40" style:parent-style-name="Tipodeletrapredefinidodoparágrafo" style:family="text">
      <style:text-properties fo:color="#0070C0"/>
    </style:style>
    <style:style style:name="T41" style:parent-style-name="Tipodeletrapredefinidodoparágrafo" style:family="text">
      <style:text-properties fo:color="#0070C0"/>
    </style:style>
    <style:style style:name="T42" style:parent-style-name="Tipodeletrapredefinidodoparágrafo" style:family="text">
      <style:text-properties fo:color="#0070C0"/>
    </style:style>
    <style:style style:name="P43" style:parent-style-name="SBCparagraph" style:family="paragraph">
      <style:paragraph-properties fo:text-indent="0.1972in"/>
    </style:style>
    <style:style style:name="P44" style:parent-style-name="SBCparagraph" style:family="paragraph">
      <style:paragraph-properties fo:text-indent="0.1972in"/>
    </style:style>
    <style:style style:name="P45" style:parent-style-name="SBCparagraph" style:family="paragraph">
      <style:paragraph-properties fo:text-indent="0.1972in"/>
    </style:style>
    <style:style style:name="T46" style:parent-style-name="DefaultParagraphFont" style:family="text">
      <style:text-properties style:font-name="Times New Roman"/>
    </style:style>
    <style:style style:name="P47" style:parent-style-name="SBCtitle1" style:list-style-name="Outline" style:family="paragraph"/>
    <style:style style:name="T48" style:parent-style-name="CommentReference" style:family="text">
      <style:text-properties style:font-name="Bitstream Vera Serif" style:font-name-asian="Bitstream Vera Sans" style:font-name-complex="Lucidasans" fo:font-weight="normal" style:font-weight-asian="normal"/>
    </style:style>
    <style:style style:name="P49" style:parent-style-name="SBCparagraphfirst" style:family="paragraph">
      <style:paragraph-properties fo:text-indent="0.1972in"/>
    </style:style>
    <style:style style:name="P50" style:parent-style-name="SBCparagraph" style:family="paragraph">
      <style:paragraph-properties fo:text-indent="0.1972in"/>
    </style:style>
    <style:style style:name="T51" style:parent-style-name="Tipodeletrapredefinidodoparágrafo" style:family="text">
      <style:text-properties fo:color="#4472C4"/>
    </style:style>
    <style:style style:name="P52" style:parent-style-name="SBCparagraph" style:family="paragraph">
      <style:paragraph-properties fo:text-indent="0.1972in"/>
    </style:style>
    <style:style style:name="P53" style:parent-style-name="SBCtitle1" style:list-style-name="Outline" style:family="paragraph"/>
    <style:style style:name="T54" style:parent-style-name="CommentReference" style:family="text">
      <style:text-properties style:font-name="Bitstream Vera Serif" style:font-name-asian="Bitstream Vera Sans" style:font-name-complex="Lucidasans" fo:font-weight="normal" style:font-weight-asian="normal"/>
    </style:style>
    <style:style style:name="P55" style:parent-style-name="SBCparagraph" style:family="paragraph">
      <style:paragraph-properties fo:text-indent="0.1972in"/>
    </style:style>
    <style:style style:name="P56" style:parent-style-name="SBCparagraph" style:family="paragraph">
      <style:paragraph-properties fo:text-indent="0.1972in"/>
    </style:style>
    <style:style style:name="T57" style:parent-style-name="Tipodeletrapredefinidodoparágrafo" style:family="text">
      <style:text-properties fo:color="#4472C4"/>
    </style:style>
    <style:style style:name="P58" style:parent-style-name="SBCparagraph" style:family="paragraph">
      <style:paragraph-properties fo:text-indent="0.1972in"/>
    </style:style>
    <style:style style:name="P59" style:parent-style-name="SBCparagraph" style:family="paragraph">
      <style:paragraph-properties fo:text-indent="0.1972in"/>
    </style:style>
    <style:style style:name="T60" style:parent-style-name="Tipodeletrapredefinidodoparágrafo" style:family="text">
      <style:text-properties style:font-name="Calibri"/>
    </style:style>
    <style:style style:name="T61" style:parent-style-name="Tipodeletrapredefinidodoparágrafo" style:family="text">
      <style:text-properties fo:color="#4472C4"/>
    </style:style>
    <style:style style:name="P62" style:parent-style-name="SBCparagraph" style:family="paragraph">
      <style:paragraph-properties fo:text-indent="0.1972in"/>
    </style:style>
    <style:style style:name="P63" style:parent-style-name="SBCtitle1" style:list-style-name="Outline" style:family="paragraph"/>
    <style:style style:name="T64" style:parent-style-name="CommentReference" style:family="text">
      <style:text-properties style:font-name="Bitstream Vera Serif" style:font-name-asian="Bitstream Vera Sans" style:font-name-complex="Lucidasans" fo:font-weight="normal" style:font-weight-asian="normal"/>
    </style:style>
    <style:style style:name="P65" style:parent-style-name="SBCparagraph" style:family="paragraph">
      <style:paragraph-properties fo:text-indent="0.1972in"/>
    </style:style>
    <style:style style:name="T66" style:parent-style-name="Tipodeletrapredefinidodoparágrafo" style:family="text">
      <style:text-properties fo:color="#4472C4"/>
    </style:style>
    <style:style style:name="T67" style:parent-style-name="Tipodeletrapredefinidodoparágrafo" style:family="text">
      <style:text-properties style:font-name="Calibri" fo:color="#4472C4"/>
    </style:style>
    <style:style style:name="T68" style:parent-style-name="Tipodeletrapredefinidodoparágrafo" style:family="text">
      <style:text-properties style:font-name="Calibri" fo:color="#4472C4"/>
    </style:style>
    <style:style style:name="P69" style:parent-style-name="SBCtitle2" style:list-style-name="Outline" style:family="paragraph"/>
    <style:style style:name="P70" style:parent-style-name="SBCparagraphfirst" style:family="paragraph">
      <style:paragraph-properties fo:text-indent="0.1972in"/>
    </style:style>
    <style:style style:name="T71" style:parent-style-name="Tipodeletrapredefinidodoparágrafo" style:family="text">
      <style:text-properties fo:color="#4472C4"/>
    </style:style>
    <style:style style:name="T72" style:parent-style-name="Tipodeletrapredefinidodoparágrafo" style:family="text">
      <style:text-properties style:font-name="Calibri" fo:color="#4472C4"/>
    </style:style>
    <style:style style:name="T73" style:parent-style-name="Tipodeletrapredefinidodoparágrafo" style:family="text">
      <style:text-properties style:font-name="Calibri" fo:color="#4472C4"/>
    </style:style>
    <style:style style:name="P74" style:parent-style-name="SBCparagraph" style:list-style-name="LFO13" style:family="paragraph">
      <style:paragraph-properties fo:margin-left="0.4923in" fo:text-indent="-0.1965in">
        <style:tab-stops/>
      </style:paragraph-properties>
    </style:style>
    <style:style style:name="P75" style:parent-style-name="SBCparagraph" style:list-style-name="LFO13" style:family="paragraph">
      <style:paragraph-properties fo:margin-left="0.4923in" fo:text-indent="-0.1965in">
        <style:tab-stops/>
      </style:paragraph-properties>
    </style:style>
    <style:style style:name="P76" style:parent-style-name="SBCparagraph" style:list-style-name="LFO13" style:family="paragraph">
      <style:paragraph-properties fo:margin-left="0.4923in" fo:text-indent="-0.1965in">
        <style:tab-stops/>
      </style:paragraph-properties>
    </style:style>
    <style:style style:name="P77" style:parent-style-name="SBCparagraph" style:list-style-name="LFO13" style:family="paragraph">
      <style:paragraph-properties fo:margin-left="0.4923in" fo:text-indent="-0.1965in">
        <style:tab-stops/>
      </style:paragraph-properties>
    </style:style>
    <style:style style:name="P78" style:parent-style-name="SBCparagraph" style:family="paragraph">
      <style:paragraph-properties fo:text-align="center"/>
    </style:style>
    <style:style style:name="T79" style:parent-style-name="Tipodeletrapredefinidodoparágrafo" style:family="text">
      <style:text-properties fo:font-weight="bold" style:font-weight-asian="bold" style:font-weight-complex="bold"/>
    </style:style>
    <style:style style:name="P80" style:parent-style-name="SBCparagraph" style:family="paragraph">
      <style:paragraph-properties fo:text-align="center"/>
      <style:text-properties fo:font-weight="bold" style:font-weight-asian="bold" style:font-weight-complex="bold"/>
    </style:style>
    <style:style style:name="P81" style:parent-style-name="SBCtitle2" style:list-style-name="Outline" style:family="paragraph"/>
    <style:style style:name="P82" style:parent-style-name="SBCparagraphfirst" style:family="paragraph">
      <style:paragraph-properties fo:text-indent="0.1972in"/>
    </style:style>
    <style:style style:name="T83" style:parent-style-name="Tipodeletrapredefinidodoparágrafo" style:family="text">
      <style:text-properties fo:color="#4472C4"/>
    </style:style>
    <style:style style:name="T84" style:parent-style-name="Tipodeletrapredefinidodoparágrafo" style:family="text">
      <style:text-properties style:font-name="Calibri" fo:color="#4472C4"/>
    </style:style>
    <style:style style:name="T85" style:parent-style-name="Tipodeletrapredefinidodoparágrafo" style:family="text">
      <style:text-properties style:font-name="Calibri" fo:color="#4472C4"/>
    </style:style>
    <style:style style:name="P86" style:parent-style-name="SBCtitle2" style:list-style-name="Outline" style:family="paragraph"/>
    <style:style style:name="P87" style:parent-style-name="SBCparagraphfirst" style:family="paragraph">
      <style:paragraph-properties fo:text-indent="0.1972in"/>
    </style:style>
    <style:style style:name="T88" style:parent-style-name="Tipodeletrapredefinidodoparágrafo" style:family="text">
      <style:text-properties fo:color="#4472C4"/>
    </style:style>
    <style:style style:name="T89" style:parent-style-name="Tipodeletrapredefinidodoparágrafo" style:family="text">
      <style:text-properties style:font-name="Calibri" fo:color="#4472C4"/>
    </style:style>
    <style:style style:name="T90" style:parent-style-name="Tipodeletrapredefinidodoparágrafo" style:family="text">
      <style:text-properties style:font-name="Calibri" fo:color="#4472C4"/>
    </style:style>
    <style:style style:name="P91" style:parent-style-name="SBCtitle2" style:list-style-name="Outline" style:family="paragraph"/>
    <style:style style:name="P92" style:parent-style-name="SBCparagraphfirst" style:family="paragraph">
      <style:paragraph-properties fo:text-indent="0.1972in"/>
    </style:style>
    <style:style style:name="T93" style:parent-style-name="Tipodeletrapredefinidodoparágrafo" style:family="text">
      <style:text-properties fo:color="#4472C4"/>
    </style:style>
    <style:style style:name="T94" style:parent-style-name="Tipodeletrapredefinidodoparágrafo" style:family="text">
      <style:text-properties style:font-name="Calibri" fo:color="#4472C4"/>
    </style:style>
    <style:style style:name="T95" style:parent-style-name="Tipodeletrapredefinidodoparágrafo" style:family="text">
      <style:text-properties style:font-name="Calibri" fo:color="#4472C4"/>
    </style:style>
    <style:style style:name="P96" style:parent-style-name="SBCtitle2" style:list-style-name="Outline" style:family="paragraph"/>
    <style:style style:name="P97" style:parent-style-name="SBCparagraphfirst" style:family="paragraph">
      <style:paragraph-properties fo:text-indent="0.1972in"/>
    </style:style>
    <style:style style:name="T98" style:parent-style-name="Tipodeletrapredefinidodoparágrafo" style:family="text">
      <style:text-properties fo:color="#4472C4"/>
    </style:style>
    <style:style style:name="T99" style:parent-style-name="Tipodeletrapredefinidodoparágrafo" style:family="text">
      <style:text-properties style:font-name="Calibri" fo:color="#4472C4"/>
    </style:style>
    <style:style style:name="T100" style:parent-style-name="Tipodeletrapredefinidodoparágrafo" style:family="text">
      <style:text-properties style:font-name="Calibri" fo:color="#4472C4"/>
    </style:style>
    <style:style style:name="P101" style:parent-style-name="SBCparagraph" style:family="paragraph">
      <style:paragraph-properties fo:text-indent="0.1972in"/>
    </style:style>
    <style:style style:name="P102" style:parent-style-name="SBCparagraph" style:family="paragraph">
      <style:paragraph-properties fo:text-indent="0.1972in"/>
    </style:style>
    <style:style style:name="P103" style:parent-style-name="Normal" style:family="paragraph">
      <style:paragraph-properties fo:text-align="center"/>
      <style:text-properties fo:font-weight="bold" style:font-weight-asian="bold" style:font-weight-complex="bold" fo:color="#000000"/>
    </style:style>
    <style:style style:name="P104" style:parent-style-name="Normal" style:family="paragraph">
      <style:paragraph-properties fo:text-align="center"/>
    </style:style>
    <style:style style:name="T105" style:parent-style-name="Tipodeletrapredefinidodoparágrafo" style:family="text">
      <style:text-properties fo:font-weight="bold" style:font-weight-asian="bold" style:font-weight-complex="bold" fo:color="#000000"/>
    </style:style>
    <style:style style:name="P106" style:parent-style-name="Normal" style:family="paragraph">
      <style:paragraph-properties fo:text-align="center"/>
      <style:text-properties fo:font-weight="bold" style:font-weight-asian="bold" style:font-weight-complex="bold" fo:color="#000000"/>
    </style:style>
    <style:style style:name="P107" style:parent-style-name="Normal" style:family="paragraph">
      <style:paragraph-properties fo:text-align="center"/>
      <style:text-properties fo:font-weight="bold" style:font-weight-asian="bold" style:font-weight-complex="bold" fo:color="#000000"/>
    </style:style>
    <style:style style:name="P108" style:parent-style-name="Normal" style:family="paragraph">
      <style:paragraph-properties fo:text-align="center"/>
      <style:text-properties fo:font-weight="bold" style:font-weight-asian="bold" style:font-weight-complex="bold" fo:color="#000000"/>
    </style:style>
    <style:style style:name="P109" style:parent-style-name="Normal" style:family="paragraph">
      <style:paragraph-properties fo:text-align="center"/>
      <style:text-properties fo:font-weight="bold" style:font-weight-asian="bold" style:font-weight-complex="bold" fo:color="#000000"/>
    </style:style>
    <style:style style:name="P110" style:parent-style-name="Normal" style:family="paragraph">
      <style:text-properties fo:font-weight="bold" style:font-weight-asian="bold" style:font-weight-complex="bold" fo:color="#000000" fo:font-size="11pt" style:font-size-asian="11pt" style:font-size-complex="11pt"/>
    </style:style>
    <style:style style:name="P111" style:parent-style-name="Normal" style:family="paragraph">
      <style:paragraph-properties fo:text-align="center" fo:margin-bottom="0.1666in"/>
      <style:text-properties fo:font-weight="bold" style:font-weight-asian="bold" style:font-weight-complex="bold" fo:color="#000000"/>
    </style:style>
    <style:style style:name="P112" style:parent-style-name="Normal" style:family="paragraph">
      <style:paragraph-properties fo:text-align="center" fo:margin-bottom="0.1666in"/>
      <style:text-properties fo:font-weight="bold" style:font-weight-asian="bold" style:font-weight-complex="bold" fo:color="#000000"/>
    </style:style>
    <style:style style:name="P113" style:parent-style-name="Normal" style:family="paragraph">
      <style:paragraph-properties fo:text-align="center" fo:margin-bottom="0.1666in"/>
      <style:text-properties fo:font-weight="bold" style:font-weight-asian="bold" style:font-weight-complex="bold" fo:color="#000000"/>
    </style:style>
    <style:style style:name="P114" style:parent-style-name="Normal" style:family="paragraph">
      <style:paragraph-properties fo:text-align="center"/>
      <style:text-properties fo:font-weight="bold" style:font-weight-asian="bold" style:font-weight-complex="bold" fo:color="#FFFFFF" fo:font-size="11pt" style:font-size-asian="11pt" style:font-size-complex="11pt"/>
    </style:style>
    <style:style style:name="P115" style:parent-style-name="Normal" style:family="paragraph">
      <style:paragraph-properties fo:text-align="center"/>
      <style:text-properties fo:font-weight="bold" style:font-weight-asian="bold" style:font-weight-complex="bold" fo:color="#FFFFFF" fo:font-size="11pt" style:font-size-asian="11pt" style:font-size-complex="11pt"/>
    </style:style>
    <style:style style:name="P116" style:parent-style-name="Normal" style:family="paragraph">
      <style:text-properties fo:color="#000000"/>
    </style:style>
    <style:style style:name="P117" style:parent-style-name="Normal" style:family="paragraph">
      <style:text-properties fo:color="#000000"/>
    </style:style>
    <style:style style:name="P118" style:parent-style-name="Normal" style:family="paragraph">
      <style:text-properties fo:color="#000000"/>
    </style:style>
    <style:style style:name="P119" style:parent-style-name="Normal" style:family="paragraph">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P120" style:parent-style-name="Normal" style:family="paragraph">
      <style:text-properties fo:color="#000000" fo:font-size="9pt" style:font-size-asian="9pt" style:font-size-complex="9pt"/>
    </style:style>
    <style:style style:name="P121" style:parent-style-name="Normal" style:family="paragraph">
      <style:text-properties fo:color="#000000" fo:font-size="9pt" style:font-size-asian="9pt" style:font-size-complex="9pt"/>
    </style:style>
    <style:style style:name="P122" style:parent-style-name="Normal" style:family="paragraph">
      <style:text-properties fo:color="#000000" fo:font-size="9pt" style:font-size-asian="9pt" style:font-size-complex="9pt"/>
    </style:style>
    <style:style style:name="P123" style:parent-style-name="Normal" style:family="paragraph">
      <style:text-properties fo:color="#000000" fo:font-size="9pt" style:font-size-asian="9pt" style:font-size-complex="9pt"/>
    </style:style>
    <style:style style:name="P124" style:parent-style-name="Normal" style:family="paragraph">
      <style:text-properties fo:color="#000000" fo:font-size="9pt" style:font-size-asian="9pt" style:font-size-complex="9pt"/>
    </style:style>
    <style:style style:name="P125" style:parent-style-name="Normal" style:family="paragraph">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fo:language="en" fo:country="US"/>
    </style:style>
    <style:style style:name="P126" style:parent-style-name="Normal" style:family="paragraph">
      <style:text-properties fo:color="#000000" fo:font-size="9pt" style:font-size-asian="9pt" style:font-size-complex="9pt" fo:language="en" fo:country="US"/>
    </style:style>
    <style:style style:name="P127" style:parent-style-name="Normal" style:family="paragraph">
      <style:text-properties fo:color="#000000" fo:font-size="9pt" style:font-size-asian="9pt" style:font-size-complex="9pt" fo:language="en" fo:country="US"/>
    </style:style>
    <style:style style:name="P128" style:parent-style-name="Normal" style:family="paragraph">
      <style:text-properties fo:color="#000000" fo:font-size="9pt" style:font-size-asian="9pt" style:font-size-complex="9pt" fo:language="en" fo:country="US"/>
    </style:style>
    <style:style style:name="P129" style:parent-style-name="Normal" style:family="paragraph">
      <style:text-properties fo:color="#000000" fo:font-size="9pt" style:font-size-asian="9pt" style:font-size-complex="9pt" fo:language="en" fo:country="US"/>
    </style:style>
    <style:style style:name="P130" style:parent-style-name="Normal" style:family="paragraph">
      <style:text-properties fo:color="#000000" fo:font-size="9pt" style:font-size-asian="9pt" style:font-size-complex="9pt" fo:language="en" fo:country="US"/>
    </style:style>
    <style:style style:name="P131" style:parent-style-name="Normal" style:family="paragraph">
      <style:text-properties fo:color="#000000" fo:font-size="9pt" style:font-size-asian="9pt" style:font-size-complex="9pt" fo:language="en" fo:country="US"/>
    </style:style>
    <style:style style:name="P132" style:parent-style-name="Normal" style:family="paragraph">
      <style:text-properties fo:color="#000000" fo:font-size="9pt" style:font-size-asian="9pt" style:font-size-complex="9pt" fo:language="en" fo:country="US"/>
    </style:style>
    <style:style style:name="P133" style:parent-style-name="Normal" style:family="paragraph">
      <style:text-properties fo:color="#FFFFFF" fo:font-size="9pt" style:font-size-asian="9pt" style:font-size-complex="9pt"/>
    </style:style>
    <style:style style:name="T134" style:parent-style-name="Tipodeletrapredefinidodoparágrafo" style:family="text">
      <style:text-properties fo:color="#FFFFFF" fo:font-size="9pt" style:font-size-asian="9pt" style:font-size-complex="9pt"/>
    </style:style>
    <style:style style:name="T135" style:parent-style-name="Tipodeletrapredefinidodoparágrafo" style:family="text">
      <style:text-properties fo:color="#FFFFFF" fo:font-size="9pt" style:font-size-asian="9pt" style:font-size-complex="9pt"/>
    </style:style>
    <style:style style:name="P136" style:parent-style-name="Normal" style:family="paragraph">
      <style:text-properties fo:color="#000000" fo:font-size="9pt" style:font-size-asian="9pt" style:font-size-complex="9pt" fo:language="en" fo:country="US"/>
    </style:style>
    <style:style style:name="P137" style:parent-style-name="Normal" style:family="paragraph">
      <style:text-properties fo:color="#000000" fo:font-size="9pt" style:font-size-asian="9pt" style:font-size-complex="9pt" fo:language="en" fo:country="US"/>
    </style:style>
    <style:style style:name="P138" style:parent-style-name="Normal" style:family="paragraph">
      <style:text-properties fo:color="#000000" fo:font-size="9pt" style:font-size-asian="9pt" style:font-size-complex="9pt" fo:language="en" fo:country="US"/>
    </style:style>
    <style:style style:name="P139" style:parent-style-name="Normal" style:family="paragraph">
      <style:text-properties fo:font-weight="bold" style:font-weight-asian="bold" style:font-weight-complex="bold" fo:color="#000000" fo:font-size="9pt" style:font-size-asian="9pt" style:font-size-complex="9pt" fo:language="en" fo:country="US"/>
    </style:style>
    <style:style style:name="P140" style:parent-style-name="SBCparagraph" style:family="paragraph">
      <style:paragraph-properties fo:text-align="center"/>
      <style:text-properties fo:font-weight="bold" style:font-weight-asian="bold" style:font-weight-complex="bold"/>
    </style:style>
    <style:style style:name="P141" style:parent-style-name="SBCparagraph" style:family="paragraph">
      <style:paragraph-properties fo:text-indent="0.1972in"/>
    </style:style>
    <style:style style:name="P142" style:parent-style-name="SBCparagraph" style:family="paragraph">
      <style:paragraph-properties fo:text-indent="0.1972in"/>
    </style:style>
    <style:style style:name="P143" style:parent-style-name="SBCparagraph" style:family="paragraph">
      <style:paragraph-properties fo:text-indent="0.1972in"/>
    </style:style>
    <style:style style:name="P144" style:parent-style-name="SBCparagraph" style:family="paragraph">
      <style:paragraph-properties fo:text-indent="0.1972in"/>
    </style:style>
    <style:style style:name="P145" style:parent-style-name="SBCtitle2" style:list-style-name="Outline" style:family="paragraph"/>
    <style:style style:name="P146" style:parent-style-name="SBCparagraphfirst" style:family="paragraph">
      <style:paragraph-properties fo:text-indent="0.1972in"/>
    </style:style>
    <style:style style:name="T147" style:parent-style-name="Tipodeletrapredefinidodoparágrafo" style:family="text">
      <style:text-properties fo:color="#4472C4"/>
    </style:style>
    <style:style style:name="T148" style:parent-style-name="Tipodeletrapredefinidodoparágrafo" style:family="text">
      <style:text-properties style:font-name="Calibri" fo:color="#4472C4"/>
    </style:style>
    <style:style style:name="T149" style:parent-style-name="Tipodeletrapredefinidodoparágrafo" style:family="text">
      <style:text-properties style:font-name="Calibri" fo:color="#4472C4"/>
    </style:style>
    <style:style style:name="P150" style:parent-style-name="SBCparagraph" style:family="paragraph">
      <style:paragraph-properties fo:text-align="center"/>
    </style:style>
    <style:style style:name="T151" style:parent-style-name="Tipodeletrapredefinidodoparágrafo" style:family="text">
      <style:text-properties fo:font-weight="bold" style:font-weight-asian="bold" style:font-weight-complex="bold"/>
    </style:style>
    <style:style style:name="P152" style:parent-style-name="SBCparagraphfirst" style:family="paragraph">
      <style:paragraph-properties fo:text-align="center" fo:text-indent="0.1972in"/>
    </style:style>
    <style:style style:name="P153" style:parent-style-name="SBCtitle2" style:list-style-name="Outline" style:family="paragraph"/>
    <style:style style:name="P154" style:parent-style-name="SBCparagraphfirst" style:family="paragraph">
      <style:paragraph-properties fo:text-indent="0.1972in"/>
    </style:style>
    <style:style style:name="T155" style:parent-style-name="Tipodeletrapredefinidodoparágrafo" style:family="text">
      <style:text-properties fo:color="#4472C4"/>
    </style:style>
    <style:style style:name="T156" style:parent-style-name="Tipodeletrapredefinidodoparágrafo" style:family="text">
      <style:text-properties style:font-name="Calibri" fo:color="#4472C4"/>
    </style:style>
    <style:style style:name="T157" style:parent-style-name="Tipodeletrapredefinidodoparágrafo" style:family="text">
      <style:text-properties style:font-name="Calibri" fo:color="#4472C4"/>
    </style:style>
    <style:style style:name="P158" style:parent-style-name="SBCparagraph" style:list-style-name="LFO14" style:family="paragraph">
      <style:text-properties style:font-name="Calibri"/>
    </style:style>
    <style:style style:name="P159" style:parent-style-name="SBCparagraph" style:list-style-name="LFO14" style:family="paragraph">
      <style:text-properties style:font-name="Calibri"/>
    </style:style>
    <style:style style:name="P160" style:parent-style-name="SBCparagraph" style:list-style-name="LFO14" style:family="paragraph">
      <style:text-properties style:font-name="Calibri"/>
    </style:style>
    <style:style style:name="P161" style:parent-style-name="SBCparagraph" style:list-style-name="LFO14" style:family="paragraph">
      <style:text-properties style:font-name="Calibri"/>
    </style:style>
    <style:style style:name="P162" style:parent-style-name="SBCparagraph" style:list-style-name="LFO14" style:family="paragraph">
      <style:text-properties style:font-name="Calibri"/>
    </style:style>
    <style:style style:name="P163" style:parent-style-name="SBCparagraph" style:list-style-name="LFO14" style:family="paragraph">
      <style:text-properties style:font-name="Calibri"/>
    </style:style>
    <style:style style:name="P164" style:parent-style-name="SBCparagraph" style:list-style-name="LFO14" style:family="paragraph">
      <style:text-properties style:font-name="Calibri"/>
    </style:style>
    <style:style style:name="P165" style:parent-style-name="SBCparagraph" style:list-style-name="LFO14" style:family="paragraph">
      <style:text-properties style:font-name="Calibri"/>
    </style:style>
    <style:style style:name="P166" style:parent-style-name="SBCparagraph" style:list-style-name="LFO14" style:family="paragraph">
      <style:text-properties style:font-name="Calibri"/>
    </style:style>
    <style:style style:name="P167" style:parent-style-name="SBCparagraph" style:list-style-name="LFO14" style:family="paragraph">
      <style:text-properties style:font-name="Calibri"/>
    </style:style>
    <style:style style:name="P168" style:parent-style-name="SBCparagraph" style:list-style-name="LFO14" style:family="paragraph">
      <style:text-properties style:font-name="Calibri"/>
    </style:style>
    <style:style style:name="P169" style:parent-style-name="SBCparagraph" style:list-style-name="LFO14" style:family="paragraph">
      <style:text-properties style:font-name="Calibri"/>
    </style:style>
    <style:style style:name="P170" style:parent-style-name="SBCparagraph" style:list-style-name="LFO14" style:family="paragraph">
      <style:text-properties style:font-name="Calibri"/>
    </style:style>
    <style:style style:name="P171" style:parent-style-name="SBCtitle2" style:list-style-name="Outline" style:family="paragraph"/>
    <style:style style:name="P172" style:parent-style-name="SBCparagraphfirst" style:family="paragraph">
      <style:paragraph-properties fo:text-indent="0.1972in"/>
    </style:style>
    <style:style style:name="T173" style:parent-style-name="Tipodeletrapredefinidodoparágrafo" style:family="text">
      <style:text-properties fo:color="#4472C4"/>
    </style:style>
    <style:style style:name="T174" style:parent-style-name="Tipodeletrapredefinidodoparágrafo" style:family="text">
      <style:text-properties style:font-name="Calibri" fo:color="#4472C4"/>
    </style:style>
    <style:style style:name="T175" style:parent-style-name="Tipodeletrapredefinidodoparágrafo" style:family="text">
      <style:text-properties style:font-name="Calibri" fo:color="#4472C4"/>
    </style:style>
    <style:style style:name="P176" style:parent-style-name="SBCparagraph" style:family="paragraph">
      <style:paragraph-properties fo:text-indent="0.1972in"/>
    </style:style>
    <style:style style:name="P177" style:parent-style-name="SBCparagraph" style:family="paragraph">
      <style:paragraph-properties fo:text-align="center" fo:text-indent="0.1972in"/>
      <style:text-properties fo:font-weight="bold" style:font-weight-asian="bold" style:font-weight-complex="bold"/>
    </style:style>
    <style:style style:name="P178" style:parent-style-name="SBCparagraph" style:family="paragraph">
      <style:paragraph-properties fo:text-indent="0.1972in"/>
    </style:style>
    <style:style style:name="P179" style:parent-style-name="SBCparagraph" style:family="paragraph">
      <style:paragraph-properties fo:text-indent="0.1972in"/>
    </style:style>
    <style:style style:name="P180" style:parent-style-name="SBCparagraph" style:family="paragraph">
      <style:paragraph-properties fo:text-indent="0.1972in"/>
    </style:style>
    <style:style style:name="P181" style:parent-style-name="SBCparagraph" style:family="paragraph">
      <style:paragraph-properties fo:text-indent="0in"/>
    </style:style>
    <style:style style:name="P182" style:parent-style-name="Normal" style:family="paragraph">
      <style:paragraph-properties fo:text-align="center"/>
    </style:style>
    <style:style style:name="P183" style:parent-style-name="Normal" style:family="paragraph">
      <style:paragraph-properties fo:text-align="center"/>
      <style:text-properties fo:color="#000000" fo:font-size="9pt" style:font-size-asian="9pt" style:font-size-complex="9pt"/>
    </style:style>
    <style:style style:name="P184" style:parent-style-name="Normal" style:family="paragraph">
      <style:paragraph-properties fo:text-align="center"/>
      <style:text-properties fo:color="#000000" fo:font-size="9pt" style:font-size-asian="9pt" style:font-size-complex="9pt"/>
    </style:style>
    <style:style style:name="P185" style:parent-style-name="Normal" style:family="paragraph">
      <style:paragraph-properties fo:text-align="center"/>
      <style:text-properties fo:color="#000000" fo:font-size="9pt" style:font-size-asian="9pt" style:font-size-complex="9pt"/>
    </style:style>
    <style:style style:name="P186" style:parent-style-name="Normal" style:family="paragraph">
      <style:paragraph-properties fo:text-align="center"/>
      <style:text-properties fo:color="#000000" fo:font-size="9pt" style:font-size-asian="9pt" style:font-size-complex="9pt"/>
    </style:style>
    <style:style style:name="P187" style:parent-style-name="Normal" style:family="paragraph">
      <style:paragraph-properties fo:text-align="center"/>
      <style:text-properties fo:color="#000000" fo:font-size="9pt" style:font-size-asian="9pt" style:font-size-complex="9pt"/>
    </style:style>
    <style:style style:name="P188" style:parent-style-name="Normal" style:family="paragraph">
      <style:paragraph-properties fo:text-align="center"/>
      <style:text-properties fo:color="#000000" fo:font-size="9pt" style:font-size-asian="9pt" style:font-size-complex="9pt"/>
    </style:style>
    <style:style style:name="P189" style:parent-style-name="Normal" style:family="paragraph">
      <style:paragraph-properties fo:text-align="center"/>
      <style:text-properties fo:color="#000000" fo:font-size="9pt" style:font-size-asian="9pt" style:font-size-complex="9pt"/>
    </style:style>
    <style:style style:name="P190" style:parent-style-name="Normal" style:family="paragraph">
      <style:text-properties fo:color="#000000" fo:font-size="9pt" style:font-size-asian="9pt" style:font-size-complex="9pt"/>
    </style:style>
    <style:style style:name="P191" style:parent-style-name="Normal" style:family="paragraph">
      <style:paragraph-properties fo:text-align="center"/>
    </style:style>
    <style:style style:name="P192" style:parent-style-name="Normal" style:family="paragraph">
      <style:paragraph-properties fo:text-align="center"/>
      <style:text-properties fo:color="#000000" fo:font-size="9pt" style:font-size-asian="9pt" style:font-size-complex="9pt"/>
    </style:style>
    <style:style style:name="P193" style:parent-style-name="Normal" style:family="paragraph">
      <style:paragraph-properties fo:text-align="center"/>
      <style:text-properties fo:color="#000000" fo:font-size="9pt" style:font-size-asian="9pt" style:font-size-complex="9pt"/>
    </style:style>
    <style:style style:name="P194" style:parent-style-name="Normal" style:family="paragraph">
      <style:paragraph-properties fo:text-align="center"/>
      <style:text-properties fo:color="#000000" fo:font-size="9pt" style:font-size-asian="9pt" style:font-size-complex="9pt"/>
    </style:style>
    <style:style style:name="P195" style:parent-style-name="Normal" style:family="paragraph">
      <style:paragraph-properties fo:text-align="center"/>
      <style:text-properties fo:color="#000000" fo:font-size="9pt" style:font-size-asian="9pt" style:font-size-complex="9pt"/>
    </style:style>
    <style:style style:name="P196" style:parent-style-name="Normal" style:family="paragraph">
      <style:paragraph-properties fo:text-align="center"/>
      <style:text-properties fo:color="#000000" fo:font-size="9pt" style:font-size-asian="9pt" style:font-size-complex="9pt"/>
    </style:style>
    <style:style style:name="P197" style:parent-style-name="Normal" style:family="paragraph">
      <style:paragraph-properties fo:text-align="center"/>
      <style:text-properties fo:color="#000000"/>
    </style:style>
    <style:style style:name="P198" style:parent-style-name="Normal" style:family="paragraph">
      <style:text-properties fo:color="#000000" fo:font-size="9pt" style:font-size-asian="9pt" style:font-size-complex="9pt"/>
    </style:style>
    <style:style style:name="P199" style:parent-style-name="Normal" style:family="paragraph">
      <style:text-properties fo:color="#000000" fo:font-size="9pt" style:font-size-asian="9pt" style:font-size-complex="9pt"/>
    </style:style>
    <style:style style:name="P200" style:parent-style-name="Normal" style:family="paragraph">
      <style:paragraph-properties fo:text-align="center"/>
      <style:text-properties fo:color="#000000"/>
    </style:style>
    <style:style style:name="P201" style:parent-style-name="SBCparagraph" style:family="paragraph">
      <style:paragraph-properties fo:text-align="center" fo:text-indent="0.1972in"/>
      <style:text-properties fo:font-weight="bold" style:font-weight-asian="bold" style:font-weight-complex="bold"/>
    </style:style>
    <style:style style:name="P202" style:parent-style-name="SBCparagraph" style:family="paragraph">
      <style:paragraph-properties fo:text-indent="0.1972in"/>
    </style:style>
    <style:style style:name="P203" style:parent-style-name="SBCparagraph" style:family="paragraph">
      <style:paragraph-properties fo:text-indent="0.1972in"/>
    </style:style>
    <style:style style:name="P204" style:parent-style-name="SBCparagraph" style:family="paragraph">
      <style:paragraph-properties fo:text-align="center" fo:text-indent="0.1972in"/>
    </style:style>
    <style:style style:name="T205" style:parent-style-name="Tipodeletrapredefinidodoparágrafo" style:family="text">
      <style:text-properties fo:font-weight="bold" style:font-weight-asian="bold" style:font-weight-complex="bold"/>
    </style:style>
    <style:style style:name="P206" style:parent-style-name="SBCparagraph" style:family="paragraph">
      <style:paragraph-properties fo:text-align="center" fo:text-indent="0.1972in"/>
    </style:style>
    <style:style style:name="P207" style:parent-style-name="SBCtitle2" style:list-style-name="Outline" style:family="paragraph"/>
    <style:style style:name="P208" style:parent-style-name="SBCparagraphfirst" style:family="paragraph">
      <style:paragraph-properties fo:text-indent="0.1972in"/>
    </style:style>
    <style:style style:name="T209" style:parent-style-name="Tipodeletrapredefinidodoparágrafo" style:family="text">
      <style:text-properties fo:color="#4472C4"/>
    </style:style>
    <style:style style:name="T210" style:parent-style-name="Tipodeletrapredefinidodoparágrafo" style:family="text">
      <style:text-properties style:font-name="Calibri" fo:color="#4472C4"/>
    </style:style>
    <style:style style:name="T211" style:parent-style-name="Tipodeletrapredefinidodoparágrafo" style:family="text">
      <style:text-properties style:font-name="Calibri" fo:color="#4472C4"/>
    </style:style>
    <style:style style:name="P212" style:parent-style-name="SBCparagraphfirst" style:family="paragraph">
      <style:paragraph-properties fo:text-indent="0.1972in"/>
    </style:style>
    <style:style style:name="P213" style:parent-style-name="SBCparagraphfirst" style:family="paragraph">
      <style:paragraph-properties fo:text-indent="0.1972in"/>
    </style:style>
    <style:style style:name="P214" style:parent-style-name="SBCtitle2" style:list-style-name="Outline" style:family="paragraph"/>
    <style:style style:name="P215" style:parent-style-name="Normal" style:family="paragraph">
      <style:paragraph-properties fo:margin-top="0.1666in"/>
    </style:style>
    <style:style style:name="T216" style:parent-style-name="Tipodeletrapredefinidodoparágrafo" style:family="text">
      <style:text-properties style:font-name="Times"/>
    </style:style>
    <style:style style:name="T217" style:parent-style-name="Tipodeletrapredefinidodoparágrafo" style:family="text">
      <style:text-properties fo:color="#4472C4"/>
    </style:style>
    <style:style style:name="T218" style:parent-style-name="Tipodeletrapredefinidodoparágrafo" style:family="text">
      <style:text-properties style:font-name="Calibri" fo:color="#4472C4"/>
    </style:style>
    <style:style style:name="T219" style:parent-style-name="Tipodeletrapredefinidodoparágrafo" style:family="text">
      <style:text-properties style:font-name="Calibri" fo:color="#4472C4"/>
    </style:style>
    <style:style style:name="T220" style:parent-style-name="Tipodeletrapredefinidodoparágrafo" style:family="text">
      <style:text-properties style:font-name="Times"/>
    </style:style>
    <style:style style:name="P221" style:parent-style-name="Normal" style:family="paragraph">
      <style:paragraph-properties fo:margin-top="0.1666in"/>
      <style:text-properties style:font-name="Times"/>
    </style:style>
    <style:style style:name="P222" style:parent-style-name="ParágrafodaLista" style:list-style-name="LFO15" style:family="paragraph">
      <style:paragraph-properties fo:margin-top="0.1666in"/>
      <style:text-properties style:font-name="Times"/>
    </style:style>
    <style:style style:name="P223" style:parent-style-name="ParágrafodaLista" style:list-style-name="LFO15" style:family="paragraph">
      <style:paragraph-properties fo:margin-top="0.1666in"/>
      <style:text-properties style:font-name="Times"/>
    </style:style>
    <style:style style:name="P224" style:parent-style-name="Normal" style:family="paragraph">
      <style:paragraph-properties fo:margin-top="0.1666in"/>
      <style:text-properties style:font-name="Times"/>
    </style:style>
    <style:style style:name="P225" style:parent-style-name="ParágrafodaLista" style:list-style-name="LFO16" style:family="paragraph">
      <style:paragraph-properties fo:margin-top="0.1666in"/>
      <style:text-properties style:font-name="Times"/>
    </style:style>
    <style:style style:name="P226" style:parent-style-name="ParágrafodaLista" style:list-style-name="LFO16" style:family="paragraph">
      <style:paragraph-properties fo:margin-top="0.1666in"/>
    </style:style>
    <style:style style:name="T227" style:parent-style-name="Tipodeletrapredefinidodoparágrafo" style:family="text">
      <style:text-properties style:font-name="Times"/>
    </style:style>
    <style:style style:name="P228" style:parent-style-name="SBCtitle2" style:list-style-name="Outline" style:family="paragraph"/>
    <style:style style:name="P229" style:parent-style-name="Normal" style:family="paragraph">
      <style:paragraph-properties fo:text-align="center"/>
      <style:text-properties fo:color="#000000" fo:font-size="8pt" style:font-size-asian="8pt" style:font-size-complex="8pt"/>
    </style:style>
    <style:style style:name="P230" style:parent-style-name="Normal" style:family="paragraph">
      <style:paragraph-properties fo:text-align="center"/>
      <style:text-properties fo:color="#FFFFFF" fo:font-size="5pt" style:font-size-asian="5pt" style:font-size-complex="5pt"/>
    </style:style>
    <style:style style:name="P231" style:parent-style-name="Normal" style:family="paragraph">
      <style:paragraph-properties fo:text-align="center"/>
      <style:text-properties fo:color="#000000" fo:font-size="5pt" style:font-size-asian="5pt" style:font-size-complex="5pt"/>
    </style:style>
    <style:style style:name="P232" style:parent-style-name="Normal" style:family="paragraph">
      <style:paragraph-properties fo:text-align="center"/>
      <style:text-properties fo:color="#ED7D31" fo:font-size="7pt" style:font-size-asian="7pt" style:font-size-complex="7pt"/>
    </style:style>
    <style:style style:name="P233" style:parent-style-name="Normal" style:family="paragraph">
      <style:paragraph-properties fo:text-align="center"/>
      <style:text-properties fo:color="#FFFFFF" fo:font-size="5pt" style:font-size-asian="5pt" style:font-size-complex="5pt"/>
    </style:style>
    <style:style style:name="P234" style:parent-style-name="Normal" style:family="paragraph">
      <style:paragraph-properties fo:text-align="center"/>
      <style:text-properties fo:color="#FFFFFF" fo:font-size="5pt" style:font-size-asian="5pt" style:font-size-complex="5pt"/>
    </style:style>
    <style:style style:name="P235" style:parent-style-name="Normal" style:family="paragraph">
      <style:paragraph-properties fo:text-align="center"/>
      <style:text-properties fo:color="#000000" fo:font-size="7pt" style:font-size-asian="7pt" style:font-size-complex="7pt"/>
    </style:style>
    <style:style style:name="P236" style:parent-style-name="Normal" style:family="paragraph">
      <style:paragraph-properties fo:text-align="center"/>
      <style:text-properties fo:color="#000000"/>
    </style:style>
    <style:style style:name="P237" style:parent-style-name="Normal" style:family="paragraph">
      <style:paragraph-properties fo:text-align="center"/>
      <style:text-properties fo:color="#000000" fo:font-size="10pt" style:font-size-asian="10pt" style:font-size-complex="10pt"/>
    </style:style>
    <style:style style:name="P238" style:parent-style-name="Normal" style:family="paragraph">
      <style:paragraph-properties fo:text-align="center"/>
      <style:text-properties fo:color="#E7E6E6" fo:font-size="6pt" style:font-size-asian="6pt" style:font-size-complex="6pt"/>
    </style:style>
    <style:style style:name="P239" style:parent-style-name="Normal" style:family="paragraph">
      <style:paragraph-properties fo:text-align="center"/>
      <style:text-properties fo:color="#7030A0" fo:font-size="7pt" style:font-size-asian="7pt" style:font-size-complex="7pt"/>
    </style:style>
    <style:style style:name="P240" style:parent-style-name="Normal" style:family="paragraph">
      <style:paragraph-properties fo:text-align="center"/>
      <style:text-properties fo:color="#FFC000" fo:font-size="7pt" style:font-size-asian="7pt" style:font-size-complex="7pt"/>
    </style:style>
    <style:style style:name="P241" style:parent-style-name="Normal" style:family="paragraph">
      <style:paragraph-properties fo:text-align="center"/>
      <style:text-properties fo:color="#000000"/>
    </style:style>
    <style:style style:name="P242" style:parent-style-name="Normal" style:family="paragraph">
      <style:paragraph-properties fo:text-align="center"/>
      <style:text-properties fo:color="#E7E6E6" fo:font-size="7pt" style:font-size-asian="7pt" style:font-size-complex="7pt"/>
    </style:style>
    <style:style style:name="P243" style:parent-style-name="Normal" style:family="paragraph">
      <style:paragraph-properties fo:text-align="justify"/>
      <style:text-properties fo:color="#000000" fo:font-size="8pt" style:font-size-asian="8pt" style:font-size-complex="8pt"/>
    </style:style>
    <style:style style:name="P244" style:parent-style-name="ParágrafodaLista" style:list-style-name="LFO17" style:family="paragraph">
      <style:paragraph-properties fo:text-align="justify"/>
      <style:text-properties fo:color="#000000" fo:font-size="8pt" style:font-size-asian="8pt" style:font-size-complex="8pt"/>
    </style:style>
    <style:style style:name="P245" style:parent-style-name="ParágrafodaLista" style:list-style-name="LFO17" style:family="paragraph">
      <style:paragraph-properties fo:text-align="justify"/>
      <style:text-properties fo:color="#000000" fo:font-size="8pt" style:font-size-asian="8pt" style:font-size-complex="8pt"/>
    </style:style>
    <style:style style:name="P246" style:parent-style-name="ParágrafodaLista" style:list-style-name="LFO17" style:family="paragraph">
      <style:paragraph-properties fo:text-align="justify"/>
      <style:text-properties fo:color="#000000" fo:font-size="8pt" style:font-size-asian="8pt" style:font-size-complex="8pt"/>
    </style:style>
    <style:style style:name="P247" style:parent-style-name="Normal" style:family="paragraph">
      <style:paragraph-properties fo:text-align="justify"/>
      <style:text-properties fo:color="#000000" fo:font-size="8pt" style:font-size-asian="8pt" style:font-size-complex="8pt"/>
    </style:style>
    <style:style style:name="P248" style:parent-style-name="Normal" style:family="paragraph">
      <style:paragraph-properties fo:text-align="justify"/>
      <style:text-properties fo:color="#000000" fo:font-size="8pt" style:font-size-asian="8pt" style:font-size-complex="8pt"/>
    </style:style>
    <style:style style:name="P249" style:parent-style-name="ParágrafodaLista" style:list-style-name="LFO18" style:family="paragraph">
      <style:paragraph-properties fo:text-align="justify"/>
      <style:text-properties fo:color="#000000" fo:font-size="8pt" style:font-size-asian="8pt" style:font-size-complex="8pt"/>
    </style:style>
    <style:style style:name="P250" style:parent-style-name="ParágrafodaLista" style:list-style-name="LFO18" style:family="paragraph">
      <style:paragraph-properties fo:text-align="justify"/>
      <style:text-properties fo:color="#000000" fo:font-size="8pt" style:font-size-asian="8pt" style:font-size-complex="8pt"/>
    </style:style>
    <style:style style:name="P251" style:parent-style-name="ParágrafodaLista" style:list-style-name="LFO18" style:family="paragraph">
      <style:paragraph-properties fo:text-align="justify"/>
      <style:text-properties fo:color="#000000" fo:font-size="8pt" style:font-size-asian="8pt" style:font-size-complex="8pt"/>
    </style:style>
    <style:style style:name="P252" style:parent-style-name="Normal" style:family="paragraph">
      <style:paragraph-properties fo:text-align="justify"/>
      <style:text-properties fo:color="#000000" fo:font-size="8pt" style:font-size-asian="8pt" style:font-size-complex="8pt"/>
    </style:style>
    <style:style style:name="P253" style:parent-style-name="Normal" style:family="paragraph">
      <style:paragraph-properties fo:text-align="justify"/>
      <style:text-properties fo:color="#000000" fo:font-size="8pt" style:font-size-asian="8pt" style:font-size-complex="8pt"/>
    </style:style>
    <style:style style:name="P254" style:parent-style-name="Normal" style:family="paragraph">
      <style:paragraph-properties fo:text-align="center" fo:margin-top="0.1666in"/>
    </style:style>
    <style:style style:name="T255" style:parent-style-name="Tipodeletrapredefinidodoparágrafo" style:family="text">
      <style:text-properties fo:font-weight="bold" style:font-weight-asian="bold" style:font-weight-complex="bold"/>
    </style:style>
    <style:style style:name="P256" style:parent-style-name="SBCtitle2" style:list-style-name="Outline" style:family="paragraph"/>
    <style:style style:name="P257" style:parent-style-name="Normal" style:family="paragraph">
      <style:paragraph-properties fo:text-align="center"/>
      <style:text-properties fo:color="#000000" fo:font-size="8pt" style:font-size-asian="8pt" style:font-size-complex="8pt"/>
    </style:style>
    <style:style style:name="P258" style:parent-style-name="Normal" style:family="paragraph">
      <style:paragraph-properties fo:text-align="center"/>
      <style:text-properties fo:color="#FFFFFF" fo:font-size="5pt" style:font-size-asian="5pt" style:font-size-complex="5pt"/>
    </style:style>
    <style:style style:name="P259" style:parent-style-name="Normal" style:family="paragraph">
      <style:paragraph-properties fo:text-align="center"/>
      <style:text-properties fo:color="#000000" fo:font-size="5pt" style:font-size-asian="5pt" style:font-size-complex="5pt"/>
    </style:style>
    <style:style style:name="P260" style:parent-style-name="Normal" style:family="paragraph">
      <style:paragraph-properties fo:text-align="center"/>
      <style:text-properties fo:color="#FFFFFF" fo:font-size="5pt" style:font-size-asian="5pt" style:font-size-complex="5pt"/>
    </style:style>
    <style:style style:name="P261" style:parent-style-name="Normal" style:family="paragraph">
      <style:paragraph-properties fo:text-align="center"/>
      <style:text-properties fo:color="#FFFFFF" fo:font-size="5pt" style:font-size-asian="5pt" style:font-size-complex="5pt"/>
    </style:style>
    <style:style style:name="P262" style:parent-style-name="Normal" style:family="paragraph">
      <style:paragraph-properties fo:text-align="center"/>
      <style:text-properties fo:color="#000000" fo:font-size="7pt" style:font-size-asian="7pt" style:font-size-complex="7pt"/>
    </style:style>
    <style:style style:name="P263" style:parent-style-name="Normal" style:family="paragraph">
      <style:paragraph-properties fo:text-align="center"/>
      <style:text-properties fo:color="#000000"/>
    </style:style>
    <style:style style:name="P264" style:parent-style-name="Normal" style:family="paragraph">
      <style:paragraph-properties fo:text-align="center"/>
      <style:text-properties fo:color="#000000" fo:font-size="10pt" style:font-size-asian="10pt" style:font-size-complex="10pt"/>
    </style:style>
    <style:style style:name="P265" style:parent-style-name="Normal" style:family="paragraph">
      <style:paragraph-properties fo:text-align="center"/>
      <style:text-properties fo:color="#000000" fo:font-size="6pt" style:font-size-asian="6pt" style:font-size-complex="6pt"/>
    </style:style>
    <style:style style:name="P266" style:parent-style-name="Normal" style:family="paragraph">
      <style:paragraph-properties fo:text-align="center"/>
      <style:text-properties fo:color="#7030A0" fo:font-size="7pt" style:font-size-asian="7pt" style:font-size-complex="7pt"/>
    </style:style>
    <style:style style:name="P267" style:parent-style-name="Normal" style:family="paragraph">
      <style:paragraph-properties fo:text-align="center"/>
      <style:text-properties fo:color="#FFC000" fo:font-size="7pt" style:font-size-asian="7pt" style:font-size-complex="7pt"/>
    </style:style>
    <style:style style:name="P268" style:parent-style-name="Normal" style:family="paragraph">
      <style:paragraph-properties fo:text-align="center"/>
      <style:text-properties fo:color="#000000"/>
    </style:style>
    <style:style style:name="P269" style:parent-style-name="Normal" style:family="paragraph">
      <style:paragraph-properties fo:text-align="center"/>
      <style:text-properties fo:color="#000000" fo:font-size="7pt" style:font-size-asian="7pt" style:font-size-complex="7pt"/>
    </style:style>
    <style:style style:name="P270" style:parent-style-name="Normal" style:family="paragraph">
      <style:paragraph-properties fo:text-align="justify"/>
      <style:text-properties fo:color="#000000" fo:font-size="8pt" style:font-size-asian="8pt" style:font-size-complex="8pt"/>
    </style:style>
    <style:style style:name="P271" style:parent-style-name="ParágrafodaLista" style:list-style-name="LFO19" style:family="paragraph">
      <style:paragraph-properties fo:text-align="justify"/>
      <style:text-properties fo:color="#000000" fo:font-size="8pt" style:font-size-asian="8pt" style:font-size-complex="8pt"/>
    </style:style>
    <style:style style:name="P272" style:parent-style-name="ParágrafodaLista" style:list-style-name="LFO19" style:family="paragraph">
      <style:paragraph-properties fo:text-align="justify"/>
      <style:text-properties fo:color="#000000" fo:font-size="8pt" style:font-size-asian="8pt" style:font-size-complex="8pt"/>
    </style:style>
    <style:style style:name="P273" style:parent-style-name="ParágrafodaLista" style:list-style-name="LFO19" style:family="paragraph">
      <style:paragraph-properties fo:text-align="justify"/>
      <style:text-properties fo:color="#000000" fo:font-size="8pt" style:font-size-asian="8pt" style:font-size-complex="8pt"/>
    </style:style>
    <style:style style:name="P274" style:parent-style-name="ParágrafodaLista" style:list-style-name="LFO19" style:family="paragraph">
      <style:paragraph-properties fo:text-align="justify"/>
      <style:text-properties fo:color="#000000" fo:font-size="8pt" style:font-size-asian="8pt" style:font-size-complex="8pt"/>
    </style:style>
    <style:style style:name="P275" style:parent-style-name="Normal" style:family="paragraph">
      <style:paragraph-properties fo:text-align="justify"/>
      <style:text-properties fo:color="#000000" fo:font-size="8pt" style:font-size-asian="8pt" style:font-size-complex="8pt"/>
    </style:style>
    <style:style style:name="P276" style:parent-style-name="Normal" style:family="paragraph">
      <style:paragraph-properties fo:text-align="justify"/>
      <style:text-properties fo:color="#000000" fo:font-size="8pt" style:font-size-asian="8pt" style:font-size-complex="8pt"/>
    </style:style>
    <style:style style:name="P277" style:parent-style-name="ParágrafodaLista" style:list-style-name="LFO20" style:family="paragraph">
      <style:paragraph-properties fo:text-align="justify"/>
      <style:text-properties fo:color="#000000" fo:font-size="8pt" style:font-size-asian="8pt" style:font-size-complex="8pt"/>
    </style:style>
    <style:style style:name="P278" style:parent-style-name="ParágrafodaLista" style:list-style-name="LFO20" style:family="paragraph">
      <style:paragraph-properties fo:text-align="justify"/>
      <style:text-properties fo:color="#000000" fo:font-size="8pt" style:font-size-asian="8pt" style:font-size-complex="8pt"/>
    </style:style>
    <style:style style:name="P279" style:parent-style-name="ParágrafodaLista" style:list-style-name="LFO20" style:family="paragraph">
      <style:paragraph-properties fo:text-align="justify"/>
      <style:text-properties fo:color="#000000" fo:font-size="8pt" style:font-size-asian="8pt" style:font-size-complex="8pt"/>
    </style:style>
    <style:style style:name="P280" style:parent-style-name="Normal" style:family="paragraph">
      <style:paragraph-properties fo:text-align="justify"/>
      <style:text-properties fo:color="#000000" fo:font-size="8pt" style:font-size-asian="8pt" style:font-size-complex="8pt"/>
    </style:style>
    <style:style style:name="P281" style:parent-style-name="Normal" style:family="paragraph">
      <style:paragraph-properties fo:text-align="center" fo:margin-top="0.1666in"/>
    </style:style>
    <style:style style:name="T282" style:parent-style-name="Tipodeletrapredefinidodoparágrafo" style:family="text">
      <style:text-properties fo:font-weight="bold" style:font-weight-asian="bold" style:font-weight-complex="bold"/>
    </style:style>
    <style:style style:name="P283" style:parent-style-name="SBCtitle1" style:list-style-name="Outline" style:family="paragraph"/>
    <style:style style:name="P284" style:parent-style-name="SBCparagraphfirst" style:family="paragraph">
      <style:paragraph-properties fo:text-indent="0.1972in"/>
    </style:style>
    <style:style style:name="T285" style:parent-style-name="Tipodeletrapredefinidodoparágrafo" style:family="text">
      <style:text-properties fo:font-weight="bold" style:font-weight-asian="bold" style:font-weight-complex="bold"/>
    </style:style>
    <style:style style:name="P286" style:parent-style-name="SBCparagraph" style:family="paragraph">
      <style:paragraph-properties fo:text-indent="0.1972in"/>
    </style:style>
    <style:style style:name="P287" style:parent-style-name="SBCparagraph" style:list-style-name="LFO21" style:family="paragraph"/>
    <style:style style:name="P288" style:parent-style-name="SBCparagraph" style:list-style-name="LFO21" style:family="paragraph"/>
    <style:style style:name="P289" style:parent-style-name="SBCparagraph" style:list-style-name="LFO21" style:family="paragraph"/>
    <style:style style:name="P290" style:parent-style-name="SBCparagraph" style:list-style-name="LFO21" style:family="paragraph"/>
    <style:style style:name="P291" style:parent-style-name="SBCparagraph" style:list-style-name="LFO21" style:family="paragraph"/>
    <style:style style:name="P292" style:parent-style-name="SBCparagraph" style:list-style-name="LFO21" style:family="paragraph"/>
    <style:style style:name="P293" style:parent-style-name="SBCparagraph" style:list-style-name="LFO21" style:family="paragraph"/>
    <style:style style:name="P294" style:parent-style-name="SBCparagraph" style:list-style-name="LFO21" style:family="paragraph"/>
    <style:style style:name="P295" style:parent-style-name="SBCparagraph" style:list-style-name="LFO21" style:family="paragraph"/>
    <style:style style:name="P296" style:parent-style-name="SBCparagraph" style:list-style-name="LFO21" style:family="paragraph"/>
    <style:style style:name="P297" style:parent-style-name="SBCparagraph" style:list-style-name="LFO21" style:family="paragraph"/>
    <style:style style:name="P298" style:parent-style-name="SBCparagraph" style:list-style-name="LFO21" style:family="paragraph"/>
    <style:style style:name="P299" style:parent-style-name="SBCparagraph" style:list-style-name="LFO21" style:family="paragraph"/>
    <style:style style:name="P300" style:parent-style-name="SBCparagraph" style:family="paragraph">
      <style:paragraph-properties fo:text-indent="0in"/>
      <style:text-properties fo:font-weight="bold" style:font-weight-asian="bold" style:font-weight-complex="bold"/>
    </style:style>
    <style:style style:name="P301" style:parent-style-name="SBCparagraph" style:family="paragraph">
      <style:paragraph-properties fo:text-indent="0.1972in"/>
    </style:style>
    <style:style style:name="T302" style:parent-style-name="Tipodeletrapredefinidodoparágrafo" style:family="text">
      <style:text-properties fo:color="#4472C4"/>
    </style:style>
    <style:style style:name="P303" style:parent-style-name="SBCparagraph" style:family="paragraph">
      <style:paragraph-properties fo:text-indent="0.1972in"/>
    </style:style>
    <style:style style:name="T304" style:parent-style-name="Tipodeletrapredefinidodoparágrafo" style:family="text">
      <style:text-properties fo:color="#4472C4"/>
    </style:style>
    <style:style style:name="P305" style:parent-style-name="SBCparagraph" style:family="paragraph">
      <style:paragraph-properties fo:text-indent="0.1972in"/>
    </style:style>
    <style:style style:name="T306" style:parent-style-name="Tipodeletrapredefinidodoparágrafo" style:family="text">
      <style:text-properties fo:color="#4472C4"/>
    </style:style>
    <style:style style:name="P307" style:parent-style-name="SBCparagraph" style:family="paragraph">
      <style:paragraph-properties fo:text-indent="0.1972in"/>
    </style:style>
    <style:style style:name="T308" style:parent-style-name="Tipodeletrapredefinidodoparágrafo" style:family="text">
      <style:text-properties fo:color="#4472C4"/>
    </style:style>
    <style:style style:name="P309" style:parent-style-name="SBCtitle1" style:list-style-name="Outline" style:family="paragraph"/>
    <style:style style:name="P310" style:parent-style-name="SBCparagraph" style:family="paragraph">
      <style:paragraph-properties fo:text-indent="0.1972in"/>
    </style:style>
    <style:style style:name="T311" style:parent-style-name="Tipodeletrapredefinidodoparágrafo" style:family="text">
      <style:text-properties fo:color="#4472C4"/>
    </style:style>
    <style:style style:name="T312" style:parent-style-name="Tipodeletrapredefinidodoparágrafo" style:family="text">
      <style:text-properties fo:color="#4472C4"/>
    </style:style>
    <style:style style:name="P313" style:parent-style-name="SBCparagraph" style:list-style-name="LFO22" style:family="paragraph"/>
    <style:style style:name="P314" style:parent-style-name="SBCparagraph" style:list-style-name="LFO22" style:family="paragraph"/>
    <style:style style:name="T315" style:parent-style-name="Tipodeletrapredefinidodoparágrafo" style:family="text">
      <style:text-properties fo:language="en" fo:country="US"/>
    </style:style>
    <style:style style:name="P316" style:parent-style-name="SBCparagraph" style:family="paragraph">
      <style:paragraph-properties fo:text-indent="0.1972in"/>
    </style:style>
    <style:style style:name="P317" style:parent-style-name="SBCparagraph" style:family="paragraph">
      <style:paragraph-properties fo:text-indent="0.1972in"/>
    </style:style>
    <style:style style:name="T318" style:parent-style-name="Tipodeletrapredefinidodoparágrafo" style:family="text">
      <style:text-properties fo:color="#4472C4"/>
    </style:style>
    <style:style style:name="P319" style:parent-style-name="SBCparagraph" style:family="paragraph">
      <style:paragraph-properties fo:line-height="104%" fo:text-indent="0.1972in"/>
    </style:style>
    <style:style style:name="T320" style:parent-style-name="Tipodeletrapredefinidodoparágrafo" style:family="text">
      <style:text-properties fo:color="#4472C4"/>
    </style:style>
    <style:style style:name="P321" style:parent-style-name="SBCparagraph" style:family="paragraph">
      <style:paragraph-properties fo:text-indent="0.1972in"/>
    </style:style>
    <style:style style:name="T322" style:parent-style-name="Tipodeletrapredefinidodoparágrafo" style:family="text">
      <style:text-properties fo:color="#4472C4"/>
    </style:style>
    <style:style style:name="P323" style:parent-style-name="SBCparagraph" style:family="paragraph">
      <style:paragraph-properties fo:text-indent="0in"/>
    </style:style>
    <style:style style:name="T324" style:parent-style-name="Tipodeletrapredefinidodoparágrafo" style:family="text">
      <style:text-properties fo:font-weight="bold" style:font-weight-asian="bold" style:font-weight-complex="bold"/>
    </style:style>
    <style:style style:name="P325" style:parent-style-name="ParágrafodaLista" style:list-style-name="LFO23" style:family="paragraph">
      <style:text-properties style:font-name="Times" fo:font-weight="bold" style:font-weight-asian="bold" style:font-weight-complex="bold" fo:font-size="11pt" style:font-size-asian="11pt" style:font-size-complex="11pt" fo:language="en" fo:country="US"/>
    </style:style>
    <style:style style:name="T326" style:parent-style-name="Tipodeletrapredefinidodoparágrafo" style:family="text">
      <style:text-properties fo:font-weight="bold" style:font-weight-asian="bold" style:font-weight-complex="bold"/>
    </style:style>
    <style:style style:name="P327" style:parent-style-name="ParágrafodaLista" style:list-style-name="LFO23" style:family="paragraph">
      <style:text-properties style:font-name="Times" fo:font-weight="bold" style:font-weight-asian="bold" style:font-weight-complex="bold" fo:font-size="11pt" style:font-size-asian="11pt" style:font-size-complex="11pt" fo:language="en" fo:country="US"/>
    </style:style>
    <style:style style:name="T328" style:parent-style-name="Tipodeletrapredefinidodoparágrafo" style:family="text">
      <style:text-properties fo:font-weight="bold" style:font-weight-asian="bold" style:font-weight-complex="bold"/>
    </style:style>
    <style:style style:name="P329" style:parent-style-name="ParágrafodaLista" style:list-style-name="LFO23" style:family="paragraph">
      <style:text-properties style:font-name="Times" fo:font-weight="bold" style:font-weight-asian="bold" style:font-weight-complex="bold" fo:font-size="11pt" style:font-size-asian="11pt" style:font-size-complex="11pt" fo:language="en" fo:country="US"/>
    </style:style>
    <style:style style:name="P330" style:parent-style-name="Normal" style:family="paragraph">
      <style:paragraph-properties fo:line-height="150%"/>
      <style:text-properties fo:font-weight="bold" style:font-weight-asian="bold" style:font-weight-complex="bold" fo:font-size="4pt" style:font-size-asian="4pt" style:font-size-complex="4pt" fo:language="de" fo:country="DE"/>
    </style:style>
    <style:style style:name="P331" style:parent-style-name="Normal" style:family="paragraph">
      <style:paragraph-properties fo:line-height="150%"/>
      <style:text-properties fo:font-weight="bold" style:font-weight-asian="bold" style:font-weight-complex="bold" fo:font-size="4pt" style:font-size-asian="4pt" style:font-size-complex="4pt" fo:language="de" fo:country="DE"/>
    </style:style>
    <style:style style:name="P332"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33"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34" style:parent-style-name="Normal" style:family="paragraph">
      <style:paragraph-properties fo:text-align="end" fo:line-height="150%"/>
      <style:text-properties fo:font-size="6pt" style:font-size-asian="6pt" style:font-size-complex="6pt"/>
    </style:style>
    <style:style style:name="P335" style:parent-style-name="Normal" style:family="paragraph">
      <style:paragraph-properties fo:text-align="end" fo:line-height="150%"/>
      <style:text-properties fo:font-size="6pt" style:font-size-asian="6pt" style:font-size-complex="6pt"/>
    </style:style>
    <style:style style:name="P336" style:parent-style-name="Normal" style:family="paragraph">
      <style:paragraph-properties fo:text-align="end" fo:line-height="150%"/>
      <style:text-properties fo:font-size="6pt" style:font-size-asian="6pt" style:font-size-complex="6pt"/>
    </style:style>
    <style:style style:name="P337" style:parent-style-name="Normal" style:family="paragraph">
      <style:paragraph-properties fo:text-align="end" fo:line-height="150%"/>
      <style:text-properties fo:font-size="6pt" style:font-size-asian="6pt" style:font-size-complex="6pt"/>
    </style:style>
    <style:style style:name="P338" style:parent-style-name="Normal" style:family="paragraph">
      <style:paragraph-properties fo:text-align="end" fo:line-height="150%"/>
      <style:text-properties fo:font-size="6pt" style:font-size-asian="6pt" style:font-size-complex="6pt"/>
    </style:style>
    <style:style style:name="P339" style:parent-style-name="Normal" style:family="paragraph">
      <style:paragraph-properties fo:line-height="150%"/>
      <style:text-properties fo:font-weight="bold" style:font-weight-asian="bold" style:font-weight-complex="bold" fo:font-size="4pt" style:font-size-asian="4pt" style:font-size-complex="4pt"/>
    </style:style>
    <style:style style:name="P340" style:parent-style-name="Normal" style:family="paragraph">
      <style:paragraph-properties fo:line-height="150%"/>
      <style:text-properties fo:font-weight="bold" style:font-weight-asian="bold" style:font-weight-complex="bold" fo:font-size="4pt" style:font-size-asian="4pt" style:font-size-complex="4pt"/>
    </style:style>
    <style:style style:name="P341" style:parent-style-name="Normal" style:family="paragraph">
      <style:paragraph-properties fo:line-height="150%"/>
      <style:text-properties fo:font-weight="bold" style:font-weight-asian="bold" style:font-weight-complex="bold" fo:font-size="4pt" style:font-size-asian="4pt" style:font-size-complex="4pt"/>
    </style:style>
    <style:style style:name="P342" style:parent-style-name="Normal" style:family="paragraph">
      <style:paragraph-properties fo:line-height="150%"/>
      <style:text-properties fo:font-weight="bold" style:font-weight-asian="bold" style:font-weight-complex="bold" fo:font-size="4pt" style:font-size-asian="4pt" style:font-size-complex="4pt"/>
    </style:style>
    <style:style style:name="P343" style:parent-style-name="Normal" style:family="paragraph">
      <style:paragraph-properties fo:line-height="150%"/>
      <style:text-properties fo:font-weight="bold" style:font-weight-asian="bold" style:font-weight-complex="bold" fo:font-size="4pt" style:font-size-asian="4pt" style:font-size-complex="4pt"/>
    </style:style>
    <style:style style:name="P344" style:parent-style-name="Normal" style:family="paragraph">
      <style:paragraph-properties fo:line-height="150%"/>
      <style:text-properties fo:font-weight="bold" style:font-weight-asian="bold" style:font-weight-complex="bold" fo:font-size="4pt" style:font-size-asian="4pt" style:font-size-complex="4pt"/>
    </style:style>
    <style:style style:name="P345" style:parent-style-name="Normal" style:family="paragraph">
      <style:paragraph-properties fo:line-height="150%"/>
      <style:text-properties fo:font-weight="bold" style:font-weight-asian="bold" style:font-weight-complex="bold" fo:font-size="4pt" style:font-size-asian="4pt" style:font-size-complex="4pt"/>
    </style:style>
    <style:style style:name="P346" style:parent-style-name="Normal" style:family="paragraph">
      <style:paragraph-properties fo:line-height="150%"/>
      <style:text-properties fo:font-size="6pt" style:font-size-asian="6pt" style:font-size-complex="6pt"/>
    </style:style>
    <style:style style:name="P347" style:parent-style-name="Normal" style:family="paragraph">
      <style:paragraph-properties fo:line-height="150%"/>
      <style:text-properties fo:font-weight="bold" style:font-weight-asian="bold" style:font-weight-complex="bold" fo:font-size="4pt" style:font-size-asian="4pt" style:font-size-complex="4pt" fo:language="de" fo:country="DE"/>
    </style:style>
    <style:style style:name="P348" style:parent-style-name="Normal" style:family="paragraph">
      <style:paragraph-properties fo:line-height="150%"/>
      <style:text-properties fo:font-weight="bold" style:font-weight-asian="bold" style:font-weight-complex="bold" fo:font-size="4pt" style:font-size-asian="4pt" style:font-size-complex="4pt" fo:language="de" fo:country="DE"/>
    </style:style>
    <style:style style:name="P349" style:parent-style-name="Normal" style:family="paragraph">
      <style:paragraph-properties fo:text-align="center"/>
      <style:text-properties fo:font-weight="bold" style:font-weight-asian="bold" style:font-weight-complex="bold" fo:font-size="6pt" style:font-size-asian="6pt" style:font-size-complex="6pt"/>
    </style:style>
    <style:style style:name="P350"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51" style:parent-style-name="Normal" style:family="paragraph">
      <style:paragraph-properties fo:text-align="end" fo:line-height="115%"/>
      <style:text-properties fo:font-size="6pt" style:font-size-asian="6pt" style:font-size-complex="6pt"/>
    </style:style>
    <style:style style:name="P352" style:parent-style-name="Normal" style:family="paragraph">
      <style:paragraph-properties fo:text-align="end" fo:line-height="115%"/>
      <style:text-properties fo:font-size="6pt" style:font-size-asian="6pt" style:font-size-complex="6pt"/>
    </style:style>
    <style:style style:name="P353" style:parent-style-name="Normal" style:family="paragraph">
      <style:paragraph-properties fo:text-align="end" fo:line-height="115%"/>
      <style:text-properties fo:font-size="6pt" style:font-size-asian="6pt" style:font-size-complex="6pt"/>
    </style:style>
    <style:style style:name="P354" style:parent-style-name="Normal" style:family="paragraph">
      <style:paragraph-properties fo:text-align="end" fo:line-height="115%"/>
      <style:text-properties fo:font-size="6pt" style:font-size-asian="6pt" style:font-size-complex="6pt"/>
    </style:style>
    <style:style style:name="P355" style:parent-style-name="Normal" style:family="paragraph">
      <style:paragraph-properties fo:text-align="end" fo:line-height="115%"/>
      <style:text-properties fo:font-size="6pt" style:font-size-asian="6pt" style:font-size-complex="6pt"/>
    </style:style>
    <style:style style:name="P356" style:parent-style-name="Normal" style:family="paragraph">
      <style:paragraph-properties fo:text-align="end" fo:line-height="115%"/>
      <style:text-properties fo:font-size="6pt" style:font-size-asian="6pt" style:font-size-complex="6pt"/>
    </style:style>
    <style:style style:name="P357" style:parent-style-name="Normal" style:family="paragraph">
      <style:paragraph-properties fo:text-align="end" fo:line-height="115%"/>
      <style:text-properties fo:font-size="6pt" style:font-size-asian="6pt" style:font-size-complex="6pt"/>
    </style:style>
    <style:style style:name="P358" style:parent-style-name="Normal" style:family="paragraph">
      <style:paragraph-properties fo:line-height="150%"/>
      <style:text-properties fo:font-weight="bold" style:font-weight-asian="bold" style:font-weight-complex="bold" fo:font-size="4pt" style:font-size-asian="4pt" style:font-size-complex="4pt"/>
    </style:style>
    <style:style style:name="P359" style:parent-style-name="Normal" style:family="paragraph">
      <style:paragraph-properties fo:line-height="150%"/>
      <style:text-properties fo:font-weight="bold" style:font-weight-asian="bold" style:font-weight-complex="bold" fo:font-size="4pt" style:font-size-asian="4pt" style:font-size-complex="4pt"/>
    </style:style>
    <style:style style:name="P360" style:parent-style-name="Normal" style:family="paragraph">
      <style:paragraph-properties fo:line-height="150%"/>
      <style:text-properties fo:font-weight="bold" style:font-weight-asian="bold" style:font-weight-complex="bold" fo:font-size="4pt" style:font-size-asian="4pt" style:font-size-complex="4pt"/>
    </style:style>
    <style:style style:name="P361" style:parent-style-name="Normal" style:family="paragraph">
      <style:paragraph-properties fo:line-height="150%"/>
      <style:text-properties fo:font-weight="bold" style:font-weight-asian="bold" style:font-weight-complex="bold" fo:font-size="4pt" style:font-size-asian="4pt" style:font-size-complex="4pt"/>
    </style:style>
    <style:style style:name="P362" style:parent-style-name="Normal" style:family="paragraph">
      <style:paragraph-properties fo:line-height="150%"/>
      <style:text-properties fo:font-size="6pt" style:font-size-asian="6pt" style:font-size-complex="6pt"/>
    </style:style>
    <style:style style:name="P363"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64"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65" style:parent-style-name="Normal" style:family="paragraph">
      <style:paragraph-properties fo:text-align="center"/>
      <style:text-properties fo:font-weight="bold" style:font-weight-asian="bold" style:font-weight-complex="bold" fo:font-size="6pt" style:font-size-asian="6pt" style:font-size-complex="6pt"/>
    </style:style>
    <style:style style:name="P366"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67" style:parent-style-name="Normal" style:family="paragraph">
      <style:paragraph-properties fo:text-align="end" fo:line-height="115%"/>
      <style:text-properties fo:font-size="6pt" style:font-size-asian="6pt" style:font-size-complex="6pt" fo:language="en" fo:country="US"/>
    </style:style>
    <style:style style:name="P368" style:parent-style-name="Normal" style:family="paragraph">
      <style:paragraph-properties fo:text-align="end" fo:line-height="115%"/>
      <style:text-properties fo:font-size="6pt" style:font-size-asian="6pt" style:font-size-complex="6pt" fo:language="en" fo:country="US"/>
    </style:style>
    <style:style style:name="P369" style:parent-style-name="Normal" style:family="paragraph">
      <style:paragraph-properties fo:text-align="end" fo:line-height="115%"/>
      <style:text-properties fo:font-size="6pt" style:font-size-asian="6pt" style:font-size-complex="6pt" fo:language="en" fo:country="US"/>
    </style:style>
    <style:style style:name="P370" style:parent-style-name="Normal" style:family="paragraph">
      <style:paragraph-properties fo:text-align="end" fo:line-height="115%"/>
      <style:text-properties fo:font-size="6pt" style:font-size-asian="6pt" style:font-size-complex="6pt" fo:language="en" fo:country="US"/>
    </style:style>
    <style:style style:name="P371" style:parent-style-name="Normal" style:family="paragraph">
      <style:paragraph-properties fo:text-align="end" fo:line-height="115%"/>
    </style:style>
    <style:style style:name="T372" style:parent-style-name="Tipodeletrapredefinidodoparágrafo" style:family="text">
      <style:text-properties fo:font-size="6pt" style:font-size-asian="6pt" style:font-size-complex="6pt" fo:language="en" fo:country="US"/>
    </style:style>
    <style:style style:name="T373" style:parent-style-name="Tipodeletrapredefinidodoparágrafo" style:family="text">
      <style:text-properties fo:font-size="6pt" style:font-size-asian="6pt" style:font-size-complex="6pt"/>
    </style:style>
    <style:style style:name="T374" style:parent-style-name="Tipodeletrapredefinidodoparágrafo" style:family="text">
      <style:text-properties fo:font-size="6pt" style:font-size-asian="6pt" style:font-size-complex="6pt" fo:language="en" fo:country="US"/>
    </style:style>
    <style:style style:name="P375" style:parent-style-name="Normal" style:family="paragraph">
      <style:paragraph-properties fo:text-align="end" fo:line-height="115%"/>
    </style:style>
    <style:style style:name="T376" style:parent-style-name="Tipodeletrapredefinidodoparágrafo" style:family="text">
      <style:text-properties fo:font-size="6pt" style:font-size-asian="6pt" style:font-size-complex="6pt" fo:language="en" fo:country="US"/>
    </style:style>
    <style:style style:name="T377" style:parent-style-name="Tipodeletrapredefinidodoparágrafo" style:family="text">
      <style:text-properties fo:font-size="6pt" style:font-size-asian="6pt" style:font-size-complex="6pt"/>
    </style:style>
    <style:style style:name="T378" style:parent-style-name="Tipodeletrapredefinidodoparágrafo" style:family="text">
      <style:text-properties fo:font-size="6pt" style:font-size-asian="6pt" style:font-size-complex="6pt" fo:language="en" fo:country="US"/>
    </style:style>
    <style:style style:name="P379" style:parent-style-name="Normal" style:family="paragraph">
      <style:paragraph-properties fo:text-align="end" fo:line-height="115%"/>
    </style:style>
    <style:style style:name="T380" style:parent-style-name="Tipodeletrapredefinidodoparágrafo" style:family="text">
      <style:text-properties fo:font-size="6pt" style:font-size-asian="6pt" style:font-size-complex="6pt" fo:language="en" fo:country="US"/>
    </style:style>
    <style:style style:name="T381" style:parent-style-name="Tipodeletrapredefinidodoparágrafo" style:family="text">
      <style:text-properties fo:font-size="6pt" style:font-size-asian="6pt" style:font-size-complex="6pt"/>
    </style:style>
    <style:style style:name="T382" style:parent-style-name="Tipodeletrapredefinidodoparágrafo" style:family="text">
      <style:text-properties fo:font-size="6pt" style:font-size-asian="6pt" style:font-size-complex="6pt" fo:language="en" fo:country="US"/>
    </style:style>
    <style:style style:name="P383" style:parent-style-name="Normal" style:family="paragraph">
      <style:paragraph-properties fo:line-height="150%"/>
      <style:text-properties fo:font-weight="bold" style:font-weight-asian="bold" style:font-weight-complex="bold" fo:font-size="4pt" style:font-size-asian="4pt" style:font-size-complex="4pt"/>
    </style:style>
    <style:style style:name="P384" style:parent-style-name="Normal" style:family="paragraph">
      <style:paragraph-properties fo:line-height="150%"/>
      <style:text-properties fo:font-size="6pt" style:font-size-asian="6pt" style:font-size-complex="6pt"/>
    </style:style>
    <style:style style:name="P385" style:parent-style-name="Normal" style:family="paragraph">
      <style:paragraph-properties fo:text-align="center"/>
    </style:style>
    <style:style style:name="T386" style:parent-style-name="Tipodeletrapredefinidodoparágrafo" style:family="text">
      <style:text-properties fo:font-weight="bold" style:font-weight-asian="bold" style:font-weight-complex="bold"/>
    </style:style>
    <style:style style:name="P387" style:parent-style-name="SBCtitle1" style:list-style-name="Outline" style:family="paragraph"/>
    <style:style style:name="T388" style:parent-style-name="CommentReference" style:family="text">
      <style:text-properties style:font-name="Bitstream Vera Serif" style:font-name-asian="Bitstream Vera Sans" style:font-name-complex="Lucidasans" fo:font-weight="normal" style:font-weight-asian="normal"/>
    </style:style>
    <style:style style:name="P389" style:parent-style-name="SBCparagraph" style:list-style-name="LFO24" style:family="paragraph">
      <style:paragraph-properties fo:text-align="start"/>
    </style:style>
    <style:style style:name="T390" style:parent-style-name="Tipodeletrapredefinidodoparágrafo" style:family="text">
      <style:text-properties style:font-name="Calibri" fo:font-weight="bold" style:font-weight-asian="bold" style:font-weight-complex="bold"/>
    </style:style>
    <style:style style:name="T391" style:parent-style-name="Tipodeletrapredefinidodoparágrafo" style:family="text">
      <style:text-properties style:font-name="Calibri"/>
    </style:style>
    <style:style style:name="T392" style:parent-style-name="Hiperligação" style:family="text">
      <style:text-properties style:font-name="Calibri"/>
    </style:style>
    <style:style style:name="T393" style:parent-style-name="Tipodeletrapredefinidodoparágrafo" style:family="text">
      <style:text-properties style:font-name="Calibri"/>
    </style:style>
    <style:style style:name="T394" style:parent-style-name="Hiperligação" style:family="text">
      <style:text-properties style:font-name="Calibri"/>
    </style:style>
    <style:style style:name="T395" style:parent-style-name="Hiperligação" style:family="text">
      <style:text-properties style:font-name="Calibri"/>
    </style:style>
    <style:style style:name="T396" style:parent-style-name="Hiperligação" style:family="text">
      <style:text-properties style:font-name="Calibri"/>
    </style:style>
    <style:style style:name="T397" style:parent-style-name="Tipodeletrapredefinidodoparágrafo" style:family="text">
      <style:text-properties style:font-name="Calibri"/>
    </style:style>
    <style:style style:name="P398" style:parent-style-name="SBCparagraph" style:list-style-name="LFO24" style:family="paragraph"/>
    <style:style style:name="T399" style:parent-style-name="Tipodeletrapredefinidodoparágrafo" style:family="text">
      <style:text-properties style:font-name="Calibri" fo:font-weight="bold" style:font-weight-asian="bold" style:font-weight-complex="bold"/>
    </style:style>
    <style:style style:name="T400" style:parent-style-name="Tipodeletrapredefinidodoparágrafo" style:family="text">
      <style:text-properties style:font-name="Calibri"/>
    </style:style>
    <style:style style:name="T401" style:parent-style-name="Hiperligação" style:family="text">
      <style:text-properties style:font-name="Calibri"/>
    </style:style>
    <style:style style:name="T402" style:parent-style-name="Tipodeletrapredefinidodoparágrafo" style:family="text">
      <style:text-properties style:font-name="Calibri"/>
    </style:style>
    <style:style style:name="P403" style:parent-style-name="SBCparagraph" style:list-style-name="LFO24" style:family="paragraph"/>
    <style:style style:name="T404" style:parent-style-name="Tipodeletrapredefinidodoparágrafo" style:family="text">
      <style:text-properties style:font-name="Calibri" fo:font-weight="bold" style:font-weight-asian="bold" style:font-weight-complex="bold"/>
    </style:style>
    <style:style style:name="T405" style:parent-style-name="Tipodeletrapredefinidodoparágrafo" style:family="text">
      <style:text-properties style:font-name="Calibri"/>
    </style:style>
    <style:style style:name="T406" style:parent-style-name="Hiperligação" style:family="text">
      <style:text-properties style:font-name="Calibri"/>
    </style:style>
    <style:style style:name="T407" style:parent-style-name="Tipodeletrapredefinidodoparágrafo" style:family="text">
      <style:text-properties style:font-name="Calibri"/>
    </style:style>
    <style:style style:name="T408" style:parent-style-name="Hiperligação" style:family="text">
      <style:text-properties style:font-name="Calibri"/>
    </style:style>
    <style:style style:name="T409" style:parent-style-name="Tipodeletrapredefinidodoparágrafo" style:family="text">
      <style:text-properties style:font-name="Calibri"/>
    </style:style>
    <style:style style:name="P410" style:parent-style-name="SBCparagraph" style:list-style-name="LFO24" style:family="paragraph"/>
    <style:style style:name="T411" style:parent-style-name="Tipodeletrapredefinidodoparágrafo" style:family="text">
      <style:text-properties style:font-name="Calibri" fo:font-weight="bold" style:font-weight-asian="bold" style:font-weight-complex="bold"/>
    </style:style>
    <style:style style:name="T412" style:parent-style-name="Tipodeletrapredefinidodoparágrafo" style:family="text">
      <style:text-properties style:font-name="Calibri"/>
    </style:style>
    <style:style style:name="T413" style:parent-style-name="Hiperligação" style:family="text">
      <style:text-properties style:font-name="Calibri"/>
    </style:style>
    <style:style style:name="T414" style:parent-style-name="Tipodeletrapredefinidodoparágrafo" style:family="text">
      <style:text-properties style:font-name="Calibri"/>
    </style:style>
    <style:style style:name="P415" style:parent-style-name="SBCparagraph" style:list-style-name="LFO24" style:family="paragraph"/>
    <style:style style:name="T416" style:parent-style-name="Tipodeletrapredefinidodoparágrafo" style:family="text">
      <style:text-properties style:font-name="Calibri" fo:font-weight="bold" style:font-weight-asian="bold" style:font-weight-complex="bold"/>
    </style:style>
    <style:style style:name="T417" style:parent-style-name="Tipodeletrapredefinidodoparágrafo" style:family="text">
      <style:text-properties style:font-name="Calibri"/>
    </style:style>
    <style:style style:name="T418" style:parent-style-name="Hiperligação" style:family="text">
      <style:text-properties style:font-name="Calibri"/>
    </style:style>
    <style:style style:name="T419" style:parent-style-name="Tipodeletrapredefinidodoparágrafo" style:family="text">
      <style:text-properties style:font-name="Calibri"/>
    </style:style>
    <style:style style:name="T420" style:parent-style-name="Hiperligação" style:family="text">
      <style:text-properties style:font-name="Calibri"/>
    </style:style>
    <style:style style:name="T421" style:parent-style-name="Tipodeletrapredefinidodoparágrafo" style:family="text">
      <style:text-properties style:font-name="Calibri"/>
    </style:style>
    <style:style style:name="P422" style:parent-style-name="SBCparagraph" style:list-style-name="LFO24" style:family="paragraph"/>
    <style:style style:name="T423" style:parent-style-name="Tipodeletrapredefinidodoparágrafo" style:family="text">
      <style:text-properties style:font-name="Calibri" fo:font-weight="bold" style:font-weight-asian="bold" style:font-weight-complex="bold"/>
    </style:style>
    <style:style style:name="T424" style:parent-style-name="Tipodeletrapredefinidodoparágrafo" style:family="text">
      <style:text-properties style:font-name="Calibri"/>
    </style:style>
    <style:style style:name="T425" style:parent-style-name="Hiperligação" style:family="text">
      <style:text-properties style:font-name="Calibri"/>
    </style:style>
    <style:style style:name="T426" style:parent-style-name="Tipodeletrapredefinidodoparágrafo" style:family="text">
      <style:text-properties style:font-name="Calibri"/>
    </style:style>
    <style:style style:name="T427" style:parent-style-name="Hiperligação" style:family="text">
      <style:text-properties style:font-name="Calibri"/>
    </style:style>
    <style:style style:name="T428" style:parent-style-name="Tipodeletrapredefinidodoparágrafo" style:family="text">
      <style:text-properties style:font-name="Calibri"/>
    </style:style>
    <style:style style:name="P429" style:parent-style-name="SBCparagraph" style:list-style-name="LFO24" style:family="paragraph"/>
    <style:style style:name="T430" style:parent-style-name="Tipodeletrapredefinidodoparágrafo" style:family="text">
      <style:text-properties style:font-name="Calibri" fo:font-weight="bold" style:font-weight-asian="bold" style:font-weight-complex="bold"/>
    </style:style>
    <style:style style:name="T431" style:parent-style-name="Tipodeletrapredefinidodoparágrafo" style:family="text">
      <style:text-properties style:font-name="Calibri"/>
    </style:style>
    <style:style style:name="P432" style:parent-style-name="SBCtitle1" style:list-style-name="Outline" style:family="paragraph"/>
    <style:style style:name="P433" style:parent-style-name="SBCparagraphfirst" style:list-style-name="LFO25" style:family="paragraph"/>
    <style:style style:name="T434" style:parent-style-name="Tipodeletrapredefinidodoparágrafo" style:family="text">
      <style:text-properties style:font-name="Calibri"/>
    </style:style>
    <style:style style:name="T435" style:parent-style-name="Tipodeletrapredefinidodoparágrafo" style:family="text">
      <style:text-properties style:font-name="Calibri"/>
    </style:style>
    <style:style style:name="P436" style:parent-style-name="SBCparagraph" style:list-style-name="LFO25" style:family="paragraph"/>
    <style:style style:name="T437" style:parent-style-name="Tipodeletrapredefinidodoparágrafo" style:family="text">
      <style:text-properties style:font-name="Calibri"/>
    </style:style>
    <style:style style:name="P438" style:parent-style-name="SBCtitle1" style:list-style-name="Outline" style:family="paragraph"/>
    <style:style style:name="P439" style:parent-style-name="SBCparagraphfirst" style:family="paragraph">
      <style:text-properties style:use-window-font-color="true"/>
    </style:style>
    <style:style style:name="T440" style:parent-style-name="DefaultParagraphFont" style:family="text">
      <style:text-properties style:use-window-font-color="true"/>
    </style:style>
    <style:style style:name="T441" style:parent-style-name="DefaultParagraphFont" style:family="text">
      <style:text-properties style:use-window-font-color="true"/>
    </style:style>
    <style:style style:name="T442" style:parent-style-name="CommentReference" style:family="text">
      <style:text-properties style:font-name="Bitstream Vera Serif" style:font-name-asian="Bitstream Vera Sans" style:font-name-complex="Lucidasans" style:use-window-font-color="true"/>
    </style:style>
    <style:style style:name="T443" style:parent-style-name="DefaultParagraphFont" style:family="text">
      <style:text-properties style:use-window-font-color="true"/>
    </style:style>
    <style:style style:name="P444" style:parent-style-name="SBCparagraphfirst" style:family="paragraph">
      <style:text-properties style:use-window-font-color="true"/>
    </style:style>
    <style:style style:name="T445" style:parent-style-name="CommentReference" style:family="text">
      <style:text-properties style:font-name="Bitstream Vera Serif" style:font-name-asian="Bitstream Vera Sans" style:font-name-complex="Lucidasans" fo:font-weight="normal" style:font-weight-asian="normal"/>
    </style:style>
    <style:style style:name="P446" style:parent-style-name="SBCreference" style:list-style-name="LFO26" style:family="paragraph">
      <style:paragraph-properties fo:margin-left="0.3937in" fo:text-indent="-0.3937in">
        <style:tab-stops/>
      </style:paragraph-properties>
    </style:style>
    <style:style style:name="T447" style:parent-style-name="Tipodeletrapredefinidodoparágrafo" style:family="text">
      <style:text-properties fo:language="en" fo:country="US"/>
    </style:style>
    <style:style style:name="T448" style:parent-style-name="Hiperligação" style:family="text">
      <style:text-properties fo:language="en" fo:country="US"/>
    </style:style>
    <style:style style:name="T449" style:parent-style-name="Hiperligação" style:family="text">
      <style:text-properties fo:language="en" fo:country="US"/>
    </style:style>
    <style:style style:name="T450" style:parent-style-name="Hiperligação" style:family="text">
      <style:text-properties fo:language="en" fo:country="US"/>
    </style:style>
    <style:style style:name="P451" style:parent-style-name="SBCreference" style:list-style-name="LFO26" style:family="paragraph">
      <style:paragraph-properties fo:margin-left="0.3937in" fo:text-indent="-0.3937in">
        <style:tab-stops/>
      </style:paragraph-properties>
    </style:style>
    <style:style style:name="P452" style:parent-style-name="SBCreference" style:list-style-name="LFO26" style:family="paragraph">
      <style:paragraph-properties fo:margin-left="0.3937in" fo:text-indent="-0.3937in">
        <style:tab-stops/>
      </style:paragraph-properties>
    </style:style>
    <style:style style:name="T453" style:parent-style-name="Tipodeletrapredefinidodoparágrafo" style:family="text">
      <style:text-properties fo:language="en" fo:country="US"/>
    </style:style>
    <style:style style:name="P454" style:parent-style-name="SBCreference" style:list-style-name="LFO26" style:family="paragraph">
      <style:paragraph-properties fo:margin-left="0.3937in" fo:text-indent="-0.3937in">
        <style:tab-stops/>
      </style:paragraph-properties>
    </style:style>
    <style:style style:name="P455" style:parent-style-name="SBCreference" style:list-style-name="LFO26" style:family="paragraph">
      <style:paragraph-properties fo:margin-left="0.3937in" fo:text-indent="-0.3937in">
        <style:tab-stops/>
      </style:paragraph-properties>
    </style:style>
    <style:style style:name="T456" style:parent-style-name="Tipodeletrapredefinidodoparágrafo" style:family="text">
      <style:text-properties fo:language="en" fo:country="US"/>
    </style:style>
    <style:style style:name="T457" style:parent-style-name="Tipodeletrapredefinidodoparágrafo" style:family="text">
      <style:text-properties fo:language="en" fo:country="US"/>
    </style:style>
    <style:style style:name="T458" style:parent-style-name="Hiperligação" style:family="text">
      <style:text-properties fo:language="en" fo:country="US"/>
    </style:style>
    <style:style style:name="T459" style:parent-style-name="Hiperligação" style:family="text">
      <style:text-properties fo:language="en" fo:country="US"/>
    </style:style>
    <style:style style:name="T460" style:parent-style-name="Hiperligação" style:family="text">
      <style:text-properties fo:language="en" fo:country="US"/>
    </style:style>
    <style:style style:name="T461" style:parent-style-name="Tipodeletrapredefinidodoparágrafo" style:family="text">
      <style:text-properties fo:language="en" fo:country="US"/>
    </style:style>
    <style:style style:name="P462" style:parent-style-name="SBCreference" style:list-style-name="LFO26" style:family="paragraph">
      <style:paragraph-properties fo:margin-left="0.3937in" fo:text-indent="-0.3937in">
        <style:tab-stops/>
      </style:paragraph-properties>
    </style:style>
    <style:style style:name="P463" style:parent-style-name="SBCreference" style:list-style-name="LFO26" style:family="paragraph">
      <style:paragraph-properties fo:margin-left="0.3937in" fo:text-indent="-0.3937in">
        <style:tab-stops/>
      </style:paragraph-properties>
    </style:style>
    <style:style style:name="T464" style:parent-style-name="Tipodeletrapredefinidodoparágrafo" style:family="text">
      <style:text-properties fo:language="en" fo:country="US"/>
    </style:style>
    <style:style style:name="T465" style:parent-style-name="Hiperligação" style:family="text">
      <style:text-properties fo:language="en" fo:country="US"/>
    </style:style>
    <style:style style:name="T466" style:parent-style-name="Hiperligação" style:family="text">
      <style:text-properties fo:language="en" fo:country="US"/>
    </style:style>
    <style:style style:name="T467" style:parent-style-name="Hiperligação" style:family="text">
      <style:text-properties fo:language="en" fo:country="US"/>
    </style:style>
    <style:style style:name="T468" style:parent-style-name="Tipodeletrapredefinidodoparágrafo" style:family="text">
      <style:text-properties fo:language="en" fo:country="US"/>
    </style:style>
    <style:style style:name="P469" style:parent-style-name="SBCreference" style:list-style-name="LFO26" style:family="paragraph">
      <style:paragraph-properties fo:margin-left="0.3937in" fo:text-indent="-0.3937in">
        <style:tab-stops/>
      </style:paragraph-properties>
    </style:style>
    <style:style style:name="T470" style:parent-style-name="Tipodeletrapredefinidodoparágrafo" style:family="text">
      <style:text-properties fo:language="en" fo:country="US"/>
    </style:style>
    <style:style style:name="T471" style:parent-style-name="Tipodeletrapredefinidodoparágrafo" style:family="text">
      <style:text-properties fo:language="en" fo:country="US"/>
    </style:style>
    <style:style style:name="P472" style:parent-style-name="SBCreference" style:list-style-name="LFO26" style:family="paragraph">
      <style:paragraph-properties fo:margin-left="0.3937in" fo:text-indent="-0.3937in">
        <style:tab-stops/>
      </style:paragraph-properties>
    </style:style>
    <style:style style:name="T473" style:parent-style-name="Tipodeletrapredefinidodoparágrafo" style:family="text">
      <style:text-properties fo:language="en" fo:country="US"/>
    </style:style>
    <style:style style:name="T474" style:parent-style-name="Hiperligação" style:family="text">
      <style:text-properties fo:language="en" fo:country="US"/>
    </style:style>
    <style:style style:name="T475" style:parent-style-name="Hiperligação" style:family="text">
      <style:text-properties fo:language="en" fo:country="US"/>
    </style:style>
    <style:style style:name="T476" style:parent-style-name="Hiperligação" style:family="text">
      <style:text-properties fo:language="en" fo:country="US"/>
    </style:style>
    <style:style style:name="T477" style:parent-style-name="Hiperligação" style:family="text">
      <style:text-properties fo:language="en" fo:country="US"/>
    </style:style>
    <style:style style:name="T478" style:parent-style-name="Hiperligação" style:family="text">
      <style:text-properties fo:language="en" fo:country="US"/>
    </style:style>
    <style:style style:name="T479" style:parent-style-name="Tipodeletrapredefinidodoparágrafo" style:family="text">
      <style:text-properties fo:language="en" fo:country="US"/>
    </style:style>
    <style:style style:name="P480" style:parent-style-name="SBCreference" style:list-style-name="LFO26" style:family="paragraph">
      <style:paragraph-properties fo:margin-left="0.3937in" fo:text-indent="-0.3937in">
        <style:tab-stops/>
      </style:paragraph-properties>
    </style:style>
    <style:style style:name="T481" style:parent-style-name="Tipodeletrapredefinidodoparágrafo" style:family="text">
      <style:text-properties style:font-name-complex="Times"/>
    </style:style>
    <style:style style:name="T482" style:parent-style-name="Tipodeletrapredefinidodoparágrafo" style:family="text">
      <style:text-properties style:font-name="Cambria Math" style:font-name-complex="Cambria Math"/>
    </style:style>
    <style:style style:name="T483" style:parent-style-name="Tipodeletrapredefinidodoparágrafo" style:family="text">
      <style:text-properties style:font-name="Cambria Math" style:font-name-complex="Cambria Math"/>
    </style:style>
    <style:style style:name="T484" style:parent-style-name="Tipodeletrapredefinidodoparágrafo" style:family="text">
      <style:text-properties style:font-name-complex="Times"/>
    </style:style>
    <style:style style:name="T485" style:parent-style-name="Tipodeletrapredefinidodoparágrafo" style:family="text">
      <style:text-properties style:font-name="Cambria Math" style:font-name-complex="Cambria Math"/>
    </style:style>
    <style:style style:name="T486" style:parent-style-name="Tipodeletrapredefinidodoparágrafo" style:family="text">
      <style:text-properties style:font-name="Cambria Math" style:font-name-complex="Cambria Math"/>
    </style:style>
    <style:style style:name="T487" style:parent-style-name="Tipodeletrapredefinidodoparágrafo" style:family="text">
      <style:text-properties fo:language="en" fo:country="US"/>
    </style:style>
    <style:style style:name="T488" style:parent-style-name="Hiperligação" style:family="text">
      <style:text-properties fo:language="en" fo:country="US"/>
    </style:style>
    <style:style style:name="T489" style:parent-style-name="Hiperligação" style:family="text">
      <style:text-properties fo:language="en" fo:country="US"/>
    </style:style>
    <style:style style:name="T490" style:parent-style-name="Hiperligação" style:family="text">
      <style:text-properties fo:language="en" fo:country="US"/>
    </style:style>
    <style:style style:name="T491" style:parent-style-name="Tipodeletrapredefinidodoparágrafo" style:family="text">
      <style:text-properties fo:language="en" fo:country="US"/>
    </style:style>
    <style:style style:name="P492" style:parent-style-name="SBCreference" style:list-style-name="LFO26" style:family="paragraph">
      <style:paragraph-properties fo:margin-left="0.3937in" fo:text-indent="-0.3937in">
        <style:tab-stops/>
      </style:paragraph-properties>
      <style:text-properties fo:language="en" fo:country="US"/>
    </style:style>
    <style:style style:name="P493" style:parent-style-name="SBCreference" style:list-style-name="LFO26" style:family="paragraph">
      <style:paragraph-properties fo:margin-left="0.3937in" fo:text-indent="-0.3937in">
        <style:tab-stops/>
      </style:paragraph-properties>
    </style:style>
    <style:style style:name="T494" style:parent-style-name="Tipodeletrapredefinidodoparágrafo" style:family="text">
      <style:text-properties fo:language="en" fo:country="US"/>
    </style:style>
    <style:style style:name="T495" style:parent-style-name="Tipodeletrapredefinidodoparágrafo" style:family="text">
      <style:text-properties style:font-name="Cambria Math" style:font-name-complex="Cambria Math" fo:language="en" fo:country="US"/>
    </style:style>
    <style:style style:name="T496" style:parent-style-name="Tipodeletrapredefinidodoparágrafo" style:family="text">
      <style:text-properties fo:language="en" fo:country="US"/>
    </style:style>
    <style:style style:name="P497" style:parent-style-name="SBCreference" style:list-style-name="LFO26" style:family="paragraph">
      <style:paragraph-properties fo:margin-left="0.3937in" fo:text-indent="-0.3937in">
        <style:tab-stops/>
      </style:paragraph-properties>
    </style:style>
    <style:style style:name="T498" style:parent-style-name="Tipodeletrapredefinidodoparágrafo" style:family="text">
      <style:text-properties fo:language="en" fo:country="US"/>
    </style:style>
    <style:style style:name="T499" style:parent-style-name="Tipodeletrapredefinidodoparágrafo" style:family="text">
      <style:text-properties style:font-name="Cambria Math" style:font-name-complex="Cambria Math" fo:language="en" fo:country="US"/>
    </style:style>
    <style:style style:name="T500" style:parent-style-name="Tipodeletrapredefinidodoparágrafo" style:family="text">
      <style:text-properties fo:language="en" fo:country="US"/>
    </style:style>
    <style:style style:name="P501" style:parent-style-name="SBCreference" style:list-style-name="LFO26" style:family="paragraph">
      <style:paragraph-properties fo:margin-left="0.3937in" fo:text-indent="-0.3937in">
        <style:tab-stops/>
      </style:paragraph-properties>
    </style:style>
    <style:style style:name="T502" style:parent-style-name="Tipodeletrapredefinidodoparágrafo" style:family="text">
      <style:text-properties fo:language="en" fo:country="US"/>
    </style:style>
    <style:style style:name="T503" style:parent-style-name="Tipodeletrapredefinidodoparágrafo" style:family="text">
      <style:text-properties style:font-name="Calibri" fo:language="en" fo:country="US"/>
    </style:style>
    <style:style style:name="T504" style:parent-style-name="Hiperligação" style:family="text">
      <style:text-properties style:font-name="Calibri"/>
    </style:style>
    <style:style style:name="T505" style:parent-style-name="Tipodeletrapredefinidodoparágrafo" style:family="text">
      <style:text-properties style:font-name="Calibri"/>
    </style:style>
    <style:style style:name="P506" style:parent-style-name="SBCreference" style:list-style-name="LFO26" style:family="paragraph">
      <style:paragraph-properties fo:margin-left="0.3937in" fo:text-indent="-0.3937in">
        <style:tab-stops/>
      </style:paragraph-properties>
    </style:style>
    <style:style style:name="T507" style:parent-style-name="Tipodeletrapredefinidodoparágrafo" style:family="text">
      <style:text-properties style:font-name="Calibri"/>
    </style:style>
    <style:style style:name="T508" style:parent-style-name="Hiperligação" style:family="text">
      <style:text-properties style:font-name="Calibri"/>
    </style:style>
    <style:style style:name="T509" style:parent-style-name="Tipodeletrapredefinidodoparágrafo" style:family="text">
      <style:text-properties style:font-name="Calibri"/>
    </style:style>
    <style:style style:name="P510" style:parent-style-name="SBCreference" style:list-style-name="LFO26" style:family="paragraph">
      <style:paragraph-properties fo:margin-left="0.3937in" fo:text-indent="-0.3937in">
        <style:tab-stops/>
      </style:paragraph-properties>
    </style:style>
    <style:style style:name="T511" style:parent-style-name="Tipodeletrapredefinidodoparágrafo" style:family="text">
      <style:text-properties style:font-name="Calibri"/>
    </style:style>
    <style:style style:name="T512" style:parent-style-name="Hiperligação" style:family="text">
      <style:text-properties style:font-name="Calibri"/>
    </style:style>
    <style:style style:name="T513" style:parent-style-name="Tipodeletrapredefinidodoparágrafo" style:family="text">
      <style:text-properties style:font-name="Calibri"/>
    </style:style>
    <style:style style:name="P514" style:parent-style-name="SBCreference" style:list-style-name="LFO26" style:family="paragraph">
      <style:paragraph-properties fo:margin-left="0.3937in" fo:text-indent="-0.3937in">
        <style:tab-stops/>
      </style:paragraph-properties>
    </style:style>
    <style:style style:name="T515" style:parent-style-name="Tipodeletrapredefinidodoparágrafo" style:family="text">
      <style:text-properties style:font-name="Calibri" fo:language="en" fo:country="US"/>
    </style:style>
    <style:style style:name="T516" style:parent-style-name="Hiperligação" style:family="text">
      <style:text-properties style:font-name="Calibri" fo:language="en" fo:country="US"/>
    </style:style>
    <style:style style:name="T517" style:parent-style-name="Tipodeletrapredefinidodoparágrafo" style:family="text">
      <style:text-properties style:font-name="Calibri" fo:language="en" fo:country="US"/>
    </style:style>
    <style:style style:name="T518" style:parent-style-name="Tipodeletrapredefinidodoparágrafo" style:family="text">
      <style:text-properties style:font-name="Calibri" fo:language="en" fo:country="US"/>
    </style:style>
    <style:style style:name="P519" style:parent-style-name="SBCreference" style:list-style-name="LFO26" style:family="paragraph">
      <style:paragraph-properties fo:margin-left="0.3937in" fo:text-indent="-0.3937in">
        <style:tab-stops/>
      </style:paragraph-properties>
    </style:style>
    <style:style style:name="T520" style:parent-style-name="Tipodeletrapredefinidodoparágrafo" style:family="text">
      <style:text-properties style:font-name="Calibri" fo:language="en" fo:country="US"/>
    </style:style>
    <style:style style:name="T521" style:parent-style-name="Tipodeletrapredefinidodoparágrafo" style:family="text">
      <style:text-properties fo:language="en" fo:country="US"/>
    </style:style>
    <style:style style:name="T522" style:parent-style-name="Tipodeletrapredefinidodoparágrafo" style:family="text">
      <style:text-properties style:font-name="Calibri"/>
    </style:style>
    <style:style style:name="T523" style:parent-style-name="Tipodeletrapredefinidodoparágrafo" style:family="text">
      <style:text-properties fo:language="en" fo:country="US"/>
    </style:style>
    <style:style style:name="P524" style:parent-style-name="SBCreference" style:list-style-name="LFO26" style:family="paragraph">
      <style:paragraph-properties fo:margin-left="0.3937in" fo:text-indent="-0.3937in">
        <style:tab-stops/>
      </style:paragraph-properties>
    </style:style>
    <style:style style:name="T525" style:parent-style-name="Tipodeletrapredefinidodoparágrafo" style:family="text">
      <style:text-properties style:font-name="Calibri"/>
    </style:style>
    <style:style style:name="T526" style:parent-style-name="Tipodeletrapredefinidodoparágrafo" style:family="text">
      <style:text-properties fo:language="en" fo:country="US"/>
    </style:style>
    <style:style style:name="T527" style:parent-style-name="Tipodeletrapredefinidodoparágrafo" style:family="text">
      <style:text-properties fo:language="en" fo:country="US"/>
    </style:style>
    <style:style style:family="graphic" style:name="a95">
      <style:graphic-properties draw:fill="none" draw:stroke="dash" draw:stroke-dash="a94" svg:stroke-width="0.02083in" svg:stroke-color="#000000" svg:stroke-opacity="100%" draw:stroke-linejoin="miter" svg:stroke-linecap="butt"/>
    </style:style>
    <style:style style:family="graphic" style:name="a179"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97">
      <style:graphic-properties draw:fill="none" draw:stroke="dash" draw:stroke-dash="a96" svg:stroke-width="0.02083in" svg:stroke-color="#000000" svg:stroke-opacity="100%" draw:stroke-linejoin="miter" svg:stroke-linecap="butt"/>
    </style:style>
    <style:style style:family="graphic" style:name="a99">
      <style:graphic-properties draw:fill="none" draw:stroke="dash" draw:stroke-dash="a98" svg:stroke-width="0.02083in" svg:stroke-color="#000000" svg:stroke-opacity="100%" draw:stroke-linejoin="miter" svg:stroke-linecap="butt"/>
    </style:style>
    <style:style style:family="graphic" style:name="a180"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8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82">
      <style:graphic-properties draw:fill="solid" draw:fill-color="#ffffff" draw:opacity="100%" draw:stroke="solid" svg:stroke-width="0.01389in" svg:stroke-color="#70ad47" svg:stroke-opacity="100%" draw:stroke-linejoin="miter" svg:stroke-linecap="butt"/>
    </style:style>
    <style:style style:family="graphic" style:name="a184">
      <style:graphic-properties draw:fill="bitmap" draw:fill-image-name="a183" style:repeat="repeat" draw:fill-image-ref-point="top-left" draw:opacity="100%" draw:stroke="solid" svg:stroke-width="0.01389in" svg:stroke-color="#000000" svg:stroke-opacity="100%" draw:stroke-linejoin="miter" svg:stroke-linecap="butt"/>
    </style:style>
    <style:style style:family="graphic" style:name="a185">
      <style:graphic-properties draw:fill="solid" draw:fill-color="#c55a11" draw:opacity="100%" draw:stroke="solid" svg:stroke-width="0.01389in" svg:stroke-color="#000000" svg:stroke-opacity="100%" draw:stroke-linejoin="miter" svg:stroke-linecap="butt"/>
    </style:style>
    <style:style style:family="graphic" style:name="a200">
      <style:graphic-properties draw:fill="solid" draw:fill-color="#ffffff" draw:opacity="100%" draw:stroke="solid" svg:stroke-width="0.01389in" svg:stroke-color="#70ad47" svg:stroke-opacity="100%" draw:stroke-linejoin="miter" svg:stroke-linecap="butt"/>
    </style:style>
    <style:style style:family="graphic" style:name="a187">
      <style:graphic-properties draw:fill="bitmap" draw:fill-image-name="a186" style:repeat="repeat" draw:fill-image-ref-point="top-left" draw:opacity="100%" draw:stroke="solid" svg:stroke-width="0.01389in" svg:stroke-color="#000000" svg:stroke-opacity="100%" draw:stroke-linejoin="miter" svg:stroke-linecap="butt"/>
    </style:style>
    <style:style style:family="graphic" style:name="a188">
      <style:graphic-properties draw:fill="solid" draw:fill-color="#ffffff" draw:opacity="100%" draw:stroke="solid" svg:stroke-width="0.01389in" svg:stroke-color="#70ad47" svg:stroke-opacity="100%" draw:stroke-linejoin="miter" svg:stroke-linecap="butt"/>
    </style:style>
    <style:style style:family="graphic" style:name="a202">
      <style:graphic-properties draw:fill="bitmap" draw:fill-image-name="a201" style:repeat="repeat" draw:fill-image-ref-point="top-left" draw:opacity="100%" draw:stroke="solid" svg:stroke-width="0.01389in" svg:stroke-color="#000000" svg:stroke-opacity="100%" draw:stroke-linejoin="miter" svg:stroke-linecap="butt"/>
    </style:style>
    <style:style style:family="graphic" style:name="a203">
      <style:graphic-properties draw:fill="none" draw:stroke="solid" svg:stroke-width="0.01389in" svg:stroke-color="#000000" svg:stroke-opacity="100%" draw:stroke-linejoin="miter" svg:stroke-linecap="butt"/>
    </style:style>
    <style:style style:family="graphic" style:name="a204">
      <style:graphic-properties draw:fill="solid" draw:fill-color="#c55a11" draw:opacity="100%" draw:stroke="solid" svg:stroke-width="0.01389in" svg:stroke-color="#000000" svg:stroke-opacity="100%" draw:stroke-linejoin="miter" svg:stroke-linecap="butt"/>
    </style:style>
    <style:style style:family="graphic" style:name="a206">
      <style:graphic-properties draw:fill="bitmap" draw:fill-image-name="a205" style:repeat="repeat" draw:fill-image-ref-point="top-left" draw:opacity="100%" draw:stroke="solid" svg:stroke-width="0.01389in" svg:stroke-color="#000000" svg:stroke-opacity="100%" draw:stroke-linejoin="miter" svg:stroke-linecap="butt"/>
    </style:style>
    <style:style style:family="graphic" style:name="a207">
      <style:graphic-properties draw:fill="none" draw:stroke="solid" svg:stroke-width="0.01389in" svg:stroke-color="#000000" svg:stroke-opacity="100%" draw:stroke-linejoin="miter" svg:stroke-linecap="butt"/>
    </style:style>
    <style:style style:family="graphic" style:name="a208">
      <style:graphic-properties draw:fill="none" draw:stroke="solid" svg:stroke-width="0.01389in" svg:stroke-color="#000000" svg:stroke-opacity="100%" draw:stroke-linejoin="miter" svg:stroke-linecap="butt"/>
    </style:style>
    <style:style style:family="graphic" style:name="a209">
      <style:graphic-properties draw:fill="none" draw:stroke="solid" svg:stroke-width="0.01389in" svg:stroke-color="#000000" svg:stroke-opacity="100%" draw:stroke-linejoin="miter" svg:stroke-linecap="butt"/>
    </style:style>
    <style:style style:family="graphic" style:name="a190">
      <style:graphic-properties draw:fill="bitmap" draw:fill-image-name="a189" style:repeat="repeat" draw:fill-image-ref-point="top-left" draw:opacity="100%" draw:stroke="solid" svg:stroke-width="0.01389in" svg:stroke-color="#000000" svg:stroke-opacity="100%" draw:stroke-linejoin="miter" svg:stroke-linecap="butt"/>
    </style:style>
    <style:style style:family="graphic" style:name="a191">
      <style:graphic-properties draw:fill="solid" draw:fill-color="#c55a11" draw:opacity="100%" draw:stroke="solid" svg:stroke-width="0.01389in" svg:stroke-color="#000000" svg:stroke-opacity="100%" draw:stroke-linejoin="miter" svg:stroke-linecap="butt"/>
    </style:style>
    <style:style style:family="graphic" style:name="a193">
      <style:graphic-properties draw:fill="bitmap" draw:fill-image-name="a192" style:repeat="repeat" draw:fill-image-ref-point="top-left" draw:opacity="100%" draw:stroke="solid" svg:stroke-width="0.01389in" svg:stroke-color="#000000" svg:stroke-opacity="100%" draw:stroke-linejoin="miter" svg:stroke-linecap="butt"/>
    </style:style>
    <style:style style:family="graphic" style:name="a194">
      <style:graphic-properties draw:fill="solid" draw:fill-color="#ffffff" draw:opacity="100%" draw:stroke="solid" svg:stroke-width="0.01389in" svg:stroke-color="#70ad47" svg:stroke-opacity="100%" draw:stroke-linejoin="miter" svg:stroke-linecap="butt"/>
    </style:style>
    <style:style style:family="graphic" style:name="a196">
      <style:graphic-properties draw:fill="bitmap" draw:fill-image-name="a195" style:repeat="repeat" draw:fill-image-ref-point="top-left" draw:opacity="100%" draw:stroke="solid" svg:stroke-width="0.01389in" svg:stroke-color="#000000" svg:stroke-opacity="100%" draw:stroke-linejoin="miter" svg:stroke-linecap="butt"/>
    </style:style>
    <style:style style:family="graphic" style:name="a210">
      <style:graphic-properties draw:fill="none" draw:stroke="solid" svg:stroke-width="0.01389in" svg:stroke-color="#000000" svg:stroke-opacity="100%" draw:stroke-linejoin="miter" svg:stroke-linecap="butt"/>
    </style:style>
    <style:style style:family="graphic" style:name="a197">
      <style:graphic-properties draw:fill="solid" draw:fill-color="#c55a11" draw:opacity="100%" draw:stroke="solid" svg:stroke-width="0.01389in" svg:stroke-color="#000000" svg:stroke-opacity="100%" draw:stroke-linejoin="miter" svg:stroke-linecap="butt"/>
    </style:style>
    <style:style style:family="graphic" style:name="a211">
      <style:graphic-properties draw:fill="none" draw:stroke="solid" svg:stroke-width="0.01389in" svg:stroke-color="#000000" svg:stroke-opacity="100%" draw:stroke-linejoin="miter" svg:stroke-linecap="butt"/>
    </style:style>
    <style:style style:family="graphic" style:name="a212">
      <style:graphic-properties draw:fill="none" draw:stroke="solid" svg:stroke-width="0.01389in" svg:stroke-color="#000000" svg:stroke-opacity="100%" draw:stroke-linejoin="miter" svg:stroke-linecap="butt"/>
    </style:style>
    <style:style style:family="graphic" style:name="a199">
      <style:graphic-properties draw:fill="bitmap" draw:fill-image-name="a198" style:repeat="repeat" draw:fill-image-ref-point="top-left" draw:opacity="100%" draw:stroke="solid" svg:stroke-width="0.01389in" svg:stroke-color="#000000" svg:stroke-opacity="100%" draw:stroke-linejoin="miter" svg:stroke-linecap="butt"/>
    </style:style>
    <style:style style:family="graphic" style:name="a213">
      <style:graphic-properties draw:fill="none" draw:stroke="solid" svg:stroke-width="0.01389in" svg:stroke-color="#000000" svg:stroke-opacity="100%" draw:stroke-linejoin="miter" svg:stroke-linecap="butt"/>
    </style:style>
    <style:style style:family="graphic" style:name="a214">
      <style:graphic-properties draw:fill="none" draw:stroke="solid" svg:stroke-width="0.01389in" svg:stroke-color="#000000" svg:stroke-opacity="100%" draw:stroke-linejoin="miter" svg:stroke-linecap="butt"/>
    </style:style>
    <style:style style:family="graphic" style:name="a215">
      <style:graphic-properties draw:fill="none" draw:stroke="solid" svg:stroke-width="0.01389in" svg:stroke-color="#000000" svg:stroke-opacity="100%" draw:stroke-linejoin="miter" svg:stroke-linecap="butt"/>
    </style:style>
    <style:style style:family="graphic" style:name="a216">
      <style:graphic-properties draw:fill="none" draw:stroke="solid" svg:stroke-width="0.01389in" svg:stroke-color="#000000" svg:stroke-opacity="100%" draw:stroke-linejoin="miter" svg:stroke-linecap="butt"/>
    </style:style>
    <style:style style:family="graphic" style:name="a217">
      <style:graphic-properties draw:fill="none" draw:stroke="solid" svg:stroke-width="0.01389in" svg:stroke-color="#000000" svg:stroke-opacity="100%" draw:stroke-linejoin="miter" svg:stroke-linecap="butt"/>
    </style:style>
    <style:style style:family="graphic" style:name="a218">
      <style:graphic-properties draw:fill="none" draw:stroke="solid" svg:stroke-width="0.01389in" svg:stroke-color="#000000" svg:stroke-opacity="100%" draw:stroke-linejoin="miter" svg:stroke-linecap="butt"/>
    </style:style>
    <style:style style:family="graphic" style:name="a219"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2">
      <style:graphic-properties draw:fill="solid" draw:fill-color="#ffffff" draw:opacity="100%" draw:stroke="solid" svg:stroke-width="0.01389in" svg:stroke-color="#70ad47" svg:stroke-opacity="100%" draw:stroke-linejoin="round" svg:stroke-linecap="round"/>
    </style:style>
    <style:style style:family="graphic" style:name="a223">
      <style:graphic-properties draw:fill="solid" draw:fill-color="#c55a11" draw:opacity="100%" draw:stroke="solid" svg:stroke-width="0.01389in" svg:stroke-color="#000000" svg:stroke-opacity="100%" draw:stroke-linejoin="round" svg:stroke-linecap="round"/>
    </style:style>
    <style:style style:family="graphic" style:name="a225">
      <style:graphic-properties draw:fill="bitmap" draw:fill-image-name="a224" style:repeat="repeat" draw:fill-image-ref-point="top-left" draw:opacity="100%" draw:stroke="solid" svg:stroke-width="0.01389in" svg:stroke-color="#000000" svg:stroke-opacity="100%" draw:stroke-linejoin="round" svg:stroke-linecap="round"/>
    </style:style>
    <style:style style:family="graphic" style:name="a227">
      <style:graphic-properties draw:fill="bitmap" draw:fill-image-name="a226" style:repeat="repeat" draw:fill-image-ref-point="top-left" draw:opacity="100%" draw:stroke="solid" svg:stroke-width="0.01389in" svg:stroke-color="#000000" svg:stroke-opacity="100%" draw:stroke-linejoin="round" svg:stroke-linecap="round"/>
    </style:style>
    <style:style style:family="graphic" style:name="a228"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9"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6"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7">
      <style:graphic-properties draw:fill="solid" draw:fill-color="#ffffff" draw:opacity="100%" draw:stroke="solid" svg:stroke-width="0.01389in" svg:stroke-color="#70ad47" svg:stroke-opacity="100%" draw:stroke-linejoin="miter" svg:stroke-linecap="butt"/>
    </style:style>
    <style:style style:family="graphic" style:name="a239">
      <style:graphic-properties draw:fill="bitmap" draw:fill-image-name="a238" style:repeat="repeat" draw:fill-image-ref-point="top-left" draw:opacity="100%" draw:stroke="solid" svg:stroke-width="0.01389in" svg:stroke-color="#000000" svg:stroke-opacity="100%" draw:stroke-linejoin="miter" svg:stroke-linecap="butt"/>
    </style:style>
    <style:style style:family="graphic" style:name="a10">
      <style:graphic-properties draw:fill="none" draw:stroke="solid" svg:stroke-width="0.02083in" svg:stroke-color="#000000" draw:marker-end="a9" svg:stroke-opacity="100%" draw:stroke-linejoin="miter" svg:stroke-linecap="butt"/>
    </style:style>
    <style:style style:family="graphic" style:name="a11">
      <style:graphic-properties style:wrap="run-through" style:run-through="foreground" style:horizontal-rel="paragraph" style:vertical-rel="paragraph" style:horizontal-pos="from-left" style:vertical-pos="from-top"/>
    </style:style>
    <style:style style:family="graphic" style:name="a12">
      <style:graphic-properties draw:fill="none" draw:stroke="solid" svg:stroke-width="0.02083in" svg:stroke-color="#000000" svg:stroke-opacity="100%" draw:stroke-linejoin="miter" svg:stroke-linecap="butt"/>
    </style:style>
    <style:style style:family="graphic" style:name="a13">
      <style:graphic-properties draw:fill="none" draw:stroke="solid" svg:stroke-width="0.02083in" svg:stroke-color="#000000" svg:stroke-opacity="100%" draw:stroke-linejoin="miter" svg:stroke-linecap="butt"/>
    </style:style>
    <style:style style:family="graphic" style:name="a14">
      <style:graphic-properties draw:fill="none" draw:stroke="solid" svg:stroke-width="0.02083in" svg:stroke-color="#000000" svg:stroke-opacity="100%" draw:stroke-linejoin="miter" svg:stroke-linecap="butt"/>
    </style:style>
    <style:style style:family="graphic" style:name="a16">
      <style:graphic-properties draw:fill="none" draw:stroke="solid" svg:stroke-width="0.02083in" svg:stroke-color="#000000" draw:marker-end="a15" svg:stroke-opacity="100%" draw:stroke-linejoin="miter" svg:stroke-linecap="butt"/>
    </style:style>
    <style:style style:family="graphic" style:name="a17">
      <style:graphic-properties style:wrap="run-through" style:run-through="foreground" style:horizontal-rel="paragraph" style:vertical-rel="paragraph" style:horizontal-pos="from-left" style:vertical-pos="from-top"/>
    </style:style>
    <style:style style:family="graphic" style:name="a18">
      <style:graphic-properties draw:fill="none" draw:stroke="solid" svg:stroke-width="0.02083in" svg:stroke-color="#000000" svg:stroke-opacity="100%" draw:stroke-linejoin="miter" svg:stroke-linecap="butt"/>
    </style:style>
    <style:style style:family="graphic" style:name="a19">
      <style:graphic-properties draw:fill="none" draw:stroke="solid" svg:stroke-width="0.02083in" svg:stroke-color="#000000" svg:stroke-opacity="100%" draw:stroke-linejoin="miter" svg:stroke-linecap="butt"/>
    </style:style>
    <style:style style:family="graphic" style:name="a241">
      <style:graphic-properties draw:fill="bitmap" draw:fill-image-name="a240" style:repeat="repeat" draw:fill-image-ref-point="top-left" draw:opacity="100%" draw:stroke="solid" svg:stroke-width="0.01389in" svg:stroke-color="#000000" svg:stroke-opacity="100%" draw:stroke-linejoin="miter" svg:stroke-linecap="butt"/>
    </style:style>
    <style:style style:family="graphic" style:name="a242">
      <style:graphic-properties draw:fill="solid" draw:fill-color="#c55a11" draw:opacity="100%" draw:stroke="solid" svg:stroke-width="0.01389in" svg:stroke-color="#000000" svg:stroke-opacity="100%" draw:stroke-linejoin="miter" svg:stroke-linecap="butt"/>
    </style:style>
    <style:style style:family="graphic" style:name="a243">
      <style:graphic-properties draw:fill="solid" draw:fill-color="#ffffff" draw:opacity="100%" draw:stroke="solid" svg:stroke-width="0.01389in" svg:stroke-color="#70ad47" svg:stroke-opacity="100%" draw:stroke-linejoin="miter" svg:stroke-linecap="butt"/>
    </style:style>
    <style:style style:family="graphic" style:name="a245">
      <style:graphic-properties draw:fill="bitmap" draw:fill-image-name="a244" style:repeat="repeat" draw:fill-image-ref-point="top-left" draw:opacity="100%" draw:stroke="solid" svg:stroke-width="0.01389in" svg:stroke-color="#000000" svg:stroke-opacity="100%" draw:stroke-linejoin="miter" svg:stroke-linecap="butt"/>
    </style:style>
    <style:style style:family="graphic" style:name="a1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247">
      <style:graphic-properties draw:fill="bitmap" draw:fill-image-name="a246" style:repeat="repeat" draw:fill-image-ref-point="top-left" draw:opacity="100%" draw:stroke="solid" svg:stroke-width="0.01389in" svg:stroke-color="#000000" svg:stroke-opacity="100%" draw:stroke-linejoin="miter" svg:stroke-linecap="butt"/>
    </style:style>
    <style:style style:family="graphic" style:name="a248">
      <style:graphic-properties draw:fill="solid" draw:fill-color="#c55a11" draw:opacity="100%" draw:stroke="solid" svg:stroke-width="0.01389in" svg:stroke-color="#000000" svg:stroke-opacity="100%" draw:stroke-linejoin="miter" svg:stroke-linecap="butt"/>
    </style:style>
    <style:style style:family="graphic" style:name="a102">
      <style:graphic-properties draw:fill="none" draw:stroke="solid" svg:stroke-width="0.00694in" svg:stroke-color="#000000" draw:marker-end="a101" svg:stroke-opacity="100%" draw:stroke-linejoin="miter" svg:stroke-linecap="butt"/>
    </style:style>
    <style:style style:family="graphic" style:name="a249">
      <style:graphic-properties draw:fill="solid" draw:fill-color="#ffffff" draw:opacity="100%" draw:stroke="solid" svg:stroke-width="0.01389in" svg:stroke-color="#70ad47" svg:stroke-opacity="100%" draw:stroke-linejoin="miter" svg:stroke-linecap="butt"/>
    </style:style>
    <style:style style:family="graphic" style:name="a20">
      <style:graphic-properties draw:fill="none" draw:stroke="solid" svg:stroke-width="0.02083in" svg:stroke-color="#000000" svg:stroke-opacity="100%" draw:stroke-linejoin="miter" svg:stroke-linecap="butt"/>
    </style:style>
    <style:style style:family="graphic" style:name="a104">
      <style:graphic-properties draw:fill="none" draw:stroke="solid" svg:stroke-width="0.00694in" svg:stroke-color="#000000" draw:marker-end="a103" svg:stroke-opacity="100%" draw:stroke-linejoin="miter" svg:stroke-linecap="butt"/>
    </style:style>
    <style:style style:family="graphic" style:name="a22">
      <style:graphic-properties draw:fill="none" draw:stroke="solid" svg:stroke-width="0.02083in" svg:stroke-color="#000000" draw:marker-end="a21" svg:stroke-opacity="100%" draw:stroke-linejoin="miter" svg:stroke-linecap="butt"/>
    </style:style>
    <style:style style:family="graphic" style:name="a106">
      <style:graphic-properties draw:fill="none" draw:stroke="solid" svg:stroke-width="0.00694in" svg:stroke-color="#000000" draw:marker-end="a105" svg:stroke-opacity="100%" draw:stroke-linejoin="miter" svg:stroke-linecap="butt"/>
    </style:style>
    <style:style style:family="graphic" style:name="a23">
      <style:graphic-properties draw:fill="none" draw:stroke="solid" svg:stroke-width="0.02083in" svg:stroke-color="#000000" svg:stroke-opacity="100%" draw:stroke-linejoin="miter" svg:stroke-linecap="butt"/>
    </style:style>
    <style:style style:family="graphic" style:name="a24">
      <style:graphic-properties draw:fill="none" draw:stroke="solid" svg:stroke-width="0.02083in" svg:stroke-color="#000000" svg:stroke-opacity="100%" draw:stroke-linejoin="miter" svg:stroke-linecap="butt"/>
    </style:style>
    <style:style style:family="graphic" style:name="a108">
      <style:graphic-properties draw:fill="none" draw:stroke="solid" svg:stroke-width="0.00694in" svg:stroke-color="#000000" draw:marker-end="a107" svg:stroke-opacity="100%" draw:stroke-linejoin="miter" svg:stroke-linecap="butt"/>
    </style:style>
    <style:style style:family="graphic" style:name="a25">
      <style:graphic-properties draw:fill="none" draw:stroke="solid" svg:stroke-width="0.02083in" svg:stroke-color="#000000" svg:stroke-opacity="100%" draw:stroke-linejoin="miter" svg:stroke-linecap="butt"/>
    </style:style>
    <style:style style:family="graphic" style:name="a26">
      <style:graphic-properties draw:fill="none" draw:stroke="solid" svg:stroke-width="0.02083in" svg:stroke-color="#000000" svg:stroke-opacity="100%" draw:stroke-linejoin="miter" svg:stroke-linecap="butt"/>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9">
      <style:graphic-properties style:wrap="run-through" style:run-through="foreground" draw:fill="none" draw:stroke="solid" svg:stroke-width="0.02083in" svg:stroke-color="#000000" draw:marker-end="a28" svg:stroke-opacity="100%" draw:stroke-linejoin="miter" svg:stroke-linecap="butt" style:horizontal-rel="paragraph" style:vertical-rel="paragraph" style:horizontal-pos="from-left" style:vertical-pos="from-top"/>
    </style:style>
    <style:style style:family="graphic" style:name="a251">
      <style:graphic-properties draw:fill="bitmap" draw:fill-image-name="a250" style:repeat="repeat" draw:fill-image-ref-point="top-left" draw:opacity="100%" draw:stroke="solid" svg:stroke-width="0.01389in" svg:stroke-color="#000000" svg:stroke-opacity="100%" draw:stroke-linejoin="miter" svg:stroke-linecap="butt"/>
    </style:style>
    <style:style style:family="graphic" style:name="a253">
      <style:graphic-properties draw:fill="bitmap" draw:fill-image-name="a252" style:repeat="repeat" draw:fill-image-ref-point="top-left" draw:opacity="100%" draw:stroke="solid" svg:stroke-width="0.01389in" svg:stroke-color="#000000" svg:stroke-opacity="100%" draw:stroke-linejoin="miter" svg:stroke-linecap="butt"/>
    </style:style>
    <style:style style:family="graphic" style:name="a254">
      <style:graphic-properties draw:fill="solid" draw:fill-color="#c55a11" draw:opacity="100%" draw:stroke="solid" svg:stroke-width="0.01389in" svg:stroke-color="#000000" svg:stroke-opacity="100%" draw:stroke-linejoin="miter" svg:stroke-linecap="butt"/>
    </style:style>
    <style:style style:family="graphic" style:name="a255">
      <style:graphic-properties draw:fill="solid" draw:fill-color="#ffffff" draw:opacity="100%" draw:stroke="solid" svg:stroke-width="0.01389in" svg:stroke-color="#70ad47" svg:stroke-opacity="100%" draw:stroke-linejoin="miter" svg:stroke-linecap="butt"/>
    </style:style>
    <style:style style:family="graphic" style:name="a110">
      <style:graphic-properties draw:fill="none" draw:stroke="solid" svg:stroke-width="0.00694in" svg:stroke-color="#000000" draw:marker-end="a109" svg:stroke-opacity="100%" draw:stroke-linejoin="miter" svg:stroke-linecap="butt"/>
    </style:style>
    <style:style style:family="graphic" style:name="a257">
      <style:graphic-properties draw:fill="bitmap" draw:fill-image-name="a256" style:repeat="repeat" draw:fill-image-ref-point="top-left" draw:opacity="100%" draw:stroke="solid" svg:stroke-width="0.01389in" svg:stroke-color="#000000" svg:stroke-opacity="100%" draw:stroke-linejoin="miter" svg:stroke-linecap="butt"/>
    </style:style>
    <style:style style:family="graphic" style:name="a111">
      <style:graphic-properties/>
    </style:style>
    <style:style style:family="graphic" style:name="a258">
      <style:graphic-properties draw:fill="none" draw:stroke="solid" svg:stroke-width="0.01389in" svg:stroke-color="#000000" svg:stroke-opacity="100%" draw:stroke-linejoin="miter" svg:stroke-linecap="butt"/>
    </style:style>
    <style:style style:family="graphic" style:name="a112" style:parent-style-name="Graphics">
      <style:graphic-properties fo:border="0.01042in none" fo:background-color="transparent" fo:clip="rect(0in, 0in, 0in, 0in)"/>
    </style:style>
    <style:style style:family="graphic" style:name="a113">
      <style:graphic-properties draw:fill="solid" draw:fill-color="#c5e0b4" draw:opacity="100%" draw:stroke="solid" svg:stroke-width="0.01389in" svg:stroke-color="#548235" svg:stroke-opacity="100%" draw:stroke-linejoin="miter" svg:stroke-linecap="butt"/>
    </style:style>
    <style:style style:family="graphic" style:name="a114">
      <style:graphic-properties draw:fill="solid" draw:fill-color="#bdd7ee" draw:opacity="100%" draw:stroke="solid" svg:stroke-width="0.01389in" svg:stroke-color="#2e75b6" svg:stroke-opacity="100%" draw:stroke-linejoin="miter" svg:stroke-linecap="butt"/>
    </style:style>
    <style:style style:family="graphic" style:name="a31">
      <style:graphic-properties style:wrap="run-through" style:run-through="foreground" draw:fill="none" draw:stroke="solid" svg:stroke-width="0.02083in" svg:stroke-color="#000000" draw:marker-end="a30" svg:stroke-opacity="100%" draw:stroke-linejoin="miter" svg:stroke-linecap="butt" style:horizontal-rel="paragraph" style:vertical-rel="paragraph" style:horizontal-pos="from-left" style:vertical-pos="from-top"/>
    </style:style>
    <style:style style:family="graphic" style:name="a11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style:style>
    <style:style style:family="graphic" style:name="a11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17">
      <style:graphic-properties fo:wrap-option="wrap" fo:padding-top="0.05in" fo:padding-bottom="0.05in" fo:padding-left="0.1in" fo:padding-right="0.1in" draw:textarea-vertical-align="top" draw:textarea-horizontal-align="left" draw:fill="solid" draw:fill-color="#f8cbad" draw:opacity="100%" draw:stroke="solid" svg:stroke-width="0.01389in" svg:stroke-color="#c55a11" svg:stroke-opacity="100%" draw:stroke-linejoin="miter" svg:stroke-linecap="butt"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1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11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7">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draw:fill="solid" draw:fill-color="#a9d18e" draw:opacity="100%" draw:stroke="none"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draw:fill="solid" draw:fill-color="#bfbfb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260">
      <style:graphic-properties draw:fill="bitmap" draw:fill-image-name="a259" style:repeat="repeat" draw:fill-image-ref-point="top-left" draw:opacity="100%" draw:stroke="solid" svg:stroke-width="0.01389in" svg:stroke-color="#000000" svg:stroke-opacity="100%" draw:stroke-linejoin="miter" svg:stroke-linecap="butt"/>
    </style:style>
    <style:style style:family="graphic" style:name="a261">
      <style:graphic-properties draw:fill="solid" draw:fill-color="#c55a11" draw:opacity="100%" draw:stroke="solid" svg:stroke-width="0.01389in" svg:stroke-color="#000000" svg:stroke-opacity="100%" draw:stroke-linejoin="miter" svg:stroke-linecap="butt"/>
    </style:style>
    <style:style style:family="graphic" style:name="a262">
      <style:graphic-properties draw:fill="none" draw:stroke="solid" svg:stroke-width="0.01389in" svg:stroke-color="#000000" svg:stroke-opacity="100%" draw:stroke-linejoin="miter" svg:stroke-linecap="butt"/>
    </style:style>
    <style:style style:family="graphic" style:name="a263">
      <style:graphic-properties draw:fill="none" draw:stroke="solid" svg:stroke-width="0.01389in" svg:stroke-color="#000000" svg:stroke-opacity="100%" draw:stroke-linejoin="miter" svg:stroke-linecap="butt"/>
    </style:style>
    <style:style style:family="graphic" style:name="a264">
      <style:graphic-properties draw:fill="none" draw:stroke="solid" svg:stroke-width="0.01389in" svg:stroke-color="#000000" svg:stroke-opacity="100%" draw:stroke-linejoin="miter" svg:stroke-linecap="butt"/>
    </style:style>
    <style:style style:family="graphic" style:name="a265">
      <style:graphic-properties draw:fill="none" draw:stroke="solid" svg:stroke-width="0.01389in" svg:stroke-color="#000000" svg:stroke-opacity="100%" draw:stroke-linejoin="miter" svg:stroke-linecap="butt"/>
    </style:style>
    <style:style style:family="graphic" style:name="a266">
      <style:graphic-properties draw:fill="none" draw:stroke="solid" svg:stroke-width="0.01389in" svg:stroke-color="#000000" svg:stroke-opacity="100%" draw:stroke-linejoin="miter" svg:stroke-linecap="butt"/>
    </style:style>
    <style:style style:family="graphic" style:name="a12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7">
      <style:graphic-properties draw:fill="none" draw:stroke="solid" svg:stroke-width="0.01389in" svg:stroke-color="#000000" svg:stroke-opacity="100%" draw:stroke-linejoin="miter" svg:stroke-linecap="butt"/>
    </style:style>
    <style:style style:family="graphic" style:name="a12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268">
      <style:graphic-properties draw:fill="none" draw:stroke="solid" svg:stroke-width="0.01389in" svg:stroke-color="#000000" svg:stroke-opacity="100%" draw:stroke-linejoin="miter" svg:stroke-linecap="butt"/>
    </style:style>
    <style:style style:family="graphic" style:name="a12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9">
      <style:graphic-properties draw:fill="none" draw:stroke="solid" svg:stroke-width="0.01389in" svg:stroke-color="#000000" svg:stroke-opacity="100%" draw:stroke-linejoin="miter" svg:stroke-linecap="butt"/>
    </style:style>
    <style:style style:family="graphic" style:name="a12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
      <style:graphic-properties fo:wrap-option="wrap" fo:padding-top="0.05in" fo:padding-bottom="0.05in" fo:padding-left="0.1in" fo:padding-right="0.1in" draw:textarea-vertical-align="top" draw:textarea-horizontal-align="left" draw:fill="solid" draw:fill-color="#d9d9d9" draw:opacity="100%" draw:stroke="solid" svg:stroke-width="0.01389in" svg:stroke-color="#a6a6a6" svg:stroke-opacity="100%" draw:stroke-linejoin="miter" svg:stroke-linecap="butt"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draw:fill="solid" draw:fill-color="#203864" draw:opacity="100%" draw:stroke="none"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draw:fill="solid" draw:fill-color="#ac75d5" draw:opacity="100%" draw:stroke="solid" svg:stroke-width="0.01389in" svg:stroke-color="#7030a0" svg:stroke-opacity="100%" draw:stroke-linejoin="miter" svg:stroke-linecap="butt"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draw:fill="solid" draw:fill-color="#843c0c" draw:opacity="100%" draw:stroke="none" draw:auto-grow-width="false" draw:auto-grow-height="false"/>
      <style:paragraph-properties style:font-independent-line-spacing="true" style:writing-mode="lr-tb"/>
    </style:style>
    <style:style style:family="graphic" style:name="a126">
      <style:graphic-properties fo:wrap-option="wrap" fo:padding-top="0.05in" fo:padding-bottom="0.05in" fo:padding-left="0.1in" fo:padding-right="0.1in" draw:textarea-vertical-align="middle" draw:textarea-horizontal-align="left" draw:fill="solid" draw:fill-color="#ffe699" draw:opacity="100%" draw:stroke="solid" svg:stroke-width="0.01389in" svg:stroke-color="#bf9000" svg:stroke-opacity="100%" draw:stroke-linejoin="miter" svg:stroke-linecap="butt"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
      <style:graphic-properties draw:fill="none" draw:stroke="solid" svg:stroke-width="0.00694in" svg:stroke-color="#262626" svg:stroke-opacity="100%" draw:stroke-linejoin="miter" svg:stroke-linecap="butt"/>
    </style:style>
    <style:style style:family="graphic"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
      <style:graphic-properties draw:fill="none" draw:stroke="solid" svg:stroke-width="0.01389in" svg:stroke-color="#181717" draw:marker-end="a48" svg:stroke-opacity="100%" draw:stroke-linejoin="miter" svg:stroke-linecap="butt"/>
    </style:style>
    <style:style style:family="graphic" style:name="a270">
      <style:graphic-properties draw:fill="none" draw:stroke="solid" svg:stroke-width="0.01389in" svg:stroke-color="#000000" svg:stroke-opacity="100%" draw:stroke-linejoin="miter" svg:stroke-linecap="butt"/>
    </style:style>
    <style:style style:family="graphic" style:name="a27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4">
      <style:graphic-properties draw:fill="solid" draw:fill-color="#ffffff" draw:opacity="100%" draw:stroke="solid" svg:stroke-width="0.01389in" svg:stroke-color="#70ad47" svg:stroke-opacity="100%" draw:stroke-linejoin="round" svg:stroke-linecap="round"/>
    </style:style>
    <style:style style:family="graphic" style:name="a276">
      <style:graphic-properties draw:fill="bitmap" draw:fill-image-name="a275" style:repeat="repeat" draw:fill-image-ref-point="top-left" draw:opacity="100%" draw:stroke="solid" svg:stroke-width="0.01389in" svg:stroke-color="#000000" svg:stroke-opacity="100%" draw:stroke-linejoin="round" svg:stroke-linecap="round"/>
    </style:style>
    <style:style style:family="graphic" style:name="a130">
      <style:graphic-properties draw:fill="none" draw:stroke="solid" svg:stroke-width="0.00694in" svg:stroke-color="#000000" draw:marker-end="a129" svg:stroke-opacity="100%" draw:stroke-linejoin="miter" svg:stroke-linecap="butt"/>
    </style:style>
    <style:style style:family="graphic" style:name="a278">
      <style:graphic-properties draw:fill="bitmap" draw:fill-image-name="a277" style:repeat="repeat" draw:fill-image-ref-point="top-left" draw:opacity="100%" draw:stroke="solid" svg:stroke-width="0.01389in" svg:stroke-color="#000000" svg:stroke-opacity="100%" draw:stroke-linejoin="round" svg:stroke-linecap="round"/>
    </style:style>
    <style:style style:family="graphic" style:name="a132">
      <style:graphic-properties draw:fill="none" draw:stroke="solid" svg:stroke-width="0.00694in" svg:stroke-color="#ed7d31" draw:marker-end="a131" svg:stroke-opacity="100%" draw:stroke-linejoin="miter" svg:stroke-linecap="butt"/>
    </style:style>
    <style:style style:family="graphic" style:name="a279">
      <style:graphic-properties draw:fill="solid" draw:fill-color="#c55a11" draw:opacity="100%" draw:stroke="solid" svg:stroke-width="0.01389in" svg:stroke-color="#000000" svg:stroke-opacity="100%" draw:stroke-linejoin="round" svg:stroke-linecap="round"/>
    </style:style>
    <style:style style:family="graphic" style:name="a134">
      <style:graphic-properties draw:fill="none" draw:stroke="solid" svg:stroke-width="0.00694in" svg:stroke-color="#a5a5a5" draw:marker-end="a133" svg:stroke-opacity="100%" draw:stroke-linejoin="miter" svg:stroke-linecap="butt"/>
    </style:style>
    <style:style style:family="graphic" style:name="a136">
      <style:graphic-properties fo:wrap-option="wrap" fo:padding-top="0.05in" fo:padding-bottom="0.05in" fo:padding-left="0.1in" fo:padding-right="0.1in" draw:textarea-vertical-align="middle" draw:textarea-horizontal-align="left" draw:fill="none" draw:stroke="dash" draw:stroke-dash="a135" svg:stroke-width="0.01389in" svg:stroke-color="#767171" svg:stroke-opacity="100%" draw:stroke-linejoin="miter" svg:stroke-linecap="butt" draw:auto-grow-width="false" draw:auto-grow-height="false"/>
      <style:paragraph-properties style:font-independent-line-spacing="true" style:writing-mode="lr-tb"/>
    </style:style>
    <style:style style:family="graphic" style:name="a52">
      <style:graphic-properties draw:fill="none" draw:stroke="solid" svg:stroke-width="0.01389in" svg:stroke-color="#181717" draw:marker-start="a50" draw:marker-end="a51" svg:stroke-opacity="100%" draw:stroke-linejoin="miter" svg:stroke-linecap="butt"/>
    </style:style>
    <style:style style:family="graphic" style:name="a138">
      <style:graphic-properties draw:fill="none" draw:stroke="solid" svg:stroke-width="0.00694in" svg:stroke-color="#000000" draw:marker-end="a137" svg:stroke-opacity="100%" draw:stroke-linejoin="miter" svg:stroke-linecap="butt"/>
    </style:style>
    <style:style style:family="graphic" style:name="a55">
      <style:graphic-properties draw:fill="none" draw:stroke="solid" svg:stroke-width="0.01389in" svg:stroke-color="#181717" draw:marker-start="a53" draw:marker-end="a54" svg:stroke-opacity="100%" draw:stroke-linejoin="miter" svg:stroke-linecap="butt"/>
    </style:style>
    <style:style style:family="graphic" style:name="a57">
      <style:graphic-properties draw:fill="none" draw:stroke="solid" svg:stroke-width="0.01389in" svg:stroke-color="#181717" draw:marker-end="a56" svg:stroke-opacity="100%" draw:stroke-linejoin="miter" svg:stroke-linecap="butt"/>
    </style:style>
    <style:style style:family="graphic" style:name="a59">
      <style:graphic-properties draw:fill="none" draw:stroke="solid" svg:stroke-width="0.01389in" svg:stroke-color="#181717" draw:marker-end="a58" svg:stroke-opacity="100%" draw:stroke-linejoin="miter" svg:stroke-linecap="butt"/>
    </style:style>
    <style:style style:family="graphic" style:name="a28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6">
      <style:graphic-properties draw:fill="solid" draw:fill-color="#ffffff" draw:opacity="100%" draw:stroke="solid" svg:stroke-width="0.01389in" svg:stroke-color="#70ad47" svg:stroke-opacity="100%" draw:stroke-linejoin="miter" svg:stroke-linecap="butt"/>
    </style:style>
    <style:style style:family="graphic" style:name="a140">
      <style:graphic-properties draw:fill="none" draw:stroke="solid" svg:stroke-width="0.00694in" svg:stroke-color="#7030a0" draw:marker-end="a139" svg:stroke-opacity="100%" draw:stroke-linejoin="miter" svg:stroke-linecap="butt"/>
    </style:style>
    <style:style style:family="graphic" style:name="a300">
      <style:graphic-properties draw:fill="bitmap" draw:fill-image-name="a299" style:repeat="repeat" draw:fill-image-ref-point="top-left" draw:opacity="100%" draw:stroke="solid" svg:stroke-width="0.01389in" svg:stroke-color="#000000" svg:stroke-opacity="100%" draw:stroke-linejoin="miter" svg:stroke-linecap="butt"/>
    </style:style>
    <style:style style:family="graphic" style:name="a288">
      <style:graphic-properties draw:fill="bitmap" draw:fill-image-name="a287" style:repeat="repeat" draw:fill-image-ref-point="top-left" draw:opacity="100%" draw:stroke="solid" svg:stroke-width="0.01389in" svg:stroke-color="#000000" svg:stroke-opacity="100%" draw:stroke-linejoin="miter" svg:stroke-linecap="butt"/>
    </style:style>
    <style:style style:family="graphic" style:name="a142">
      <style:graphic-properties draw:fill="none" draw:stroke="solid" svg:stroke-width="0.00694in" svg:stroke-color="#ffc000" draw:marker-end="a141" svg:stroke-opacity="100%" draw:stroke-linejoin="miter" svg:stroke-linecap="butt"/>
    </style:style>
    <style:style style:family="graphic" style:name="a302">
      <style:graphic-properties draw:fill="bitmap" draw:fill-image-name="a301" style:repeat="repeat" draw:fill-image-ref-point="top-left" draw:opacity="100%" draw:stroke="solid" svg:stroke-width="0.01389in" svg:stroke-color="#000000" svg:stroke-opacity="100%" draw:stroke-linejoin="miter" svg:stroke-linecap="butt"/>
    </style:style>
    <style:style style:family="graphic" style:name="a60">
      <style:graphic-properties/>
    </style:style>
    <style:style style:family="graphic" style:name="a303">
      <style:graphic-properties draw:fill="solid" draw:fill-color="#c55a11" draw:opacity="100%" draw:stroke="solid" svg:stroke-width="0.01389in" svg:stroke-color="#000000" svg:stroke-opacity="100%" draw:stroke-linejoin="miter" svg:stroke-linecap="butt"/>
    </style:style>
    <style:style style:family="graphic" style:name="a144">
      <style:graphic-properties draw:fill="none" draw:stroke="dash" draw:stroke-dash="a143" svg:stroke-width="0.00694in" svg:stroke-color="#afabab" svg:stroke-opacity="100%" draw:stroke-linejoin="miter" svg:stroke-linecap="butt"/>
    </style:style>
    <style:style style:family="graphic" style:name="a61" style:parent-style-name="Graphics">
      <style:graphic-properties fo:border="0.01042in none" fo:background-color="transparent" fo:clip="rect(0in, 0in, 0in, 0in)"/>
    </style:style>
    <style:style style:family="graphic" style:name="a304">
      <style:graphic-properties draw:fill="solid" draw:fill-color="#ffffff" draw:opacity="100%" draw:stroke="solid" svg:stroke-width="0.01389in" svg:stroke-color="#70ad47" svg:stroke-opacity="100%" draw:stroke-linejoin="miter" svg:stroke-linecap="butt"/>
    </style:style>
    <style:style style:family="graphic" style:name="a14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 style:parent-style-name="Graphics">
      <style:graphic-properties fo:border="0.01042in none" fo:background-color="transparent" style:wrap="parallel" style:wrap-contour="false" fo:clip="rect(0.02227in, 0in, 0.02227in, 0in)" style:horizontal-rel="page-content" style:vertical-rel="paragraph" style:horizontal-pos="right" style:vertical-pos="from-top"/>
    </style:style>
    <style:style style:family="graphic" style:name="a146">
      <style:graphic-properties style:wrap="parallel" style:wrap-contour="false" style:horizontal-rel="page-content" style:vertical-rel="paragraph" style:horizontal-pos="right" style:vertical-pos="from-top"/>
    </style:style>
    <style:style style:family="graphic" style:name="a63">
      <style:graphic-properties draw:fill="none" draw:stroke="solid" svg:stroke-width="0.01389in" svg:stroke-color="#172c51" svg:stroke-opacity="100%" draw:stroke-linejoin="miter" svg:stroke-linecap="butt"/>
    </style:style>
    <style:style style:family="graphic" style:name="a306">
      <style:graphic-properties draw:fill="bitmap" draw:fill-image-name="a305" style:repeat="repeat" draw:fill-image-ref-point="top-left" draw:opacity="100%" draw:stroke="solid" svg:stroke-width="0.01389in" svg:stroke-color="#000000" svg:stroke-opacity="100%" draw:stroke-linejoin="miter" svg:stroke-linecap="butt"/>
    </style:style>
    <style:style style:family="graphic" style:name="a147">
      <style:graphic-properties draw:fill="solid" draw:fill-color="#c5e0b4" draw:opacity="100%" draw:stroke="solid" svg:stroke-width="0.01389in" svg:stroke-color="#548235" svg:stroke-opacity="100%" draw:stroke-linejoin="miter" svg:stroke-linecap="butt"/>
    </style:style>
    <style:style style:family="graphic" style:name="a64">
      <style:graphic-properties draw:fill="none" draw:stroke="solid" svg:stroke-width="0.01389in" svg:stroke-color="#172c51" svg:stroke-opacity="100%" draw:stroke-linejoin="miter" svg:stroke-linecap="butt"/>
    </style:style>
    <style:style style:family="graphic" style:name="a307">
      <style:graphic-properties draw:fill="none" draw:stroke="solid" svg:stroke-width="0.01389in" svg:stroke-color="#000000" svg:stroke-opacity="100%" draw:stroke-linejoin="miter" svg:stroke-linecap="butt"/>
    </style:style>
    <style:style style:family="graphic" style:name="a148">
      <style:graphic-properties draw:fill="solid" draw:fill-color="#bdd7ee" draw:opacity="100%" draw:stroke="solid" svg:stroke-width="0.01389in" svg:stroke-color="#2e75b6" svg:stroke-opacity="100%" draw:stroke-linejoin="miter" svg:stroke-linecap="butt"/>
    </style:style>
    <style:style style:family="graphic" style:name="a65">
      <style:graphic-properties draw:fill="none" draw:stroke="solid" svg:stroke-width="0.01389in" svg:stroke-color="#172c51" svg:stroke-opacity="100%" draw:stroke-linejoin="miter" svg:stroke-linecap="butt"/>
    </style:style>
    <style:style style:family="graphic" style:name="a14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66">
      <style:graphic-properties draw:fill="none" draw:stroke="solid" svg:stroke-width="0.01389in" svg:stroke-color="#172c51" svg:stroke-opacity="100%" draw:stroke-linejoin="miter" svg:stroke-linecap="butt"/>
    </style:style>
    <style:style style:family="graphic" style:name="a309">
      <style:graphic-properties draw:fill="bitmap" draw:fill-image-name="a308" style:repeat="repeat" draw:fill-image-ref-point="top-left" draw:opacity="100%" draw:stroke="solid" svg:stroke-width="0.01389in" svg:stroke-color="#000000" svg:stroke-opacity="100%" draw:stroke-linejoin="miter" svg:stroke-linecap="butt"/>
    </style:style>
    <style:style style:family="graphic" style:name="a67">
      <style:graphic-properties fo:wrap-option="wrap" fo:padding-top="0.05in" fo:padding-bottom="0.05in" fo:padding-left="0.1in" fo:padding-right="0.1in" draw:textarea-vertical-align="middle"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68">
      <style:graphic-properties draw:fill="none" draw:stroke="solid" svg:stroke-width="0.01389in" svg:stroke-color="#172c51" svg:stroke-opacity="100%" draw:stroke-linejoin="miter" svg:stroke-linecap="butt"/>
    </style:style>
    <style:style style:family="graphic" style:name="a69">
      <style:graphic-properties draw:fill="none" draw:stroke="solid" svg:stroke-width="0.01389in" svg:stroke-color="#172c51" svg:stroke-opacity="100%" draw:stroke-linejoin="miter" svg:stroke-linecap="butt"/>
    </style:style>
    <style:style style:family="graphic" style:name="a290">
      <style:graphic-properties draw:fill="bitmap" draw:fill-image-name="a289" style:repeat="repeat" draw:fill-image-ref-point="top-left" draw:opacity="100%" draw:stroke="solid" svg:stroke-width="0.01389in" svg:stroke-color="#000000" svg:stroke-opacity="100%" draw:stroke-linejoin="miter" svg:stroke-linecap="butt"/>
    </style:style>
    <style:style style:family="graphic" style:name="a291">
      <style:graphic-properties draw:fill="solid" draw:fill-color="#c55a11" draw:opacity="100%" draw:stroke="solid" svg:stroke-width="0.01389in" svg:stroke-color="#000000" svg:stroke-opacity="100%" draw:stroke-linejoin="miter" svg:stroke-linecap="butt"/>
    </style:style>
    <style:style style:family="graphic" style:name="a292">
      <style:graphic-properties draw:fill="solid" draw:fill-color="#ffffff" draw:opacity="100%" draw:stroke="solid" svg:stroke-width="0.01389in" svg:stroke-color="#70ad47" svg:stroke-opacity="100%" draw:stroke-linejoin="miter" svg:stroke-linecap="butt"/>
    </style:style>
    <style:style style:family="graphic" style:name="a294">
      <style:graphic-properties draw:fill="bitmap" draw:fill-image-name="a293" style:repeat="repeat" draw:fill-image-ref-point="top-left" draw:opacity="100%" draw:stroke="solid" svg:stroke-width="0.01389in" svg:stroke-color="#000000" svg:stroke-opacity="100%" draw:stroke-linejoin="miter" svg:stroke-linecap="butt"/>
    </style:style>
    <style:style style:family="graphic" style:name="a296">
      <style:graphic-properties draw:fill="bitmap" draw:fill-image-name="a295" style:repeat="repeat" draw:fill-image-ref-point="top-left" draw:opacity="100%" draw:stroke="solid" svg:stroke-width="0.01389in" svg:stroke-color="#000000" svg:stroke-opacity="100%" draw:stroke-linejoin="miter" svg:stroke-linecap="butt"/>
    </style:style>
    <style:style style:family="graphic" style:name="a15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10">
      <style:graphic-properties draw:fill="solid" draw:fill-color="#c55a11" draw:opacity="100%" draw:stroke="solid" svg:stroke-width="0.01389in" svg:stroke-color="#000000" svg:stroke-opacity="100%" draw:stroke-linejoin="miter" svg:stroke-linecap="butt"/>
    </style:style>
    <style:style style:family="graphic" style:name="a15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97">
      <style:graphic-properties draw:fill="solid" draw:fill-color="#c55a11" draw:opacity="100%" draw:stroke="solid" svg:stroke-width="0.01389in" svg:stroke-color="#000000" svg:stroke-opacity="100%" draw:stroke-linejoin="miter" svg:stroke-linecap="butt"/>
    </style:style>
    <style:style style:family="graphic" style:name="a311">
      <style:graphic-properties draw:fill="none" draw:stroke="solid" svg:stroke-width="0.01389in" svg:stroke-color="#000000" svg:stroke-opacity="100%" draw:stroke-linejoin="miter" svg:stroke-linecap="butt"/>
    </style:style>
    <style:style style:family="graphic" style:name="a15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98">
      <style:graphic-properties draw:fill="solid" draw:fill-color="#ffffff" draw:opacity="100%" draw:stroke="solid" svg:stroke-width="0.01389in" svg:stroke-color="#70ad47" svg:stroke-opacity="100%" draw:stroke-linejoin="miter" svg:stroke-linecap="butt"/>
    </style:style>
    <style:style style:family="graphic" style:name="a312">
      <style:graphic-properties draw:fill="none" draw:stroke="solid" svg:stroke-width="0.01389in" svg:stroke-color="#000000" svg:stroke-opacity="100%" draw:stroke-linejoin="miter" svg:stroke-linecap="butt"/>
    </style:style>
    <style:style style:family="graphic" style:name="a15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13">
      <style:graphic-properties draw:fill="none" draw:stroke="solid" svg:stroke-width="0.01389in" svg:stroke-color="#000000" svg:stroke-opacity="100%" draw:stroke-linejoin="miter" svg:stroke-linecap="butt"/>
    </style:style>
    <style:style style:family="graphic" style:name="a15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70">
      <style:graphic-properties draw:fill="none" draw:stroke="solid" svg:stroke-width="0.01389in" svg:stroke-color="#172c51" svg:stroke-opacity="100%" draw:stroke-linejoin="miter" svg:stroke-linecap="butt"/>
    </style:style>
    <style:style style:family="graphic" style:name="a314">
      <style:graphic-properties draw:fill="none" draw:stroke="solid" svg:stroke-width="0.01389in" svg:stroke-color="#000000" svg:stroke-opacity="100%" draw:stroke-linejoin="miter" svg:stroke-linecap="butt"/>
    </style:style>
    <style:style style:family="graphic" style:name="a1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5">
      <style:graphic-properties draw:fill="none" draw:stroke="solid" svg:stroke-width="0.01389in" svg:stroke-color="#000000" svg:stroke-opacity="100%" draw:stroke-linejoin="miter" svg:stroke-linecap="butt"/>
    </style:style>
    <style:style style:family="graphic" style:name="a15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6">
      <style:graphic-properties draw:fill="none" draw:stroke="solid" svg:stroke-width="0.01389in" svg:stroke-color="#000000" svg:stroke-opacity="100%" draw:stroke-linejoin="miter" svg:stroke-linecap="butt"/>
    </style:style>
    <style:style style:family="graphic" style:name="a157">
      <style:graphic-properties fo:wrap-option="wrap" fo:padding-top="0.05in" fo:padding-bottom="0.05in" fo:padding-left="0.1in" fo:padding-right="0.1in" draw:textarea-vertical-align="top" draw:textarea-horizontal-align="left" draw:fill="solid" draw:fill-color="#d9d9d9" draw:opacity="100%" draw:stroke="solid" svg:stroke-width="0.01389in" svg:stroke-color="#a6a6a6" svg:stroke-opacity="100%" draw:stroke-linejoin="miter" svg:stroke-linecap="butt"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7">
      <style:graphic-properties draw:fill="none" draw:stroke="solid" svg:stroke-width="0.01389in" svg:stroke-color="#000000" svg:stroke-opacity="100%" draw:stroke-linejoin="miter" svg:stroke-linecap="butt"/>
    </style:style>
    <style:style style:family="graphic" style:name="a158">
      <style:graphic-properties fo:wrap-option="wrap" fo:padding-top="0.05in" fo:padding-bottom="0.05in" fo:padding-left="0.1in" fo:padding-right="0.1in" draw:textarea-vertical-align="middle" draw:textarea-horizontal-align="left" draw:fill="solid" draw:fill-color="#ac75d5" draw:opacity="100%" draw:stroke="solid" svg:stroke-width="0.01389in" svg:stroke-color="#7030a0" svg:stroke-opacity="100%" draw:stroke-linejoin="miter" svg:stroke-linecap="butt"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8">
      <style:graphic-properties draw:fill="none" draw:stroke="solid" svg:stroke-width="0.01389in" svg:stroke-color="#000000" svg:stroke-opacity="100%" draw:stroke-linejoin="miter" svg:stroke-linecap="butt"/>
    </style:style>
    <style:style style:family="graphic" style:name="a159">
      <style:graphic-properties fo:wrap-option="wrap" fo:padding-top="0.05in" fo:padding-bottom="0.05in" fo:padding-left="0.1in" fo:padding-right="0.1in" draw:textarea-vertical-align="middle" draw:textarea-horizontal-align="left" draw:fill="solid" draw:fill-color="#ffe699" draw:opacity="100%" draw:stroke="solid" svg:stroke-width="0.01389in" svg:stroke-color="#bf9000" svg:stroke-opacity="100%" draw:stroke-linejoin="miter" svg:stroke-linecap="butt"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9">
      <style:graphic-properties draw:fill="none" draw:stroke="solid" svg:stroke-width="0.01389in" svg:stroke-color="#000000" svg:stroke-opacity="100%" draw:stroke-linejoin="miter" svg:stroke-linecap="butt"/>
    </style:style>
    <style:style style:family="graphic"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6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0">
      <style:graphic-properties draw:fill="none" draw:stroke="solid" svg:stroke-width="0.01389in" svg:stroke-color="#000000" svg:stroke-opacity="100%" draw:stroke-linejoin="miter" svg:stroke-linecap="butt"/>
    </style:style>
    <style:style style:family="graphic" style:name="a161">
      <style:graphic-properties draw:fill="none" draw:stroke="solid" svg:stroke-width="0.00694in" svg:stroke-color="#262626" svg:stroke-opacity="100%" draw:stroke-linejoin="miter" svg:stroke-linecap="butt"/>
    </style:style>
    <style:style style:family="graphic" style:name="a321">
      <style:graphic-properties draw:fill="none" draw:stroke="solid" svg:stroke-width="0.01389in" svg:stroke-color="#000000" svg:stroke-opacity="100%" draw:stroke-linejoin="miter" svg:stroke-linecap="butt"/>
    </style:style>
    <style:style style:family="graphic" style:name="a322">
      <style:graphic-properties draw:fill="none" draw:stroke="solid" svg:stroke-width="0.01389in" svg:stroke-color="#000000" svg:stroke-opacity="100%" draw:stroke-linejoin="miter" svg:stroke-linecap="butt"/>
    </style:style>
    <style:style style:family="graphic" style:name="a163">
      <style:graphic-properties draw:fill="none" draw:stroke="solid" svg:stroke-width="0.00694in" svg:stroke-color="#000000" draw:marker-end="a162" svg:stroke-opacity="100%" draw:stroke-linejoin="miter" svg:stroke-linecap="butt"/>
    </style:style>
    <style:style style:family="graphic" style:name="a32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draw:fill="none" draw:stroke="solid" svg:stroke-width="0.01389in" svg:stroke-color="#172c51" svg:stroke-opacity="100%" draw:stroke-linejoin="miter" svg:stroke-linecap="butt"/>
    </style:style>
    <style:style style:family="graphic" style:name="a32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65">
      <style:graphic-properties draw:fill="none" draw:stroke="solid" svg:stroke-width="0.00694in" svg:stroke-color="#ed7d31" draw:marker-end="a164" svg:stroke-opacity="100%" draw:stroke-linejoin="miter" svg:stroke-linecap="butt"/>
    </style:style>
    <style:style style:family="graphic" style:name="a81">
      <style:graphic-properties draw:fill="none" draw:stroke="solid" svg:stroke-width="0.01389in" svg:stroke-color="#172c51" svg:stroke-opacity="100%" draw:stroke-linejoin="miter" svg:stroke-linecap="butt"/>
    </style:style>
    <style:style style:family="graphic" style:name="a32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draw:fill="none" draw:stroke="solid" svg:stroke-width="0.01389in" svg:stroke-color="#172c51" svg:stroke-opacity="100%" draw:stroke-linejoin="miter" svg:stroke-linecap="butt"/>
    </style:style>
    <style:style style:family="graphic" style:name="a326">
      <style:graphic-properties draw:fill="solid" draw:fill-color="#ffffff" draw:opacity="100%" draw:stroke="solid" svg:stroke-width="0.01389in" svg:stroke-color="#70ad47" svg:stroke-opacity="100%" draw:stroke-linejoin="round" svg:stroke-linecap="round"/>
    </style:style>
    <style:style style:family="graphic" style:name="a167">
      <style:graphic-properties draw:fill="none" draw:stroke="solid" svg:stroke-width="0.00694in" svg:stroke-color="#a5a5a5" draw:marker-end="a166" svg:stroke-opacity="100%" draw:stroke-linejoin="miter" svg:stroke-linecap="butt"/>
    </style:style>
    <style:style style:family="graphic" style:name="a83">
      <style:graphic-properties draw:fill="none" draw:stroke="solid" svg:stroke-width="0.01389in" svg:stroke-color="#172c51" svg:stroke-opacity="100%" draw:stroke-linejoin="miter" svg:stroke-linecap="butt"/>
    </style:style>
    <style:style style:family="graphic" style:name="a327">
      <style:graphic-properties draw:fill="solid" draw:fill-color="#c55a11" draw:opacity="100%" draw:stroke="solid" svg:stroke-width="0.01389in" svg:stroke-color="#000000" svg:stroke-opacity="100%" draw:stroke-linejoin="round" svg:stroke-linecap="round"/>
    </style:style>
    <style:style style:family="graphic" style:name="a168">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9">
      <style:graphic-properties draw:fill="bitmap" draw:fill-image-name="a328" style:repeat="repeat" draw:fill-image-ref-point="top-left" draw:opacity="100%" draw:stroke="solid" svg:stroke-width="0.01389in" svg:stroke-color="#000000" svg:stroke-opacity="100%" draw:stroke-linejoin="round" svg:stroke-linecap="round"/>
    </style:style>
    <style:style style:family="graphic"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0">
      <style:graphic-properties style:wrap="run-through" style:run-through="foreground" draw:fill="solid" draw:fill-color="#c00000"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7f7f7f"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000000" draw:marker-end="a2"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83in" svg:stroke-color="#000000" draw:marker-end="a4" svg:stroke-opacity="100%" draw:stroke-linejoin="miter" svg:stroke-linecap="butt" style:horizontal-rel="paragraph" style:vertical-rel="paragraph" style:horizontal-pos="from-left" style:vertical-pos="from-top"/>
    </style:style>
    <style:style style:family="graphic" style:name="a6">
      <style:graphic-properties draw:fill="none" draw:stroke="solid" svg:stroke-width="0.02083in" svg:stroke-color="#000000" svg:stroke-opacity="100%" draw:stroke-linejoin="miter" svg:stroke-linecap="butt"/>
    </style:style>
    <style:style style:family="graphic" style:name="a7">
      <style:graphic-properties draw:fill="none" draw:stroke="solid" svg:stroke-width="0.02083in" svg:stroke-color="#000000" svg:stroke-opacity="100%" draw:stroke-linejoin="miter" svg:stroke-linecap="butt"/>
    </style:style>
    <style:style style:family="graphic" style:name="a8">
      <style:graphic-properties draw:fill="none" draw:stroke="solid" svg:stroke-width="0.02083in" svg:stroke-color="#000000" svg:stroke-opacity="100%" draw:stroke-linejoin="miter" svg:stroke-linecap="butt"/>
    </style:style>
    <style:style style:family="graphic" style:name="a170">
      <style:graphic-properties draw:fill="none" draw:stroke="solid" svg:stroke-width="0.00694in" svg:stroke-color="#000000" draw:marker-end="a169" svg:stroke-opacity="100%" draw:stroke-linejoin="miter" svg:stroke-linecap="butt"/>
    </style:style>
    <style:style style:family="graphic" style:name="a331">
      <style:graphic-properties draw:fill="bitmap" draw:fill-image-name="a330" style:repeat="repeat" draw:fill-image-ref-point="top-left" draw:opacity="100%" draw:stroke="solid" svg:stroke-width="0.01389in" svg:stroke-color="#000000" svg:stroke-opacity="100%" draw:stroke-linejoin="round" svg:stroke-linecap="round"/>
    </style:style>
    <style:style style:family="graphic" style:name="a172">
      <style:graphic-properties draw:fill="none" draw:stroke="solid" svg:stroke-width="0.00694in" svg:stroke-color="#7030a0" draw:marker-end="a171" svg:stroke-opacity="100%" draw:stroke-linejoin="miter" svg:stroke-linecap="butt"/>
    </style:style>
    <style:style style:family="graphic" style:name="a33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33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74">
      <style:graphic-properties draw:fill="none" draw:stroke="solid" svg:stroke-width="0.00694in" svg:stroke-color="#ffc000" draw:marker-end="a173" svg:stroke-opacity="100%" draw:stroke-linejoin="miter" svg:stroke-linecap="butt"/>
    </style:style>
    <style:style style:family="graphic" style:name="a90">
      <style:graphic-properties fo:wrap-option="wrap" fo:padding-top="0.05in" fo:padding-bottom="0.05in" fo:padding-left="0.1in" fo:padding-right="0.1in" draw:textarea-vertical-align="top"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top"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34">
      <style:graphic-properties draw:fill="none" draw:stroke="solid" svg:stroke-width="0.01389in" svg:stroke-color="#000000" svg:stroke-opacity="100%" draw:stroke-linejoin="miter" svg:stroke-linecap="butt"/>
    </style:style>
    <style:style style:family="graphic" style:name="a175">
      <style:graphic-properties draw:fill="none" draw:stroke="solid" svg:stroke-width="0.00694in" svg:stroke-color="#0d0d0d" svg:stroke-opacity="100%" draw:stroke-linejoin="miter" svg:stroke-linecap="butt"/>
    </style:style>
    <style:style style:family="graphic" style:name="a17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5">
      <style:graphic-properties style:wrap="parallel" style:wrap-contour="false" style:horizontal-rel="page-content" style:vertical-rel="paragraph" style:horizontal-pos="right" style:vertical-pos="from-top"/>
    </style:style>
    <style:style style:family="graphic" style:name="a93">
      <style:graphic-properties draw:fill="none" draw:stroke="dash" draw:stroke-dash="a92" svg:stroke-width="0.02083in" svg:stroke-color="#000000" svg:stroke-opacity="100%" draw:stroke-linejoin="miter" svg:stroke-linecap="butt"/>
    </style:style>
    <style:style style:family="graphic" style:name="a177">
      <style:graphic-properties style:wrap="parallel" style:wrap-contour="false" style:horizontal-rel="page-content" style:vertical-rel="paragraph" style:horizontal-pos="left" style:vertical-pos="from-top"/>
    </style:style>
    <style:style style:family="graphic" style:name="a178"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office:annotation office:name="0" xml:id="410608028"><dc:creator>Dalton Tavares</dc:creator><dc:date>2023-11-23T08:26:00</dc:date><text:p text:style-name="CommentText">Atenção: para a versão final, atenção ao template. Isso será observado na correção final, conforme observado na planilha de correção divulgada.</text:p></office:annotation>Estudo de Caso sobre o Sistema Operacional Gramine SGX<text:span text:style-name="Ref.denotaderodapé"><text:note text:note-class="footnote" text:id="_ftn0"><text:note-citation text:label="*">*</text:note-citation><text:note-body><text:p text:style-name="SBCfootnote">Adaptação para OpenOffice.org 1.1 feita por Roland Teodorowitsch (roland@ulbra.tche.br) em 29 mar. 2005.</text:p></text:note-body></text:note></text:span><text:span text:style-name="T2"><office:annotation-end office:name="0"/></text:span></text:p>
      <text:p text:style-name="SBCauthors"><text:span text:style-name="Tipodeletrapredefinidodoparágrafo">Gustavo Borges Peres da Silva</text:span><text:span text:style-name="T3">1</text:span></text:p>
      <text:p text:style-name="SBCinstitution"><text:span text:style-name="T4">1</text:span>Departamento de Ciência da Computação – Universidade Federal de Catalão (UFCAT)</text:p>
      <text:p text:style-name="SBCemail">gustavo.silva@discente.ufcat.edu.br</text:p>
      <text:p text:style-name="P5"><text:span text:style-name="T6"><office:annotation office:name="1" xml:id="1653396302"><dc:creator>Dalton Tavares</dc:creator><dc:date>2023-11-23T08:29:00</dc:date><text:p text:style-name="CommentText">Precisa melhorar. Fale sobre a organização do trabalho.<text:s/></text:p></office:annotation>Resumo</text:span><text:span text:style-name="T7"><office:annotation-end office:name="1"/></text:span><text:span text:style-name="T8">.</text:span><text:s/>O Sistema Operacional Gramine SGX oferece um ambiente seguro impulsionado pela tecnologia Intel Software Guard Extensions (SGX), criando "enclaves" na CPU para a execução segura de operações críticas, protegendo assim dados sensíveis contra acessos não autorizados. Projetado para proporcionar isolamento e segurança, o Gramine SGX é uma solução leve que suporta nativamente binários Linux não modificados em qualquer plataforma. Sua funcionalidade estende-se a ambientes de nuvem e borda, permitindo a transição simples de aplicativos para Computação Confidencial com Intel SGX. Este estudo de caso<text:s/><office:annotation office:name="2" xml:id="1972290580"><dc:creator>Dalton Tavares</dc:creator><dc:date>2023-11-23T08:28:00</dc:date><text:p text:style-name="CommentText">??? como assim provavelmente? Explora ou não?</text:p></office:annotation>provavelmente<text:s/><text:span text:style-name="T9"><office:annotation-end office:name="2"/></text:span>explora implementações específicas do Gramine SGX, destacando benefícios tangíveis em segurança e confidencialidade de dados. Exemplos práticos podem ser fornecidos, demonstrando sua aplicação eficaz em setores como finanças e seguros, militares, comércio, saúde e assistência soucial ou em contextos que exigem uma camada robusta de proteção de informações.</text:p>
      <text:list text:style-name="Outline" text:continue-numbering="true">
        <text:list-item>
          <text:p text:style-name="P10">Introdução</text:p>
        </text:list-item>
      </text:list>
      <text:p text:style-name="P11">A evolução das ameaças cibernéticas demanda inovações contínuas em segurança computacional, e é nesse contexto que o Sistema Operacional Gramine SGX emerge como uma solução de destaque. A base de sua robustez reside na tecnologia revolucionária da Intel, Software Guard Extensions (SGX), lançada em 2015<text:s/><text:span text:style-name="T12"><office:annotation office:name="3" xml:id="699983014"><dc:creator>Dalton Tavares</dc:creator><dc:date>2023-11-23T08:30:00</dc:date><text:p text:style-name="CommentText">Revisar citações e referências de acordo com o template.</text:p></office:annotation><text:bookmark-ref text:ref-name="_Ref148643999" text:reference-format="text">[8]</text:bookmark-ref></text:span><text:span text:style-name="T13"><office:annotation-end office:name="3"/></text:span>. Essa tecnologia introduziu um conjunto inovador de instruções de CPU, permitindo que as aplicações utilizem regiões encriptadas de memória chamadas "enclaves".</text:p>
      <text:p text:style-name="P14">Esses enclaves não apenas tornam a execução do código mais segura, mas também protegem os dados processados de acessos não autorizados, inclusive de códigos com alto nível de privilégio, como o kernel, sistema operacional e a BIOS. Em essência, o SGX visa salvaguardar código e dados sensíveis contra modificações e acessos não autorizados. Para compreender o enclave SGX, é crucial reconhecê-lo como opaco (conteúdo interno do enclave é praticamente inacessível e incompreensível para o ambiente externo), ou seja, suas regiões encriptadas isolam-se do restante do ambiente, garantindo que os códigos executados em enclaves sejam considerados confiáveis e protegidos contra ataques privilegiados. Enquanto isso, o restante do ambiente, incluindo o sistema operacional e o hypervisor, é considerado não confiável e potencialmente mal-intencionado<text:s/><text:span text:style-name="T15"><text:bookmark-ref text:ref-name="_Ref148643966" text:reference-format="text">[4]</text:bookmark-ref></text:span>.</text:p>
      <text:p text:style-name="P16">A eficácia do enclave SGX repousa na alocação de parte da memória física (RAM) para enclaves, conhecida como EPC (Enclave Page Cache). Essa memória é encriptada para evitar ataques por hardware, e a chave criptográfica é armazenada de maneira segura<text:s/><text:soft-page-break/>dentro da CPU, mudando aleatoriamente a cada ciclo de energia<text:s/><text:span text:style-name="T17">[</text:span><text:span text:style-name="T18"><text:bookmark-ref text:ref-name="_Ref148644700" text:reference-format="text">1</text:bookmark-ref></text:span><text:span text:style-name="T19">,<text:s/></text:span><text:span text:style-name="T20"><text:bookmark-ref text:ref-name="_Ref148644708" text:reference-format="text">12</text:bookmark-ref></text:span><text:span text:style-name="T21">]<text:s/></text:span>.</text:p>
      <text:p text:style-name="P22">Além disso, o SGX entrega dois mecanismos cruciais para suportar sistemas que demandam alto nível de segurança: a selagem de dados, que criptografa dados destinados a serem salvos fora da região segura do enclave, e a atestação, que permite que o enclave prove sua identidade e integridade a outros enclaves, seja localmente ou remotamente.</text:p>
      <text:p text:style-name="P23">Os sistemas de autenticação podem se beneficiar dessa arquitetura, implementando até três processos principais: Autenticação, que identifica e valida o usuário; Autorização, que determina quais recursos o usuário autenticado pode acessar; e Responsabilização, que registra as ações do usuário durante o acesso aos recursos computacionais<text:s/><text:span text:style-name="T24"><text:bookmark-ref text:ref-name="_Ref148643966" text:reference-format="text">[4]</text:bookmark-ref></text:span>.</text:p>
      <text:p text:style-name="P25">A diferença crucial entre um Trusted Execution Environment (TEE) e a tecnologia Intel Software Guard Extensions (SGX) reside na abordagem de isolamento e proteção.</text:p>
      <text:p text:style-name="P26">O TEE é um ambiente seguro e isolado dentro do processador principal, projetado para proteger dados e código confidenciais contra acessos não autorizados e alterações. Ele opera paralelamente ao sistema operacional principal, garantindo que os dados processados sejam protegidos em um ambiente confiável. O TEE é comumente utilizado em dispositivos como smartphones, decodificadores, consoles de videogame e Smart TVs, proporcionando um ambiente de processamento seguro com recursos dedicados de processamento e armazenamento<text:s/><text:span text:style-name="T27"><text:bookmark-ref text:ref-name="_Ref148643921" text:reference-format="text">[9]</text:bookmark-ref></text:span>.</text:p>
      <text:p text:style-name="P28">Por outro lado, o SGX, parte da família de TEEs, é uma tecnologia específica da Intel que vai além do isolamento físico ao introduzir enclaves dentro da CPU. Esses enclaves oferecem não apenas isolamento robusto, mas também opacidade, tornando o conteúdo interno praticamente inacessível para entidades externas. A principal vantagem do SGX é sua capacidade de proteger dados e código contra ameaças internas, incluindo sistemas operacionais e hypervisors, proporcionando uma camada adicional de segurança em comparação com abordagens tradicionais baseadas em TEE. Entretanto, para poder usar o SGX, ele deve ter sido habilitado pelo BIOS, e apenas alguns BIOS realmente suportam essa tecnologia. Essa é uma das razões pelas quais não é amplamente utilizado<text:s/><text:span text:style-name="T29">[</text:span><text:bookmark-start text:name="_Hlt148645342"/><text:span text:style-name="T30"><text:bookmark-ref text:ref-name="_Ref148643966" text:reference-format="text">4</text:bookmark-ref></text:span><text:bookmark-end text:name="_Hlt148645342"/><text:span text:style-name="T31">,<text:s/></text:span><text:bookmark-start text:name="_Hlt148645353"/><text:span text:style-name="T32"><text:bookmark-ref text:ref-name="_Ref148643999" text:reference-format="text">8</text:bookmark-ref></text:span><text:bookmark-end text:name="_Hlt148645353"/><text:span text:style-name="T33">]</text:span>.</text:p>
      <text:p text:style-name="P34">A utiliza<text:span text:style-name="T35">ção</text:span><text:s/>do Intel SGX pode ter um impacto dramático no design e implementação de software. Por exemplo, a introdução do SGX pode exigir novos modelos de programação ou até mesmo um novo paradigma a ser considerado. No entanto, apesar do rápido desenvolvimento de ambientes de execução confiáveis (TEEs), as tecnologias de software para TEE ainda estão em estágio inicial. Na verdade, para o Intel SGX, não é viável explorar completamente todo o potencial que o SGX pode proporcionar porque a comunidade de pesquisa carece de uma plataforma utilizável para experimentação. Em particular, o acesso à plataforma Intel SGX é atualmente limitado a apenas um grupo seleto de pessoas<text:s/><text:span text:style-name="T36">[</text:span><text:span text:style-name="T37"><text:bookmark-ref text:ref-name="_Ref148643921" text:reference-format="text">9</text:bookmark-ref></text:span><text:span text:style-name="T38">,<text:s/></text:span><text:span text:style-name="T39"><text:bookmark-ref text:ref-name="_Ref148644037" text:reference-format="text">10</text:bookmark-ref></text:span><text:span text:style-name="T40">,<text:s/></text:span><text:span text:style-name="T41"><text:bookmark-ref text:ref-name="_Ref148644073" text:reference-format="text">11</text:bookmark-ref></text:span><text:span text:style-name="T42">]</text:span>. Isso é uma das barreiras fundamentais para a inovação e pesquisa de software sobre o SGX, especialmente em sua fase inicial.<text:s/></text:p>
      <text:p text:style-name="P43">Um adendo também bastante importante, é que o Gramine SGX era conhecido como Graphene SGX, mas por conta de questões organizacionais, a equipe optou por mudar o nome para Gramine <text:s/>SGX e mudar sua localização para um novo repositório do Github no qual todo o desenvolvimento irá continuar por lá.</text:p>
      <text:p text:style-name="P44">Objetivos do trabalho?</text:p>
      <text:p text:style-name="P45"><text:span text:style-name="T46">A seção 2 discute... A seção 3 apresenta... etc etc (outline do restante do artigo).</text:span></text:p>
      <text:list text:style-name="Outline" text:continue-numbering="true">
        <text:list-item>
          <text:p text:style-name="P47"><office:annotation office:name="4" xml:id="1463314513"><dc:creator>Dalton Tavares</dc:creator><dc:date>2023-11-23T08:33:00</dc:date><text:p text:style-name="CommentText">Vide correção.</text:p></office:annotation><text:soft-page-break/>Questões relacionadas a proteção do SO<text:span text:style-name="T48"><office:annotation-end office:name="4"/></text:span></text:p>
        </text:list-item>
      </text:list>
      <text:p text:style-name="P49">No contexto da evolução das ameaças cibernéticas, o Sistema Operacional Gramine SGX destaca-se como uma solução robusta. Sua base reside na tecnologia revolucionária da Intel, Software Guard Extensions (SGX), introduzindo instruções de CPU que permitem o uso de regiões encriptadas de memória chamadas "enclaves". Esses enclaves não apenas tornam a execução do código mais segura, mas também protegem os dados processados de acessos não autorizados, inclusive de códigos com alto nível de privilégio, como o kernel, sistema operacional e a BIOS.</text:p>
      <text:p text:style-name="P50">Além disso, de acordo com Mona Vij (Engenheira principal da Intel Labs), no epsodio aberto da Intel podcast<text:s/><text:span text:style-name="T51"><text:bookmark-ref text:ref-name="_Ref148901522" text:reference-format="text">[13]</text:bookmark-ref></text:span>, o Intel SGX é uma extensão de proteção de software e oferece um espaço para executar seu código onde a confidencialidade e a integridade do código e dos dados são protegidas. A Intel tem um conjunto de instruções para usar esse recurso, mas, como desenvolvedor, você precisa saber o que deseja proteger. Você quer proteger todo o aplicativo? Provavelmente, mas há algum dado confidencial que seu código esteja gerenciando? Muitas vezes, você tem o código e os dados, que são milhões de linhas de código, e precisa descobrir que parte do código precisa ser protegida e o que pode não ser seguro, mas isso pode ser um desafio, dependendo da complexidade do seu software. Normalmente, não se trata de um único desenvolvedor, mas de um conjunto de desenvolvedores criando um aplicativo.<text:s/></text:p>
      <text:p text:style-name="P52">Por outro lado, o Gramine tira o fardo que o desenvolvedor tem relacionado à complexidade e desafios de adaptar código existente, como por exemplo o Snort, que para serem compatíveis e executados em enclaves, pode ser introduzido bugs inadvertidos e isso requirindo um profundo conhecimento do codigo existente. Quando você executa seu aplicativo em Gramine, ele cria automaticamente o enclave para você e pega seu aplicativo e o executa dentro do enclave. Quando você deseja executar um binário, basta digitar o nome do executável e ele começa a ser executado. Com Gramine você pode simplesmente digitar ‘gramine’ e o nome do binário e Gramine fará todo o trabalho de criação do enclave, carregando seu binário dentro do enclave, e então você obtém essas proteções automáticas.</text:p>
      <text:list text:style-name="Outline" text:continue-numbering="true">
        <text:list-item>
          <text:p text:style-name="P53"><office:annotation office:name="5" xml:id="1045493809"><dc:creator>Dalton Tavares</dc:creator><dc:date>2023-11-23T08:34:00</dc:date><text:p text:style-name="CommentText">Vide correção.</text:p></office:annotation>Questões relacionadas a modularidade do S.O<text:span text:style-name="T54"><office:annotation-end office:name="5"/></text:span></text:p>
        </text:list-item>
      </text:list>
      <text:p text:style-name="P55">A modularidade no contexto do Intel SGX (Software Guard eXtensions) revela-se através da criação de enclaves, regiões isoladas de memória que promovem a segurança do sistema operacional. Estes enclaves, introduzidos como uma camada adicional no SGX, encapsulam partes críticas do sistema, contribuindo para a robustez e confidencialidade.</text:p>
      <text:p text:style-name="P56">Ao adotar enclaves seguros, como o Intel SGX, observamos uma nova dimensão de modularidade no sistema operacional. Os enclaves atuam como módulos isolados, permitindo que aplicativos operem em um ambiente seguro. Essa abordagem modular isola efetivamente aplicativos uns dos outros, mas mantém a flexibilidade ao permitir que um superusuário acesse, se necessário. Aqui, a modularidade é clara na interação entre diferentes partes do sistema operacional, como aplicações e superusuários, destacando a capacidade de isolamento e interconexão<text:s/><text:span text:style-name="T57"><text:bookmark-ref text:ref-name="_Ref148901522" text:reference-format="text">[13]</text:bookmark-ref></text:span>.</text:p>
      <text:p text:style-name="P58">O Gramine, ao automatizar a criação de enclaves e facilitar a execução de aplicativos dentro desses ambientes protegidos, contribui para a modularidade ao simplificar o desenvolvimento. Ao isolar automaticamente o código do aplicativo em um enclave, o<text:s/><text:soft-page-break/>Gramine elimina a necessidade de extensivas modificações no código existente, demonstrando uma abordagem modular e eficiente<text:s/><text:bookmark-ref text:ref-name="_Ref148901522" text:reference-format="text">[12, 13]</text:bookmark-ref>.</text:p>
      <text:p text:style-name="P59">É relevante notar que a adesão do Gramine ao Confidential Computing Consortium em 2021 sublinha a importância da modularidade na proteção de dados em uso. Este consórcio, parte da The Linux Foundation, promove princípios fundamentais de confidential computing, centrados na execução de dados sensíveis em Trusted Execution Environments (TEEs). Essa adesão ressalta a necessidade de abordagens modulares para garantir a segurança e a confidencialidade dos dados em um nível fundamental do sistema operacional. Est<text:span text:style-name="T60">á pa</text:span>rticipação no consórcio evidencia como a modularidade é essencial para criar ambientes seguros de computação confidencial. O TEE, oferecido por vários fornecedores, incluindo Intel com SGX e Intel TDX, representa uma abstração modular de hardware que proporciona confidencialidade e integridade aos dados em uso. Esta flexibilidade modular permite a escolha de diferentes TEEs com base nas necessidades de segurança, contribuindo para a generalidade e flexibilidade do S.O<text:s/><text:span text:style-name="T61"><text:bookmark-ref text:ref-name="_Ref148901522" text:reference-format="text">[ 13]</text:bookmark-ref></text:span>.</text:p>
      <text:p text:style-name="P62">Assim, a jornada do SGX, do uso de enclaves à automação com o Gramine e à integração com o Confidential Computing Consortium, destaca a contínua evolução da modularidade como um pilar fundamental na construção de sistemas operacionais seguros e eficientes.</text:p>
      <text:list text:style-name="Outline" text:continue-numbering="true">
        <text:list-item>
          <text:p text:style-name="P63"><office:annotation office:name="6" xml:id="1046182267"><dc:creator>Dalton Tavares</dc:creator><dc:date>2023-11-23T08:34:00</dc:date><text:p text:style-name="CommentText">Vide correção.</text:p></office:annotation>Questões relacionadas a generalidade do S.O.<text:span text:style-name="T64"><office:annotation-end office:name="6"/></text:span></text:p>
        </text:list-item>
      </text:list>
      <text:p text:style-name="P65">O Sistema Operacional Gramine SGX representa um ambiente seguro e inovador que utiliza a tecnologia Intel Software Guard Extensions (SGX) para proporcionar isolamento e proteção a dados sensíveis em sistemas computacionais. Este sistema é projetado com a capacidade de criar "enclaves" seguros diretamente na CPU, onde operações críticas podem ser executadas sem risco de acesso não autorizado<text:s/><text:span text:style-name="T66"><text:bookmark-ref text:ref-name="_Ref148643999" text:reference-format="text">[8</text:bookmark-ref></text:span><text:span text:style-name="T67">,<text:s/></text:span><text:span text:style-name="T68"><text:bookmark-ref text:ref-name="_Ref150119837" text:reference-format="text">14]</text:bookmark-ref></text:span>.</text:p>
      <text:list text:style-name="Outline" text:continue-numbering="true">
        <text:list-item>
          <text:list>
            <text:list-item>
              <text:p text:style-name="P69">Implementação e Estruturas Fundamentais do Intel SGX</text:p>
            </text:list-item>
          </text:list>
        </text:list-item>
      </text:list>
      <text:p text:style-name="P70">O Intel SGX (Software Guard Extensions) propõe uma abordagem revolucionária para a implementação de ambientes de execução segura, introduzindo conceitos fundamentais que redefinem a segurança em sistemas computacionais modernos<text:s/><text:span text:style-name="T71"><text:bookmark-ref text:ref-name="_Ref148643999" text:reference-format="text">[8</text:bookmark-ref></text:span><text:span text:style-name="T72">,<text:s/></text:span><text:span text:style-name="T73"><text:bookmark-ref text:ref-name="_Ref150119837" text:reference-format="text">14]</text:bookmark-ref></text:span>.</text:p>
      <text:p text:style-name="SBCparagraph">Em relação ao processo de como a tecnologia SGX funciona protegendo contra ataques de software, abaixo temos a visualização do processo (Figura 1). Esse processo funciona da seguinte forma:</text:p>
      <text:list text:style-name="LFO13" text:continue-numbering="true">
        <text:list-item>
          <text:p text:style-name="P74">O aplicativo é construído com partes confiáveis e não confiáveis.</text:p>
        </text:list-item>
        <text:list-item>
          <text:p text:style-name="P75">O aplicativo é executado e cria um enclave, que é colocado na memória confiável.</text:p>
        </text:list-item>
        <text:list-item>
          <text:p text:style-name="P76">Uma função confiável é chamada; o código em execução dentro do enclave visualiza dados sem criptografia; o acesso externo aos dados é negado.</text:p>
        </text:list-item>
        <text:list-item>
          <text:p text:style-name="P77">A função retorna; os dados do enclave permanecem na memória confiável.</text:p>
        </text:list-item>
      </text:list>
      <text:soft-page-break/>
      <text:p text:style-name="P78"><draw:custom-shape svg:x="3.87222in" svg:y="2.61736in" svg:width="0.79167in" svg:height="0.79167in" draw:z-index="251654144" draw:id="id0" draw:style-name="a0" draw:name="&quot;Not Allowed&quot; Symbol 3" text:anchor-type="paragraph"><svg:title/><svg:desc/><draw:enhanced-geometry draw:path-stretchpoint-x="21600" draw:path-stretchpoint-y="21600" draw:type="non-primitive" svg:viewBox="0 0 21600 21600" draw:enhanced-path="M ?f11 ?f31 A ?f151 ?f152 ?f153 ?f154 ?f11 ?f31 ?f148 ?f150  W ?f155 ?f156 ?f157 ?f158 ?f11 ?f31 ?f148 ?f150 Z M ?f108 ?f109 A ?f191 ?f192 ?f193 ?f194 ?f108 ?f109 ?f188 ?f190  W ?f195 ?f196 ?f197 ?f198 ?f108 ?f109 ?f188 ?f190 Z M ?f110 ?f111 A ?f234 ?f235 ?f236 ?f237 ?f110 ?f111 ?f231 ?f233  W ?f238 ?f239 ?f240 ?f241 ?f110 ?f111 ?f231 ?f233 Z N" draw:text-areas="?f59 ?f61 ?f60 ?f62" draw:glue-points="?f59 ?f61 ?f59 ?f62 ?f60 ?f62 ?f60 ?f61"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0"/><draw:equation draw:name="f13" draw:formula="0 - 10800000"/><draw:equation draw:name="f14" draw:formula="18750"/><draw:equation draw:name="f15" draw:formula="2700000 + ?f1"/><draw:equation draw:name="f16" draw:formula="?f15 - ?f1"/><draw:equation draw:name="f17" draw:formula="?f7 / 21600"/><draw:equation draw:name="f18" draw:formula="?f6 / 21600"/><draw:equation draw:name="f19" draw:formula="21600 * ?f7"/><draw:equation draw:name="f20" draw:formula="21600 * ?f6"/><draw:equation draw:name="f21" draw:formula="min(?f18, ?f17)"/><draw:equation draw:name="f22" draw:formula="?f19 / ?f8"/><draw:equation draw:name="f23" draw:formula="?f20 / ?f8"/><draw:equation draw:name="f24" draw:formula="?f23 - ?f11"/><draw:equation draw:name="f25" draw:formula="?f22 - ?f11"/><draw:equation draw:name="f26" draw:formula="?f24 / 2"/><draw:equation draw:name="f27" draw:formula="?f25 / 2"/><draw:equation draw:name="f28" draw:formula="min(?f25, ?f24)"/><draw:equation draw:name="f29" draw:formula="0 - ?f25"/><draw:equation draw:name="f30" draw:formula="0 - ?f24"/><draw:equation draw:name="f31" draw:formula="?f11 + ?f26"/><draw:equation draw:name="f32" draw:formula="?f11 + ?f27"/><draw:equation draw:name="f33" draw:formula="?f28 * ?f14"/><draw:equation draw:name="f34" draw:formula="?f27 * ?f21"/><draw:equation draw:name="f35" draw:formula="?f26 * ?f21"/><draw:equation draw:name="f36" draw:formula="?f33 / 100000"/><draw:equation draw:name="f37" draw:formula="atan2(?f29, ?f30)"/><draw:equation draw:name="f38" draw:formula="0 - ?f37"/><draw:equation draw:name="f39" draw:formula="?f38 * ?f0 / ?f9"/><draw:equation draw:name="f40" draw:formula="?f39 - ?f1"/><draw:equation draw:name="f41" draw:formula="?f27 - ?f36"/><draw:equation draw:name="f42" draw:formula="?f26 - ?f36"/><draw:equation draw:name="f43" draw:formula="?f36 / 2"/><draw:equation draw:name="f44" draw:formula="?f16 + ?f1"/><draw:equation draw:name="f45" draw:formula="?f44 * ?f9 / ?f0"/><draw:equation draw:name="f46" draw:formula="0 - ?f45"/><draw:equation draw:name="f47" draw:formula="sin(?f46)"/><draw:equation draw:name="f48" draw:formula="0 - ?f47"/><draw:equation draw:name="f49" draw:formula="?f48"/><draw:equation draw:name="f50" draw:formula="cos(?f46)"/><draw:equation draw:name="f51" draw:formula="0 - ?f50"/><draw:equation draw:name="f52" draw:formula="?f51"/><draw:equation draw:name="f53" draw:formula="?f41 * ?f42"/><draw:equation draw:name="f54" draw:formula="0 - ?f43"/><draw:equation draw:name="f55" draw:formula="?f41 * ?f21"/><draw:equation draw:name="f56" draw:formula="?f42 * ?f21"/><draw:equation draw:name="f57" draw:formula="?f49 * ?f27"/><draw:equation draw:name="f58" draw:formula="?f52 * ?f26"/><draw:equation draw:name="f59" draw:formula="?f32 - ?f57"/><draw:equation draw:name="f60" draw:formula="?f32 + ?f57"/><draw:equation draw:name="f61" draw:formula="?f31 - ?f58"/><draw:equation draw:name="f62" draw:formula="?f31 + ?f58"/><draw:equation draw:name="f63" draw:formula="?f40 + ?f1"/><draw:equation draw:name="f64" draw:formula="?f63 * ?f9 / ?f0"/><draw:equation draw:name="f65" draw:formula="0 - ?f64"/><draw:equation draw:name="f66" draw:formula="sin(?f65)"/><draw:equation draw:name="f67" draw:formula="0 - ?f66"/><draw:equation draw:name="f68" draw:formula="?f67"/><draw:equation draw:name="f69" draw:formula="cos(?f65)"/><draw:equation draw:name="f70" draw:formula="0 - ?f69"/><draw:equation draw:name="f71" draw:formula="?f70"/><draw:equation draw:name="f72" draw:formula="?f68 * ?f42"/><draw:equation draw:name="f73" draw:formula="?f71 * ?f41"/><draw:equation draw:name="f74" draw:formula="?f72 * ?f72"/><draw:equation draw:name="f75" draw:formula="?f73 * ?f73"/><draw:equation draw:name="f76" draw:formula="?f74 + ?f75"/><draw:equation draw:name="f77" draw:formula="?f76 + ?f12"/><draw:equation draw:name="f78" draw:formula="sqrt(?f77)"/><draw:equation draw:name="f79" draw:formula="?f53 / ?f78"/><draw:equation draw:name="f80" draw:formula="0 - ?f79"/><draw:equation draw:name="f81" draw:formula="atan2(?f80, ?f54)"/><draw:equation draw:name="f82" draw:formula="0 - ?f81"/><draw:equation draw:name="f83" draw:formula="?f82 * ?f0 / ?f9"/><draw:equation draw:name="f84" draw:formula="?f83 - ?f1"/><draw:equation draw:name="f85" draw:formula="?f84 * 2"/><draw:equation draw:name="f86" draw:formula="?f40 - ?f84"/><draw:equation draw:name="f87" draw:formula="?f13 + ?f85"/><draw:equation draw:name="f88" draw:formula="?f86 - ?f0"/><draw:equation draw:name="f89" draw:formula="?f86 + ?f1"/><draw:equation draw:name="f90" draw:formula="?f89 * ?f9 / ?f0"/><draw:equation draw:name="f91" draw:formula="0 - ?f90"/><draw:equation draw:name="f92" draw:formula="sin(?f91)"/><draw:equation draw:name="f93" draw:formula="0 - ?f92"/><draw:equation draw:name="f94" draw:formula="?f93"/><draw:equation draw:name="f95" draw:formula="cos(?f91)"/><draw:equation draw:name="f96" draw:formula="0 - ?f95"/><draw:equation draw:name="f97" draw:formula="?f96"/><draw:equation draw:name="f98" draw:formula="?f94 * ?f42"/><draw:equation draw:name="f99" draw:formula="?f97 * ?f41"/><draw:equation draw:name="f100" draw:formula="?f98 * ?f98"/><draw:equation draw:name="f101" draw:formula="?f99 * ?f99"/><draw:equation draw:name="f102" draw:formula="?f100 + ?f101"/><draw:equation draw:name="f103" draw:formula="?f102 + ?f12"/><draw:equation draw:name="f104" draw:formula="sqrt(?f103)"/><draw:equation draw:name="f105" draw:formula="?f53 / ?f104"/><draw:equation draw:name="f106" draw:formula="?f94 * ?f105"/><draw:equation draw:name="f107" draw:formula="?f97 * ?f105"/><draw:equation draw:name="f108" draw:formula="?f32 + ?f106"/><draw:equation draw:name="f109" draw:formula="?f31 + ?f107"/><draw:equation draw:name="f110" draw:formula="?f32 - ?f106"/><draw:equation draw:name="f111" draw:formula="?f31 - ?f107"/><draw:equation draw:name="f112" draw:formula="21550000 - ?f10"/><draw:equation draw:name="f113" draw:formula="if(?f112, ?f10, 21550000)"/><draw:equation draw:name="f114" draw:formula="-21550000 - ?f113"/><draw:equation draw:name="f115" draw:formula="if(?f114, -21550000, ?f113)"/><draw:equation draw:name="f116" draw:formula="?f0 + ?f115"/><draw:equation draw:name="f117" draw:formula="?f0 + ?f1"/><draw:equation draw:name="f118" draw:formula="?f117 * ?f9 / ?f0"/><draw:equation draw:name="f119" draw:formula="0 - ?f118"/><draw:equation draw:name="f120" draw:formula="cos(?f119)"/><draw:equation draw:name="f121" draw:formula="0 - ?f120"/><draw:equation draw:name="f122" draw:formula="?f121 * ?f34"/><draw:equation draw:name="f123" draw:formula="sin(?f119)"/><draw:equation draw:name="f124" draw:formula="0 - ?f123"/><draw:equation draw:name="f125" draw:formula="?f124 * ?f35"/><draw:equation draw:name="f126" draw:formula="sqrt(?f122 * ?f122 + ?f125 * ?f125 + 0 * 0)"/><draw:equation draw:name="f127" draw:formula="?f34 * ?f35 / ?f126"/><draw:equation draw:name="f128" draw:formula="?f124 * ?f127"/><draw:equation draw:name="f129" draw:formula="?f11 - ?f128"/><draw:equation draw:name="f130" draw:formula="?f121 * ?f127"/><draw:equation draw:name="f131" draw:formula="?f31 - ?f130"/><draw:equation draw:name="f132" draw:formula="?f129 - ?f34"/><draw:equation draw:name="f133" draw:formula="?f131 - ?f35"/><draw:equation draw:name="f134" draw:formula="?f129 + ?f34"/><draw:equation draw:name="f135" draw:formula="?f131 + ?f35"/><draw:equation draw:name="f136" draw:formula="?f116 + ?f1"/><draw:equation draw:name="f137" draw:formula="?f136 * ?f9 / ?f0"/><draw:equation draw:name="f138" draw:formula="0 - ?f137"/><draw:equation draw:name="f139" draw:formula="cos(?f138)"/><draw:equation draw:name="f140" draw:formula="0 - ?f139"/><draw:equation draw:name="f141" draw:formula="?f140 * ?f34"/><draw:equation draw:name="f142" draw:formula="sin(?f138)"/><draw:equation draw:name="f143" draw:formula="0 - ?f142"/><draw:equation draw:name="f144" draw:formula="?f143 * ?f35"/><draw:equation draw:name="f145" draw:formula="sqrt(?f141 * ?f141 + ?f144 * ?f144 + 0 * 0)"/><draw:equation draw:name="f146" draw:formula="?f34 * ?f35 / ?f145"/><draw:equation draw:name="f147" draw:formula="?f143 * ?f146"/><draw:equation draw:name="f148" draw:formula="?f129 + ?f147"/><draw:equation draw:name="f149" draw:formula="?f140 * ?f146"/><draw:equation draw:name="f150" draw:formula="?f131 + ?f149"/><draw:equation draw:name="f151" draw:formula="if(?f115, ?f11, ?f132)"/><draw:equation draw:name="f152" draw:formula="if(?f115, ?f31, ?f133)"/><draw:equation draw:name="f153" draw:formula="if(?f115, ?f11, ?f134)"/><draw:equation draw:name="f154" draw:formula="if(?f115, ?f31, ?f135)"/><draw:equation draw:name="f155" draw:formula="if(?f115, ?f132, ?f148)"/><draw:equation draw:name="f156" draw:formula="if(?f115, ?f133, ?f150)"/><draw:equation draw:name="f157" draw:formula="if(?f115, ?f134, ?f148)"/><draw:equation draw:name="f158" draw:formula="if(?f115, ?f135, ?f150)"/><draw:equation draw:name="f159" draw:formula="21550000 - ?f87"/><draw:equation draw:name="f160" draw:formula="if(?f159, ?f87, 21550000)"/><draw:equation draw:name="f161" draw:formula="-21550000 - ?f160"/><draw:equation draw:name="f162" draw:formula="if(?f161, -21550000, ?f160)"/><draw:equation draw:name="f163" draw:formula="?f86 + ?f162"/><draw:equation draw:name="f164" draw:formula="?f96 * ?f55"/><draw:equation draw:name="f165" draw:formula="?f93 * ?f56"/><draw:equation draw:name="f166" draw:formula="sqrt(?f164 * ?f164 + ?f165 * ?f165 + 0 * 0)"/><draw:equation draw:name="f167" draw:formula="?f55 * ?f56 / ?f166"/><draw:equation draw:name="f168" draw:formula="?f93 * ?f167"/><draw:equation draw:name="f169" draw:formula="?f108 - ?f168"/><draw:equation draw:name="f170" draw:formula="?f96 * ?f167"/><draw:equation draw:name="f171" draw:formula="?f109 - ?f170"/><draw:equation draw:name="f172" draw:formula="?f169 - ?f55"/><draw:equation draw:name="f173" draw:formula="?f171 - ?f56"/><draw:equation draw:name="f174" draw:formula="?f169 + ?f55"/><draw:equation draw:name="f175" draw:formula="?f171 + ?f56"/><draw:equation draw:name="f176" draw:formula="?f163 + ?f1"/><draw:equation draw:name="f177" draw:formula="?f176 * ?f9 / ?f0"/><draw:equation draw:name="f178" draw:formula="0 - ?f177"/><draw:equation draw:name="f179" draw:formula="cos(?f178)"/><draw:equation draw:name="f180" draw:formula="0 - ?f179"/><draw:equation draw:name="f181" draw:formula="?f180 * ?f55"/><draw:equation draw:name="f182" draw:formula="sin(?f178)"/><draw:equation draw:name="f183" draw:formula="0 - ?f182"/><draw:equation draw:name="f184" draw:formula="?f183 * ?f56"/><draw:equation draw:name="f185" draw:formula="sqrt(?f181 * ?f181 + ?f184 * ?f184 + 0 * 0)"/><draw:equation draw:name="f186" draw:formula="?f55 * ?f56 / ?f185"/><draw:equation draw:name="f187" draw:formula="?f183 * ?f186"/><draw:equation draw:name="f188" draw:formula="?f169 + ?f187"/><draw:equation draw:name="f189" draw:formula="?f180 * ?f186"/><draw:equation draw:name="f190" draw:formula="?f171 + ?f189"/><draw:equation draw:name="f191" draw:formula="if(?f162, ?f108, ?f172)"/><draw:equation draw:name="f192" draw:formula="if(?f162, ?f109, ?f173)"/><draw:equation draw:name="f193" draw:formula="if(?f162, ?f108, ?f174)"/><draw:equation draw:name="f194" draw:formula="if(?f162, ?f109, ?f175)"/><draw:equation draw:name="f195" draw:formula="if(?f162, ?f172, ?f188)"/><draw:equation draw:name="f196" draw:formula="if(?f162, ?f173, ?f190)"/><draw:equation draw:name="f197" draw:formula="if(?f162, ?f174, ?f188)"/><draw:equation draw:name="f198" draw:formula="if(?f162, ?f175, ?f190)"/><draw:equation draw:name="f199" draw:formula="?f88 + ?f162"/><draw:equation draw:name="f200" draw:formula="?f88 + ?f1"/><draw:equation draw:name="f201" draw:formula="?f200 * ?f9 / ?f0"/><draw:equation draw:name="f202" draw:formula="0 - ?f201"/><draw:equation draw:name="f203" draw:formula="cos(?f202)"/><draw:equation draw:name="f204" draw:formula="0 - ?f203"/><draw:equation draw:name="f205" draw:formula="?f204 * ?f55"/><draw:equation draw:name="f206" draw:formula="sin(?f202)"/><draw:equation draw:name="f207" draw:formula="0 - ?f206"/><draw:equation draw:name="f208" draw:formula="?f207 * ?f56"/><draw:equation draw:name="f209" draw:formula="sqrt(?f205 * ?f205 + ?f208 * ?f208 + 0 * 0)"/><draw:equation draw:name="f210" draw:formula="?f55 * ?f56 / ?f209"/><draw:equation draw:name="f211" draw:formula="?f207 * ?f210"/><draw:equation draw:name="f212" draw:formula="?f110 - ?f211"/><draw:equation draw:name="f213" draw:formula="?f204 * ?f210"/><draw:equation draw:name="f214" draw:formula="?f111 - ?f213"/><draw:equation draw:name="f215" draw:formula="?f212 - ?f55"/><draw:equation draw:name="f216" draw:formula="?f214 - ?f56"/><draw:equation draw:name="f217" draw:formula="?f212 + ?f55"/><draw:equation draw:name="f218" draw:formula="?f214 + ?f56"/><draw:equation draw:name="f219" draw:formula="?f199 + ?f1"/><draw:equation draw:name="f220" draw:formula="?f219 * ?f9 / ?f0"/><draw:equation draw:name="f221" draw:formula="0 - ?f220"/><draw:equation draw:name="f222" draw:formula="cos(?f221)"/><draw:equation draw:name="f223" draw:formula="0 - ?f222"/><draw:equation draw:name="f224" draw:formula="?f223 * ?f55"/><draw:equation draw:name="f225" draw:formula="sin(?f221)"/><draw:equation draw:name="f226" draw:formula="0 - ?f225"/><draw:equation draw:name="f227" draw:formula="?f226 * ?f56"/><draw:equation draw:name="f228" draw:formula="sqrt(?f224 * ?f224 + ?f227 * ?f227 + 0 * 0)"/><draw:equation draw:name="f229" draw:formula="?f55 * ?f56 / ?f228"/><draw:equation draw:name="f230" draw:formula="?f226 * ?f229"/><draw:equation draw:name="f231" draw:formula="?f212 + ?f230"/><draw:equation draw:name="f232" draw:formula="?f223 * ?f229"/><draw:equation draw:name="f233" draw:formula="?f214 + ?f232"/><draw:equation draw:name="f234" draw:formula="if(?f162, ?f110, ?f215)"/><draw:equation draw:name="f235" draw:formula="if(?f162, ?f111, ?f216)"/><draw:equation draw:name="f236" draw:formula="if(?f162, ?f110, ?f217)"/><draw:equation draw:name="f237" draw:formula="if(?f162, ?f111, ?f218)"/><draw:equation draw:name="f238" draw:formula="if(?f162, ?f215, ?f231)"/><draw:equation draw:name="f239" draw:formula="if(?f162, ?f216, ?f233)"/><draw:equation draw:name="f240" draw:formula="if(?f162, ?f217, ?f231)"/><draw:equation draw:name="f241" draw:formula="if(?f162, ?f218, ?f233)"/></draw:enhanced-geometry></draw:custom-shape><draw:custom-shape svg:width="0.69792in" svg:height="1.42431in" draw:z-index="251653120" draw:id="id1" draw:style-name="a1" draw:transform="translate(-0.34896in -0.71215in) rotate(-3.14159) translate(4.27812in 2.94265in)" draw:name="Arrow: Down 2"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6308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onnector draw:type="line" svg:x1="4.20764in" svg:y1="1.15139in" svg:x2="4.21389in" svg:y2="1.56042in" draw:z-index="251658240" draw:id="id2" draw:style-name="a3" draw:name="Straight Arrow Connector 5" text:anchor-type="paragraph"><svg:title/><svg:desc/></draw:connector><draw:connector draw:type="line" svg:x1="3.89028in" svg:y1="1.87639in" svg:x2="2.91111in" svg:y2="2.10278in" draw:z-index="251655168" draw:id="id3" draw:style-name="a5" draw:name="Straight Arrow Connector 4" text:anchor-type="paragraph"><svg:title/><svg:desc/></draw:connector><draw:g draw:z-index="251669504" draw:name="Group 9" draw:id="id8" draw:style-name="a11" text:anchor-type="paragraph"><svg:title/><svg:desc/><draw:connector draw:type="line" svg:x1="2.10898in" svg:y1="0.82014in" svg:x2="2.22357in" svg:y2="0.95631in" draw:id="id4" draw:style-name="a6" draw:name="Straight Connector 6"><svg:title/><svg:desc/></draw:connector><draw:connector draw:type="line" svg:x1="2.10898in" svg:y1="1.08548in" svg:x2="2.22357in" svg:y2="0.94931in" draw:id="id5" draw:style-name="a7" draw:name="Straight Connector 6"><svg:title/><svg:desc/></draw:connector><draw:connector draw:type="line" svg:x1="2.10898in" svg:y1="1.07222in" svg:x2="2.22357in" svg:y2="1.2084in" draw:id="id6" draw:style-name="a8" draw:name="Straight Connector 6"><svg:title/><svg:desc/></draw:connector><draw:connector draw:type="line" svg:x1="2.22148in" svg:y1="1.20347in" svg:x2="2.14232in" svg:y2="1.28889in" draw:id="id7" draw:style-name="a10" draw:name="Straight Arrow Connector 8"><svg:title/><svg:desc/></draw:connector></draw:g><draw:g draw:z-index="251671552" draw:name="Group 9" draw:id="id13" draw:style-name="a17" text:anchor-type="paragraph"><svg:title/><svg:desc/><draw:connector draw:type="line" svg:x1="2.12014in" svg:y1="1.55903in" svg:x2="2.23472in" svg:y2="1.6952in" draw:id="id9" draw:style-name="a12" draw:name="Straight Connector 6"><svg:title/><svg:desc/></draw:connector><draw:connector draw:type="line" svg:x1="2.12014in" svg:y1="1.82437in" svg:x2="2.23472in" svg:y2="1.68819in" draw:id="id10" draw:style-name="a13" draw:name="Straight Connector 6"><svg:title/><svg:desc/></draw:connector><draw:connector draw:type="line" svg:x1="2.12014in" svg:y1="1.81111in" svg:x2="2.23472in" svg:y2="1.94729in" draw:id="id11" draw:style-name="a14" draw:name="Straight Connector 6"><svg:title/><svg:desc/></draw:connector><draw:connector draw:type="line" svg:x1="2.23264in" svg:y1="1.94236in" svg:x2="2.15347in" svg:y2="2.02778in" draw:id="id12" draw:style-name="a16" draw:name="Straight Arrow Connector 8"><svg:title/><svg:desc/></draw:connector></draw:g><draw:g draw:z-index="251680768" draw:name="Group 10" draw:id="id23" draw:style-name="a27" text:anchor-type="paragraph"><svg:title/><svg:desc/><draw:g draw:name="Group 9" draw:id="id18"><svg:title/><svg:desc/><draw:connector draw:type="line" svg:x1="2.10675in" svg:y1="2.84564in" svg:x2="2.22134in" svg:y2="2.98182in" draw:id="id14" draw:style-name="a18" draw:name="Straight Connector 6"><svg:title/><svg:desc/></draw:connector><draw:connector draw:type="line" svg:x1="2.10675in" svg:y1="3.11098in" svg:x2="2.22134in" svg:y2="2.97481in" draw:id="id15" draw:style-name="a19" draw:name="Straight Connector 6"><svg:title/><svg:desc/></draw:connector><draw:connector draw:type="line" svg:x1="2.10675in" svg:y1="3.09772in" svg:x2="2.22134in" svg:y2="3.2339in" draw:id="id16" draw:style-name="a20" draw:name="Straight Connector 6"><svg:title/><svg:desc/></draw:connector><draw:connector draw:type="line" svg:x1="2.21925in" svg:y1="3.22897in" svg:x2="2.14009in" svg:y2="3.31439in" draw:id="id17" draw:style-name="a22" draw:name="Straight Arrow Connector 8"><svg:title/><svg:desc/></draw:connector></draw:g><draw:connector draw:type="line" svg:x1="2.10625in" svg:y1="2.59382in" svg:x2="2.22083in" svg:y2="2.72993in" draw:id="id19" draw:style-name="a23" draw:name="Straight Connector 6"><svg:title/><svg:desc/></draw:connector><draw:connector draw:type="line" svg:x1="2.10625in" svg:y1="2.85833in" svg:x2="2.22083in" svg:y2="2.72215in" draw:id="id20" draw:style-name="a24" draw:name="Straight Connector 6"><svg:title/><svg:desc/></draw:connector><draw:connector draw:type="line" svg:x1="2.11109in" svg:y1="2.3299in" svg:x2="2.22568in" svg:y2="2.46601in" draw:id="id21" draw:style-name="a25" draw:name="Straight Connector 6"><svg:title/><svg:desc/></draw:connector><draw:connector draw:type="line" svg:x1="2.11109in" svg:y1="2.59676in" svg:x2="2.22568in" svg:y2="2.46065in" draw:id="id22" draw:style-name="a26" draw:name="Straight Connector 6"><svg:title/><svg:desc/></draw:connector></draw:g><draw:connector draw:type="line" svg:x1="3.38273in" svg:y1="1.04656in" svg:x2="3.80426in" svg:y2="1.04656in" draw:z-index="251681792" draw:id="id24" draw:style-name="a29" draw:name="Straight Arrow Connector 13" text:anchor-type="paragraph"><svg:title/><svg:desc/></draw:connector><draw:connector draw:type="line" svg:x1="2.82818in" svg:y1="2.02249in" svg:x2="3.19485in" svg:y2="1.25582in" draw:z-index="251657216" draw:id="id25" draw:style-name="a31" draw:name="Straight Arrow Connector 4" text:anchor-type="paragraph"><svg:title/><svg:desc/></draw:connector><text:span text:style-name="T79"><draw:frame draw:style-name="a32" draw:name="Picture 1" text:anchor-type="as-char" svg:x="0in" svg:y="0in" svg:width="4.16981in" svg:height="4.16981in" style:rel-width="scale" style:rel-height="scale"><draw:image xlink:href="media/image1.png" xlink:type="simple" xlink:show="embed" xlink:actuate="onLoad"/><svg:title/><svg:desc>A diagram of a computer system

Description automatically generated</svg:desc></draw:frame></text:span></text:p>
      <text:p text:style-name="P80">Figura 1. Visualização do Processo.</text:p>
      <text:list text:style-name="Outline" text:continue-numbering="true">
        <text:list-item>
          <text:list>
            <text:list-item>
              <text:p text:style-name="P81">Divisão de Aplicativos: Partes Seguras e Não Seguras</text:p>
            </text:list-item>
          </text:list>
        </text:list-item>
      </text:list>
      <text:p text:style-name="P82">O SGX reorganiza a arquitetura de aplicativos, segregando-os em duas partes distintas: uma parte segura e outra não segura. A parte segura, conhecida como enclave, é um ambiente isolado na CPU, enquanto a parte não segura mantém as operações convencionais. Essa divisão permite isolar operações críticas em enclaves seguros, protegendo-as contra acessos não autorizados e garantindo que apenas o código interno ao enclave tenha visibilidade sobre seus dados<text:s/><text:span text:style-name="T83"><text:bookmark-ref text:ref-name="_Ref148643999" text:reference-format="text">[8</text:bookmark-ref></text:span><text:span text:style-name="T84">,<text:s/></text:span><text:span text:style-name="T85"><text:bookmark-ref text:ref-name="_Ref150119837" text:reference-format="text">14]</text:bookmark-ref></text:span>.</text:p>
      <text:list text:style-name="Outline" text:continue-numbering="true">
        <text:list-item>
          <text:list>
            <text:list-item>
              <text:p text:style-name="P86">Lançamento de Enclaves em Memória Protegida</text:p>
            </text:list-item>
          </text:list>
        </text:list-item>
      </text:list>
      <text:p text:style-name="P87">O processo de lançamento de enclaves envolve a alocação de memória protegida, denominada Enclave Page Cache (EPC). Essa região de memória é criptografada pelo Memory Encryption Engine (MEE), uma unidade dedicada, assegurando a confidencialidade e integridade dos dados do enclave. A EPC atua como um cofre digital, garantindo que dados sensíveis permaneçam inacessíveis a qualquer entidade não autorizada<text:s/><text:span text:style-name="T88"><text:bookmark-ref text:ref-name="_Ref148643999" text:reference-format="text">[8</text:bookmark-ref></text:span><text:span text:style-name="T89">,<text:s/></text:span><text:span text:style-name="T90"><text:bookmark-ref text:ref-name="_Ref150119837" text:reference-format="text">14]</text:bookmark-ref></text:span>.</text:p>
      <text:list text:style-name="Outline" text:continue-numbering="true">
        <text:list-item>
          <text:list>
            <text:list-item>
              <text:p text:style-name="P91">Execução de Funções de Enclave com Acesso Restrito</text:p>
            </text:list-item>
          </text:list>
        </text:list-item>
      </text:list>
      <text:p text:style-name="P92">Ao chamar funções dentro de um enclave, apenas o código interno ao enclave pode acessar seus dados. Isso implica que operações críticas são realizadas com acesso restrito, protegendo a confidencialidade das operações executadas. Qualquer tentativa de acesso externo é rigorosamente negada, garantindo a segurança das operações realizadas dentro do enclave<text:s/><text:span text:style-name="T93"><text:bookmark-ref text:ref-name="_Ref148643999" text:reference-format="text">[8</text:bookmark-ref></text:span><text:span text:style-name="T94">,<text:s/></text:span><text:span text:style-name="T95"><text:bookmark-ref text:ref-name="_Ref150119837" text:reference-format="text">14]</text:bookmark-ref></text:span>.</text:p>
      <text:soft-page-break/>
      <text:list text:style-name="Outline" text:continue-numbering="true">
        <text:list-item>
          <text:list>
            <text:list-item>
              <text:p text:style-name="P96">Estrutura do Ambiente de Execução Seguro (TEE) do SGX Integrado</text:p>
            </text:list-item>
          </text:list>
        </text:list-item>
      </text:list>
      <text:p text:style-name="P97">O ambiente de execução seguro (TEE) do SGX é integrado ao processo do host, com o aplicativo contendo seu próprio código e dados, enquanto o enclave mantém sua própria cópia isolada. Essa estrutura proporciona uma camada adicional de segurança, protegendo não apenas o enclave, mas também garantindo que o código do aplicativo não possa comprometer as operações seguras do enclave<text:s/><text:span text:style-name="T98"><text:bookmark-ref text:ref-name="_Ref148643999" text:reference-format="text">[8</text:bookmark-ref></text:span><text:span text:style-name="T99">,<text:s/></text:span><text:span text:style-name="T100"><text:bookmark-ref text:ref-name="_Ref150119837" text:reference-format="text">14]</text:bookmark-ref></text:span>.</text:p>
      <text:p text:style-name="P101">Sendo assim, abaixo na Figura 2, veremos a visão geral de alto nível de hardware/software do SGX para termos uma base de como funciona.</text:p>
      <text:p text:style-name="P102"><draw:g draw:name="Canvas 14" draw:id="id46" draw:style-name="a60" text:anchor-type="as-char"><svg:title/><svg:desc/><draw:custom-shape svg:x="1.04057in" svg:y="1.7356in" svg:width="3.09375in" svg:height="0.51021in" draw:id="id26" draw:style-name="a33" draw:name="Rectangle 2044752498"><svg:title/><svg:desc/><text:p text:style-name="P103">SGX<text:s/></text:p><text:p text:style-name="P104"><text:span text:style-name="T105">Módulo</text:span></text:p><draw:enhanced-geometry draw:type="non-primitive" svg:viewBox="0 0 21600 21600" draw:enhanced-path="M 0 0 L 21600 0 21600 21600 0 21600 Z N"/></draw:custom-shape><draw:custom-shape svg:x="1.53762in" svg:y="0.12221in" svg:width="0.97917in" svg:height="0.41767in" draw:id="id27" draw:style-name="a34" draw:name="Rectangle 2010633657"><svg:title/><svg:desc/><text:p text:style-name="P106">Enclave</text:p><draw:enhanced-geometry draw:type="non-primitive" svg:viewBox="0 0 21600 21600" draw:enhanced-path="M 0 0 L 21600 0 21600 21600 0 21600 Z N"/></draw:custom-shape><draw:custom-shape svg:x="2.69281in" svg:y="0.12221in" svg:width="0.97917in" svg:height="0.4173in" draw:id="id28" draw:style-name="a35" draw:name="Rectangle 1983118253"><svg:title/><svg:desc/><text:p text:style-name="P107">Enclave</text:p><draw:enhanced-geometry draw:type="non-primitive" svg:viewBox="0 0 21600 21600" draw:enhanced-path="M 0 0 L 21600 0 21600 21600 0 21600 Z N"/></draw:custom-shape><draw:custom-shape svg:x="1.52614in" svg:y="0.85874in" svg:width="0.97917in" svg:height="0.501in" draw:id="id29" draw:style-name="a36" draw:name="Rectangle 1680747670"><svg:title/><svg:desc/><text:p text:style-name="P108">SGX User Runtime</text:p><draw:enhanced-geometry draw:type="non-primitive" svg:viewBox="0 0 21600 21600" draw:enhanced-path="M 0 0 L 21600 0 21600 21600 0 21600 Z N"/></draw:custom-shape><draw:custom-shape svg:x="2.69281in" svg:y="0.85874in" svg:width="0.97917in" svg:height="0.50062in" draw:id="id30" draw:style-name="a37" draw:name="Rectangle 216901580"><svg:title/><svg:desc/><text:p text:style-name="P109">SGX User Runtime</text:p><draw:enhanced-geometry draw:type="non-primitive" svg:viewBox="0 0 21600 21600" draw:enhanced-path="M 0 0 L 21600 0 21600 21600 0 21600 Z N"/></draw:custom-shape><draw:custom-shape svg:x="1.09434in" svg:y="1.77419in" svg:width="0.80315in" svg:height="0.44276in" draw:id="id31" draw:style-name="a38" draw:name="Rectangle 1489552879"><svg:title/><svg:desc/><text:p text:style-name="P110">Page Tables</text:p><draw:enhanced-geometry draw:type="non-primitive" svg:viewBox="0 0 21600 21600" draw:enhanced-path="M 0 0 L 21600 0 21600 21600 0 21600 Z N"/></draw:custom-shape><draw:custom-shape svg:x="0.96353in" svg:y="2.72562in" svg:width="3.26415in" svg:height="1.04829in" draw:id="id32" draw:style-name="a39" draw:name="Rectangle 1073638864"><svg:title/><svg:desc/><text:p text:style-name="P111">Plataforma</text:p><text:p text:style-name="P112"/><text:p text:style-name="P113"/><draw:enhanced-geometry draw:type="non-primitive" svg:viewBox="0 0 21600 21600" draw:enhanced-path="M 0 0 L 21600 0 21600 21600 0 21600 Z N"/></draw:custom-shape><draw:custom-shape svg:x="1.04057in" svg:y="3.13122in" svg:width="2.35692in" svg:height="0.4423in" draw:id="id33" draw:style-name="a40" draw:name="Rectangle 1910473625"><svg:title/><svg:desc/><text:p text:style-name="P114">EPC</text:p><draw:enhanced-geometry draw:type="non-primitive" svg:viewBox="0 0 21600 21600" draw:enhanced-path="M 0 0 L 21600 0 21600 21600 0 21600 Z N"/></draw:custom-shape><draw:custom-shape svg:x="3.46226in" svg:y="3.12892in" svg:width="0.69938in" svg:height="0.4423in" draw:id="id34" draw:style-name="a41" draw:name="Rectangle 464356606"><svg:title/><svg:desc/><text:p text:style-name="P115">EPCM</text:p><draw:enhanced-geometry draw:type="non-primitive" svg:viewBox="0 0 21600 21600" draw:enhanced-path="M 0 0 L 21600 0 21600 21600 0 21600 Z N"/></draw:custom-shape><draw:custom-shape svg:x="0.0107in" svg:y="1.7351in" svg:width="1.16986in" svg:height="0.56548in" draw:id="id35" draw:style-name="a42" draw:name="Rectangle 1295921685"><svg:title/><svg:desc/><text:p text:style-name="P116">Ambiente Privilegiado</text:p><draw:enhanced-geometry draw:type="non-primitive" svg:viewBox="0 0 21600 21600" draw:enhanced-path="M 0 0 L 21600 0 21600 21600 0 21600 Z N"/></draw:custom-shape><draw:custom-shape svg:x="0in" svg:y="0.39576in" svg:width="1.16418in" svg:height="0.70111in" draw:id="id36" draw:style-name="a43" draw:name="Rectangle 1706121972"><svg:title/><svg:desc/><text:p text:style-name="P117">Ambiente de Aplicação</text:p><draw:enhanced-geometry draw:type="non-primitive" svg:viewBox="0 0 21600 21600" draw:enhanced-path="M 0 0 L 21600 0 21600 21600 0 21600 Z N"/></draw:custom-shape><draw:custom-shape svg:x="0in" svg:y="3.0369in" svg:width="0.99852in" svg:height="0.50062in" draw:id="id37" draw:style-name="a44" draw:name="Rectangle 1785196883"><svg:title/><svg:desc/><text:p text:style-name="P118">Hardware Exposto</text:p><draw:enhanced-geometry draw:type="non-primitive" svg:viewBox="0 0 21600 21600" draw:enhanced-path="M 0 0 L 21600 0 21600 21600 0 21600 Z N"/></draw:custom-shape><draw:custom-shape svg:x="4.26866in" svg:y="0in" svg:width="1.63433in" svg:height="1.53259in" draw:id="id38" draw:style-name="a45" draw:name="Rectangle 1839542248"><svg:title/><svg:desc/><text:p text:style-name="P119">Instruções</text:p><text:p text:style-name="P120">EEXIT</text:p><text:p text:style-name="P121">EGETKEY</text:p><text:p text:style-name="P122">EREPORT</text:p><text:p text:style-name="P123">EENTER</text:p><text:p text:style-name="P124">ERESUME</text:p><draw:enhanced-geometry draw:type="non-primitive" svg:viewBox="0 0 21600 21600" draw:enhanced-path="M 0 0 L 21600 0 21600 21600 0 21600 Z N"/></draw:custom-shape><draw:custom-shape svg:x="4.26866in" svg:y="0.95763in" svg:width="1.63433in" svg:height="1.88497in" draw:id="id39" draw:style-name="a46" draw:name="Rectangle 1504420053"><svg:title/><svg:desc/><text:p text:style-name="P125">Instruções</text:p><text:p text:style-name="P126">EADD <text:s text:c="15"/>ELDB</text:p><text:p text:style-name="P127">EBLOCK <text:s text:c="10"/>ELDU</text:p><text:p text:style-name="P128">ECREATE <text:s text:c="8"/>EPA</text:p><text:p text:style-name="P129">EDBGRD <text:s text:c="9"/>EREMOVE</text:p><text:p text:style-name="P130">EBDGWR <text:s text:c="8"/>ETRACE</text:p><text:p text:style-name="P131">EINIT <text:s text:c="15"/>EWB</text:p><text:p text:style-name="P132">EEXTEND</text:p><draw:enhanced-geometry draw:type="non-primitive" svg:viewBox="0 0 21600 21600" draw:enhanced-path="M 0 0 L 21600 0 21600 21600 0 21600 Z N"/></draw:custom-shape><draw:custom-shape svg:x="4.25437in" svg:y="2.72561in" svg:width="1.64861in" svg:height="1.06284in" draw:id="id40" draw:style-name="a47" draw:name="Rectangle 1835910391"><svg:title/><svg:desc/><text:p text:style-name="P133">Estrutura de<text:s/></text:p><text:p text:style-name="Normal"><text:span text:style-name="T134">Dados de Hardware</text:span></text:p><text:p text:style-name="Normal"><text:span text:style-name="T135">Hardware</text:span></text:p><text:p text:style-name="P136">Runtime</text:p><text:p text:style-name="P137">Application</text:p><text:p text:style-name="P138">OS Data structure</text:p><text:p text:style-name="P139"/><draw:enhanced-geometry draw:type="non-primitive" svg:viewBox="0 0 21600 21600" draw:enhanced-path="M 0 0 L 21600 0 21600 21600 0 21600 Z N"/></draw:custom-shape><draw:connector draw:type="line" svg:x1="2.58745in" svg:y1="2.2455in" svg:x2="2.5956in" svg:y2="2.72523in" draw:id="id41" draw:style-name="a49" draw:name="Straight Arrow Connector 2015725941"><svg:title/><svg:desc/></draw:connector><draw:connector draw:type="line" svg:x1="2.02312in" svg:y1="0.55593in" svg:x2="2.01572in" svg:y2="0.85862in" draw:id="id42" draw:style-name="a52" draw:name="Straight Arrow Connector 1059003063"><svg:title/><svg:desc/></draw:connector><draw:connector draw:type="line" svg:x1="3.19653in" svg:y1="0.5398in" svg:x2="3.18239in" svg:y2="0.85862in" draw:id="id43" draw:style-name="a55" draw:name="Straight Arrow Connector 2020216379"><svg:title/><svg:desc/></draw:connector><draw:connector draw:type="line" svg:x1="2.00578in" svg:y1="1.37085in" svg:x2="2.00578in" svg:y2="1.73535in" draw:id="id44" draw:style-name="a57" draw:name="Straight Arrow Connector 129768291"><svg:title/><svg:desc/></draw:connector><draw:connector draw:type="line" svg:x1="3.18239in" svg:y1="1.35917in" svg:x2="3.18239in" svg:y2="1.7351in" draw:id="id45" draw:style-name="a59" draw:name="Straight Arrow Connector 1119326872"><svg:title/><svg:desc/></draw:connector></draw:g></text:p>
      <text:p text:style-name="P140">Figura 2. Arquitetura SGX.</text:p>
      <text:p text:style-name="P141">Segundo a Intel, o ponto chave dessa perspectiva arquitetural é que a tradução básica de virtual para físico ocorria por meio dessas tabelas de páginas. No entanto, a enclave possui seu próprio espaço de memória restrito, e é por isso que existe essa estrutura adicional (Plataforma retângulo de cor cinza).</text:p>
      <text:p text:style-name="P142">Essencialmente, chamamos isso de Enclave Page Cache (EPC) e Enclave Page Cache Manager (EPCM), que supervisiona todas as páginas alocadas para o enclave.</text:p>
      <text:p text:style-name="P143">Imagine um programa no qual algumas informações confidenciais não podem ser comprometidas, como dados cruciais. Para garantir a confidencialidade de seus próprios dados, você pode recorrer ao Ambiente de Execução SGX.</text:p>
      <text:p text:style-name="P144">Dentro desse ambiente SGX, utilizamos as páginas do EPC e do gerenciador do EPC para monitorar quantas páginas foram designadas para o enclave.</text:p>
      <text:list text:style-name="Outline" text:continue-numbering="true">
        <text:list-item>
          <text:list>
            <text:list-item>
              <text:p text:style-name="P145">Instruções do Intel SGX</text:p>
            </text:list-item>
          </text:list>
        </text:list-item>
      </text:list>
      <text:p text:style-name="P146">O SGX introduz 18 novas instruções, divididas entre o supervisor e o usuário. Essas instruções, como EADD, EENTER, EEXIT, EREPORT e EGETKEY, desempenham papéis cruciais na criação, entrada e saída de enclaves, bem como na obtenção de chaves<text:s/><text:soft-page-break/>e relatórios de atestação. Elas são os blocos de construção fundamentais que capacitam a operação segura dos enclaves<text:s/><text:span text:style-name="T147"><text:bookmark-ref text:ref-name="_Ref148643999" text:reference-format="text">[8</text:bookmark-ref></text:span><text:span text:style-name="T148">,<text:s/></text:span><text:span text:style-name="T149"><text:bookmark-ref text:ref-name="_Ref150119837" text:reference-format="text">14]</text:bookmark-ref></text:span>.</text:p>
      <text:p text:style-name="P150"><text:span text:style-name="T151">Tabela 1. Instruções do Intel SGX em destaque.</text:span></text:p>
      <text:p text:style-name="P152"><draw:frame draw:style-name="a61" draw:name="Picture 1" text:anchor-type="as-char" svg:x="0in" svg:y="0in" svg:width="5.90556in" svg:height="2.51042in" style:rel-width="scale" style:rel-height="scale"><draw:image xlink:href="media/image2.emf" xlink:type="simple" xlink:show="embed" xlink:actuate="onLoad"/><svg:title/><svg:desc/></draw:frame></text:p>
      <text:list text:style-name="Outline" text:continue-numbering="true">
        <text:list-item>
          <text:list>
            <text:list-item>
              <text:p text:style-name="P153">Estruturas de Controle de Enclave</text:p>
            </text:list-item>
          </text:list>
        </text:list-item>
      </text:list>
      <text:p text:style-name="P154">O SGX define 13 novas estruturas de dados, essenciais para o gerenciamento de enclaves. Essas estruturas, incluindo SGX Enclave Control Structure (SECS), Thread Control Structure (TCS) e Version Array (VA), desempenham papéis vitais na criação, execução e salvamento de estados do enclave. Cada estrutura é projetada para garantir a integridade e confidencialidade dos dados contidos nos enclaves<text:s/><text:span text:style-name="T155"><text:bookmark-ref text:ref-name="_Ref148643999" text:reference-format="text">[8</text:bookmark-ref></text:span><text:span text:style-name="T156">,<text:s/></text:span><text:span text:style-name="T157"><text:bookmark-ref text:ref-name="_Ref150119837" text:reference-format="text">14]</text:bookmark-ref></text:span>.</text:p>
      <text:list text:style-name="LFO14" text:continue-numbering="true">
        <text:list-item>
          <text:p text:style-name="P158">SGX Enclave Control Structure (SECS): Metadados sobre o enclave.</text:p>
        </text:list-item>
        <text:list-item>
          <text:p text:style-name="P159">Thread Control Structure (TCS): Ponto de execução no enclave.</text:p>
        </text:list-item>
        <text:list-item>
          <text:p text:style-name="P160">State State Area (SSA): Salva o estado do processador durante exceções.</text:p>
        </text:list-item>
        <text:list-item>
          <text:p text:style-name="P161">Page Information (PAGEINFO): Fornece informações sobre uma página.</text:p>
        </text:list-item>
        <text:list-item>
          <text:p text:style-name="P162">Security Information (SECINFO): Armazena metadados de página.</text:p>
        </text:list-item>
        <text:list-item>
          <text:p text:style-name="P163">Paging Crypto MetaData (PCMD): Rastreia metadados de página evitada.</text:p>
        </text:list-item>
        <text:list-item>
          <text:p text:style-name="P164">Version Array (VA): Armazena versões de páginas evitadas.</text:p>
        </text:list-item>
        <text:list-item>
          <text:p text:style-name="P165">Enclave Page Cache Map (EPCM): Armazena o estado das páginas no EPC.</text:p>
        </text:list-item>
        <text:list-item>
          <text:p text:style-name="P166">Enclave Signature Structure (SIGSTRUCT): Contém a medida do enclave e informações de assinatura.</text:p>
        </text:list-item>
        <text:list-item>
          <text:p text:style-name="P167">EINIT Token Structure (EINITTOKEN): Usado para verificar a autorização do enclave.</text:p>
        </text:list-item>
        <text:list-item>
          <text:p text:style-name="P168">Report (REPORT): Saída autenticada da instrução EREPORT.</text:p>
        </text:list-item>
        <text:list-item>
          <text:p text:style-name="P169">Report Target Info (TARGETINFO): Identifica o enclave destinatário.</text:p>
        </text:list-item>
        <text:list-item>
          <text:p text:style-name="P170">Key Request (KEYREQUEST): Usado para obter chaves específicas.</text:p>
        </text:list-item>
      </text:list>
      <text:soft-page-break/>
      <text:list text:style-name="Outline" text:continue-numbering="true">
        <text:list-item>
          <text:list>
            <text:list-item>
              <text:p text:style-name="P171">Memória: Enclave Page Cache (EPC) e Enclave Page Cache Map (EPCM)</text:p>
            </text:list-item>
          </text:list>
        </text:list-item>
      </text:list>
      <text:p text:style-name="P172">A memória desempenha um papel crítico no SGX, com o EPC servindo como área dedicada ao enclave e o EPCM mapeando o estado das páginas. O conteúdo do EPC é protegido contra leituras externas, garantindo a segurança das informações. A EPCM é responsável por rastrear o estado das páginas, garantindo que somente páginas alocadas e apropriadas para o enclave sejam acessíveis<text:s/><text:span text:style-name="T173"><text:bookmark-ref text:ref-name="_Ref148643999" text:reference-format="text">[8</text:bookmark-ref></text:span><text:span text:style-name="T174">,<text:s/></text:span><text:span text:style-name="T175"><text:bookmark-ref text:ref-name="_Ref150119837" text:reference-format="text">14]</text:bookmark-ref></text:span>.</text:p>
      <text:p text:style-name="P176"><draw:frame draw:z-index="251682816" draw:style-name="a62" draw:name="Picture 11" text:anchor-type="paragraph" svg:x="0in" svg:y="1.71947in" svg:width="5.90556in" svg:height="4.65625in" style:rel-width="scale" style:rel-height="scale"><draw:image xlink:href="media/image3.png" xlink:type="simple" xlink:show="embed" xlink:actuate="onLoad"/><svg:title/><svg:desc/></draw:frame>A memória EPC é definida pela BIOS e possui um tamanho limitado. O SGX tem um método para remover uma página da EPC, colocá-la na memória desprotegida e restaurá-la posteriormente. As páginas mantêm as mesmas propriedades de segurança graças às instruções de gerenciamento de páginas da EPC, que permitem criptografar uma página e produzir metadados adicionais. Uma página não pode ser removida até que todas as entradas de cache referentes a essa página sejam removidas de todos os núcleos lógicos do processador. O conteúdo é exportado ou importado com uma granularidade de uma página (que é 4 KB).</text:p>
      <text:p text:style-name="P177">Figura 3. Memória – Caminho da página do Enclave</text:p>
      <text:p text:style-name="P178">Os conteúdos das enclaves e as estruturas de dados associadas são armazenados no Enclave Page Cache (EPC), que é um subconjunto do PRM (Memória Reservada do Processador).</text:p>
      <text:p text:style-name="P179">O design do SGX suporta a existência de várias enclaves em um sistema ao mesmo tempo, o que é uma necessidade em ambientes de vários processos. Isso é alcançado dividindo o EPC em páginas de 4 KB que podem ser atribuídas a diferentes enclaves. O<text:s/><text:soft-page-break/>EPC utiliza o mesmo tamanho de página que o recurso de tradução de endereço da arquitetura.</text:p>
      <text:p text:style-name="P180">O EPC é gerenciado pelo mesmo software do sistema que gerencia o restante da memória física do computador. O software do sistema, que pode ser um hipervisor ou um kernel de sistema operacional, utiliza instruções SGX para alocar páginas não utilizadas para enclaves e liberar páginas do EPC previamente alocadas. O software não relacionado às enclaves não pode acessar diretamente o EPC, pois está contido no PRM conforme na Figura 4 abaixo.</text:p>
      <text:p text:style-name="P181"><draw:g draw:name="Canvas 15" draw:id="id86" draw:style-name="a111" text:anchor-type="as-char"><svg:title/><svg:desc/><draw:custom-shape svg:x="0in" svg:y="0.02269in" svg:width="1.1791in" svg:height="1.76119in" draw:id="id47" draw:style-name="a63" draw:name="Rectangle: Rounded Corners 116846412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8789in" svg:y="0.02269in" svg:width="1.17847in" svg:height="1.76111in" draw:id="id48" draw:style-name="a64" draw:name="Rectangle: Rounded Corners 220884537"><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24163in" svg:y="0.02269in" svg:width="1.17847in" svg:height="1.76111in" draw:id="id49" draw:style-name="a65" draw:name="Rectangle: Rounded Corners 1872628442"><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69in" svg:y="0.33353in" svg:width="0.99472in" svg:height="0.17038in" draw:id="id50" draw:style-name="a66" draw:name="Rectangle: Rounded Corners 290629341"><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69in" svg:y="0.50391in" svg:width="0.99444in" svg:height="0.16997in" draw:id="id51" draw:style-name="a67" draw:name="Rectangle: Rounded Corners 746676740"><svg:title/><svg:desc/><text:p text:style-name="P182"/><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321in" svg:y="0.67364in" svg:width="0.99444in" svg:height="0.16997in" draw:id="id52" draw:style-name="a68" draw:name="Rectangle: Rounded Corners 1076379600"><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26115in" svg:width="0.99444in" svg:height="0.16997in" draw:id="id53" draw:style-name="a69" draw:name="Rectangle: Rounded Corners 1225047182"><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43181in" svg:width="0.99444in" svg:height="0.16997in" draw:id="id54" draw:style-name="a70" draw:name="Rectangle: Rounded Corners 99919943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34964in" svg:width="0.99444in" svg:height="0.32967in" draw:id="id55" draw:style-name="a71" draw:name="Rectangle 797500506"><svg:title/><svg:desc/><text:p text:style-name="P183">Entrada</text:p><draw:enhanced-geometry draw:type="non-primitive" svg:viewBox="0 0 21600 21600" draw:enhanced-path="M 0 0 L 21600 0 21600 21600 0 21600 Z N"/></draw:custom-shape><draw:custom-shape svg:x="4.91597in" svg:y="0.24221in" svg:width="0.99444in" svg:height="0.32917in" draw:id="id56" draw:style-name="a72" draw:name="Rectangle 1209550937"><svg:title/><svg:desc/><text:p text:style-name="P184">Entrada</text:p><draw:enhanced-geometry draw:type="non-primitive" svg:viewBox="0 0 21600 21600" draw:enhanced-path="M 0 0 L 21600 0 21600 21600 0 21600 Z N"/></draw:custom-shape><draw:custom-shape svg:x="4.91597in" svg:y="0.40066in" svg:width="0.99444in" svg:height="0.32917in" draw:id="id57" draw:style-name="a73" draw:name="Rectangle 641885352"><svg:title/><svg:desc/><text:p text:style-name="P185">Entrada</text:p><draw:enhanced-geometry draw:type="non-primitive" svg:viewBox="0 0 21600 21600" draw:enhanced-path="M 0 0 L 21600 0 21600 21600 0 21600 Z N"/></draw:custom-shape><draw:custom-shape svg:x="4.91597in" svg:y="0.57901in" svg:width="0.99444in" svg:height="0.32917in" draw:id="id58" draw:style-name="a74" draw:name="Rectangle 1460268968"><svg:title/><svg:desc/><text:p text:style-name="P186">Entrada</text:p><draw:enhanced-geometry draw:type="non-primitive" svg:viewBox="0 0 21600 21600" draw:enhanced-path="M 0 0 L 21600 0 21600 21600 0 21600 Z N"/></draw:custom-shape><draw:custom-shape svg:x="4.91597in" svg:y="1.17141in" svg:width="0.99444in" svg:height="0.32917in" draw:id="id59" draw:style-name="a75" draw:name="Rectangle 1836787484"><svg:title/><svg:desc/><text:p text:style-name="P187">Entrada</text:p><draw:enhanced-geometry draw:type="non-primitive" svg:viewBox="0 0 21600 21600" draw:enhanced-path="M 0 0 L 21600 0 21600 21600 0 21600 Z N"/></draw:custom-shape><draw:custom-shape svg:x="3.02652in" svg:y="0.0055in" svg:width="0.99444in" svg:height="0.32917in" draw:id="id60" draw:style-name="a76" draw:name="Rectangle 839673701"><svg:title/><svg:desc/><text:p text:style-name="P188">EPC</text:p><draw:enhanced-geometry draw:type="non-primitive" svg:viewBox="0 0 21600 21600" draw:enhanced-path="M 0 0 L 21600 0 21600 21600 0 21600 Z N"/></draw:custom-shape><draw:custom-shape svg:x="1.2463in" svg:y="0in" svg:width="0.99444in" svg:height="0.32917in" draw:id="id61" draw:style-name="a77" draw:name="Rectangle 1600535250"><svg:title/><svg:desc/><text:p text:style-name="P189">PRM</text:p><draw:enhanced-geometry draw:type="non-primitive" svg:viewBox="0 0 21600 21600" draw:enhanced-path="M 0 0 L 21600 0 21600 21600 0 21600 Z N"/></draw:custom-shape><draw:custom-shape svg:x="0in" svg:y="0.01004in" svg:width="0.62609in" svg:height="0.32917in" draw:id="id62" draw:style-name="a78" draw:name="Rectangle 1049021572"><svg:title/><svg:desc/><text:p text:style-name="P190">DRAM</text:p><draw:enhanced-geometry draw:type="non-primitive" svg:viewBox="0 0 21600 21600" draw:enhanced-path="M 0 0 L 21600 0 21600 21600 0 21600 Z N"/></draw:custom-shape><draw:custom-shape svg:x="3.31868in" svg:y="0.33467in" svg:width="1.04395in" svg:height="0.16971in" draw:id="id63" draw:style-name="a79" draw:name="Rectangle 1179471069"><svg:title/><svg:desc/><text:p text:style-name="P191"/><draw:enhanced-geometry draw:type="non-primitive" svg:viewBox="0 0 21600 21600" draw:enhanced-path="M 0 0 L 21600 0 21600 21600 0 21600 Z N"/></draw:custom-shape><draw:custom-shape svg:x="3.31868in" svg:y="0.50437in" svg:width="1.04375in" svg:height="0.16944in" draw:id="id64" draw:style-name="a80" draw:name="Rectangle 9692940"><svg:title/><svg:desc/><draw:enhanced-geometry draw:type="non-primitive" svg:viewBox="0 0 21600 21600" draw:enhanced-path="M 0 0 L 21600 0 21600 21600 0 21600 Z N"/></draw:custom-shape><draw:custom-shape svg:x="3.31889in" svg:y="0.6742in" svg:width="1.04375in" svg:height="0.16944in" draw:id="id65" draw:style-name="a81" draw:name="Rectangle 885407973"><svg:title/><svg:desc/><draw:enhanced-geometry draw:type="non-primitive" svg:viewBox="0 0 21600 21600" draw:enhanced-path="M 0 0 L 21600 0 21600 21600 0 21600 Z N"/></draw:custom-shape><draw:custom-shape svg:x="3.32389in" svg:y="1.26261in" svg:width="1.04375in" svg:height="0.16944in" draw:id="id66" draw:style-name="a82" draw:name="Rectangle 17566906"><svg:title/><svg:desc/><draw:enhanced-geometry draw:type="non-primitive" svg:viewBox="0 0 21600 21600" draw:enhanced-path="M 0 0 L 21600 0 21600 21600 0 21600 Z N"/></draw:custom-shape><draw:custom-shape svg:x="3.32389in" svg:y="1.43199in" svg:width="1.04375in" svg:height="0.16944in" draw:id="id67" draw:style-name="a83" draw:name="Rectangle 317112904"><svg:title/><svg:desc/><draw:enhanced-geometry draw:type="non-primitive" svg:viewBox="0 0 21600 21600" draw:enhanced-path="M 0 0 L 21600 0 21600 21600 0 21600 Z N"/></draw:custom-shape><draw:custom-shape svg:x="3.36156in" svg:y="0.25504in" svg:width="0.97631in" svg:height="0.30646in" draw:id="id68" draw:style-name="a84" draw:name="Rectangle 1506428893"><svg:title/><svg:desc/><text:p text:style-name="P192">4kb página</text:p><draw:enhanced-geometry draw:type="non-primitive" svg:viewBox="0 0 21600 21600" draw:enhanced-path="M 0 0 L 21600 0 21600 21600 0 21600 Z N"/></draw:custom-shape><draw:custom-shape svg:x="3.34994in" svg:y="0.40066in" svg:width="0.99444in" svg:height="0.36061in" draw:id="id69" draw:style-name="a85" draw:name="Rectangle 1123060661"><svg:title/><svg:desc/><text:p text:style-name="P193">4kb página</text:p><draw:enhanced-geometry draw:type="non-primitive" svg:viewBox="0 0 21600 21600" draw:enhanced-path="M 0 0 L 21600 0 21600 21600 0 21600 Z N"/></draw:custom-shape><draw:custom-shape svg:x="3.34994in" svg:y="0.58852in" svg:width="0.99444in" svg:height="0.32917in" draw:id="id70" draw:style-name="a86" draw:name="Rectangle 1258270931"><svg:title/><svg:desc/><text:p text:style-name="P194">4kb página</text:p><draw:enhanced-geometry draw:type="non-primitive" svg:viewBox="0 0 21600 21600" draw:enhanced-path="M 0 0 L 21600 0 21600 21600 0 21600 Z N"/></draw:custom-shape><draw:custom-shape svg:x="3.34994in" svg:y="1.17141in" svg:width="0.99444in" svg:height="0.32917in" draw:id="id71" draw:style-name="a87" draw:name="Rectangle 200210307"><svg:title/><svg:desc/><text:p text:style-name="P195">4kb página</text:p><draw:enhanced-geometry draw:type="non-primitive" svg:viewBox="0 0 21600 21600" draw:enhanced-path="M 0 0 L 21600 0 21600 21600 0 21600 Z N"/></draw:custom-shape><draw:custom-shape svg:x="3.34994in" svg:y="1.33894in" svg:width="0.99444in" svg:height="0.32917in" draw:id="id72" draw:style-name="a88" draw:name="Rectangle 1921778867"><svg:title/><svg:desc/><text:p text:style-name="P196">4kb página</text:p><draw:enhanced-geometry draw:type="non-primitive" svg:viewBox="0 0 21600 21600" draw:enhanced-path="M 0 0 L 21600 0 21600 21600 0 21600 Z N"/></draw:custom-shape><draw:custom-shape svg:x="3.41368in" svg:y="0.87499in" svg:width="0.96979in" svg:height="0.32917in" draw:id="id73" draw:style-name="a89" draw:name="Rectangle 1332505350"><svg:title/><svg:desc/><text:p text:style-name="P197">...</text:p><draw:enhanced-geometry draw:type="non-primitive" svg:viewBox="0 0 21600 21600" draw:enhanced-path="M 0 0 L 21600 0 21600 21600 0 21600 Z N"/></draw:custom-shape><draw:custom-shape svg:x="1.56167in" svg:y="0.6955in" svg:width="1.04375in" svg:height="0.71205in" draw:id="id74" draw:style-name="a90" draw:name="Rectangle 1252158810"><svg:title/><svg:desc/><text:p text:style-name="P198">EPC</text:p><draw:enhanced-geometry draw:type="non-primitive" svg:viewBox="0 0 21600 21600" draw:enhanced-path="M 0 0 L 21600 0 21600 21600 0 21600 Z N"/></draw:custom-shape><draw:custom-shape svg:x="0.06982in" svg:y="0.68932in" svg:width="1.04375in" svg:height="0.40901in" draw:id="id75" draw:style-name="a91" draw:name="Rectangle 82657654"><svg:title/><svg:desc/><text:p text:style-name="P199">PRM</text:p><draw:enhanced-geometry draw:type="non-primitive" svg:viewBox="0 0 21600 21600" draw:enhanced-path="M 0 0 L 21600 0 21600 21600 0 21600 Z N"/></draw:custom-shape><draw:connector draw:type="line" svg:x1="1.11357in" svg:y1="0.68932in" svg:x2="1.51792in" svg:y2="0.1244in" draw:id="id76" draw:style-name="a93" draw:name="Straight Connector 365123092"><svg:title/><svg:desc/></draw:connector><draw:connector draw:type="line" svg:x1="1.50814in" svg:y1="1.63254in" svg:x2="1.12193in" svg:y2="1.09323in" draw:id="id77" draw:style-name="a95" draw:name="Straight Connector 1766329955"><svg:title/><svg:desc/></draw:connector><draw:connector draw:type="line" svg:x1="3.36156in" svg:y1="1.76935in" svg:x2="2.5975in" svg:y2="1.38639in" draw:id="id78" draw:style-name="a97" draw:name="Straight Connector 224777670"><svg:title/><svg:desc/></draw:connector><draw:connector draw:type="line" svg:x1="3.33551in" svg:y1="0.04622in" svg:x2="2.60912in" svg:y2="0.68932in" draw:id="id79" draw:style-name="a99" draw:name="Straight Connector 1690904062"><svg:title/><svg:desc/></draw:connector><draw:custom-shape svg:x="5.07047in" svg:y="0.83018in" svg:width="0.83995in" svg:height="0.32917in" draw:id="id80" draw:style-name="a100" draw:name="Rectangle 1132929376"><svg:title/><svg:desc/><text:p text:style-name="P200">...</text:p><draw:enhanced-geometry draw:type="non-primitive" svg:viewBox="0 0 21600 21600" draw:enhanced-path="M 0 0 L 21600 0 21600 21600 0 21600 Z N"/></draw:custom-shape><draw:connector draw:type="line" svg:x1="4.91569in" svg:y1="0.41872in" svg:x2="4.36264in" svg:y2="0.41952in" draw:id="id81" draw:style-name="a102" draw:name="Straight Arrow Connector 2069598626"><svg:title/><svg:desc/></draw:connector><draw:connector draw:type="line" svg:x1="4.91569in" svg:y1="0.5889in" svg:x2="4.36243in" svg:y2="0.5891in" draw:id="id82" draw:style-name="a104" draw:name="Straight Arrow Connector 330989565"><svg:title/><svg:desc/></draw:connector><draw:connector draw:type="line" svg:x1="4.91321in" svg:y1="0.75862in" svg:x2="4.36264in" svg:y2="0.75892in" draw:id="id83" draw:style-name="a106" draw:name="Straight Arrow Connector 2113445522"><svg:title/><svg:desc/></draw:connector><draw:connector draw:type="line" svg:x1="4.91597in" svg:y1="1.34614in" svg:x2="4.36764in" svg:y2="1.34734in" draw:id="id84" draw:style-name="a108" draw:name="Straight Arrow Connector 1825601399"><svg:title/><svg:desc/></draw:connector><draw:connector draw:type="line" svg:x1="4.90554in" svg:y1="1.51841in" svg:x2="4.36764in" svg:y2="1.51672in" draw:id="id85" draw:style-name="a110" draw:name="Straight Arrow Connector 711467765"><svg:title/><svg:desc/></draw:connector></draw:g></text:p>
      <text:p text:style-name="P201">Figura 4. Memória – Cache de página enclave (EPC) no PRM<text:s/></text:p>
      <text:p text:style-name="P202">O design do SGX espera que o software do sistema aloque as páginas do EPC para as enclaves. No entanto, como o software do sistema não é confiável, os processadores SGX verificam a correção das decisões de alocação do software do sistema e recusam-se a executar qualquer ação que comprometa as garantias de segurança do SGX. Por exemplo, se o software do sistema tentar alocar a mesma página do EPC para duas enclaves, a instrução SGX usada para realizar a alocação falhará.</text:p>
      <text:p text:style-name="P203">Para realizar suas verificações de segurança, o SGX registra algumas informações sobre as decisões de alocação do software do sistema para cada página do EPC no Enclave Page Cache Map (EPCM). O EPCM é uma matriz com uma entrada por página do EPC, portanto, calcular o endereço da entrada do EPCM de uma página requer apenas uma operação de deslocamento de bits e uma adição. (Assim como a Tabela 2 abaixo)</text:p>
      <text:p text:style-name="P204"><text:span text:style-name="T205">Tabela 2. EPCM - Tabela de páginas em um SO regular</text:span></text:p>
      <text:p text:style-name="P206"><draw:frame draw:style-name="a112" draw:name="Picture 2" text:anchor-type="as-char" svg:x="0in" svg:y="0in" svg:width="4.13542in" svg:height="0.84375in" style:rel-width="scale" style:rel-height="scale"><draw:image xlink:href="media/image4.emf" xlink:type="simple" xlink:show="embed" xlink:actuate="onLoad"/><svg:title/><svg:desc/></draw:frame></text:p>
      <text:list text:style-name="Outline" text:continue-numbering="true">
        <text:list-item>
          <text:list>
            <text:list-item>
              <text:p text:style-name="P207">Troca de Páginas do EPC</text:p>
            </text:list-item>
          </text:list>
        </text:list-item>
      </text:list>
      <text:p text:style-name="P208">A troca de páginas no Enclave Page Cache (EPC) é uma operação crucial no Intel SGX, que visa gerenciar eficientemente o espaço de memória seguro. A memória EPC, configurada pelo BIOS e limitada em tamanho, requer um mecanismo para remover páginas do EPC, colocá-las em memória não protegida e, posteriormente, restaurá-las. Esse processo é fundamental para garantir que as páginas de enclave mantenham suas propriedades de segurança, como confidencialidade, anti-replay e integridade, mesmo após a restauração <text:s/><text:span text:style-name="T209"><text:bookmark-ref text:ref-name="_Ref148643999" text:reference-format="text">[8</text:bookmark-ref></text:span><text:span text:style-name="T210">,<text:s/></text:span><text:span text:style-name="T211"><text:bookmark-ref text:ref-name="_Ref150119837" text:reference-format="text">14]</text:bookmark-ref></text:span>.</text:p>
      <text:soft-page-break/>
      <text:p text:style-name="P212">As instruções de paginação do EPC desempenham um papel vital nesse cenário, proporcionando a capacidade de criptografar páginas e gerar os metadados necessários para atender aos requisitos de segurança. Uma consideração importante é que uma página de enclave só deve ser removida do EPC após todas as traduções em cache para essa página terem sido eliminadas de todos os processadores lógicos.</text:p>
      <text:p text:style-name="P213">A troca de conteúdo ocorre com uma granularidade de páginas de 4 KB, onde cada página de EPC de 4 KB produz 4 KB de conteúdo criptografado e 128 bytes de metadados (PCMD). Essa abordagem visa equilibrar a segurança e a eficiência, garantindo que as operações de troca de páginas sejam precisas e eficazes no ambiente protegido pelo SGX.</text:p>
      <text:list text:style-name="Outline" text:continue-numbering="true">
        <text:list-item>
          <text:list>
            <text:list-item>
              <text:list>
                <text:list-item>
                  <text:p text:style-name="P214"><text:bookmark-start text:name="_Hlk150122192"/>Operações de Paginação em High Level</text:p>
                </text:list-item>
              </text:list>
            </text:list-item>
          </text:list>
        </text:list-item>
      </text:list>
      <text:p text:style-name="P215"><text:bookmark-end text:name="_Hlk150122192"/><text:span text:style-name="T216">As operações de paginação em um nível elevado no Intel SGX seguem um processo preciso<text:s/></text:span><text:s/><text:span text:style-name="T217"><text:bookmark-ref text:ref-name="_Ref148643999" text:reference-format="text">[8</text:bookmark-ref></text:span><text:span text:style-name="T218">,<text:s/></text:span><text:span text:style-name="T219"><text:bookmark-ref text:ref-name="_Ref150119837" text:reference-format="text">14]</text:bookmark-ref></text:span><text:span text:style-name="T220">.</text:span></text:p>
      <text:p text:style-name="P221">Quando uma página é removida do Enclave Page Cache (EPC):</text:p>
      <text:list text:style-name="LFO15" text:continue-numbering="true">
        <text:list-item>
          <text:p text:style-name="P222">Recebe um número de versão exclusivo, registrado na nova página do EPC chamada matriz de versões (VA).</text:p>
        </text:list-item>
        <text:list-item>
          <text:p text:style-name="P223">A página criptografada, os metadados e as informações do EPCM são gravados na memória do sistema.</text:p>
        </text:list-item>
      </text:list>
      <text:p text:style-name="P224">Ao recarregar a página:</text:p>
      <text:list text:style-name="LFO16" text:continue-numbering="true">
        <text:list-item>
          <text:p text:style-name="P225">O processador descriptografa e verifica a integridade da página usando metadados criptográficos.</text:p>
        </text:list-item>
        <text:list-item>
          <text:p text:style-name="P226"><text:span text:style-name="T227">O processador confirma se a versão é a mesma que foi gravada pela última vez. Essa abordagem garante a consistência e a segurança das operações de troca de páginas no ambiente protegido pelo SGX.</text:span></text:p>
        </text:list-item>
      </text:list>
      <text:soft-page-break/>
      <text:list text:style-name="Outline" text:continue-numbering="true">
        <text:list-item>
          <text:list>
            <text:list-item>
              <text:list>
                <text:list-item>
                  <text:p text:style-name="P228"><draw:g draw:z-index="251683840" draw:name="Canvas 1" draw:id="id113" draw:style-name="a146" text:anchor-type="paragraph"><svg:title/><svg:desc/><draw:custom-shape svg:x="0in" svg:y="1.29074in" svg:width="0.86794in" svg:height="2.02366in" draw:id="id87" draw:style-name="a113" draw:name="Rectangle 1901396833"><svg:title/><svg:desc/><draw:enhanced-geometry draw:type="non-primitive" svg:viewBox="0 0 21600 21600" draw:enhanced-path="M 0 0 L 21600 0 21600 21600 0 21600 Z N"/></draw:custom-shape><draw:custom-shape svg:x="2.18685in" svg:y="1.29074in" svg:width="0.86774in" svg:height="2.0331in" draw:id="id88" draw:style-name="a114" draw:name="Rectangle 1023102237"><svg:title/><svg:desc/><draw:enhanced-geometry draw:type="non-primitive" svg:viewBox="0 0 21600 21600" draw:enhanced-path="M 0 0 L 21600 0 21600 21600 0 21600 Z N"/></draw:custom-shape><draw:custom-shape svg:x="0.00193in" svg:y="1.40956in" svg:width="0.86518in" svg:height="0.30872in" draw:id="id89" draw:style-name="a115" draw:name="Rectangle 237769428"><svg:title/><svg:desc/><text:p text:style-name="P229">SECS</text:p><draw:enhanced-geometry draw:type="non-primitive" svg:viewBox="0 0 21600 21600" draw:enhanced-path="M 0 0 L 21600 0 21600 21600 0 21600 Z N"/></draw:custom-shape><draw:custom-shape svg:x="0.00305in" svg:y="2.02833in" svg:width="0.86409in" svg:height="0.12569in" draw:id="id90" draw:style-name="a116" draw:name="Rectangle 2064618075"><svg:title/><svg:desc/><text:p text:style-name="P230"> </text:p><draw:enhanced-geometry draw:type="non-primitive" svg:viewBox="0 0 21600 21600" draw:enhanced-path="M 0 0 L 21600 0 21600 21600 0 21600 Z N"/></draw:custom-shape><draw:g draw:name="Group 1834943945" draw:id="id93"><svg:title/><svg:desc/><draw:custom-shape svg:x="0.00218in" svg:y="1.90203in" svg:width="0.86479in" svg:height="0.1263in" draw:id="id91" draw:style-name="a117" draw:name="Rectangle 814306441"><svg:title/><svg:desc/><text:p text:style-name="P231"/><draw:enhanced-geometry draw:type="non-primitive" svg:viewBox="0 0 21600 21600" draw:enhanced-path="M 0 0 L 21600 0 21600 21600 0 21600 Z N"/></draw:custom-shape><draw:frame draw:id="id92" draw:style-name="a118" draw:name="Text Box 1395268214" svg:x="0.22571in" svg:y="1.85021in" svg:width="0.4512in" svg:height="0.20806in" style:rel-width="scale" style:rel-height="scale"><draw:text-box><text:p text:style-name="P232">VER</text:p></draw:text-box><svg:title/><svg:desc/></draw:frame></draw:g><draw:custom-shape svg:x="0.00396in" svg:y="2.15467in" svg:width="0.8634in" svg:height="0.12569in" draw:id="id94" draw:style-name="a119" draw:name="Rectangle 1764090809"><svg:title/><svg:desc/><text:p text:style-name="P233"> </text:p><draw:enhanced-geometry draw:type="non-primitive" svg:viewBox="0 0 21600 21600" draw:enhanced-path="M 0 0 L 21600 0 21600 21600 0 21600 Z N"/></draw:custom-shape><draw:custom-shape svg:x="0.00396in" svg:y="2.28086in" svg:width="0.8634in" svg:height="0.12569in" draw:id="id95" draw:style-name="a120" draw:name="Rectangle 45909139"><svg:title/><svg:desc/><text:p text:style-name="P234"> </text:p><draw:enhanced-geometry draw:type="non-primitive" svg:viewBox="0 0 21600 21600" draw:enhanced-path="M 0 0 L 21600 0 21600 21600 0 21600 Z N"/></draw:custom-shape><draw:custom-shape svg:x="0.00018in" svg:y="2.93964in" svg:width="0.86736in" svg:height="0.26528in" draw:id="id96" draw:style-name="a121" draw:name="Rectangle 2010365813"><svg:title/><svg:desc/><text:p text:style-name="P235">Página enclave</text:p><draw:enhanced-geometry draw:type="non-primitive" svg:viewBox="0 0 21600 21600" draw:enhanced-path="M 0 0 L 21600 0 21600 21600 0 21600 Z N"/></draw:custom-shape><draw:frame draw:id="id97" draw:style-name="a122" draw:name="Text Box 1" svg:x="0.00389in" svg:y="1.00735in" svg:width="0.86382in" svg:height="0.38762in" style:rel-width="scale" style:rel-height="scale"><draw:text-box><text:p text:style-name="P236">EPC</text:p></draw:text-box><svg:title/><svg:desc/></draw:frame><draw:frame draw:id="id98" draw:style-name="a123" draw:name="Text Box 1" svg:x="2.17797in" svg:y="0.85833in" svg:width="0.87479in" svg:height="0.47944in" style:rel-width="scale" style:rel-height="scale"><draw:text-box><text:p text:style-name="P237">Mémoria do sistema</text:p></draw:text-box><svg:title/><svg:desc/></draw:frame><draw:custom-shape svg:x="2.18714in" svg:y="2.33497in" svg:width="0.86667in" svg:height="0.31581in" draw:id="id99" draw:style-name="a124" draw:name="Rectangle 1528959532"><svg:title/><svg:desc/><text:p text:style-name="P238">Página criptografada</text:p><draw:enhanced-geometry draw:type="non-primitive" svg:viewBox="0 0 21600 21600" draw:enhanced-path="M 0 0 L 21600 0 21600 21600 0 21600 Z N"/></draw:custom-shape><draw:custom-shape svg:x="2.18734in" svg:y="2.71563in" svg:width="0.8657in" svg:height="0.20715in" draw:id="id100" draw:style-name="a125" draw:name="Rectangle 1337755158"><svg:title/><svg:desc/><text:p text:style-name="P239">PCMD</text:p><draw:enhanced-geometry draw:type="non-primitive" svg:viewBox="0 0 21600 21600" draw:enhanced-path="M 0 0 L 21600 0 21600 21600 0 21600 Z N"/></draw:custom-shape><draw:custom-shape svg:x="2.18723in" svg:y="2.99776in" svg:width="0.8657in" svg:height="0.20715in" draw:id="id101" draw:style-name="a126" draw:name="Rectangle 1032176191"><svg:title/><svg:desc/><text:p text:style-name="P240">SECINFO</text:p><draw:enhanced-geometry draw:type="non-primitive" svg:viewBox="0 0 21600 21600" draw:enhanced-path="M 0 0 L 21600 0 21600 21600 0 21600 Z N"/></draw:custom-shape><draw:frame draw:id="id102" draw:style-name="a127" draw:name="Text Box 1" svg:x="0.77353in" svg:y="0.53656in" svg:width="1.51102in" svg:height="0.3875in" style:rel-width="scale" style:rel-height="scale"><draw:text-box><text:p text:style-name="P241">EWB (instrução)</text:p></draw:text-box><svg:title/><svg:desc/></draw:frame><draw:connector draw:type="curve" svg:x1="0.0019in" svg:y1="1.56392in" svg:x2="0.00215in" svg:y2="1.96518in" draw:id="id103" draw:style-name="a128" draw:transform="translate(-0.00202in -1.76455in) rotate(-3.14159) translate(0.00202in 1.76455in)" draw:name="Connector: Curved 435863680"><svg:title/><svg:desc/></draw:connector><draw:connector draw:type="curve" svg:x1="0.00188in" svg:y1="1.56391in" svg:x2="0.00013in" svg:y2="3.07227in" draw:id="id104" draw:style-name="a130" draw:transform="translate(-0.001in -2.31809in) rotate(-3.1416) translate(0.001in 2.31809in)" draw:name="Connector: Curved 62845298"><svg:title/><svg:desc/></draw:connector><draw:connector draw:type="curve" svg:x1="0.67741in" svg:y1="1.11359in" svg:x2="1.71854in" svg:y2="1.77566in" draw:id="id105" draw:style-name="a132" draw:transform="translate(-1.19797in -1.44462in) rotate(-1.5708) translate(1.19797in 1.44462in)" draw:name="Connector: Curved 623276361"><svg:title/><svg:desc/></draw:connector><draw:connector draw:type="curve" svg:x1="2.6425in" svg:y1="1.3794in" svg:x2="1.07367in" svg:y2="2.03751in" draw:id="id106" draw:style-name="a134" draw:transform="translate(-1.85808in -1.70845in) rotate(-1.5708) translate(1.85808in 1.70845in)" draw:name="Connector: Curved 55854742"><svg:title/><svg:desc/></draw:connector><draw:custom-shape svg:x="0.00018in" svg:y="2.56047in" svg:width="0.86736in" svg:height="0.26528in" draw:id="id107" draw:style-name="a136" draw:name="Rectangle 726402687"><svg:title/><svg:desc/><text:p text:style-name="P242">Página enclave</text:p><draw:enhanced-geometry draw:type="non-primitive" svg:viewBox="0 0 21600 21600" draw:enhanced-path="M 0 0 L 21600 0 21600 21600 0 21600 Z N"/></draw:custom-shape><draw:connector draw:type="curve" svg:x1="0.31376in" svg:y1="1.47779in" svg:x2="2.0828in" svg:y2="2.13928in" draw:id="id108" draw:style-name="a138" draw:transform="translate(-1.19828in -1.80854in) rotate(-1.5708) translate(1.19828in 1.80854in)" draw:name="Connector: Curved 1074830831"><svg:title/><svg:desc/></draw:connector><draw:connector draw:type="curve" svg:x1="2.80366in" svg:y1="1.54966in" svg:x2="0.91779in" svg:y2="2.20285in" draw:id="id109" draw:style-name="a140" draw:transform="translate(-1.86072in -1.87625in) rotate(-1.5708) translate(1.86072in 1.87625in)" draw:name="Connector: Curved 1098137737"><svg:title/><svg:desc/></draw:connector><draw:connector draw:type="curve" svg:x1="2.94677in" svg:y1="1.6836in" svg:x2="0.76949in" svg:y2="2.3418in" draw:id="id110" draw:style-name="a142" draw:transform="translate(-1.85813in -2.0127in) rotate(-1.5708) translate(1.85813in 2.0127in)" draw:name="Connector: Curved 270260746"><svg:title/><svg:desc/></draw:connector><draw:connector draw:type="curve" svg:x1="0.00188in" svg:y1="1.56387in" svg:x2="0.00013in" svg:y2="2.69306in" draw:id="id111" draw:style-name="a144" draw:transform="translate(-0.001in -2.12846in) rotate(-3.1416) translate(0.001in 2.12846in)" draw:name="Connector: Curved 1282511803"><svg:title/><svg:desc/></draw:connector><draw:frame draw:id="id112" draw:style-name="a145" draw:name="Text Box 1" svg:x="3.1597in" svg:y="1.08152in" svg:width="2.44459in" svg:height="2.28167in" style:rel-width="scale" style:rel-height="scale"><draw:text-box><text:p text:style-name="P243">Parâmetros do EWB:</text:p><text:list text:style-name="LFO17" text:continue-numbering="true"><text:list-item><text:p text:style-name="P244">Ponteiro para a página do EPC que precisa ser paginada;</text:p></text:list-item><text:list-item><text:p text:style-name="P245">Ponteiro para o slot de versão vazio;</text:p></text:list-item><text:list-item><text:p text:style-name="P246">Ponteiros fora da localização do EPC.</text:p></text:list-item></text:list><text:p text:style-name="P247"/><text:p text:style-name="P248">Operação do EWB:</text:p><text:list text:style-name="LFO18" text:continue-numbering="true"><text:list-item><text:p text:style-name="P249">Remover a página do EPC;</text:p></text:list-item><text:list-item><text:p text:style-name="P250">Preencher o slot de versão;</text:p></text:list-item><text:list-item><text:p text:style-name="P251">Escrever a versão criptografada para fora.</text:p></text:list-item></text:list><text:p text:style-name="P252"/><text:p text:style-name="P253">Todas as páginas, incluindo SECS e Matriz de Versões, podem ser páginadas.</text:p></draw:text-box><svg:title/><svg:desc/></draw:frame></draw:g>Exemplo de page-out</text:p>
                </text:list-item>
              </text:list>
            </text:list-item>
          </text:list>
        </text:list-item>
      </text:list>
      <text:p text:style-name="P254"><text:span text:style-name="T255">Figura 5. Gerenciamento de Páginas – Page-out</text:span></text:p>
      <text:list text:style-name="Outline" text:continue-numbering="true">
        <text:list-item>
          <text:list>
            <text:list-item>
              <text:list>
                <text:list-item>
                  <text:p text:style-name="P256"><draw:g draw:z-index="251685888" draw:name="Canvas 311488419" draw:id="id138" draw:style-name="a177" text:anchor-type="paragraph"><svg:title/><svg:desc/><draw:custom-shape svg:x="0in" svg:y="1.17685in" svg:width="0.86794in" svg:height="2.02366in" draw:id="id114" draw:style-name="a147" draw:name="Rectangle 506204811"><svg:title/><svg:desc/><draw:enhanced-geometry draw:type="non-primitive" svg:viewBox="0 0 21600 21600" draw:enhanced-path="M 0 0 L 21600 0 21600 21600 0 21600 Z N"/></draw:custom-shape><draw:custom-shape svg:x="2.18685in" svg:y="1.17685in" svg:width="0.86774in" svg:height="2.0331in" draw:id="id115" draw:style-name="a148" draw:name="Rectangle 336312789"><svg:title/><svg:desc/><draw:enhanced-geometry draw:type="non-primitive" svg:viewBox="0 0 21600 21600" draw:enhanced-path="M 0 0 L 21600 0 21600 21600 0 21600 Z N"/></draw:custom-shape><draw:custom-shape svg:x="0.00193in" svg:y="1.29567in" svg:width="0.86518in" svg:height="0.30872in" draw:id="id116" draw:style-name="a149" draw:name="Rectangle 238365676"><svg:title/><svg:desc/><text:p text:style-name="P257">SECS</text:p><draw:enhanced-geometry draw:type="non-primitive" svg:viewBox="0 0 21600 21600" draw:enhanced-path="M 0 0 L 21600 0 21600 21600 0 21600 Z N"/></draw:custom-shape><draw:custom-shape svg:x="0.00305in" svg:y="1.91444in" svg:width="0.86409in" svg:height="0.12569in" draw:id="id117" draw:style-name="a150" draw:name="Rectangle 1985362657"><svg:title/><svg:desc/><text:p text:style-name="P258"> </text:p><draw:enhanced-geometry draw:type="non-primitive" svg:viewBox="0 0 21600 21600" draw:enhanced-path="M 0 0 L 21600 0 21600 21600 0 21600 Z N"/></draw:custom-shape><draw:custom-shape svg:x="0.00218in" svg:y="1.78815in" svg:width="0.86479in" svg:height="0.1263in" draw:id="id118" draw:style-name="a151" draw:name="Rectangle 1934316361"><svg:title/><svg:desc/><text:p text:style-name="P259"/><draw:enhanced-geometry draw:type="non-primitive" svg:viewBox="0 0 21600 21600" draw:enhanced-path="M 0 0 L 21600 0 21600 21600 0 21600 Z N"/></draw:custom-shape><draw:custom-shape svg:x="0.00396in" svg:y="2.04078in" svg:width="0.8634in" svg:height="0.12569in" draw:id="id119" draw:style-name="a152" draw:name="Rectangle 147177217"><svg:title/><svg:desc/><text:p text:style-name="P260"> </text:p><draw:enhanced-geometry draw:type="non-primitive" svg:viewBox="0 0 21600 21600" draw:enhanced-path="M 0 0 L 21600 0 21600 21600 0 21600 Z N"/></draw:custom-shape><draw:custom-shape svg:x="0.00396in" svg:y="2.16697in" svg:width="0.8634in" svg:height="0.12569in" draw:id="id120" draw:style-name="a153" draw:name="Rectangle 404020616"><svg:title/><svg:desc/><text:p text:style-name="P261"> </text:p><draw:enhanced-geometry draw:type="non-primitive" svg:viewBox="0 0 21600 21600" draw:enhanced-path="M 0 0 L 21600 0 21600 21600 0 21600 Z N"/></draw:custom-shape><draw:custom-shape svg:x="0.00018in" svg:y="2.82575in" svg:width="0.86736in" svg:height="0.26528in" draw:id="id121" draw:style-name="a154" draw:name="Rectangle 582311303"><svg:title/><svg:desc/><text:p text:style-name="P262">Página enclave</text:p><draw:enhanced-geometry draw:type="non-primitive" svg:viewBox="0 0 21600 21600" draw:enhanced-path="M 0 0 L 21600 0 21600 21600 0 21600 Z N"/></draw:custom-shape><draw:frame draw:id="id122" draw:style-name="a155" draw:name="Text Box 1" svg:x="0.00389in" svg:y="0.89346in" svg:width="0.86382in" svg:height="0.38762in" style:rel-width="scale" style:rel-height="scale"><draw:text-box><text:p text:style-name="P263">EPC</text:p></draw:text-box><svg:title/><svg:desc/></draw:frame><draw:frame draw:id="id123" draw:style-name="a156" draw:name="Text Box 1" svg:x="2.17797in" svg:y="0.74444in" svg:width="0.87479in" svg:height="0.47944in" style:rel-width="scale" style:rel-height="scale"><draw:text-box><text:p text:style-name="P264">Mémoria do sistema</text:p></draw:text-box><svg:title/><svg:desc/></draw:frame><draw:custom-shape svg:x="2.18714in" svg:y="2.22108in" svg:width="0.86667in" svg:height="0.31581in" draw:id="id124" draw:style-name="a157" draw:name="Rectangle 1194481451"><svg:title/><svg:desc/><text:p text:style-name="P265">Página criptografada</text:p><draw:enhanced-geometry draw:type="non-primitive" svg:viewBox="0 0 21600 21600" draw:enhanced-path="M 0 0 L 21600 0 21600 21600 0 21600 Z N"/></draw:custom-shape><draw:custom-shape svg:x="2.18734in" svg:y="2.60174in" svg:width="0.8657in" svg:height="0.20715in" draw:id="id125" draw:style-name="a158" draw:name="Rectangle 415280522"><svg:title/><svg:desc/><text:p text:style-name="P266">PCMD</text:p><draw:enhanced-geometry draw:type="non-primitive" svg:viewBox="0 0 21600 21600" draw:enhanced-path="M 0 0 L 21600 0 21600 21600 0 21600 Z N"/></draw:custom-shape><draw:custom-shape svg:x="2.18723in" svg:y="2.88387in" svg:width="0.8657in" svg:height="0.20715in" draw:id="id126" draw:style-name="a159" draw:name="Rectangle 911414468"><svg:title/><svg:desc/><text:p text:style-name="P267">SECINFO</text:p><draw:enhanced-geometry draw:type="non-primitive" svg:viewBox="0 0 21600 21600" draw:enhanced-path="M 0 0 L 21600 0 21600 21600 0 21600 Z N"/></draw:custom-shape><draw:frame draw:id="id127" draw:style-name="a160" draw:name="Text Box 1" svg:x="0.77353in" svg:y="0.42267in" svg:width="1.51102in" svg:height="0.3875in" style:rel-width="scale" style:rel-height="scale"><draw:text-box><text:p text:style-name="P268">ELD (instrução)</text:p></draw:text-box><svg:title/><svg:desc/></draw:frame><draw:connector draw:type="curve" svg:x1="0.0019in" svg:y1="1.45003in" svg:x2="0.00215in" svg:y2="1.85129in" draw:id="id128" draw:style-name="a161" draw:transform="translate(-0.00202in -1.65066in) rotate(-3.14159) translate(0.00202in 1.65066in)" draw:name="Connector: Curved 1211177496"><svg:title/><svg:desc/></draw:connector><draw:connector draw:type="curve" svg:x1="0.00188in" svg:y1="1.44998in" svg:x2="0.00013in" svg:y2="2.95833in" draw:id="id129" draw:style-name="a163" draw:transform="translate(-0.001in -2.20415in) rotate(-3.1416) translate(0.001in 2.20415in)" draw:name="Connector: Curved 1562157636"><svg:title/><svg:desc/></draw:connector><draw:connector draw:type="curve" svg:x1="0.67739in" svg:y1="0.9997in" svg:x2="1.71852in" svg:y2="1.66177in" draw:id="id130" draw:style-name="a165" draw:transform="translate(-1.19795in -1.33073in) rotate(-1.5708) translate(1.19795in 1.33073in)" draw:name="Connector: Curved 1557515761"><svg:title/><svg:desc/></draw:connector><draw:connector draw:type="curve" svg:x1="2.6425in" svg:y1="1.26551in" svg:x2="1.07367in" svg:y2="1.92362in" draw:id="id131" draw:style-name="a167" draw:transform="translate(-1.85808in -1.59456in) rotate(-1.5708) translate(1.85808in 1.59456in)" draw:name="Connector: Curved 1388910192"><svg:title/><svg:desc/></draw:connector><draw:custom-shape svg:x="0.00018in" svg:y="2.44658in" svg:width="0.86736in" svg:height="0.26528in" draw:id="id132" draw:style-name="a168" draw:name="Rectangle 1013346317"><svg:title/><svg:desc/><text:p text:style-name="P269">Página enclave</text:p><draw:enhanced-geometry draw:type="non-primitive" svg:viewBox="0 0 21600 21600" draw:enhanced-path="M 0 0 L 21600 0 21600 21600 0 21600 Z N"/></draw:custom-shape><draw:connector draw:type="curve" svg:x1="0.31373in" svg:y1="1.36395in" svg:x2="2.08278in" svg:y2="2.02544in" draw:id="id133" draw:style-name="a170" draw:transform="translate(-1.19825in -1.69469in) rotate(-1.5708) translate(1.19825in 1.69469in)" draw:name="Connector: Curved 1139280605"><svg:title/><svg:desc/></draw:connector><draw:connector draw:type="curve" svg:x1="2.80366in" svg:y1="1.43577in" svg:x2="0.91779in" svg:y2="2.08896in" draw:id="id134" draw:style-name="a172" draw:transform="translate(-1.86072in -1.76236in) rotate(-1.5708) translate(1.86072in 1.76236in)" draw:name="Connector: Curved 772968406"><svg:title/><svg:desc/></draw:connector><draw:connector draw:type="curve" svg:x1="2.94677in" svg:y1="1.56971in" svg:x2="0.76949in" svg:y2="2.22791in" draw:id="id135" draw:style-name="a174" draw:transform="translate(-1.85813in -1.89881in) rotate(-1.5708) translate(1.85813in 1.89881in)" draw:name="Connector: Curved 561095954"><svg:title/><svg:desc/></draw:connector><draw:connector draw:type="curve" svg:x1="0.00188in" svg:y1="1.44998in" svg:x2="0.00013in" svg:y2="2.57917in" draw:id="id136" draw:style-name="a175" draw:transform="translate(-0.001in -2.01457in) rotate(-3.1416) translate(0.001in 2.01457in)" draw:name="Connector: Curved 1503554424"><svg:title/><svg:desc/></draw:connector><draw:frame draw:id="id137" draw:style-name="a176" draw:name="Text Box 1" svg:x="3.18168in" svg:y="1.37986in" svg:width="2.42261in" svg:height="1.86944in" style:rel-width="scale" style:rel-height="scale"><draw:text-box><text:p text:style-name="P270">Parâmetros de ELD:</text:p><text:list text:style-name="LFO19" text:continue-numbering="true"><text:list-item><text:p text:style-name="P271">Página criptografada;</text:p></text:list-item><text:list-item><text:p text:style-name="P272">Página EPC livre;</text:p></text:list-item><text:list-item><text:p text:style-name="P273">SECS (para uma página de enclave);</text:p></text:list-item><text:list-item><text:p text:style-name="P274">Slot de versão preenchido.</text:p></text:list-item></text:list><text:p text:style-name="P275"/><text:p text:style-name="P276">Operação de ELD:</text:p><text:list text:style-name="LFO20" text:continue-numbering="true"><text:list-item><text:p text:style-name="P277">Verificar e descriptografar a página usando a versão;</text:p></text:list-item><text:list-item><text:p text:style-name="P278">Preencher o slot EPC;</text:p></text:list-item><text:list-item><text:p text:style-name="P279">Liberar o slot de versão.</text:p></text:list-item></text:list><text:p text:style-name="P280"/></draw:text-box><svg:title/><svg:desc/></draw:frame></draw:g>Exemplo de page-in</text:p>
                </text:list-item>
              </text:list>
            </text:list-item>
          </text:list>
        </text:list-item>
      </text:list>
      <text:p text:style-name="P281"><text:span text:style-name="T282">Figura 6. Gerenciamento de Páginas – Page-in</text:span></text:p>
      <text:list text:style-name="Outline" text:continue-numbering="true">
        <text:list-item>
          <text:p text:style-name="P283">Desempenho frente a SOs tradicionais<text:s/></text:p>
        </text:list-item>
      </text:list>
      <text:p text:style-name="P284">O Gramine é um sistema operacional convidado leve, projetado para executar um único aplicativo Linux com requisitos mínimos de host. O Gramine pode executar aplicativos em um ambiente isolado com benefícios<text:s/><text:span text:style-name="T285">comparáveis</text:span><text:s/>aos da execução de um sistema operacional completo em uma máquina virtual, incluindo personalização do convidado, facilidade de portabilidade para diferentes sistemas operacionais host e migração de processos.</text:p>
      <text:p text:style-name="P286">Suas caracteristicas em comparações aos SOs tradicionais em geral são:</text:p>
      <text:soft-page-break/>
      <text:list text:style-name="LFO21" text:continue-numbering="true">
        <text:list-item>
          <text:p text:style-name="P287">Rodar aplicativos Linux nativos e não modificados em qualquer plataforma.</text:p>
        </text:list-item>
        <text:list-item>
          <text:p text:style-name="P288">Oferecer suporte a segurança, especialmente protegendo contra um sistema operacional host malicioso.</text:p>
        </text:list-item>
        <text:list-item>
          <text:p text:style-name="P289">Intercepta todas as solicitações de aplicativos ao sistema operacional host.</text:p>
        </text:list-item>
        <text:list-item>
          <text:p text:style-name="P290">Processa algumas dessas solicitações internamente, enquanto outras passam por uma API fina para o sistema operacional host.</text:p>
        </text:list-item>
        <text:list-item>
          <text:p text:style-name="P291">Verifica cada solicitação de aplicativo e cada resposta do host quanto à correção e consistência, mantendo um estado interno "shadow" para defesa contra ataques Iago.</text:p>
        </text:list-item>
        <text:list-item>
          <text:p text:style-name="P292">Busca ser 100% compatível com o kernel Linux, mesmo quando há desvios de padrões como o POSIX.</text:p>
        </text:list-item>
        <text:list-item>
          <text:p text:style-name="P293">É minimalista, implementando apenas o conjunto mais importante de funcionalidades do Linux para executar aplicativos portáteis e independentes de hardware.</text:p>
        </text:list-item>
        <text:list-item>
          <text:p text:style-name="P294">Atualmente, possui dois backends: execução no sistema operacional host Linux (gramine-direct) e execução dentro de uma enclave Intel SGX (gramine-sgx).</text:p>
        </text:list-item>
        <text:list-item>
          <text:p text:style-name="P295">Diferenças e peculiaridades em alguns recursos são descritas explicitamente dependendo do backend.</text:p>
        </text:list-item>
        <text:list-item>
          <text:p text:style-name="P296">Classifica os recursos em termos de funcionalidades do Linux e funcionalidades específicas do Gramine.</text:p>
        </text:list-item>
        <text:list-item>
          <text:p text:style-name="P297">Indica se uma funcionalidade é implementada, parcialmente implementada ou não implementada, com detalhes adicionais quando parcialmente implementada.</text:p>
        </text:list-item>
        <text:list-item>
          <text:p text:style-name="P298">Algumas funcionalidades não são implementadas por design, devido ao aumento desproporcional da Base de Confiabilidade do Gramine, ou por não poderem ser implementadas com segurança.</text:p>
        </text:list-item>
        <text:list-item>
          <text:p text:style-name="P299">Outras funcionalidades não são implementadas porque são pouco usadas ou obsoletas.</text:p>
        </text:list-item>
      </text:list>
      <text:p text:style-name="P300"/>
      <text:p text:style-name="P301">Além disso, de acordo com a empresa PhoenixNAP Bare Metal Cloud especializada em servidores com suporte ao Intel SGX, diz que o SGX oferece uma série de benefícios significativos, destacando-se pela elevação da segurança de dados sensíveis e críticos para a missão<text:s/><text:span text:style-name="T302"><text:bookmark-ref text:ref-name="_Ref150132981" text:reference-format="text">[17]</text:bookmark-ref></text:span>.</text:p>
      <text:p text:style-name="P303">Um benefício notável é a capacidade de armazenar informações que requerem verificação diretamente na máquina, em vez de enviá-las para um servidor remoto. Isso engloba dados biométricos e outras informações de autenticação, proporcionando uma camada adicional de segurança. O SGX da Intel age como uma defesa contra ameaças avançadas, protegendo contra comprometimentos no BIOS, nos componentes do sistema e nos perfis de usuário com permissões de root<text:s/><text:span text:style-name="T304"><text:bookmark-ref text:ref-name="_Ref150132981" text:reference-format="text">[17]</text:bookmark-ref></text:span>.</text:p>
      <text:p text:style-name="P305">A selagem de dados é outra característica valiosa, oferecendo proteção à propriedade intelectual mesmo fora dos enclaves. A chave para decodificar dados confidenciais reside<text:s/><text:soft-page-break/>na memória confiável, bloqueando assim o acesso não autorizado externo<text:s/><text:span text:style-name="T306"><text:bookmark-ref text:ref-name="_Ref150132981" text:reference-format="text">[17]</text:bookmark-ref></text:span>.</text:p>
      <text:p text:style-name="P307">Além disso, o modelo permite um dimensionamento horizontal contínuo. Conforme as demandas empresariais crescem, novas máquinas podem integrar-se ao conjunto sem interrupções. Antes de se tornarem parte do cluster de servidores confiáveis, os nós são verificados para garantir o nível adequado de segurança. Esses benefícios coletivos fortalecem a infraestrutura e a proteção de dados em ambientes dinâmicos e em expansão<text:s/><text:span text:style-name="T308"><text:bookmark-ref text:ref-name="_Ref150132981" text:reference-format="text">[17]</text:bookmark-ref></text:span>.</text:p>
      <text:list text:style-name="Outline" text:continue-numbering="true">
        <text:list-item>
          <text:list>
            <text:list-item>
              <text:p text:style-name="P309">Análise do Overhead de Desempenho Gramine SGX e Linux</text:p>
            </text:list-item>
          </text:list>
        </text:list-item>
      </text:list>
      <text:p text:style-name="P310">De acordo com uma analise realizada pela associação USENIX<text:s/><text:span text:style-name="T311"><text:bookmark-ref text:ref-name="_Ref150144105" text:reference-format="text">[19]</text:bookmark-ref></text:span>, foram avaliados operações de sistema impactadas no Gramine SGX. Foi realizado as medidas de chamadas open, read e fork com o LMbench 2.5<text:s/><text:span text:style-name="T312"><text:bookmark-ref text:ref-name="_Ref150144037" text:reference-format="text">[18]</text:bookmark-ref></text:span>. As técnicas criptográficas protegem aplicativos, com custos em tempo de execução e os resultados indicam:</text:p>
      <text:list text:style-name="LFO22" text:continue-numbering="true">
        <text:list-item>
          <text:p text:style-name="P313">open: latência varia de 383µs (64KB) a 21ms (4MB) no Gramine-SGX, enquanto no Linux é constante em 0,85µs. Enclaves têm desvantagens, pois usam open para validar conteúdo.</text:p>
        </text:list-item>
        <text:list-item>
          <text:p text:style-name="P314"><text:span text:style-name="T315">read: overhead menor que open.<text:s/></text:span>Dependendo do bloco lido, a latência no Gramine-SGX é 0,5µs (64 bytes).</text:p>
        </text:list-item>
      </text:list>
      <text:p text:style-name="P316">Custos significativos vêm da saída do enclave para chamadas do sistema host e manipulação de memória no EPC. O Gramine -SGX mantém segurança sem comprometer drasticamente o desempenho, sendo aplicável a uma variedade de casos de uso.</text:p>
      <text:p text:style-name="P317">A Figura 7(a) mostra a sobrecarga para autenticar arquivos no open. Dependendo do tamanho do arquivo, a latência do open no Gramine-SGX varia de 383 µs (arquivo de 64 KB) a 21 ms (arquivo de 4 MB), enquanto no Linux, a latência é constante em 0,85 µs. Observe-se que os enclaves estão em desvantagem, já que o open normalmente não precisa ler o conteúdo do arquivo. Enquanto que, <text:s/>no Gramine-SGX, o open é usado como um ponto para validar o conteúdo do arquivo. Para um open subsequente, quando a árvore de Merkle já está gerada, a sobrecarga de simplesmente sair do enclave para open e procurar na lista de arquivos no manifesto é cerca de 9 vezes<text:s/><text:span text:style-name="T318"><text:bookmark-ref text:ref-name="_Ref150144105" text:reference-format="text">[19]</text:bookmark-ref></text:span>.</text:p>
      <text:p text:style-name="P319">A Figura 7(b) mostra a sobrecarga para autenticar arquivos no read, que é menor do que no open. Uma vez que o arquivo inteiro foi verificado no open, a leitura sequencial verifica apenas os fragmentos dos arquivos que está lendo da memória não confiável. Dependendo do tamanho dos blocos lidos, a latência no Gramine-SGX varia de 0,5 µs (leitura de 64 bytes) a 16,9 µs (leitura de 4 KB). A latência de read no Linux é de aproximadamente 0,1 µs para qualquer tamanho de bloco abaixo de 4 KB. Se o arquivo não for autenticado, o Gramine-SGX apenas copia o conteúdo do arquivo para o buffer, e a sobrecarga reduz para 48% (leitura de 64 bytes) a 83% (leitura de 4 KB)<text:s/><text:span text:style-name="T320"><text:bookmark-ref text:ref-name="_Ref150144105" text:reference-format="text">[19]</text:bookmark-ref></text:span>.</text:p>
      <text:p text:style-name="P321">A Figura 7(c) mostra a sobrecarga de fork de um processo. A latência de fork no Gramine-SGX é afetada por três fatores: criação de um novo enclave, atestação local da integridade e duplicação do estado do processo por meio de uma transmissão RPC criptografada. Combinando esses fatores, fork é uma das chamadas mais caras no Gramine-SGX. O tamanho padrão do enclave é de 256 MB. A avaliação realizada mostra que a latência para forking de um processo varia de aproximadamente 0,8s (processo de<text:s/><text:soft-page-break/>16 MB) a 2,7s (processo de 128 MB), mas pode ser mais cara se o processo pai usar mais memória. A tendência corresponde ao desempenho do Gramine sem a otimização de IPC em massa<text:s/><text:span text:style-name="T322"><text:bookmark-ref text:ref-name="_Ref150144105" text:reference-format="text">[19]</text:bookmark-ref></text:span>.</text:p>
      <text:p text:style-name="P323"><text:span text:style-name="T324"><draw:frame draw:id="id139" draw:style-name="a178" draw:name="Text Box 2" text:anchor-type="as-char" svg:x="0in" svg:y="0in" svg:width="1.93681in" svg:height="0.37639in" style:rel-width="scale" style:rel-height="scale"><draw:text-box><text:list text:style-name="LFO23" text:continue-numbering="true"><text:list-item><text:p text:style-name="P325">Abrir um arquivo</text:p></text:list-item></text:list></draw:text-box><svg:title/><svg:desc/></draw:frame></text:span><text:span text:style-name="T326"><draw:frame draw:id="id140" draw:style-name="a179" draw:name="Text Box 2" text:anchor-type="as-char" svg:x="0in" svg:y="0in" svg:width="1.94028in" svg:height="0.37639in" style:rel-width="scale" style:rel-height="scale"><draw:text-box><text:list text:style-name="LFO23" text:continue-numbering="true"><text:list-item><text:p text:style-name="P327">Ler um arquivo</text:p></text:list-item></text:list></draw:text-box><svg:title/><svg:desc/></draw:frame></text:span><text:span text:style-name="T328"><draw:frame draw:id="id141" draw:style-name="a180" draw:name="Text Box 2" text:anchor-type="as-char" svg:x="0in" svg:y="0in" svg:width="1.93681in" svg:height="0.37639in" style:rel-width="scale" style:rel-height="scale"><draw:text-box><text:list text:style-name="LFO23" text:continue-numbering="true"><text:list-item><text:p text:style-name="P329">Criar um processo</text:p></text:list-item></text:list></draw:text-box><svg:title/><svg:desc/></draw:frame></text:span><draw:g draw:z-index="251686912" draw:name="Canvas 5" draw:id="id266" draw:style-name="a335" text:anchor-type="paragraph"><svg:title/><svg:desc/><draw:frame draw:id="id142" draw:style-name="a181" draw:name="Text Box 2" svg:x="0.47905in" svg:y="0.38742in" svg:width="1.84758in" svg:height="0.30922in" style:rel-width="scale" style:rel-height="scale"><draw:text-box><text:p text:style-name="P330">Linux<text:tab/><text:s text:c="30"/>Graphene</text:p><text:p text:style-name="P331">Graphene-SGX (sem buffer) <text:s text:c="12"/>Graphene-SGX (com buffer)</text:p></draw:text-box><svg:title/><svg:desc/></draw:frame><draw:custom-shape svg:x="1.24863in" svg:y="1.31657in" svg:width="0.06894in" svg:height="0.14474in" draw:id="id143" draw:style-name="a182" draw:name="Rectangle 1610129260"><svg:title/><svg:desc/><draw:enhanced-geometry draw:type="non-primitive" svg:viewBox="0 0 21600 21600" draw:enhanced-path="M 0 0 L 21600 0 21600 21600 0 21600 Z N"/></draw:custom-shape><draw:custom-shape svg:x="1.31802in" svg:y="1.24546in" svg:width="0.06772in" svg:height="0.21584in" draw:id="id144" draw:style-name="a184" draw:name="Rectangle 1241264649"><svg:title/><svg:desc/><draw:enhanced-geometry draw:type="non-primitive" svg:viewBox="0 0 21600 21600" draw:enhanced-path="M 0 0 L 21600 0 21600 21600 0 21600 Z N"/></draw:custom-shape><draw:custom-shape svg:x="1.38574in" svg:y="0.86425in" svg:width="0.06942in" svg:height="0.59705in" draw:id="id145" draw:style-name="a185" draw:name="Rectangle 566995462"><svg:title/><svg:desc/><draw:enhanced-geometry draw:type="non-primitive" svg:viewBox="0 0 21600 21600" draw:enhanced-path="M 0 0 L 21600 0 21600 21600 0 21600 Z N"/></draw:custom-shape><draw:custom-shape svg:x="1.45348in" svg:y="1.20314in" svg:width="0.0728in" svg:height="0.25817in" draw:id="id146" draw:style-name="a187" draw:name="Rectangle 1009037957"><svg:title/><svg:desc/><draw:enhanced-geometry draw:type="non-primitive" svg:viewBox="0 0 21600 21600" draw:enhanced-path="M 0 0 L 21600 0 21600 21600 0 21600 Z N"/></draw:custom-shape><draw:custom-shape svg:x="1.64945in" svg:y="1.31657in" svg:width="0.06894in" svg:height="0.14474in" draw:id="id147" draw:style-name="a188" draw:name="Rectangle 944906231"><svg:title/><svg:desc/><draw:enhanced-geometry draw:type="non-primitive" svg:viewBox="0 0 21600 21600" draw:enhanced-path="M 0 0 L 21600 0 21600 21600 0 21600 Z N"/></draw:custom-shape><draw:custom-shape svg:x="1.71885in" svg:y="1.24546in" svg:width="0.06772in" svg:height="0.21584in" draw:id="id148" draw:style-name="a190" draw:name="Rectangle 476134765"><svg:title/><svg:desc/><draw:enhanced-geometry draw:type="non-primitive" svg:viewBox="0 0 21600 21600" draw:enhanced-path="M 0 0 L 21600 0 21600 21600 0 21600 Z N"/></draw:custom-shape><draw:custom-shape svg:x="1.78656in" svg:y="0.82671in" svg:width="0.06942in" svg:height="0.63459in" draw:id="id149" draw:style-name="a191" draw:name="Rectangle 2106761589"><svg:title/><svg:desc/><draw:enhanced-geometry draw:type="non-primitive" svg:viewBox="0 0 21600 21600" draw:enhanced-path="M 0 0 L 21600 0 21600 21600 0 21600 Z N"/></draw:custom-shape><draw:custom-shape svg:x="1.85427in" svg:y="1.20314in" svg:width="0.0728in" svg:height="0.25817in" draw:id="id150" draw:style-name="a193" draw:name="Rectangle 472008189"><svg:title/><svg:desc/><draw:enhanced-geometry draw:type="non-primitive" svg:viewBox="0 0 21600 21600" draw:enhanced-path="M 0 0 L 21600 0 21600 21600 0 21600 Z N"/></draw:custom-shape><draw:custom-shape svg:x="2.02182in" svg:y="1.31657in" svg:width="0.06894in" svg:height="0.14474in" draw:id="id151" draw:style-name="a194" draw:name="Rectangle 825499566"><svg:title/><svg:desc/><draw:enhanced-geometry draw:type="non-primitive" svg:viewBox="0 0 21600 21600" draw:enhanced-path="M 0 0 L 21600 0 21600 21600 0 21600 Z N"/></draw:custom-shape><draw:custom-shape svg:x="2.09122in" svg:y="1.24546in" svg:width="0.06772in" svg:height="0.21584in" draw:id="id152" draw:style-name="a196" draw:name="Rectangle 1328915334"><svg:title/><svg:desc/><draw:enhanced-geometry draw:type="non-primitive" svg:viewBox="0 0 21600 21600" draw:enhanced-path="M 0 0 L 21600 0 21600 21600 0 21600 Z N"/></draw:custom-shape><draw:custom-shape svg:x="2.15893in" svg:y="0.69679in" svg:width="0.06942in" svg:height="0.76451in" draw:id="id153" draw:style-name="a197" draw:name="Rectangle 538274215"><svg:title/><svg:desc/><draw:enhanced-geometry draw:type="non-primitive" svg:viewBox="0 0 21600 21600" draw:enhanced-path="M 0 0 L 21600 0 21600 21600 0 21600 Z N"/></draw:custom-shape><draw:custom-shape svg:x="2.22667in" svg:y="1.20314in" svg:width="0.0728in" svg:height="0.25817in" draw:id="id154" draw:style-name="a199" draw:name="Rectangle 1140623058"><svg:title/><svg:desc/><draw:enhanced-geometry draw:type="non-primitive" svg:viewBox="0 0 21600 21600" draw:enhanced-path="M 0 0 L 21600 0 21600 21600 0 21600 Z N"/></draw:custom-shape><draw:custom-shape svg:x="0.8892in" svg:y="1.31657in" svg:width="0.06894in" svg:height="0.14474in" draw:id="id155" draw:style-name="a200" draw:name="Rectangle 2009505448"><svg:title/><svg:desc/><draw:enhanced-geometry draw:type="non-primitive" svg:viewBox="0 0 21600 21600" draw:enhanced-path="M 0 0 L 21600 0 21600 21600 0 21600 Z N"/></draw:custom-shape><draw:custom-shape svg:x="0.95858in" svg:y="1.24546in" svg:width="0.06772in" svg:height="0.21584in" draw:id="id156" draw:style-name="a202" draw:name="Rectangle 713524362"><svg:title/><svg:desc/><draw:enhanced-geometry draw:type="non-primitive" svg:viewBox="0 0 21600 21600" draw:enhanced-path="M 0 0 L 21600 0 21600 21600 0 21600 Z N"/></draw:custom-shape><draw:connector draw:type="line" svg:x1="0.85455in" svg:y1="0.62865in" svg:x2="0.85455in" svg:y2="1.46453in" draw:id="id157" draw:style-name="a203" draw:name="Straight Connector 305326362"><svg:title/><svg:desc/></draw:connector><draw:custom-shape svg:x="1.02632in" svg:y="0.94243in" svg:width="0.06942in" svg:height="0.51888in" draw:id="id158" draw:style-name="a204" draw:name="Rectangle 930845960"><svg:title/><svg:desc/><draw:enhanced-geometry draw:type="non-primitive" svg:viewBox="0 0 21600 21600" draw:enhanced-path="M 0 0 L 21600 0 21600 21600 0 21600 Z N"/></draw:custom-shape><draw:custom-shape svg:x="1.09403in" svg:y="1.20314in" svg:width="0.0728in" svg:height="0.25817in" draw:id="id159" draw:style-name="a206" draw:name="Rectangle 1072744594"><svg:title/><svg:desc/><draw:enhanced-geometry draw:type="non-primitive" svg:viewBox="0 0 21600 21600" draw:enhanced-path="M 0 0 L 21600 0 21600 21600 0 21600 Z N"/></draw:custom-shape><draw:connector draw:type="line" svg:x1="0.84773in" svg:y1="1.4613in" svg:x2="2.33842in" svg:y2="1.4613in" draw:id="id160" draw:style-name="a207" draw:name="Straight Connector 1175134061"><svg:title/><svg:desc/></draw:connector><draw:connector draw:type="line" svg:x1="0.8333in" svg:y1="1.4613in" svg:x2="0.85337in" svg:y2="1.4613in" draw:id="id161" draw:style-name="a208" draw:name="Straight Connector 1846076452"><svg:title/><svg:desc/></draw:connector><draw:connector draw:type="line" svg:x1="0.8333in" svg:y1="0.89034in" svg:x2="0.85337in" svg:y2="0.89034in" draw:id="id162" draw:style-name="a209" draw:name="Straight Connector 1197414398"><svg:title/><svg:desc/></draw:connector><draw:connector draw:type="line" svg:x1="0.8333in" svg:y1="1.03485in" svg:x2="0.84773in" svg:y2="1.03485in" draw:id="id163" draw:style-name="a210" draw:name="Straight Connector 1382846456"><svg:title/><svg:desc/></draw:connector><draw:connector draw:type="line" svg:x1="0.8333in" svg:y1="1.1767in" svg:x2="0.85337in" svg:y2="1.1767in" draw:id="id164" draw:style-name="a211" draw:name="Straight Connector 1042062557"><svg:title/><svg:desc/></draw:connector><draw:connector draw:type="line" svg:x1="0.8333in" svg:y1="1.32121in" svg:x2="0.85716in" svg:y2="1.32121in" draw:id="id165" draw:style-name="a212" draw:name="Straight Connector 1337356875"><svg:title/><svg:desc/></draw:connector><draw:connector draw:type="line" svg:x1="0.8333in" svg:y1="0.75777in" svg:x2="0.85337in" svg:y2="0.75777in" draw:id="id166" draw:style-name="a213" draw:name="Straight Connector 1007056993"><svg:title/><svg:desc/></draw:connector><draw:connector draw:type="line" svg:x1="0.84333in" svg:y1="1.47788in" svg:x2="0.86342in" svg:y2="1.47788in" draw:id="id167" draw:style-name="a214" draw:transform="translate(-0.85337in -1.47788in) rotate(-1.5708) translate(0.85337in 1.47788in)" draw:name="Straight Connector 307568547"><svg:title/><svg:desc/></draw:connector><draw:connector draw:type="line" svg:x1="1.18749in" svg:y1="1.47788in" svg:x2="1.20756in" svg:y2="1.47788in" draw:id="id168" draw:style-name="a215" draw:transform="translate(-1.19753in -1.47788in) rotate(-1.5708) translate(1.19753in 1.47788in)" draw:name="Straight Connector 338960021"><svg:title/><svg:desc/></draw:connector><draw:connector draw:type="line" svg:x1="1.57184in" svg:y1="1.47787in" svg:x2="1.59192in" svg:y2="1.47787in" draw:id="id169" draw:style-name="a216" draw:transform="translate(-1.58188in -1.47787in) rotate(-1.5708) translate(1.58188in 1.47787in)" draw:name="Straight Connector 599946297"><svg:title/><svg:desc/></draw:connector><draw:connector draw:type="line" svg:x1="1.97679in" svg:y1="1.47786in" svg:x2="1.99688in" svg:y2="1.47786in" draw:id="id170" draw:style-name="a217" draw:transform="translate(-1.98684in -1.47786in) rotate(-1.5708) translate(1.98684in 1.47786in)" draw:name="Straight Connector 1407658025"><svg:title/><svg:desc/></draw:connector><draw:connector draw:type="line" svg:x1="2.32097in" svg:y1="1.47782in" svg:x2="2.34104in" svg:y2="1.47782in" draw:id="id171" draw:style-name="a218" draw:transform="translate(-2.33101in -1.47782in) rotate(-1.5708) translate(2.33101in 1.47782in)" draw:name="Straight Connector 1420169976"><svg:title/><svg:desc/></draw:connector><draw:frame draw:id="id172" draw:style-name="a219" draw:name="Text Box 2" svg:x="0.9923in" svg:y="1.58559in" svg:width="1.20509in" svg:height="0.16093in" style:rel-width="scale" style:rel-height="scale"><draw:text-box><text:p text:style-name="P332">Tamanho do arquivo aberto</text:p></draw:text-box><svg:title/><svg:desc/></draw:frame><draw:frame draw:id="id173" draw:style-name="a220" draw:transform="translate(-0.47311in -0.07398in) rotate(-4.71239) translate(0.47311in 1.08983in)" draw:name="Text Box 2" svg:width="0.94622in" svg:height="0.14797in" style:rel-width="scale" style:rel-height="scale"><draw:text-box><text:p text:style-name="P333">System call latência</text:p></draw:text-box><svg:title/><svg:desc/></draw:frame><draw:frame draw:id="id174" draw:style-name="a221" draw:name="Text Box 2" svg:x="0.47495in" svg:y="0.67415in" svg:width="0.35595in" svg:height="0.8295in" style:rel-width="scale" style:rel-height="scale"><draw:text-box><text:p text:style-name="P334">10ms</text:p><text:p text:style-name="P335">1ms</text:p><text:p text:style-name="P336">100μs</text:p><text:p text:style-name="P337">10μs</text:p><text:p text:style-name="P338">1μs</text:p></draw:text-box><svg:title/><svg:desc/></draw:frame><draw:custom-shape svg:x="0.46823in" svg:y="0.428in" svg:width="0.04043in" svg:height="0.04043in" draw:id="id175" draw:style-name="a222" draw:name="Rectangle 99088818"><svg:title/><svg:desc/><draw:enhanced-geometry draw:type="non-primitive" svg:viewBox="0 0 21600 21600" draw:enhanced-path="M 0 0 L 21600 0 21600 21600 0 21600 Z N"/></draw:custom-shape><draw:custom-shape svg:x="0.46844in" svg:y="0.53074in" svg:width="0.0402in" svg:height="0.0402in" draw:id="id176" draw:style-name="a223" draw:name="Rectangle 1515128681"><svg:title/><svg:desc/><draw:enhanced-geometry draw:type="non-primitive" svg:viewBox="0 0 21600 21600" draw:enhanced-path="M 0 0 L 21600 0 21600 21600 0 21600 Z N"/></draw:custom-shape><draw:custom-shape svg:x="1.33128in" svg:y="0.42823in" svg:width="0.0402in" svg:height="0.0402in" draw:id="id177" draw:style-name="a225" draw:name="Rectangle 479129517"><svg:title/><svg:desc/><draw:enhanced-geometry draw:type="non-primitive" svg:viewBox="0 0 21600 21600" draw:enhanced-path="M 0 0 L 21600 0 21600 21600 0 21600 Z N"/></draw:custom-shape><draw:custom-shape svg:x="1.33128in" svg:y="0.52934in" svg:width="0.0402in" svg:height="0.0402in" draw:id="id178" draw:style-name="a227" draw:name="Rectangle 1402079690"><svg:title/><svg:desc/><draw:enhanced-geometry draw:type="non-primitive" svg:viewBox="0 0 21600 21600" draw:enhanced-path="M 0 0 L 21600 0 21600 21600 0 21600 Z N"/></draw:custom-shape><draw:frame draw:id="id179" draw:style-name="a228" draw:name="Text Box 2" svg:x="0.89448in" svg:y="0.82387in" svg:width="0.31278in" svg:height="0.14478in" style:rel-width="scale" style:rel-height="scale"><draw:text-box><text:p text:style-name="P339"><text:s text:c="3"/>383μs</text:p></draw:text-box><svg:title/><svg:desc/></draw:frame><draw:frame draw:id="id180" draw:style-name="a229" draw:name="Text Box 2" svg:x="1.02191in" svg:y="1.09089in" svg:width="0.31278in" svg:height="0.14478in" style:rel-width="scale" style:rel-height="scale"><draw:text-box><text:p text:style-name="P340"><text:s text:c="3"/>8.4μs</text:p></draw:text-box><svg:title/><svg:desc/></draw:frame><draw:frame draw:id="id181" draw:style-name="a230" draw:name="Text Box 2" svg:x="1.38863in" svg:y="1.09089in" svg:width="0.31278in" svg:height="0.14478in" style:rel-width="scale" style:rel-height="scale"><draw:text-box><text:p text:style-name="P341"><text:s text:c="3"/>8.4μs</text:p></draw:text-box><svg:title/><svg:desc/></draw:frame><draw:frame draw:id="id182" draw:style-name="a231" draw:name="Text Box 2" svg:x="1.78377in" svg:y="1.08828in" svg:width="0.31278in" svg:height="0.14478in" style:rel-width="scale" style:rel-height="scale"><draw:text-box><text:p text:style-name="P342"><text:s text:c="3"/>8.4μs</text:p></draw:text-box><svg:title/><svg:desc/></draw:frame><draw:frame draw:id="id183" draw:style-name="a232" draw:name="Text Box 2" svg:x="1.26247in" svg:y="0.75033in" svg:width="0.31278in" svg:height="0.14478in" style:rel-width="scale" style:rel-height="scale"><draw:text-box><text:p text:style-name="P343"><text:s text:c="3"/>2ms</text:p></draw:text-box><svg:title/><svg:desc/></draw:frame><draw:frame draw:id="id184" draw:style-name="a233" draw:name="Text Box 2" svg:x="1.66642in" svg:y="0.71242in" svg:width="0.31278in" svg:height="0.14478in" style:rel-width="scale" style:rel-height="scale"><draw:text-box><text:p text:style-name="P344"><text:s text:c="3"/>5ms</text:p></draw:text-box><svg:title/><svg:desc/></draw:frame><draw:frame draw:id="id185" draw:style-name="a234" draw:name="Text Box 2" svg:x="2.03641in" svg:y="0.58561in" svg:width="0.31278in" svg:height="0.14478in" style:rel-width="scale" style:rel-height="scale"><draw:text-box><text:p text:style-name="P345"><text:s text:c="3"/>21ms</text:p></draw:text-box><svg:title/><svg:desc/></draw:frame><draw:frame draw:id="id186" draw:style-name="a235" draw:name="Text Box 2" svg:x="0.83088in" svg:y="1.46024in" svg:width="1.51763in" svg:height="0.161in" style:rel-width="scale" style:rel-height="scale"><draw:text-box><text:p text:style-name="P346"><text:s text:c="3"/>64k <text:s text:c="13"/>246k <text:s text:c="12"/>1m <text:s text:c="13"/>4m</text:p></draw:text-box><svg:title/><svg:desc/></draw:frame><draw:frame draw:id="id187" draw:style-name="a236" draw:name="Text Box 2" svg:x="2.45163in" svg:y="0.38742in" svg:width="1.84758in" svg:height="0.24684in" style:rel-width="scale" style:rel-height="scale"><draw:text-box><text:p text:style-name="P347">Linux<text:tab/><text:s text:c="31"/>Graphene</text:p><text:p text:style-name="P348">Graphene-SGX (inseguro) <text:s text:c="17"/>Graphene-SGX (seguro)</text:p></draw:text-box><svg:title/><svg:desc/></draw:frame><draw:custom-shape svg:x="3.22122in" svg:y="1.4113in" svg:width="0.06894in" svg:height="0.05in" draw:id="id188" draw:style-name="a237" draw:name="Rectangle 1215363718"><svg:title/><svg:desc/><draw:enhanced-geometry draw:type="non-primitive" svg:viewBox="0 0 21600 21600" draw:enhanced-path="M 0 0 L 21600 0 21600 21600 0 21600 Z N"/></draw:custom-shape><draw:custom-shape svg:x="3.29064in" svg:y="1.36574in" svg:width="0.06772in" svg:height="0.09556in" draw:id="id189" draw:style-name="a239" draw:name="Rectangle 1871139735"><svg:title/><svg:desc/><draw:enhanced-geometry draw:type="non-primitive" svg:viewBox="0 0 21600 21600" draw:enhanced-path="M 0 0 L 21600 0 21600 21600 0 21600 Z N"/></draw:custom-shape><draw:custom-shape svg:x="3.35837in" svg:y="1.34954in" svg:width="0.06942in" svg:height="0.11177in" draw:id="id190" draw:style-name="a241" draw:name="Rectangle 656509995"><svg:title/><svg:desc/><draw:enhanced-geometry draw:type="non-primitive" svg:viewBox="0 0 21600 21600" draw:enhanced-path="M 0 0 L 21600 0 21600 21600 0 21600 Z N"/></draw:custom-shape><draw:custom-shape svg:x="3.42608in" svg:y="1.09722in" svg:width="0.0728in" svg:height="0.36408in" draw:id="id191" draw:style-name="a242" draw:name="Rectangle 387522373"><svg:title/><svg:desc/><draw:enhanced-geometry draw:type="non-primitive" svg:viewBox="0 0 21600 21600" draw:enhanced-path="M 0 0 L 21600 0 21600 21600 0 21600 Z N"/></draw:custom-shape><draw:custom-shape svg:x="3.62205in" svg:y="1.4113in" svg:width="0.06894in" svg:height="0.05in" draw:id="id192" draw:style-name="a243" draw:name="Rectangle 715705271"><svg:title/><svg:desc/><draw:enhanced-geometry draw:type="non-primitive" svg:viewBox="0 0 21600 21600" draw:enhanced-path="M 0 0 L 21600 0 21600 21600 0 21600 Z N"/></draw:custom-shape><draw:custom-shape svg:x="3.69146in" svg:y="1.36574in" svg:width="0.06772in" svg:height="0.09556in" draw:id="id193" draw:style-name="a245" draw:name="Rectangle 1757542854"><svg:title/><svg:desc/><draw:enhanced-geometry draw:type="non-primitive" svg:viewBox="0 0 21600 21600" draw:enhanced-path="M 0 0 L 21600 0 21600 21600 0 21600 Z N"/></draw:custom-shape><draw:custom-shape svg:x="3.75918in" svg:y="1.33796in" svg:width="0.06942in" svg:height="0.12334in" draw:id="id194" draw:style-name="a247" draw:name="Rectangle 1754413381"><svg:title/><svg:desc/><draw:enhanced-geometry draw:type="non-primitive" svg:viewBox="0 0 21600 21600" draw:enhanced-path="M 0 0 L 21600 0 21600 21600 0 21600 Z N"/></draw:custom-shape><draw:custom-shape svg:x="3.82691in" svg:y="0.9537in" svg:width="0.0728in" svg:height="0.5076in" draw:id="id195" draw:style-name="a248" draw:name="Rectangle 668215847"><svg:title/><svg:desc/><draw:enhanced-geometry draw:type="non-primitive" svg:viewBox="0 0 21600 21600" draw:enhanced-path="M 0 0 L 21600 0 21600 21600 0 21600 Z N"/></draw:custom-shape><draw:custom-shape svg:x="3.99441in" svg:y="1.4113in" svg:width="0.06894in" svg:height="0.05in" draw:id="id196" draw:style-name="a249" draw:name="Rectangle 1175479798"><svg:title/><svg:desc/><draw:enhanced-geometry draw:type="non-primitive" svg:viewBox="0 0 21600 21600" draw:enhanced-path="M 0 0 L 21600 0 21600 21600 0 21600 Z N"/></draw:custom-shape><draw:custom-shape svg:x="4.06383in" svg:y="1.36574in" svg:width="0.06772in" svg:height="0.09556in" draw:id="id197" draw:style-name="a251" draw:name="Rectangle 1899759216"><svg:title/><svg:desc/><draw:enhanced-geometry draw:type="non-primitive" svg:viewBox="0 0 21600 21600" draw:enhanced-path="M 0 0 L 21600 0 21600 21600 0 21600 Z N"/></draw:custom-shape><draw:custom-shape svg:x="4.13155in" svg:y="1.32121in" svg:width="0.06942in" svg:height="0.14009in" draw:id="id198" draw:style-name="a253" draw:name="Rectangle 308041848"><svg:title/><svg:desc/><draw:enhanced-geometry draw:type="non-primitive" svg:viewBox="0 0 21600 21600" draw:enhanced-path="M 0 0 L 21600 0 21600 21600 0 21600 Z N"/></draw:custom-shape><draw:custom-shape svg:x="4.19927in" svg:y="0.69663in" svg:width="0.0728in" svg:height="0.76467in" draw:id="id199" draw:style-name="a254" draw:name="Rectangle 1584465339"><svg:title/><svg:desc/><draw:enhanced-geometry draw:type="non-primitive" svg:viewBox="0 0 21600 21600" draw:enhanced-path="M 0 0 L 21600 0 21600 21600 0 21600 Z N"/></draw:custom-shape><draw:custom-shape svg:x="2.86177in" svg:y="1.4113in" svg:width="0.06894in" svg:height="0.05in" draw:id="id200" draw:style-name="a255" draw:name="Rectangle 1603018950"><svg:title/><svg:desc/><draw:enhanced-geometry draw:type="non-primitive" svg:viewBox="0 0 21600 21600" draw:enhanced-path="M 0 0 L 21600 0 21600 21600 0 21600 Z N"/></draw:custom-shape><draw:custom-shape svg:x="2.9312in" svg:y="1.36574in" svg:width="0.06772in" svg:height="0.09556in" draw:id="id201" draw:style-name="a257" draw:name="Rectangle 79757344"><svg:title/><svg:desc/><draw:enhanced-geometry draw:type="non-primitive" svg:viewBox="0 0 21600 21600" draw:enhanced-path="M 0 0 L 21600 0 21600 21600 0 21600 Z N"/></draw:custom-shape><draw:connector draw:type="line" svg:x1="2.82716in" svg:y1="0.62865in" svg:x2="2.82716in" svg:y2="1.46453in" draw:id="id202" draw:style-name="a258" draw:name="Straight Connector 1107014247"><svg:title/><svg:desc/></draw:connector><draw:custom-shape svg:x="2.99892in" svg:y="1.35185in" svg:width="0.06942in" svg:height="0.10945in" draw:id="id203" draw:style-name="a260" draw:name="Rectangle 1622380894"><svg:title/><svg:desc/><draw:enhanced-geometry draw:type="non-primitive" svg:viewBox="0 0 21600 21600" draw:enhanced-path="M 0 0 L 21600 0 21600 21600 0 21600 Z N"/></draw:custom-shape><draw:custom-shape svg:x="3.06663in" svg:y="1.28704in" svg:width="0.0728in" svg:height="0.17427in" draw:id="id204" draw:style-name="a261" draw:name="Rectangle 256632527"><svg:title/><svg:desc/><draw:enhanced-geometry draw:type="non-primitive" svg:viewBox="0 0 21600 21600" draw:enhanced-path="M 0 0 L 21600 0 21600 21600 0 21600 Z N"/></draw:custom-shape><draw:connector draw:type="line" svg:x1="2.82031in" svg:y1="1.4613in" svg:x2="4.31101in" svg:y2="1.4613in" draw:id="id205" draw:style-name="a262" draw:name="Straight Connector 1773735474"><svg:title/><svg:desc/></draw:connector><draw:connector draw:type="line" svg:x1="2.80592in" svg:y1="1.4613in" svg:x2="2.82601in" svg:y2="1.4613in" draw:id="id206" draw:style-name="a263" draw:name="Straight Connector 623504646"><svg:title/><svg:desc/></draw:connector><draw:connector draw:type="line" svg:x1="2.80592in" svg:y1="1.12101in" svg:x2="2.82601in" svg:y2="1.12101in" draw:id="id207" draw:style-name="a264" draw:name="Straight Connector 1526875004"><svg:title/><svg:desc/></draw:connector><draw:connector draw:type="line" svg:x1="2.80592in" svg:y1="0.75777in" svg:x2="2.82601in" svg:y2="0.75777in" draw:id="id208" draw:style-name="a265" draw:name="Straight Connector 966444802"><svg:title/><svg:desc/></draw:connector><draw:connector draw:type="line" svg:x1="2.81597in" svg:y1="1.47782in" svg:x2="2.83604in" svg:y2="1.47782in" draw:id="id209" draw:style-name="a266" draw:transform="translate(-2.82601in -1.47782in) rotate(-1.5708) translate(2.82601in 1.47782in)" draw:name="Straight Connector 529700814"><svg:title/><svg:desc/></draw:connector><draw:connector draw:type="line" svg:x1="3.16011in" svg:y1="1.47787in" svg:x2="3.18019in" svg:y2="1.47787in" draw:id="id210" draw:style-name="a267" draw:transform="translate(-3.17015in -1.47787in) rotate(-1.5708) translate(3.17015in 1.47787in)" draw:name="Straight Connector 1810017444"><svg:title/><svg:desc/></draw:connector><draw:connector draw:type="line" svg:x1="3.54444in" svg:y1="1.47788in" svg:x2="3.56453in" svg:y2="1.47788in" draw:id="id211" draw:style-name="a268" draw:transform="translate(-3.55448in -1.47788in) rotate(-1.5708) translate(3.55448in 1.47788in)" draw:name="Straight Connector 10345126"><svg:title/><svg:desc/></draw:connector><draw:connector draw:type="line" svg:x1="3.94941in" svg:y1="1.47786in" svg:x2="3.96948in" svg:y2="1.47786in" draw:id="id212" draw:style-name="a269" draw:transform="translate(-3.95945in -1.47786in) rotate(-1.5708) translate(3.95945in 1.47786in)" draw:name="Straight Connector 337925128"><svg:title/><svg:desc/></draw:connector><draw:connector draw:type="line" svg:x1="4.29354in" svg:y1="1.47788in" svg:x2="4.31363in" svg:y2="1.47788in" draw:id="id213" draw:style-name="a270" draw:transform="translate(-4.30358in -1.47788in) rotate(-1.5708) translate(4.30358in 1.47788in)" draw:name="Straight Connector 967951532"><svg:title/><svg:desc/></draw:connector><draw:frame draw:id="id214" draw:style-name="a271" draw:name="Text Box 2" svg:x="2.82056in" svg:y="1.57904in" svg:width="1.46008in" svg:height="0.26301in" style:rel-width="scale" style:rel-height="scale"><draw:text-box><text:p text:style-name="P349">Tamanho do bloco do arquivo de leitura</text:p></draw:text-box><svg:title/><svg:desc/></draw:frame><draw:frame draw:id="id215" draw:style-name="a272" draw:transform="translate(-0.47311in -0.07398in) rotate(-4.71239) translate(2.48688in 1.08983in)" draw:name="Text Box 2" svg:width="0.94622in" svg:height="0.14797in" style:rel-width="scale" style:rel-height="scale"><draw:text-box><text:p text:style-name="P350">System call latência</text:p></draw:text-box><svg:title/><svg:desc/></draw:frame><draw:frame draw:id="id216" draw:style-name="a273" draw:name="Text Box 2" svg:x="2.44105in" svg:y="0.6875in" svg:width="0.37928in" svg:height="0.86806in" style:rel-width="scale" style:rel-height="scale"><draw:text-box><text:p text:style-name="P351">10μs</text:p><text:p text:style-name="P352"/><text:p text:style-name="P353"/><text:p text:style-name="P354">1μs</text:p><text:p text:style-name="P355"/><text:p text:style-name="P356"/><text:p text:style-name="P357">0.1μs</text:p></draw:text-box><svg:title/><svg:desc/></draw:frame><draw:custom-shape svg:x="2.44081in" svg:y="0.428in" svg:width="0.04043in" svg:height="0.04043in" draw:id="id217" draw:style-name="a274" draw:name="Rectangle 1313188752"><svg:title/><svg:desc/><draw:enhanced-geometry draw:type="non-primitive" svg:viewBox="0 0 21600 21600" draw:enhanced-path="M 0 0 L 21600 0 21600 21600 0 21600 Z N"/></draw:custom-shape><draw:custom-shape svg:x="2.44105in" svg:y="0.53074in" svg:width="0.0402in" svg:height="0.0402in" draw:id="id218" draw:style-name="a276" draw:name="Rectangle 1943216611"><svg:title/><svg:desc/><draw:enhanced-geometry draw:type="non-primitive" svg:viewBox="0 0 21600 21600" draw:enhanced-path="M 0 0 L 21600 0 21600 21600 0 21600 Z N"/></draw:custom-shape><draw:custom-shape svg:x="3.30386in" svg:y="0.42823in" svg:width="0.0402in" svg:height="0.0402in" draw:id="id219" draw:style-name="a278" draw:name="Rectangle 1446954648"><svg:title/><svg:desc/><draw:enhanced-geometry draw:type="non-primitive" svg:viewBox="0 0 21600 21600" draw:enhanced-path="M 0 0 L 21600 0 21600 21600 0 21600 Z N"/></draw:custom-shape><draw:custom-shape svg:x="3.30386in" svg:y="0.52934in" svg:width="0.0402in" svg:height="0.0402in" draw:id="id220" draw:style-name="a279" draw:name="Rectangle 1081661994"><svg:title/><svg:desc/><draw:enhanced-geometry draw:type="non-primitive" svg:viewBox="0 0 21600 21600" draw:enhanced-path="M 0 0 L 21600 0 21600 21600 0 21600 Z N"/></draw:custom-shape><draw:frame draw:id="id221" draw:style-name="a280" draw:name="Text Box 2" svg:x="2.9575in" svg:y="1.16497in" svg:width="0.31278in" svg:height="0.14478in" style:rel-width="scale" style:rel-height="scale"><draw:text-box><text:p text:style-name="P358"><text:s text:c="3"/>0.4μs</text:p></draw:text-box><svg:title/><svg:desc/></draw:frame><draw:frame draw:id="id222" draw:style-name="a281" draw:name="Text Box 2" svg:x="3.32188in" svg:y="0.97978in" svg:width="0.31278in" svg:height="0.14478in" style:rel-width="scale" style:rel-height="scale"><draw:text-box><text:p text:style-name="P359"><text:s text:c="3"/>1.2μs</text:p></draw:text-box><svg:title/><svg:desc/></draw:frame><draw:frame draw:id="id223" draw:style-name="a282" draw:name="Text Box 2" svg:x="3.71531in" svg:y="0.835in" svg:width="0.31278in" svg:height="0.14478in" style:rel-width="scale" style:rel-height="scale"><draw:text-box><text:p text:style-name="P360"><text:s text:c="3"/>4.4μs</text:p></draw:text-box><svg:title/><svg:desc/></draw:frame><draw:frame draw:id="id224" draw:style-name="a283" draw:name="Text Box 2" svg:x="4.07844in" svg:y="0.58561in" svg:width="0.31278in" svg:height="0.14478in" style:rel-width="scale" style:rel-height="scale"><draw:text-box><text:p text:style-name="P361"><text:s text:c="3"/>16.9μs</text:p></draw:text-box><svg:title/><svg:desc/></draw:frame><draw:frame draw:id="id225" draw:style-name="a284" draw:name="Text Box 2" svg:x="2.80351in" svg:y="1.46024in" svg:width="1.52504in" svg:height="0.161in" style:rel-width="scale" style:rel-height="scale"><draw:text-box><text:p text:style-name="P362"><text:s text:c="3"/>64b <text:s text:c="12"/>256b <text:s text:c="13"/>1k <text:s text:c="14"/>4k</text:p></draw:text-box><svg:title/><svg:desc/></draw:frame><draw:frame draw:id="id226" draw:style-name="a285" draw:name="Text Box 2" svg:x="4.42227in" svg:y="0.38742in" svg:width="1.84758in" svg:height="0.30922in" style:rel-width="scale" style:rel-height="scale"><draw:text-box><text:p text:style-name="P363">Linux<text:tab/><text:s text:c="36"/>Graphene (sobre RPC)</text:p><text:p text:style-name="P364">Graphene-SGX (IPC em massa) <text:s text:c="12"/>Graphene-SGX</text:p></draw:text-box><svg:title/><svg:desc/></draw:frame><draw:custom-shape svg:x="5.19185in" svg:y="1.19722in" svg:width="0.06894in" svg:height="0.26408in" draw:id="id227" draw:style-name="a286" draw:name="Rectangle 856937333"><svg:title/><svg:desc/><draw:enhanced-geometry draw:type="non-primitive" svg:viewBox="0 0 21600 21600" draw:enhanced-path="M 0 0 L 21600 0 21600 21600 0 21600 Z N"/></draw:custom-shape><draw:custom-shape svg:x="5.26128in" svg:y="0.97978in" svg:width="0.06772in" svg:height="0.48152in" draw:id="id228" draw:style-name="a288" draw:name="Rectangle 205269597"><svg:title/><svg:desc/><draw:enhanced-geometry draw:type="non-primitive" svg:viewBox="0 0 21600 21600" draw:enhanced-path="M 0 0 L 21600 0 21600 21600 0 21600 Z N"/></draw:custom-shape><draw:custom-shape svg:x="5.32899in" svg:y="1.08264in" svg:width="0.06942in" svg:height="0.37866in" draw:id="id229" draw:style-name="a290" draw:name="Rectangle 391804709"><svg:title/><svg:desc/><draw:enhanced-geometry draw:type="non-primitive" svg:viewBox="0 0 21600 21600" draw:enhanced-path="M 0 0 L 21600 0 21600 21600 0 21600 Z N"/></draw:custom-shape><draw:custom-shape svg:x="5.3967in" svg:y="0.74097in" svg:width="0.0728in" svg:height="0.72033in" draw:id="id230" draw:style-name="a291" draw:name="Rectangle 2068808360"><svg:title/><svg:desc/><draw:enhanced-geometry draw:type="non-primitive" svg:viewBox="0 0 21600 21600" draw:enhanced-path="M 0 0 L 21600 0 21600 21600 0 21600 Z N"/></draw:custom-shape><draw:custom-shape svg:x="5.59267in" svg:y="1.18889in" svg:width="0.06894in" svg:height="0.27241in" draw:id="id231" draw:style-name="a292" draw:name="Rectangle 738497794"><svg:title/><svg:desc/><draw:enhanced-geometry draw:type="non-primitive" svg:viewBox="0 0 21600 21600" draw:enhanced-path="M 0 0 L 21600 0 21600 21600 0 21600 Z N"/></draw:custom-shape><draw:custom-shape svg:x="5.6621in" svg:y="0.92639in" svg:width="0.06772in" svg:height="0.53492in" draw:id="id232" draw:style-name="a294" draw:name="Rectangle 179168919"><svg:title/><svg:desc/><draw:enhanced-geometry draw:type="non-primitive" svg:viewBox="0 0 21600 21600" draw:enhanced-path="M 0 0 L 21600 0 21600 21600 0 21600 Z N"/></draw:custom-shape><draw:custom-shape svg:x="5.72983in" svg:y="1.04931in" svg:width="0.06942in" svg:height="0.412in" draw:id="id233" draw:style-name="a296" draw:name="Rectangle 1653787607"><svg:title/><svg:desc/><draw:enhanced-geometry draw:type="non-primitive" svg:viewBox="0 0 21600 21600" draw:enhanced-path="M 0 0 L 21600 0 21600 21600 0 21600 Z N"/></draw:custom-shape><draw:custom-shape svg:x="5.79753in" svg:y="0.69663in" svg:width="0.0728in" svg:height="0.76467in" draw:id="id234" draw:style-name="a297" draw:name="Rectangle 1506875743"><svg:title/><svg:desc/><draw:enhanced-geometry draw:type="non-primitive" svg:viewBox="0 0 21600 21600" draw:enhanced-path="M 0 0 L 21600 0 21600 21600 0 21600 Z N"/></draw:custom-shape><draw:custom-shape svg:x="5.96504in" svg:y="1.18264in" svg:width="0.06894in" svg:height="0.27866in" draw:id="id235" draw:style-name="a298" draw:name="Rectangle 1797056101"><svg:title/><svg:desc/><draw:enhanced-geometry draw:type="non-primitive" svg:viewBox="0 0 21600 21600" draw:enhanced-path="M 0 0 L 21600 0 21600 21600 0 21600 Z N"/></draw:custom-shape><draw:custom-shape svg:x="6.03448in" svg:y="0.89034in" svg:width="0.06772in" svg:height="0.57096in" draw:id="id236" draw:style-name="a300" draw:name="Rectangle 574135836"><svg:title/><svg:desc/><draw:enhanced-geometry draw:type="non-primitive" svg:viewBox="0 0 21600 21600" draw:enhanced-path="M 0 0 L 21600 0 21600 21600 0 21600 Z N"/></draw:custom-shape><draw:custom-shape svg:x="6.10219in" svg:y="1.02014in" svg:width="0.06942in" svg:height="0.44117in" draw:id="id237" draw:style-name="a302" draw:name="Rectangle 684957979"><svg:title/><svg:desc/><draw:enhanced-geometry draw:type="non-primitive" svg:viewBox="0 0 21600 21600" draw:enhanced-path="M 0 0 L 21600 0 21600 21600 0 21600 Z N"/></draw:custom-shape><draw:custom-shape svg:x="6.1699in" svg:y="0.66806in" svg:width="0.0728in" svg:height="0.79325in" draw:id="id238" draw:style-name="a303" draw:name="Rectangle 1768228538"><svg:title/><svg:desc/><draw:enhanced-geometry draw:type="non-primitive" svg:viewBox="0 0 21600 21600" draw:enhanced-path="M 0 0 L 21600 0 21600 21600 0 21600 Z N"/></draw:custom-shape><draw:custom-shape svg:x="4.83241in" svg:y="1.21597in" svg:width="0.06894in" svg:height="0.24533in" draw:id="id239" draw:style-name="a304" draw:name="Rectangle 1760879369"><svg:title/><svg:desc/><draw:enhanced-geometry draw:type="non-primitive" svg:viewBox="0 0 21600 21600" draw:enhanced-path="M 0 0 L 21600 0 21600 21600 0 21600 Z N"/></draw:custom-shape><draw:custom-shape svg:x="4.90184in" svg:y="0.99931in" svg:width="0.06772in" svg:height="0.462in" draw:id="id240" draw:style-name="a306" draw:name="Rectangle 1918249400"><svg:title/><svg:desc/><draw:enhanced-geometry draw:type="non-primitive" svg:viewBox="0 0 21600 21600" draw:enhanced-path="M 0 0 L 21600 0 21600 21600 0 21600 Z N"/></draw:custom-shape><draw:connector draw:type="line" svg:x1="4.7978in" svg:y1="0.62865in" svg:x2="4.7978in" svg:y2="1.46453in" draw:id="id241" draw:style-name="a307" draw:name="Straight Connector 405825040"><svg:title/><svg:desc/></draw:connector><draw:custom-shape svg:x="4.96955in" svg:y="1.10764in" svg:width="0.06942in" svg:height="0.35367in" draw:id="id242" draw:style-name="a309" draw:name="Rectangle 1778572231"><svg:title/><svg:desc/><draw:enhanced-geometry draw:type="non-primitive" svg:viewBox="0 0 21600 21600" draw:enhanced-path="M 0 0 L 21600 0 21600 21600 0 21600 Z N"/></draw:custom-shape><draw:custom-shape svg:x="5.03726in" svg:y="0.76597in" svg:width="0.0728in" svg:height="0.69533in" draw:id="id243" draw:style-name="a310" draw:name="Rectangle 771875495"><svg:title/><svg:desc/><draw:enhanced-geometry draw:type="non-primitive" svg:viewBox="0 0 21600 21600" draw:enhanced-path="M 0 0 L 21600 0 21600 21600 0 21600 Z N"/></draw:custom-shape><draw:connector draw:type="line" svg:x1="4.79094in" svg:y1="1.4613in" svg:x2="6.28164in" svg:y2="1.4613in" draw:id="id244" draw:style-name="a311" draw:name="Straight Connector 609827934"><svg:title/><svg:desc/></draw:connector><draw:connector draw:type="line" svg:x1="4.77656in" svg:y1="1.4613in" svg:x2="4.79663in" svg:y2="1.4613in" draw:id="id245" draw:style-name="a312" draw:name="Straight Connector 1213207967"><svg:title/><svg:desc/></draw:connector><draw:connector draw:type="line" svg:x1="4.77656in" svg:y1="0.98617in" svg:x2="4.79663in" svg:y2="0.98617in" draw:id="id246" draw:style-name="a313" draw:name="Straight Connector 2065085605"><svg:title/><svg:desc/></draw:connector><draw:connector draw:type="line" svg:x1="4.77656in" svg:y1="1.1036in" svg:x2="4.79094in" svg:y2="1.1036in" draw:id="id247" draw:style-name="a314" draw:name="Straight Connector 246120660"><svg:title/><svg:desc/></draw:connector><draw:connector draw:type="line" svg:x1="4.77656in" svg:y1="1.21212in" svg:x2="4.79663in" svg:y2="1.21212in" draw:id="id248" draw:style-name="a315" draw:name="Straight Connector 293312649"><svg:title/><svg:desc/></draw:connector><draw:connector draw:type="line" svg:x1="4.77656in" svg:y1="1.32955in" svg:x2="4.80038in" svg:y2="1.32955in" draw:id="id249" draw:style-name="a316" draw:name="Straight Connector 2062213022"><svg:title/><svg:desc/></draw:connector><draw:connector draw:type="line" svg:x1="4.77656in" svg:y1="0.87589in" svg:x2="4.79663in" svg:y2="0.87589in" draw:id="id250" draw:style-name="a317" draw:name="Straight Connector 351886873"><svg:title/><svg:desc/></draw:connector><draw:connector draw:type="line" svg:x1="4.78658in" svg:y1="1.47786in" svg:x2="4.80667in" svg:y2="1.47786in" draw:id="id251" draw:style-name="a318" draw:transform="translate(-4.79663in -1.47786in) rotate(-1.5708) translate(4.79663in 1.47786in)" draw:name="Straight Connector 1420660062"><svg:title/><svg:desc/></draw:connector><draw:connector draw:type="line" svg:x1="5.13074in" svg:y1="1.47787in" svg:x2="5.15081in" svg:y2="1.47787in" draw:id="id252" draw:style-name="a319" draw:transform="translate(-5.14078in -1.47787in) rotate(-1.5708) translate(5.14078in 1.47787in)" draw:name="Straight Connector 71479141"><svg:title/><svg:desc/></draw:connector><draw:connector draw:type="line" svg:x1="5.51509in" svg:y1="1.47788in" svg:x2="5.53516in" svg:y2="1.47788in" draw:id="id253" draw:style-name="a320" draw:transform="translate(-5.52512in -1.47788in) rotate(-1.5708) translate(5.52512in 1.47788in)" draw:name="Straight Connector 267901368"><svg:title/><svg:desc/></draw:connector><draw:connector draw:type="line" svg:x1="5.92004in" svg:y1="1.47787in" svg:x2="5.94012in" svg:y2="1.47787in" draw:id="id254" draw:style-name="a321" draw:transform="translate(-5.93008in -1.47787in) rotate(-1.5708) translate(5.93008in 1.47787in)" draw:name="Straight Connector 2114624221"><svg:title/><svg:desc/></draw:connector><draw:connector draw:type="line" svg:x1="6.26418in" svg:y1="1.47788in" svg:x2="6.28425in" svg:y2="1.47788in" draw:id="id255" draw:style-name="a322" draw:transform="translate(-6.27421in -1.47788in) rotate(-1.5708) translate(6.27421in 1.47788in)" draw:name="Straight Connector 986789549"><svg:title/><svg:desc/></draw:connector><draw:frame draw:id="id256" draw:style-name="a323" draw:name="Text Box 2" svg:x="4.86324in" svg:y="1.58559in" svg:width="1.34963in" svg:height="0.25934in" style:rel-width="scale" style:rel-height="scale"><draw:text-box><text:p text:style-name="P365">Espaço ocupado pela memória do processo</text:p></draw:text-box><svg:title/><svg:desc/></draw:frame><draw:frame draw:id="id257" draw:style-name="a324" draw:transform="translate(-0.47311in -0.07398in) rotate(-4.71239) translate(4.41635in 1.08983in)" draw:name="Text Box 2" svg:width="0.94622in" svg:height="0.14797in" style:rel-width="scale" style:rel-height="scale"><draw:text-box><text:p text:style-name="P366">System call latência</text:p></draw:text-box><svg:title/><svg:desc/></draw:frame><draw:frame draw:id="id258" draw:style-name="a325" draw:name="Text Box 2" svg:x="4.36463in" svg:y="0.67414in" svg:width="0.375in" svg:height="0.83511in" style:rel-width="scale" style:rel-height="scale"><draw:text-box><text:p text:style-name="P367">1s</text:p><text:p text:style-name="P368">100ms</text:p><text:p text:style-name="P369">10ms</text:p><text:p text:style-name="P370">1ms</text:p><text:p text:style-name="P371"><text:span text:style-name="T372">100</text:span><text:span text:style-name="T373">μ</text:span><text:span text:style-name="T374">s</text:span></text:p><text:p text:style-name="P375"><text:span text:style-name="T376">10</text:span><text:span text:style-name="T377">μ</text:span><text:span text:style-name="T378">s</text:span></text:p><text:p text:style-name="P379"><text:span text:style-name="T380">1</text:span><text:span text:style-name="T381">μ</text:span><text:span text:style-name="T382">s</text:span></text:p></draw:text-box><svg:title/><svg:desc/></draw:frame><draw:custom-shape svg:x="4.41146in" svg:y="0.428in" svg:width="0.04043in" svg:height="0.04043in" draw:id="id259" draw:style-name="a326" draw:name="Rectangle 1834983412"><svg:title/><svg:desc/><draw:enhanced-geometry draw:type="non-primitive" svg:viewBox="0 0 21600 21600" draw:enhanced-path="M 0 0 L 21600 0 21600 21600 0 21600 Z N"/></draw:custom-shape><draw:custom-shape svg:x="4.4117in" svg:y="0.53074in" svg:width="0.0402in" svg:height="0.0402in" draw:id="id260" draw:style-name="a327" draw:name="Rectangle 547345"><svg:title/><svg:desc/><draw:enhanced-geometry draw:type="non-primitive" svg:viewBox="0 0 21600 21600" draw:enhanced-path="M 0 0 L 21600 0 21600 21600 0 21600 Z N"/></draw:custom-shape><draw:custom-shape svg:x="5.33521in" svg:y="0.42823in" svg:width="0.0402in" svg:height="0.0402in" draw:id="id261" draw:style-name="a329" draw:name="Rectangle 325295787"><svg:title/><svg:desc/><draw:enhanced-geometry draw:type="non-primitive" svg:viewBox="0 0 21600 21600" draw:enhanced-path="M 0 0 L 21600 0 21600 21600 0 21600 Z N"/></draw:custom-shape><draw:custom-shape svg:x="5.33521in" svg:y="0.52934in" svg:width="0.0402in" svg:height="0.0402in" draw:id="id262" draw:style-name="a331" draw:name="Rectangle 1059840193"><svg:title/><svg:desc/><draw:enhanced-geometry draw:type="non-primitive" svg:viewBox="0 0 21600 21600" draw:enhanced-path="M 0 0 L 21600 0 21600 21600 0 21600 Z N"/></draw:custom-shape><draw:frame draw:id="id263" draw:style-name="a332" draw:name="Text Box 2" svg:x="4.85838in" svg:y="0.82387in" svg:width="0.29208in" svg:height="0.14478in" style:rel-width="scale" style:rel-height="scale"><draw:text-box><text:p text:style-name="P383"><text:s text:c="3"/>383μs</text:p></draw:text-box><svg:title/><svg:desc/></draw:frame><draw:frame draw:id="id264" draw:style-name="a333" draw:name="Text Box 2" svg:x="4.77656in" svg:y="1.46024in" svg:width="1.51522in" svg:height="0.161in" style:rel-width="scale" style:rel-height="scale"><draw:text-box><text:p text:style-name="P384"><text:s text:c="3"/>16M <text:s text:c="11"/>32M <text:s text:c="13"/>64M <text:s text:c="8"/>128M</text:p></draw:text-box><svg:title/><svg:desc/></draw:frame><draw:connector draw:type="line" svg:x1="4.77656in" svg:y1="0.75506in" svg:x2="4.79663in" svg:y2="0.75506in" draw:id="id265" draw:style-name="a334" draw:name="Straight Connector 1617934163"><svg:title/><svg:desc/></draw:connector></draw:g></text:p>
      <text:p text:style-name="P385"><text:span text:style-name="T386">Figura 7. Latência de algumas chamadas de sistema caras no Gramine-SGX, incluindo a abertura e a leitura de um arquivo seguro (autenticado) e a bifurcação de um novo processo. Os resultados são comparados com o Linux nativo e o Gramine.</text:span></text:p>
      <text:list text:style-name="Outline" text:continue-numbering="true">
        <text:list-item>
          <text:p text:style-name="P387"><office:annotation office:name="7" xml:id="688455889"><dc:creator>Dalton Tavares</dc:creator><dc:date>2023-11-23T08:35:00</dc:date><text:p text:style-name="CommentText">Remover esta seção.</text:p></office:annotation>Imagens<text:span text:style-name="T388"><office:annotation-end office:name="7"/></text:span></text:p>
        </text:list-item>
      </text:list>
      <text:p text:style-name="SBCparagraphfirst">Todas as imagens foram reproduzidas por mim (autor) algumas foram traduzidas, portanto, deixei os crédito abaixo.</text:p>
      <text:list text:style-name="LFO24" text:continue-numbering="true">
        <text:list-item>
          <text:p text:style-name="P389"><text:span text:style-name="T390">Figura 1</text:span><text:span text:style-name="T391">: Visualização do Processo. Disponível em: &lt;</text:span><text:a xlink:href="https://blog.quarkslab.com/overview-of-intel-sgx-part-1-sgx-internals.html" office:target-frame-name="_top" xlink:show="replace"><text:span text:style-name="T392">https://blog.quarkslab.com/overview-of-intel-sgx-part-1-sgx-internals.html</text:span></text:a><text:span text:style-name="T393">&gt;,&lt;</text:span><text:a xlink:href="https://community.intel.com/legacyfs/online/drupal_files/332680-002.pdf" office:target-frame-name="_top" xlink:show="replace"><text:span text:style-name="T394">https://community.intel.com/legacy</text:span><text:bookmark-start text:name="_Hlt150128551"/><text:bookmark-start text:name="_Hlt150128552"/><text:span text:style-name="T395">f</text:span><text:bookmark-end text:name="_Hlt150128551"/><text:bookmark-end text:name="_Hlt150128552"/><text:span text:style-name="T396">s/online/drupal_files/332680-002.pdf</text:span></text:a><text:span text:style-name="T397">&gt;;<text:s/></text:span></text:p>
        </text:list-item>
        <text:list-item>
          <text:p text:style-name="P398"><text:span text:style-name="T399">Figura 2</text:span><text:span text:style-name="T400">: Arquitetura SGX. Disponível em: &lt;</text:span><text:a xlink:href="https://community.intel.com/legacyfs/online/drupal_files/332680-002.pdf" office:target-frame-name="_top" xlink:show="replace"><text:span text:style-name="T401">https://community.intel.com/legacyfs/online/drupal_files/332680-002.pdf</text:span></text:a><text:span text:style-name="T402">&gt;;<text:s/></text:span></text:p>
        </text:list-item>
        <text:list-item>
          <text:p text:style-name="P403"><text:span text:style-name="T404">Figura 3:<text:s/></text:span><text:span text:style-name="T405">Memória – Caminho da página do Enclave. Disponível em: &lt;</text:span><text:a xlink:href="https://blog.quarkslab.com/overview-of-intel-sgx-part-1-sgx-internals.html" office:target-frame-name="_top" xlink:show="replace"><text:span text:style-name="T406">https://blog.quarkslab.com/overview-of-intel-sgx-part-1-sgx-internals.html</text:span></text:a><text:span text:style-name="T407">&gt;,&lt;</text:span><text:a xlink:href="https://community.intel.com/legacyfs/online/drupal_files/332680-002.pdf" office:target-frame-name="_top" xlink:show="replace"><text:span text:style-name="T408">https://community.intel.com/legacyfs/online/drupal_files/332680-002.pdf</text:span></text:a><text:span text:style-name="T409">&gt;;</text:span></text:p>
        </text:list-item>
        <text:list-item>
          <text:p text:style-name="P410"><text:span text:style-name="T411">Figura 4:</text:span><text:span text:style-name="T412"><text:s/>Memória – Cache de página enclave (EPC) no PRM. Disponivel em: &lt;</text:span><text:a xlink:href="https://sgx101.gitbook.io/sgx101/sgx-bootstrap/enclave" office:target-frame-name="_top" xlink:show="replace"><text:span text:style-name="T413">https://sgx101.gitbook.io/sgx101/sgx-bootstrap/enclave</text:span></text:a><text:span text:style-name="T414">&gt;.</text:span></text:p>
        </text:list-item>
        <text:list-item>
          <text:p text:style-name="P415"><text:span text:style-name="T416">Figura 5:</text:span><text:span text:style-name="T417"><text:s/>Gerenciamento de Páginas – Page-out. Disponivel em: &lt;</text:span><text:a xlink:href="https://blog.quarkslab.com/overview-of-intel-sgx-part-1-sgx-internals.html" office:target-frame-name="_top" xlink:show="replace"><text:span text:style-name="T418">https://blog.quarkslab.com/overview-of-intel-sgx-part-1-sgx-internals.html</text:span></text:a><text:span text:style-name="T419">&gt;,&lt;</text:span><text:a xlink:href="https://community.intel.com/legacyfs/online/drupal_files/332680-002.pdf" office:target-frame-name="_top" xlink:show="replace"><text:span text:style-name="T420">https://community.intel.com/legacyfs/online/drupal_files/332680-002.pdf</text:span></text:a><text:span text:style-name="T421">&gt;;</text:span></text:p>
        </text:list-item>
        <text:list-item>
          <text:p text:style-name="P422"><text:span text:style-name="T423">Figura 6:</text:span><text:span text:style-name="T424"><text:s/>Gerenciamento de Páginas – Page-in. Disponivel em: &lt;</text:span><text:a xlink:href="https://blog.quarkslab.com/overview-of-intel-sgx-part-1-sgx-internals.html" office:target-frame-name="_top" xlink:show="replace"><text:span text:style-name="T425">https://blog.quarkslab.com/overview-of-intel-sgx-part-1-sgx-internals.html</text:span></text:a><text:span text:style-name="T426">&gt;,&lt;</text:span><text:a xlink:href="https://community.intel.com/legacyfs/online/drupal_files/332680-002.pdf" office:target-frame-name="_top" xlink:show="replace"><text:span text:style-name="T427">https://community.intel.com/legacyfs/online/drupal_files/332680-002.pdf</text:span></text:a><text:span text:style-name="T428">&gt;;</text:span></text:p>
        </text:list-item>
        <text:list-item>
          <text:p text:style-name="P429"><text:span text:style-name="T430">Figura 7:</text:span><text:s/>Latência de algumas chamadas de sistema [...]<text:span text:style-name="T431">. Disponivel em: &lt;</text:span><text:a xlink:href="https://www.usenix.org/system/files/conference/atc17/atc17-tsai.pdf" office:target-frame-name="_top" xlink:show="replace"><text:span text:style-name="Hiperligação">https://www.usenix.org/system/files/conference/atc17/atc17-tsai.pdf</text:span></text:a>&gt;.</text:p>
        </text:list-item>
      </text:list>
      <text:list text:style-name="Outline" text:continue-numbering="true">
        <text:list-item>
          <text:p text:style-name="P432">Tabelas</text:p>
        </text:list-item>
      </text:list>
      <text:list text:style-name="LFO25" text:continue-numbering="true">
        <text:list-item>
          <text:p text:style-name="P433">Tabela 1: Instruções do Intel SGX em destaque. Dispon<text:span text:style-name="T434">ível em:<text:s/></text:span><text:a xlink:href="https://blog.quarkslab.com/overview-of-intel-sgx-part-1-sgx-internals.html" office:target-frame-name="_top" xlink:show="replace"><text:span text:style-name="Hiperligação">https://blog.quarkslab.com/overview-of-intel-sgx-part-1-sgx-internals.html</text:span></text:a><text:span text:style-name="T435">;<text:s/></text:span></text:p>
        </text:list-item>
        <text:list-item>
          <text:p text:style-name="P436">Tabela 2: EPCM - Tabela de páginas em um SO regular. Dispon<text:span text:style-name="T437">ível em:<text:s/></text:span><text:a xlink:href="https://sgx101.gitbook.io/sgx101/sgx-bootstrap/enclave" office:target-frame-name="_top" xlink:show="replace"><text:span text:style-name="Hiperligação">https://sgx101.gitbook.io/sgx101/sgx-bootstrap/enclave</text:span></text:a>.<text:s/></text:p>
        </text:list-item>
      </text:list>
      <text:list text:style-name="Outline" text:continue-numbering="true">
        <text:list-item>
          <text:p text:style-name="P438">Conclusão</text:p>
        </text:list-item>
      </text:list>
      <text:p text:style-name="P439">Neste contexto mais amplo, o Gramine-SGX emerge como uma solução viável para superar os desafios associados à execução de aplicativos não modificados em ambientes SGX, utilizando um sistema operacional de biblioteca. O custo adicional dessa abordagem em comparação com soluções mais finas (shims) é considerado marginal, com os principais desafios ainda relacionados às limitações de hardware intrínsecas ao SGX.</text:p>
      <text:p text:style-name="SBCparagraphfirst"><text:span text:style-name="T440">A análise de desempenho revela que o Gramine-SGX, mesmo com suas características de sistema operacional de biblioteca, apresenta<text:s/></text:span><text:span text:style-name="T441"><office:annotation office:name="8" xml:id="640856258"><dc:creator>Dalton Tavares</dc:creator><dc:date>2023-11-23T08:36:00</dc:date><text:p text:style-name="CommentText">O que isso quer dizer?</text:p></office:annotation>overheads comparáveis a aplicações modificadas para utilizar camadas mais finas</text:span><text:span text:style-name="T442"><office:annotation-end office:name="8"/></text:span><text:span text:style-name="T443">. Os gargalos significativos residem nas limitações de hardware do SGX, apontando para a necessidade contínua de avanços nessa tecnologia.</text:span></text:p>
      <text:p text:style-name="P444">Além disso, a conclusão destaca que, à medida que SGX e tecnologias similares amadurecem, escolhas de design podem ganhar maior relevância. O Gramine-SGX, como uma ferramenta de código aberto, oferece uma solução prática para rápida implementação de aplicações existentes em ambientes SGX. O processo incremental de adaptação do código proporciona melhorias contínuas no desempenho e na segurança, alinhando-se às demandas dinâmicas desse cenário tecnológico em evolução.</text:p>
      <text:p text:style-name="SBCparagraph">Os objetivos do trabalho foram cumpridos?</text:p>
      <text:p text:style-name="SBCreferences"><office:annotation office:name="9" xml:id="1316355240"><dc:creator>Dalton Tavares</dc:creator><dc:date>2023-11-23T08:38:00</dc:date><text:p text:style-name="CommentText">Revisar formato de referências e citações de acordo com o template.</text:p></office:annotation>Referências<text:span text:style-name="T445"><office:annotation-end office:name="9"/></text:span></text:p>
      <text:list text:style-name="LFO26" text:continue-numbering="true">
        <text:list-item>
          <text:p text:style-name="P446"><text:bookmark-start text:name="_Ref148644700"/><text:span text:style-name="T447">[J. Rutkowska 2013]. Thoughts on Intel’s upcoming Software Guard Extensions (Part 1), Aug.<text:s/></text:span><text:a xlink:href="http://theinvisiblethings.blogspot.com/2013/08/thoughts-on-intels-upcoming-software.html" office:target-frame-name="_top" xlink:show="replace"><text:span text:style-name="T448">http://theinvisiblethings.blogspot.com/2013/08/thoughts-on-intels-upcoming-software.h</text:span><text:bookmark-start text:name="_Hlt148640179"/><text:bookmark-start text:name="_Hlt148640180"/><text:span text:style-name="T449">t</text:span><text:bookmark-end text:name="_Hlt148640179"/><text:bookmark-end text:name="_Hlt148640180"/><text:span text:style-name="T450">ml</text:span></text:a><text:bookmark-end text:name="_Ref148644700"/></text:p>
        </text:list-item>
        <text:list-item>
          <text:p text:style-name="P451">[Lucas Andrade, Edson Borin 2021)]. Projeto final de graduação: “Análise de desempenho do uso de Enclaves com Intel SGX”,<text:s/><text:a xlink:href="https://www.ic.unicamp.br/~reltech/PFG/2021/PFG-21-15.pdf" office:target-frame-name="_top" xlink:show="replace"><text:span text:style-name="Hiperligação">https://www.ic.unicamp.</text:span><text:bookmark-start text:name="_Hlt148644130"/><text:span text:style-name="Hiperligação">b</text:span><text:bookmark-end text:name="_Hlt148644130"/><text:span text:style-name="Hiperligação">r/~reltech/PFG/2021/PFG-21-15.p</text:span><text:bookmark-start text:name="_Hlt148640274"/><text:bookmark-start text:name="_Hlt148640275"/><text:span text:style-name="Hiperligação">d</text:span><text:bookmark-end text:name="_Hlt148640274"/><text:bookmark-end text:name="_Hlt148640275"/><text:span text:style-name="Hiperligação">f</text:span></text:a>, Dezembro.</text:p>
        </text:list-item>
        <text:list-item>
          <text:p text:style-name="P452"><text:span text:style-name="T453">[Sergio Prado 2020]. Trusted Execution Environment e ARM TrustZone.<text:s/></text:span><text:a xlink:href="https://sergioprado.org/trusted-execution-environment-e-arm-trustzone" office:target-frame-name="_top" xlink:show="replace"><text:span text:style-name="Hiperligação">https://sergioprado.org/trusted-execution-environment-e-arm-trustzone</text:span></text:a>. Março.</text:p>
        </text:list-item>
        <text:list-item>
          <text:p text:style-name="P454"><text:bookmark-start text:name="_Ref148643966"/>[Rafael Campra Reis Condé 2017]. Proteção de dados de autenticação em um sistema operacional usando enclaves SGX.<text:s/><text:a xlink:href="https://www.acervodigital.ufpr.br/bitstream/handle/1884/53489/R%20-%20D%20-%20RAFAEL%20CAMPRA%20REIS%20CONDE.pdf?sequence=1&amp;isAllowed=y" office:target-frame-name="_top" xlink:show="replace"><text:span text:style-name="Hiperligação">https://www.acervodigital.ufpr.br/bitstream/handle/1884/53489/R%20-%20D%20-%20RAFAEL%20CAMPRA%20REIS%20CONDE.pdf?sequence=1&amp;isAllowed=y</text:span></text:a><text:bookmark-end text:name="_Ref148643966"/>.<text:s/></text:p>
        </text:list-item>
        <text:list-item>
          <text:p text:style-name="P455"><text:span text:style-name="T456">IBM. (2023)<text:s/></text:span><text:bookmark-start text:name="trusted_comp_base__title__1"/><text:bookmark-end text:name="trusted_comp_base__title__1"/><text:span text:style-name="T457">Trusted Computing Base.<text:s/></text:span><text:a xlink:href="https://www.ibm.com/docs/pt-br/aix/7.3?topic=configuration-trusted-computing-base" office:target-frame-name="_top" xlink:show="replace"><text:span text:style-name="T458">https://www.ibm.com/docs/pt-br/aix/7.3?topic=configuration-trusted-computing-ba</text:span><text:bookmark-start text:name="_Hlt148644176"/><text:bookmark-start text:name="_Hlt148644177"/><text:span text:style-name="T459">s</text:span><text:bookmark-end text:name="_Hlt148644176"/><text:bookmark-end text:name="_Hlt148644177"/><text:span text:style-name="T460">e</text:span></text:a><text:span text:style-name="T461">. Março.</text:span></text:p>
        </text:list-item>
        <text:list-item>
          <text:p text:style-name="P462">Gramine (2023) Gramine documentation.<text:s/><text:a xlink:href="https://gramine.readthedocs.io/en/stable/" office:target-frame-name="_top" xlink:show="replace"><text:span text:style-name="Hiperligação">https://gramine.readthedoc</text:span><text:bookmark-start text:name="_Hlt148900924"/><text:bookmark-start text:name="_Hlt148900925"/><text:span text:style-name="Hiperligação">s</text:span><text:bookmark-end text:name="_Hlt148900924"/><text:bookmark-end text:name="_Hlt148900925"/><text:span text:style-name="Hiperligação">.io/en/stable/</text:span></text:a>.<text:s/></text:p>
        </text:list-item>
        <text:list-item>
          <text:p text:style-name="P463"><text:span text:style-name="T464">Gramine (2023) Introduction to SGX.<text:s/></text:span><text:a xlink:href="https://gramine.readthedocs.io/en/stable/sgx-intro.html" office:target-frame-name="_top" xlink:show="replace"><text:span text:style-name="T465">https://gramine.rea</text:span><text:bookmark-start text:name="_Hlt148900929"/><text:bookmark-start text:name="_Hlt148900930"/><text:span text:style-name="T466">d</text:span><text:bookmark-end text:name="_Hlt148900929"/><text:bookmark-end text:name="_Hlt148900930"/><text:span text:style-name="T467">thedocs.io/en/stable/sgx-intro.html</text:span></text:a><text:span text:style-name="T468">.<text:s/></text:span></text:p>
        </text:list-item>
        <text:list-item>
          <text:p text:style-name="P469"><text:bookmark-start text:name="_Ref148643999"/><text:span text:style-name="T470">Quarkslab’s website, [Alexandre Adamski 2018]. Overview of Intel SGX - Part 1, SGX Internals.<text:s/></text:span><text:a xlink:href="https://blog.quarkslab.com/overview-of-intel-sgx-part-1-sgx-internals.html" office:target-frame-name="_top" xlink:show="replace"><text:span text:style-name="Hiperligação">https://blog.quarkslab.com/overview-of-intel-sgx-part-1-sgx-internals.htm</text:span><text:bookmark-start text:name="_Hlt148644218"/><text:bookmark-start text:name="_Hlt148644219"/><text:span text:style-name="Hiperligação">l</text:span><text:bookmark-end text:name="_Hlt148644218"/><text:bookmark-end text:name="_Hlt148644219"/></text:a>.<text:s/><text:span text:style-name="T471">Julho.</text:span><text:bookmark-end text:name="_Ref148643999"/></text:p>
        </text:list-item>
        <text:list-item>
          <text:p text:style-name="P472"><text:bookmark-start text:name="_Ref148643921"/><text:span text:style-name="T473">[Ensar Seker (Medium website) 2021]. Trusted Execution Environment (TEE), Implementations, Drawbacks.<text:s/></text:span><text:a xlink:href="https://taesoo.kim/pubs/2016/jain:opensgx.pdf" office:target-frame-name="_top" xlink:show="replace"><text:span text:style-name="T474">https://ta</text:span><text:bookmark-start text:name="_Hlt148644525"/><text:bookmark-start text:name="_Hlt148644526"/><text:span text:style-name="T475">e</text:span><text:bookmark-end text:name="_Hlt148644525"/><text:bookmark-end text:name="_Hlt148644526"/><text:span text:style-name="T476">soo.</text:span><text:bookmark-start text:name="_Hlt148644223"/><text:bookmark-start text:name="_Hlt148644224"/><text:span text:style-name="T477">k</text:span><text:bookmark-end text:name="_Hlt148644223"/><text:bookmark-end text:name="_Hlt148644224"/><text:span text:style-name="T478">im/pubs/2016/jain:opensgx.pdf</text:span></text:a><text:span text:style-name="T479">, Junho.</text:span><text:bookmark-end text:name="_Ref148643921"/></text:p>
        </text:list-item>
        <text:list-item>
          <text:p text:style-name="P480"><text:bookmark-start text:name="_Ref148644037"/>[Prerit Jain, Soham Desai, Seongmin Kim, Ming-Wei Shih<text:span text:style-name="T481">,</text:span><text:s/>JaeHyuk Leek, Changho Choi<text:span text:style-name="T482">,</text:span><text:s/>Youjung Shin<text:span text:style-name="T483">,</text:span><text:s/>Taesoo Kim<text:span text:style-name="T484">,</text:span><text:s/>Brent Byunghoon Kang<text:span text:style-name="T485">,</text:span><text:s/>Dongsu Han<text:span text:style-name="T486"><text:s/></text:span>2016].<text:s/><text:span text:style-name="T487">OpenSGX: An Open Platform for SGX Research, Implementations, Drawbacks.<text:s/></text:span><text:a xlink:href="https://medium.com/geekculture/trusted-execution-environment-tee-implementations-drawbacks-8a434301d679" office:target-frame-name="_top" xlink:show="replace"><text:span text:style-name="T488">https://medium.com/geekculture/trusted-execution-environment-tee-implementations-drawbacks-</text:span><text:bookmark-start text:name="_Hlt148644516"/><text:bookmark-start text:name="_Hlt148644517"/><text:span text:style-name="T489">8</text:span><text:bookmark-end text:name="_Hlt148644516"/><text:bookmark-end text:name="_Hlt148644517"/><text:span text:style-name="T490">a434301d679</text:span></text:a><text:span text:style-name="T491">, Junho.</text:span><text:bookmark-end text:name="_Ref148644037"/></text:p>
        </text:list-item>
        <text:list-item>
          <text:p text:style-name="P492"><text:bookmark-start text:name="_Ref148644073"/>[A. Baumann, M. Peinado, and G. Hunt 2014]. Shielding applications from an untrusted cloud with haven. In Proceedings of the 11th Symposium on Operating Systems 15 Design and Implementation (OSDI), pages 267–283, Broomfield, Colorado, Outubro.<text:bookmark-end text:name="_Ref148644073"/></text:p>
        </text:list-item>
        <text:list-item>
          <text:p text:style-name="P493"><text:bookmark-start text:name="_Ref148644708"/><text:span text:style-name="T494">[Tobias Konopik</text:span><text:span text:style-name="T495"><text:s/></text:span><text:span text:style-name="T496">2023]. Securing Whole Applications with SGX.<text:s/></text:span><text:a xlink:href="https://sys.cs.fau.de/extern/lehre/ws22/akss/material/gramine-scone.pdf" office:target-frame-name="_top" xlink:show="replace"><text:span text:style-name="Hiperligação">https://sys.cs.fau.de/extern/lehre/ws22/akss/material/gramine-scone.pdf</text:span></text:a>, Janeiro.<text:bookmark-end text:name="_Ref148644708"/></text:p>
        </text:list-item>
        <text:list-item>
          <text:p text:style-name="P497"><text:bookmark-start text:name="_Ref148901522"/><text:span text:style-name="T498">[Katherine Druckman, Mona Vij</text:span><text:span text:style-name="T499"><text:s/></text:span><text:span text:style-name="T500">2023]. Securing Applications with Gramine.<text:s/></text:span><text:a xlink:href="https://www.intel.com/content/www/us/en/developer/articles/community/securing-applications-with-gramine.html?wapkw=Gramine%20SGX" office:target-frame-name="_top" xlink:show="replace"><text:span text:style-name="Hiperligação">https://www.intel.com/content/www/us/en/deve</text:span><text:bookmark-start text:name="_Hlt149264380"/><text:bookmark-start text:name="_Hlt149264381"/><text:span text:style-name="Hiperligação">l</text:span><text:bookmark-end text:name="_Hlt149264380"/><text:bookmark-end text:name="_Hlt149264381"/><text:span text:style-name="Hiperligação">oper/articles/community/securing-applications-with-gramine.html?wapkw=Gramine%20SGX</text:span></text:a>.<text:bookmark-end text:name="_Ref148901522"/></text:p>
        </text:list-item>
        <text:list-item>
          <text:p text:style-name="P501"><text:bookmark-start text:name="_Ref150119837"/><text:span text:style-name="T502">Intel Corporation (2015</text:span><text:span text:style-name="T503">). Intel Software Guard Extensions (Intel SGX).<text:s/></text:span><text:a xlink:href="https://community.intel.com/legacyfs/online/drupal_files/332680-002.pdf" office:target-frame-name="_top" xlink:show="replace"><text:span text:style-name="T504">https://community.intel.com/legacyfs/online/drupal_files/332680-002.pdf</text:span></text:a><text:span text:style-name="T505">, Junho.</text:span><text:bookmark-end text:name="_Ref150119837"/></text:p>
        </text:list-item>
        <text:list-item>
          <text:p text:style-name="P506"><text:span text:style-name="T507">SGX 101 (2019). Bootstrap SGX – Enclave.<text:s/></text:span><text:a xlink:href="https://sgx101.gitbook.io/sgx101/sgx-bootstrap/enclave" office:target-frame-name="_top" xlink:show="replace"><text:span text:style-name="T508">https://sgx101.gitbook.io/sgx101/sgx-bootstrap/enclave</text:span></text:a><text:span text:style-name="T509">. Outubro.<text:s/></text:span></text:p>
        </text:list-item>
        <text:list-item>
          <text:p text:style-name="P510"><text:span text:style-name="T511">SGX 101 (2019). Bootstrap SGX – Enclave.<text:s/></text:span><text:a xlink:href="https://sgx101.gitbook.io/sgx101/sgx-bootstrap/enclave" office:target-frame-name="_top" xlink:show="replace"><text:span text:style-name="T512">https://sgx101.gitbook.io/sgx101/sgx-bootstrap/enclave</text:span></text:a><text:span text:style-name="T513">. Outubro.<text:s/></text:span></text:p>
        </text:list-item>
        <text:list-item>
          <text:p text:style-name="P514"><text:bookmark-start text:name="_Ref150132981"/><text:span text:style-name="T515">[Goran Jevtic 2021]. What is Intel SGX and What are the Benefits?<text:s/></text:span><text:a xlink:href="https://phoenixnap.com/kb/intel-sgx" office:target-frame-name="_top" xlink:show="replace"><text:span text:style-name="T516">https://phoenixnap.com/kb/intel-sgx</text:span></text:a><text:span text:style-name="T517">. Julho.</text:span><text:bookmark-end text:name="_Ref150132981"/><text:span text:style-name="T518"><text:s/></text:span></text:p>
        </text:list-item>
        <text:list-item>
          <text:p text:style-name="P519"><text:bookmark-start text:name="_Ref150144037"/><text:span text:style-name="T520">[</text:span><text:span text:style-name="T521">L. McVoy, C. Staelin 1996]. lmbench: Portable tools for performance analysis. In Proceedings of the USENIX Annual Technical Conference, p</text:span><text:span text:style-name="T522">áginas</text:span><text:span text:style-name="T523"><text:s/>23–23.</text:span><text:bookmark-start text:name="_Ref150134218"/><text:bookmark-end text:name="_Ref150144037"/></text:p>
        </text:list-item>
        <text:list-item>
          <text:p text:style-name="P524"><text:bookmark-start text:name="_Ref150144105"/><text:span text:style-name="T525">[</text:span>Chia-Che Tsai, Donald E. Porter, Mona Vij 2017].<text:bookmark-end text:name="_Ref150134218"/><text:s/><text:span text:style-name="T526">Graphene-SGX: A Practical Library OS for Unmodified Applications on SGX.<text:s/></text:span><text:a xlink:href="https://www.usenix.org/system/files/conference/atc17/atc17-tsai.pdf" office:target-frame-name="_top" xlink:show="replace"><text:span text:style-name="Hiperligação">https://www.usenix.org/system/files/conference/atc17/atc17-tsai.pdf</text:span></text:a><text:span text:style-name="Tipodeletrapredefinidodoparágrafo">.<text:s/></text:span><text:span text:style-name="Tipodeletrapredefinidodoparágrafo"><text:line-break/></text:span><text:span text:style-name="T527">Julho.</text:span><text:bookmark-end text:name="_Ref150144105"/></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 Bold" style:font-name-asian="TimesNewRoman, Bold" style:font-name-complex="TimesNewRoman, 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ipodeletrapredefinidodoparágrafo" style:display-name="Tipo de letra predefinido do parágrafo" style:family="text"/>
    <style:style style:name="Standard" style:display-name="Standard" style:family="paragraph">
      <style:text-properties style:font-name="Times" style:font-name-asian="Times New Roman" style:font-name-complex="Times New Roman" style:font-size-complex="10pt" fo:hyphenate="false"/>
    </style: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list-style-name="Outline" style:default-outline-level="2">
      <style:paragraph-properties fo:keep-with-next="always" fo:margin-top="0.1652in"/>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1.6694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style:font-name-asian="Helvetica" style:font-name-complex="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8.662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MençãoNãoResolvida" style:display-name="Menção Não Resolvida" style:family="text" style:parent-style-name="Tipodeletrapredefinidodoparágrafo">
      <style:text-properties fo:color="#605E5C" fo:background-color="#E1DFDD"/>
    </style:style>
    <style:style style:name="Hiperligaçãovisitada" style:display-name="Hiperligação visitada" style:family="text" style:parent-style-name="Tipodeletrapredefinidodoparágrafo">
      <style:text-properties fo:color="#954F72" style:text-underline-type="single" style:text-underline-style="solid" style:text-underline-width="auto" style:text-underline-mode="continuous" style:text-underline-color="font-color"/>
    </style:style>
    <style:style style:name="Ref.denotaderodapé" style:display-name="Ref. de nota de rodapé" style:family="text" style:parent-style-name="Tipodeletrapredefinidodoparágrafo">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FootnoteReference" style:display-name="Footnote Reference" style:family="text" style:parent-style-name="DefaultParagraphFont">
      <style:text-properties style:text-position="super 66.6%"/>
    </style:style>
    <style:style style:name="Revision" style:display-name="Revision" style:family="paragraph">
      <style:paragraph-properties fo:widows="2" fo:orphans="2" style:vertical-align="auto"/>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text:list-style style:name="SBCnumberlist" style:display-name="SBC:number:list">
      <text:list-level-style-bullet text:level="1" text:style-name="WW_CharLFO1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11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11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11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11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11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11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11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11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9">
      <text:outline-level-style text:level="1" style:num-format=""/>
      <text:outline-level-style text:level="2" style:num-format=""/>
      <text:outline-level-style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Time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224" xlink:href="media/image5.png" xlink:show="embed" xlink:actuate="onLoad"/>
    <draw:fill-image draw:name="a330" xlink:href="media/image6.png" xlink:show="embed" xlink:actuate="onLoad"/>
    <draw:fill-image draw:name="a192" xlink:href="media/image6.png" xlink:show="embed" xlink:actuate="onLoad"/>
    <draw:fill-image draw:name="a226" xlink:href="media/image6.png" xlink:show="embed" xlink:actuate="onLoad"/>
    <draw:fill-image draw:name="a195" xlink:href="media/image7.png" xlink:show="embed" xlink:actuate="onLoad"/>
    <draw:fill-image draw:name="a198" xlink:href="media/image6.png" xlink:show="embed" xlink:actuate="onLoad"/>
    <draw:fill-image draw:name="a250" xlink:href="media/image7.png" xlink:show="embed" xlink:actuate="onLoad"/>
    <draw:fill-image draw:name="a183" xlink:href="media/image7.png" xlink:show="embed" xlink:actuate="onLoad"/>
    <draw:fill-image draw:name="a252" xlink:href="media/image6.png" xlink:show="embed" xlink:actuate="onLoad"/>
    <draw:fill-image draw:name="a186" xlink:href="media/image6.png" xlink:show="embed" xlink:actuate="onLoad"/>
    <draw:fill-image draw:name="a256" xlink:href="media/image7.png" xlink:show="embed" xlink:actuate="onLoad"/>
    <draw:fill-image draw:name="a293" xlink:href="media/image7.png" xlink:show="embed" xlink:actuate="onLoad"/>
    <draw:fill-image draw:name="a189" xlink:href="media/image7.png" xlink:show="embed" xlink:actuate="onLoad"/>
    <draw:fill-image draw:name="a295" xlink:href="media/image8.png" xlink:show="embed" xlink:actuate="onLoad"/>
    <draw:fill-image draw:name="a201" xlink:href="media/image7.png" xlink:show="embed" xlink:actuate="onLoad"/>
    <draw:fill-image draw:name="a259" xlink:href="media/image6.png" xlink:show="embed" xlink:actuate="onLoad"/>
    <draw:fill-image draw:name="a328" xlink:href="media/image5.png" xlink:show="embed" xlink:actuate="onLoad"/>
    <draw:fill-image draw:name="a240" xlink:href="media/image6.png" xlink:show="embed" xlink:actuate="onLoad"/>
    <draw:fill-image draw:name="a205" xlink:href="media/image6.png" xlink:show="embed" xlink:actuate="onLoad"/>
    <draw:fill-image draw:name="a299" xlink:href="media/image7.png" xlink:show="embed" xlink:actuate="onLoad"/>
    <draw:fill-image draw:name="a244" xlink:href="media/image7.png" xlink:show="embed" xlink:actuate="onLoad"/>
    <draw:fill-image draw:name="a246" xlink:href="media/image6.png" xlink:show="embed" xlink:actuate="onLoad"/>
    <draw:fill-image draw:name="a287" xlink:href="media/image7.png" xlink:show="embed" xlink:actuate="onLoad"/>
    <draw:fill-image draw:name="a289" xlink:href="media/image8.png" xlink:show="embed" xlink:actuate="onLoad"/>
    <draw:fill-image draw:name="a301" xlink:href="media/image8.png" xlink:show="embed" xlink:actuate="onLoad"/>
    <draw:fill-image draw:name="a305" xlink:href="media/image7.png" xlink:show="embed" xlink:actuate="onLoad"/>
    <draw:fill-image draw:name="a238" xlink:href="media/image7.png" xlink:show="embed" xlink:actuate="onLoad"/>
    <draw:fill-image draw:name="a275" xlink:href="media/image6.png" xlink:show="embed" xlink:actuate="onLoad"/>
    <draw:fill-image draw:name="a308" xlink:href="media/image8.png" xlink:show="embed" xlink:actuate="onLoad"/>
    <draw:fill-image draw:name="a277" xlink:href="media/image5.png" xlink:show="embed" xlink:actuate="onLoad"/>
    <draw:marker draw:name="a51" svg:viewBox="0 0 20 30" svg:d="m10 0-10 30h20z"/>
    <draw:marker draw:name="a169" svg:viewBox="0 0 20 30" svg:d="m10 0-10 30h20z"/>
    <draw:marker draw:name="a133" svg:viewBox="0 0 20 30" svg:d="m10 0-10 30h20z"/>
    <draw:marker draw:name="a53" svg:viewBox="0 0 20 30" svg:d="m10 0-10 30h20z"/>
    <draw:marker draw:name="a54" svg:viewBox="0 0 20 30" svg:d="m10 0-10 30h20z"/>
    <draw:marker draw:name="a137" svg:viewBox="0 0 20 30" svg:d="m10 0-10 30h20z"/>
    <draw:marker draw:name="a56" svg:viewBox="0 0 20 30" svg:d="m10 0-10 30h20z"/>
    <draw:marker draw:name="a101" svg:viewBox="0 0 20 30" svg:d="m10 0-10 30h20z"/>
    <draw:marker draw:name="a21" svg:viewBox="0 0 20 30" svg:d="m10 0-10 30h20z"/>
    <draw:marker draw:name="a139" svg:viewBox="0 0 20 30" svg:d="m10 0-10 30h20z"/>
    <draw:marker draw:name="a58" svg:viewBox="0 0 20 30" svg:d="m10 0-10 30h20z"/>
    <draw:marker draw:name="a103" svg:viewBox="0 0 20 30" svg:d="m10 0-10 30h20z"/>
    <draw:marker draw:name="a105" svg:viewBox="0 0 20 30" svg:d="m10 0-10 30h20z"/>
    <draw:marker draw:name="a107" svg:viewBox="0 0 20 30" svg:d="m10 0-10 30h20z"/>
    <draw:marker draw:name="a28" svg:viewBox="0 0 20 30" svg:d="m10 0-10 30h20z"/>
    <draw:marker draw:name="a109" svg:viewBox="0 0 20 30" svg:d="m10 0-10 30h20z"/>
    <draw:marker draw:name="a2" svg:viewBox="0 0 20 30" svg:d="m10 0-10 30h20z"/>
    <draw:marker draw:name="a4" svg:viewBox="0 0 20 30" svg:d="m10 0-10 30h20z"/>
    <draw:marker draw:name="a9" svg:viewBox="0 0 20 30" svg:d="m10 0-10 30h20z"/>
    <draw:marker draw:name="a171" svg:viewBox="0 0 20 30" svg:d="m10 0-10 30h20z"/>
    <draw:marker draw:name="a48" svg:viewBox="0 0 20 30" svg:d="m10 0-10 30h20z"/>
    <draw:marker draw:name="a173" svg:viewBox="0 0 20 30" svg:d="m10 0-10 30h20z"/>
    <draw:marker draw:name="a129" svg:viewBox="0 0 20 30" svg:d="m10 0-10 30h20z"/>
    <draw:marker draw:name="a15" svg:viewBox="0 0 20 30" svg:d="m10 0-10 30h20z"/>
    <draw:marker draw:name="a141" svg:viewBox="0 0 20 30" svg:d="m10 0-10 30h20z"/>
    <draw:marker draw:name="a30" svg:viewBox="0 0 20 30" svg:d="m10 0-10 30h20z"/>
    <draw:marker draw:name="a162" svg:viewBox="0 0 20 30" svg:d="m10 0-10 30h20z"/>
    <draw:marker draw:name="a164" svg:viewBox="0 0 20 30" svg:d="m10 0-10 30h20z"/>
    <draw:marker draw:name="a166" svg:viewBox="0 0 20 30" svg:d="m10 0-10 30h20z"/>
    <draw:marker draw:name="a50" svg:viewBox="0 0 20 30" svg:d="m10 0-10 30h20z"/>
    <draw:marker draw:name="a131" svg:viewBox="0 0 20 30" svg:d="m10 0-10 30h20z"/>
    <draw:stroke-dash draw:name="a98" draw:style="rect" draw:dots1="1" draw:dots1-length="0.02083in" draw:distance="0.02083in"/>
    <draw:stroke-dash draw:name="a135" draw:style="rect" draw:dots1="1" draw:dots1-length="0.01389in" draw:distance="0.01389in"/>
    <draw:stroke-dash draw:name="a92" draw:style="rect" draw:dots1="1" draw:dots1-length="0.02083in" draw:distance="0.02083in"/>
    <draw:stroke-dash draw:name="a94" draw:style="rect" draw:dots1="1" draw:dots1-length="0.02083in" draw:distance="0.02083in"/>
    <draw:stroke-dash draw:name="a143" draw:style="rect" draw:dots1="1" draw:dots1-length="0.02083in" draw:distance="0.02083in"/>
    <draw:stroke-dash draw:name="a96" draw:style="rect" draw:dots1="1" draw:dots1-length="0.02083in" draw:distance="0.02083in"/>
  </office:styles>
  <office:automatic-styles>
    <text:list-style style:name="LFO13">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3">
      <text:list-level-style-number text:level="1" text:style-name="WW_CharLFO23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Gustavo Borges</meta:initial-creator>
    <dc:creator>Dalton Tavares</dc:creator>
    <meta:creation-date>2023-11-06T11:15:00Z</meta:creation-date>
    <dc:date>2023-11-23T11:38:00Z</dc:date>
    <meta:template xlink:href="Normal" xlink:type="simple"/>
    <meta:editing-cycles>31</meta:editing-cycles>
    <meta:editing-duration>PT900S</meta:editing-duration>
    <meta:user-defined meta:name="Info 1"/>
    <meta:user-defined meta:name="Info 2"/>
    <meta:user-defined meta:name="Info 3"/>
    <meta:user-defined meta:name="Info 4"/>
    <meta:document-statistic meta:page-count="16" meta:paragraph-count="77" meta:word-count="6029" meta:character-count="38512" meta:row-count="271" meta:non-whitespace-character-count="32560"/>
  </office:meta>
</office:document-meta>
</file>