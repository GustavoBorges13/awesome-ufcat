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7">
      <text:list-level-style-number text:level="1" style:num-suffix="." style:num-list-format-name="NLF2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prefix="[" style:num-suffix="]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Fonteparág.padrão" style:family="text">
      <style:text-properties style:font-name="Times New Roman"/>
    </style:style>
    <style:style style:name="T3" style:parent-style-name="Fonteparág.padrão" style:family="text">
      <style:text-properties style:font-name="Times New Roman" style:text-position="super 66.6%"/>
    </style:style>
    <style:style style:name="T4" style:parent-style-name="Fonteparág.padrão" style:family="text">
      <style:text-properties style:font-name="Times New Roman" style:text-position="super 66.6%"/>
    </style:style>
    <style:style style:name="T5" style:parent-style-name="Fonteparág.padrão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SBCtitle1" style:list-style-name="LFO7" style:family="paragraph"/>
    <style:style style:name="P9" style:parent-style-name="SBCtitle1" style:list-style-name="LFO7" style:family="paragraph"/>
    <style:style style:name="P10" style:parent-style-name="SBCparagraph" style:family="paragraph">
      <style:paragraph-properties fo:text-indent="0.2958in"/>
      <style:text-properties style:font-name="Times New Roman"/>
    </style:style>
    <style:style style:name="P11" style:parent-style-name="SBCparagraph" style:family="paragraph">
      <style:paragraph-properties fo:text-indent="0.2958in"/>
      <style:text-properties style:font-name="Times New Roman"/>
    </style:style>
    <style:style style:name="P12" style:parent-style-name="SBCtitle1" style:list-style-name="LFO7" style:family="paragraph"/>
    <style:style style:name="P13" style:parent-style-name="SBCtitle1" style:list-style-name="LFO7" style:family="paragraph">
      <style:text-properties fo:font-size="12pt" style:font-size-asian="12pt" style:font-size-complex="9pt"/>
    </style:style>
    <style:style style:name="P14" style:parent-style-name="SBCparagraph" style:family="paragraph">
      <style:paragraph-properties fo:text-indent="0.2958in"/>
    </style:style>
    <style:style style:name="T15" style:parent-style-name="Fonteparág.padrão" style:family="text">
      <style:text-properties style:font-name="Times New Roman"/>
    </style:style>
    <style:style style:name="T16" style:parent-style-name="Hyperlink" style:family="text">
      <style:text-properties style:font-name="Times New Roman"/>
    </style:style>
    <style:style style:name="T17" style:parent-style-name="Fonteparág.padrão" style:family="text">
      <style:text-properties style:font-name="Times New Roman"/>
    </style:style>
    <style:style style:name="T18" style:parent-style-name="Fonteparág.padrão" style:family="text">
      <style:text-properties style:font-name="Times New Roman" fo:color="#4472C4"/>
    </style:style>
    <style:style style:name="T19" style:parent-style-name="Fonteparág.padrão" style:family="text">
      <style:text-properties style:font-name="Times New Roman" fo:color="#4472C4"/>
    </style:style>
    <style:style style:name="T20" style:parent-style-name="Fonteparág.padrão" style:family="text">
      <style:text-properties style:font-name="Times New Roman" fo:color="#4472C4"/>
    </style:style>
    <style:style style:name="T21" style:parent-style-name="Fonteparág.padrão" style:family="text">
      <style:text-properties style:font-name="Times New Roman"/>
    </style:style>
    <style:style style:name="P22" style:parent-style-name="SBCparagraph" style:family="paragraph">
      <style:paragraph-properties fo:text-indent="0.2958in"/>
      <style:text-properties style:font-name="Times New Roman"/>
    </style:style>
    <style:style style:name="P23" style:parent-style-name="SBCparagraph" style:family="paragraph">
      <style:paragraph-properties fo:text-align="center" fo:text-indent="0.2958in"/>
    </style:style>
    <style:style style:name="T24" style:parent-style-name="Fonteparág.padrão" style:family="text">
      <style:text-properties style:font-name="Times New Roman"/>
    </style:style>
    <style:style style:name="P2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26" style:parent-style-name="SBCparagraph" style:family="paragraph">
      <style:paragraph-properties fo:text-indent="0.2958in"/>
      <style:text-properties style:font-name="Times New Roman"/>
    </style:style>
    <style:style style:name="P27" style:parent-style-name="SBCparagraph" style:family="paragraph">
      <style:paragraph-properties fo:text-indent="0.2958in"/>
      <style:text-properties style:font-name="Times New Roman"/>
    </style:style>
    <style:style style:name="P28" style:parent-style-name="SBCparagraph" style:family="paragraph">
      <style:paragraph-properties fo:text-indent="0.2958in"/>
      <style:text-properties style:font-name="Times New Roman"/>
    </style:style>
    <style:style style:name="P29" style:parent-style-name="SBCparagraph" style:family="paragraph">
      <style:paragraph-properties fo:text-align="center" fo:text-indent="0.2958in"/>
    </style:style>
    <style:style style:name="T30" style:parent-style-name="Fonteparág.padrão" style:family="text">
      <style:text-properties style:font-name="Times New Roman"/>
    </style:style>
    <style:style style:name="P3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2" style:parent-style-name="SBCparagraph" style:master-page-name="MP1" style:family="paragraph">
      <style:paragraph-properties fo:break-before="page" fo:text-indent="0.2958in"/>
      <style:text-properties style:font-name="Times New Roman"/>
    </style:style>
    <style:style style:name="P33" style:parent-style-name="SBCparagraph" style:family="paragraph">
      <style:paragraph-properties fo:text-align="center" fo:text-indent="0.2958in"/>
    </style:style>
    <style:style style:name="T34" style:parent-style-name="Fonteparág.padrão" style:family="text">
      <style:text-properties style:font-name="Times New Roman"/>
    </style:style>
    <style:style style:name="P3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6" style:parent-style-name="SBCparagraph" style:family="paragraph">
      <style:paragraph-properties fo:text-indent="0.2958in"/>
      <style:text-properties style:font-name="Times New Roman"/>
    </style:style>
    <style:style style:name="P37" style:parent-style-name="SBCparagraph" style:family="paragraph">
      <style:paragraph-properties fo:text-align="center" fo:text-indent="0.2958in"/>
    </style:style>
    <style:style style:name="T38" style:parent-style-name="Fonteparág.padrão" style:family="text">
      <style:text-properties style:font-name="Times New Roman"/>
    </style:style>
    <style:style style:name="P39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0" style:parent-style-name="SBCparagraph" style:master-page-name="MP2" style:family="paragraph">
      <style:paragraph-properties fo:break-before="page" fo:text-indent="0.2958in"/>
      <style:text-properties style:font-name="Times New Roman"/>
    </style:style>
    <style:style style:name="P41" style:parent-style-name="SBCparagraph" style:family="paragraph">
      <style:paragraph-properties fo:text-align="center" fo:text-indent="0.2958in"/>
    </style:style>
    <style:style style:name="T42" style:parent-style-name="Fonteparág.padrão" style:family="text">
      <style:text-properties style:font-name="Times New Roman"/>
    </style:style>
    <style:style style:name="P43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4" style:parent-style-name="SBCparagraph" style:family="paragraph">
      <style:paragraph-properties fo:text-align="center" fo:line-height="150%" fo:text-indent="0.2958in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/>
    </style:style>
    <style:style style:name="T47" style:parent-style-name="Fonteparág.padrão" style:family="text">
      <style:text-properties style:font-name="Times New Roman"/>
    </style:style>
    <style:style style:name="P48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9" style:parent-style-name="ParágrafodaLista" style:master-page-name="MP3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50" style:parent-style-name="SBCparagraphfirst" style:family="paragraph">
      <style:paragraph-properties fo:text-indent="0.2958in"/>
    </style:style>
    <style:style style:name="T51" style:parent-style-name="Fonteparág.padrão" style:family="text">
      <style:text-properties style:font-name="Times New Roman"/>
    </style:style>
    <style:style style:name="T52" style:parent-style-name="Fonteparág.padrão" style:family="text">
      <style:text-properties style:font-name="Times New Roman" fo:color="#4472C4"/>
    </style:style>
    <style:style style:name="T53" style:parent-style-name="Fonteparág.padrão" style:family="text">
      <style:text-properties style:font-name="Times New Roman"/>
    </style:style>
    <style:style style:name="P54" style:parent-style-name="SBCparagraph" style:list-style-name="LFO8" style:family="paragraph"/>
    <style:style style:name="T55" style:parent-style-name="Fonteparág.padrão" style:family="text">
      <style:text-properties style:font-name="Times New Roman" fo:font-weight="bold" style:font-weight-asian="bold" style:font-weight-complex="bold"/>
    </style:style>
    <style:style style:name="T56" style:parent-style-name="Fonteparág.padrão" style:family="text">
      <style:text-properties style:font-name="Times New Roman"/>
    </style:style>
    <style:style style:name="P57" style:parent-style-name="SBCparagraph" style:list-style-name="LFO8" style:family="paragraph"/>
    <style:style style:name="T58" style:parent-style-name="Fonteparág.padrão" style:family="text">
      <style:text-properties style:font-name="Times New Roman" fo:font-weight="bold" style:font-weight-asian="bold" style:font-weight-complex="bold"/>
    </style:style>
    <style:style style:name="T59" style:parent-style-name="Fonteparág.padrão" style:family="text">
      <style:text-properties style:font-name="Times New Roman"/>
    </style:style>
    <style:style style:name="P60" style:parent-style-name="SBCparagraph" style:list-style-name="LFO8" style:family="paragraph"/>
    <style:style style:name="T61" style:parent-style-name="Fonteparág.padrão" style:family="text">
      <style:text-properties style:font-name="Times New Roman"/>
    </style:style>
    <style:style style:name="T62" style:parent-style-name="Fonteparág.padrão" style:family="text">
      <style:text-properties style:font-name="Times New Roman" fo:font-weight="bold" style:font-weight-asian="bold" style:font-weight-complex="bold"/>
    </style:style>
    <style:style style:name="T63" style:parent-style-name="Fonteparág.padrão" style:family="text">
      <style:text-properties style:font-name="Times New Roman"/>
    </style:style>
    <style:style style:name="T64" style:parent-style-name="Fonteparág.padrão" style:family="text">
      <style:text-properties style:font-name="Times New Roman" fo:font-weight="bold" style:font-weight-asian="bold" style:font-weight-complex="bold"/>
    </style:style>
    <style:style style:name="T65" style:parent-style-name="Fonteparág.padrão" style:family="text">
      <style:text-properties style:font-name="Times New Roman"/>
    </style:style>
    <style:style style:name="T66" style:parent-style-name="Fonteparág.padrão" style:family="text">
      <style:text-properties style:font-name="Times New Roman" fo:font-weight="bold" style:font-weight-asian="bold" style:font-weight-complex="bold"/>
    </style:style>
    <style:style style:name="T67" style:parent-style-name="Fonteparág.padrão" style:family="text">
      <style:text-properties style:font-name="Times New Roman"/>
    </style:style>
    <style:style style:name="P68" style:parent-style-name="SBCparagraph" style:list-style-name="LFO8" style:family="paragraph">
      <style:text-properties style:font-name="Times New Roman"/>
    </style:style>
    <style:style style:name="P69" style:parent-style-name="SBCparagraph" style:family="paragraph">
      <style:paragraph-properties fo:text-indent="0.2958in"/>
      <style:text-properties style:font-name="Times New Roman"/>
    </style:style>
    <style:style style:name="P70" style:parent-style-name="SBCparagraph" style:family="paragraph">
      <style:paragraph-properties fo:text-indent="0.2958in"/>
    </style:style>
    <style:style style:name="T71" style:parent-style-name="Fonteparág.padrão" style:family="text">
      <style:text-properties style:font-name="Times New Roman"/>
    </style:style>
    <style:style style:name="T72" style:parent-style-name="Fonteparág.padrão" style:family="text">
      <style:text-properties style:font-name="Times New Roman" fo:font-weight="bold" style:font-weight-asian="bold" style:font-weight-complex="bold"/>
    </style:style>
    <style:style style:name="T73" style:parent-style-name="Fonteparág.padrão" style:family="text">
      <style:text-properties style:font-name="Times New Roman"/>
    </style:style>
    <style:style style:name="P74" style:parent-style-name="SBCparagraph" style:family="paragraph">
      <style:paragraph-properties fo:text-indent="0.2958in"/>
    </style:style>
    <style:style style:name="T75" style:parent-style-name="Fonteparág.padrão" style:family="text">
      <style:text-properties style:font-name="Times New Roman"/>
    </style:style>
    <style:style style:name="T76" style:parent-style-name="Fonteparág.padrão" style:family="text">
      <style:text-properties style:font-name="Times New Roman" fo:font-weight="bold" style:font-weight-asian="bold" style:font-weight-complex="bold"/>
    </style:style>
    <style:style style:name="T77" style:parent-style-name="Fonteparág.padrão" style:family="text">
      <style:text-properties style:font-name="Times New Roman"/>
    </style:style>
    <style:style style:name="T78" style:parent-style-name="Fonteparág.padrão" style:family="text">
      <style:text-properties style:font-name="Times New Roman" fo:font-weight="bold" style:font-weight-asian="bold" style:font-weight-complex="bold"/>
    </style:style>
    <style:style style:name="T79" style:parent-style-name="Fonteparág.padrão" style:family="text">
      <style:text-properties style:font-name="Times New Roman"/>
    </style:style>
    <style:style style:name="P80" style:parent-style-name="SBCparagraph" style:family="paragraph">
      <style:paragraph-properties fo:text-align="center" fo:text-indent="0.2958in"/>
    </style:style>
    <style:style style:name="T81" style:parent-style-name="Fonteparág.padrão" style:family="text">
      <style:text-properties style:font-name="Times New Roman"/>
    </style:style>
    <style:style style:name="P8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3" style:parent-style-name="SBCparagraph" style:master-page-name="MP4" style:family="paragraph">
      <style:paragraph-properties fo:break-before="page" fo:text-indent="0.2958in"/>
      <style:text-properties style:font-name="Times New Roman"/>
    </style:style>
    <style:style style:name="P84" style:parent-style-name="SBCparagraph" style:family="paragraph">
      <style:paragraph-properties fo:margin-bottom="0.1666in" fo:text-indent="0.2958in"/>
      <style:text-properties style:font-name="Times New Roman"/>
    </style:style>
    <style:style style:name="P85" style:parent-style-name="SBCparagraph" style:family="paragraph">
      <style:paragraph-properties fo:text-align="center" fo:text-indent="0.2958in"/>
    </style:style>
    <style:style style:name="T86" style:parent-style-name="Fonteparág.padrão" style:family="text">
      <style:text-properties style:font-name="Times New Roman"/>
    </style:style>
    <style:style style:name="P87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8" style:parent-style-name="SBCparagraph" style:family="paragraph">
      <style:paragraph-properties fo:text-indent="0.2958in"/>
      <style:text-properties style:font-name="Times New Roman"/>
    </style:style>
    <style:style style:name="P89" style:parent-style-name="SBCparagraph" style:family="paragraph">
      <style:paragraph-properties fo:text-align="center" fo:text-indent="0.2958in"/>
    </style:style>
    <style:style style:name="T90" style:parent-style-name="Fonteparág.padrão" style:family="text">
      <style:text-properties style:font-name="Times New Roman"/>
    </style:style>
    <style:style style:name="P9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2" style:parent-style-name="SBCparagraph" style:family="paragraph">
      <style:paragraph-properties fo:text-indent="0.2958in"/>
      <style:text-properties style:font-name="Times New Roman"/>
    </style:style>
    <style:style style:name="P93" style:parent-style-name="SBCparagraph" style:family="paragraph">
      <style:paragraph-properties fo:text-align="center" fo:text-indent="0.2958in"/>
    </style:style>
    <style:style style:name="T94" style:parent-style-name="Fonteparág.padrão" style:family="text">
      <style:text-properties style:font-name="Times New Roman"/>
    </style:style>
    <style:style style:name="P9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6" style:parent-style-name="SBCparagraph" style:family="paragraph">
      <style:paragraph-properties fo:margin-bottom="0.1666in"/>
      <style:text-properties style:font-name="Times New Roman"/>
    </style:style>
    <style:style style:name="P97" style:parent-style-name="SBCparagraph" style:family="paragraph">
      <style:paragraph-properties fo:text-align="center" fo:text-indent="0.2958in"/>
    </style:style>
    <style:style style:name="T98" style:parent-style-name="Fonteparág.padrão" style:family="text">
      <style:text-properties style:font-name="Times New Roman"/>
    </style:style>
    <style:style style:name="P99" style:parent-style-name="SBCcaption" style:family="paragraph">
      <style:paragraph-properties fo:margin-bottom="0in" fo:line-height="200%" fo:margin-left="0in" fo:text-indent="0.2958in">
        <style:tab-stops/>
      </style:paragraph-properties>
      <style:text-properties style:font-name="Times New Roman"/>
    </style:style>
    <style:style style:name="P100" style:parent-style-name="ParágrafodaLista" style:list-style-name="LFO7" style:family="paragraph"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01" style:parent-style-name="SBCparagraphfirst" style:family="paragraph">
      <style:paragraph-properties fo:text-indent="0.2958in"/>
      <style:text-properties style:font-name="Times New Roman"/>
    </style:style>
    <style:style style:name="P102" style:parent-style-name="SBCparagraph" style:family="paragraph">
      <style:paragraph-properties fo:text-indent="0.2958in"/>
    </style:style>
    <style:style style:name="T103" style:parent-style-name="Fonteparág.padrão" style:family="text">
      <style:text-properties style:font-name="Times New Roman"/>
    </style:style>
    <style:style style:name="T104" style:parent-style-name="Fonteparág.padrão" style:family="text">
      <style:text-properties style:font-name="Times New Roman" fo:font-weight="bold" style:font-weight-asian="bold" style:font-weight-complex="bold"/>
    </style:style>
    <style:style style:name="T105" style:parent-style-name="Fonteparág.padrão" style:family="text">
      <style:text-properties style:font-name="Times New Roman"/>
    </style:style>
    <style:style style:name="P106" style:parent-style-name="SBCparagraph" style:family="paragraph">
      <style:paragraph-properties fo:text-indent="0.2958in"/>
    </style:style>
    <style:style style:name="T107" style:parent-style-name="Fonteparág.padrão" style:family="text">
      <style:text-properties style:font-name="Times New Roman"/>
    </style:style>
    <style:style style:name="T108" style:parent-style-name="Fonteparág.padrão" style:family="text">
      <style:text-properties style:font-name="Times New Roman" fo:font-weight="bold" style:font-weight-asian="bold" style:font-weight-complex="bold"/>
    </style:style>
    <style:style style:name="P109" style:parent-style-name="SBCparagraph" style:family="paragraph">
      <style:paragraph-properties fo:text-indent="0.2958in"/>
      <style:text-properties style:font-name="Times New Roman"/>
    </style:style>
    <style:style style:name="P110" style:parent-style-name="SBCparagraph" style:family="paragraph">
      <style:paragraph-properties fo:text-align="center" fo:text-indent="0.2958in"/>
    </style:style>
    <style:style style:name="T111" style:parent-style-name="Fonteparág.padrão" style:family="text">
      <style:text-properties style:font-name="Times New Roman"/>
    </style:style>
    <style:style style:name="P11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13" style:parent-style-name="SBCparagraph" style:family="paragraph">
      <style:paragraph-properties fo:text-align="center" fo:text-indent="0.2958in"/>
    </style:style>
    <style:style style:name="T114" style:parent-style-name="Fonteparág.padrão" style:family="text">
      <style:text-properties style:font-name="Times New Roman"/>
    </style:style>
    <style:style style:name="P11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16" style:parent-style-name="ParágrafodaLista" style:master-page-name="MP5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17" style:parent-style-name="SBCparagraphfirst" style:family="paragraph">
      <style:paragraph-properties fo:text-indent="0.2958in"/>
      <style:text-properties style:font-name="Times New Roman"/>
    </style:style>
    <style:style style:name="P118" style:parent-style-name="SBCparagraph" style:family="paragraph">
      <style:paragraph-properties fo:text-indent="0.2958in"/>
      <style:text-properties style:font-name="Times New Roman"/>
    </style:style>
    <style:style style:name="P119" style:parent-style-name="SBCparagraph" style:list-style-name="LFO9" style:family="paragraph"/>
    <style:style style:name="T120" style:parent-style-name="Fonteparág.padrão" style:family="text">
      <style:text-properties style:font-name="Times New Roman" fo:font-weight="bold" style:font-weight-asian="bold" style:font-weight-complex="bold"/>
    </style:style>
    <style:style style:name="P121" style:parent-style-name="SBCparagraph" style:list-style-name="LFO9" style:family="paragraph">
      <style:text-properties style:font-name="Times New Roman" fo:font-weight="bold" style:font-weight-asian="bold" style:font-weight-complex="bold"/>
    </style:style>
    <style:style style:name="P122" style:parent-style-name="SBCparagraph" style:family="paragraph">
      <style:text-properties style:font-name="Times New Roman"/>
    </style:style>
    <style:style style:name="P123" style:parent-style-name="SBCparagraph" style:family="paragraph">
      <style:paragraph-properties fo:text-indent="0.2958in"/>
      <style:text-properties style:font-name="Times New Roman"/>
    </style:style>
    <style:style style:name="P124" style:parent-style-name="SBCparagraph" style:family="paragraph">
      <style:paragraph-properties fo:text-indent="0.2958in"/>
      <style:text-properties style:font-name="Times New Roman"/>
    </style:style>
    <style:style style:name="P125" style:parent-style-name="SBCparagraph" style:family="paragraph">
      <style:paragraph-properties fo:text-indent="0.2958in"/>
      <style:text-properties style:font-name="Times New Roman"/>
    </style:style>
    <style:style style:name="P126" style:parent-style-name="SBCparagraph" style:family="paragraph">
      <style:paragraph-properties fo:text-indent="0in"/>
      <style:text-properties style:font-name="Times New Roman" fo:font-weight="bold" style:font-weight-asian="bold" style:font-weight-complex="bold" fo:language="en" fo:country="US"/>
    </style:style>
    <style:style style:name="P127" style:parent-style-name="SBCparagraph" style:family="paragraph">
      <style:paragraph-properties fo:text-indent="0.2958in"/>
      <style:text-properties style:font-name="Times New Roman"/>
    </style:style>
    <style:style style:name="P128" style:parent-style-name="SBCparagraph" style:family="paragraph">
      <style:paragraph-properties fo:text-align="center" fo:margin-left="0.5458in" fo:text-indent="0in">
        <style:tab-stops/>
      </style:paragraph-properties>
    </style:style>
    <style:style style:name="T129" style:parent-style-name="Fonteparág.padrão" style:family="text">
      <style:text-properties style:font-name="Times New Roman"/>
    </style:style>
    <style:style style:name="P130" style:parent-style-name="SBCcaption" style:family="paragraph">
      <style:paragraph-properties fo:line-height="200%"/>
      <style:text-properties style:font-name="Times New Roman"/>
    </style:style>
    <style:style style:name="P131" style:parent-style-name="SBCparagraph" style:family="paragraph">
      <style:paragraph-properties fo:text-align="center" fo:text-indent="0.2958in"/>
    </style:style>
    <style:style style:name="T132" style:parent-style-name="Fonteparág.padrão" style:family="text">
      <style:text-properties style:font-name="Times New Roman"/>
    </style:style>
    <style:style style:name="P133" style:parent-style-name="SBCcaption" style:family="paragraph">
      <style:paragraph-properties fo:line-height="200%"/>
      <style:text-properties style:font-name="Times New Roman"/>
    </style:style>
    <style:style style:name="P134" style:parent-style-name="ParágrafodaLista" style:master-page-name="MP6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35" style:parent-style-name="SBCparagraphfirst" style:family="paragraph">
      <style:paragraph-properties fo:text-indent="0.2958in"/>
    </style:style>
    <style:style style:name="T136" style:parent-style-name="Fonteparág.padrão" style:family="text">
      <style:text-properties style:font-name="Times New Roman"/>
    </style:style>
    <style:style style:name="T137" style:parent-style-name="Fonteparág.padrão" style:family="text">
      <style:text-properties style:font-name="Times New Roman" fo:font-weight="bold" style:font-weight-asian="bold" style:font-weight-complex="bold"/>
    </style:style>
    <style:style style:name="P138" style:parent-style-name="SBCparagraph" style:family="paragraph">
      <style:paragraph-properties fo:text-align="center" fo:text-indent="0.2958in"/>
    </style:style>
    <style:style style:name="T139" style:parent-style-name="Fonteparág.padrão" style:family="text">
      <style:text-properties style:font-name="Times New Roman"/>
    </style:style>
    <style:style style:name="P140" style:parent-style-name="SBCcaption" style:family="paragraph">
      <style:paragraph-properties fo:line-height="200%" fo:text-indent="0.2958in"/>
      <style:text-properties style:font-name="Times New Roman"/>
    </style:style>
    <style:style style:name="P141" style:parent-style-name="SBCparagraph" style:family="paragraph">
      <style:paragraph-properties fo:text-indent="0.2958in"/>
    </style:style>
    <style:style style:name="T142" style:parent-style-name="Fonteparág.padrão" style:family="text">
      <style:text-properties style:font-name="Times New Roman"/>
    </style:style>
    <style:style style:name="T143" style:parent-style-name="Fonteparág.padrão" style:family="text">
      <style:text-properties style:font-name="Times New Roman" fo:font-weight="bold" style:font-weight-asian="bold" style:font-weight-complex="bold"/>
    </style:style>
    <style:style style:name="T144" style:parent-style-name="Fonteparág.padrão" style:family="text">
      <style:text-properties style:font-name="Times New Roman"/>
    </style:style>
    <style:style style:name="P145" style:parent-style-name="SBCparagraph" style:family="paragraph">
      <style:paragraph-properties fo:text-align="center" fo:text-indent="0.2958in"/>
    </style:style>
    <style:style style:name="T146" style:parent-style-name="Fonteparág.padrão" style:family="text">
      <style:text-properties style:font-name="Times New Roman"/>
    </style:style>
    <style:style style:name="P147" style:parent-style-name="SBCcaption" style:family="paragraph">
      <style:paragraph-properties fo:line-height="200%"/>
      <style:text-properties style:font-name="Times New Roman"/>
    </style:style>
    <style:style style:name="P148" style:parent-style-name="ParágrafodaLista" style:list-style-name="LFO7" style:family="paragraph"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49" style:parent-style-name="SBCparagraphfirst" style:family="paragraph">
      <style:paragraph-properties fo:text-indent="0.2958in"/>
      <style:text-properties style:font-name="Times New Roman"/>
    </style:style>
    <style:style style:name="T150" style:parent-style-name="Fonteparág.padrão" style:family="text">
      <style:text-properties style:font-name="Times New Roman"/>
    </style:style>
    <style:style style:name="T151" style:parent-style-name="Fonteparág.padrão" style:family="text">
      <style:text-properties style:font-name="Times New Roman" fo:font-weight="bold" style:font-weight-asian="bold" style:font-weight-complex="bold"/>
    </style:style>
    <style:style style:name="P152" style:parent-style-name="SBCparagraph" style:family="paragraph">
      <style:paragraph-properties fo:text-align="center" fo:text-indent="0.2958in"/>
    </style:style>
    <style:style style:name="T153" style:parent-style-name="Fonteparág.padrão" style:family="text">
      <style:text-properties style:font-name="Times New Roman"/>
    </style:style>
    <style:style style:name="P154" style:parent-style-name="SBCcaption" style:family="paragraph">
      <style:paragraph-properties fo:line-height="200%"/>
      <style:text-properties style:font-name="Times New Roman"/>
    </style:style>
    <style:style style:name="P155" style:parent-style-name="ParágrafodaLista" style:master-page-name="MP7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56" style:parent-style-name="SBCparagraph" style:family="paragraph">
      <style:paragraph-properties fo:text-indent="0.2958in"/>
      <style:text-properties style:font-name="Times New Roman"/>
    </style:style>
    <style:style style:name="P157" style:parent-style-name="SBCparagraph" style:family="paragraph">
      <style:paragraph-properties fo:text-indent="0.2958in"/>
      <style:text-properties style:font-name="Times New Roman"/>
    </style:style>
    <style:style style:name="P158" style:parent-style-name="SBCparagraph" style:family="paragraph">
      <style:paragraph-properties fo:text-indent="0.2958in"/>
      <style:text-properties style:font-name="Times New Roman"/>
    </style:style>
    <style:style style:name="P159" style:parent-style-name="SBCparagraph" style:family="paragraph">
      <style:paragraph-properties fo:margin-bottom="0.1666in" fo:text-indent="0.2958in"/>
      <style:text-properties style:font-name="Times New Roman"/>
    </style:style>
    <style:style style:name="P160" style:parent-style-name="ParágrafodaLista" style:list-style-name="LFO7" style:family="paragraph">
      <style:paragraph-properties fo:margin-top="0.1666in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61" style:parent-style-name="ParágrafodaLista" style:list-style-name="LFO7" style:family="paragraph">
      <style:paragraph-properties fo:margin-top="0.1666in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62" style:parent-style-name="SBCparagraph" style:family="paragraph">
      <style:paragraph-properties fo:text-indent="0.2958in"/>
      <style:text-properties style:font-name="Times New Roman"/>
    </style:style>
    <style:style style:name="P163" style:parent-style-name="ParágrafodaLista" style:list-style-name="LFO7" style:family="paragraph">
      <style:paragraph-properties fo:margin-top="0.1666in"/>
      <style:text-properties style:font-name="Times" style:font-name-asian="Times New Roman" style:font-name-complex="Times New Roman" fo:font-weight="bold" style:font-weight-asian="bold" style:font-size-complex="9pt"/>
    </style:style>
    <style:style style:name="P164" style:parent-style-name="SBCparagraph" style:family="paragraph">
      <style:paragraph-properties fo:text-indent="0.2958in"/>
      <style:text-properties style:font-name="Times New Roman"/>
    </style:style>
    <style:style style:name="P165" style:parent-style-name="SBCparagraph" style:list-style-name="LFO10" style:family="paragraph">
      <style:text-properties style:font-name="Times New Roman"/>
    </style:style>
    <style:style style:name="P166" style:parent-style-name="SBCparagraph" style:list-style-name="LFO10" style:family="paragraph">
      <style:text-properties style:font-name="Times New Roman"/>
    </style:style>
    <style:style style:name="P167" style:parent-style-name="SBCparagraph" style:list-style-name="LFO10" style:family="paragraph">
      <style:text-properties style:font-name="Times New Roman"/>
    </style:style>
    <style:style style:name="P168" style:parent-style-name="SBCparagraph" style:list-style-name="LFO10" style:family="paragraph"/>
    <style:style style:name="T169" style:parent-style-name="Fonteparág.padrão" style:family="text">
      <style:text-properties style:font-name="Times New Roman"/>
    </style:style>
    <style:style style:name="T170" style:parent-style-name="Fonteparág.padrão" style:family="text">
      <style:text-properties style:font-name="Times New Roman" fo:color="#4472C4"/>
    </style:style>
    <style:style style:name="T171" style:parent-style-name="Fonteparág.padrão" style:family="text">
      <style:text-properties style:font-name="Times New Roman"/>
    </style:style>
    <style:style style:name="P172" style:parent-style-name="SBCparagraph" style:master-page-name="MP8" style:family="paragraph">
      <style:paragraph-properties fo:break-before="page" fo:margin-bottom="0.1666in" fo:text-indent="0.2958in"/>
      <style:text-properties style:font-name="Times New Roman" fo:font-weight="bold" style:font-weight-asian="bold" style:font-weight-complex="bold"/>
    </style:style>
    <style:style style:name="P17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74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76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78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7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8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82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8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4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8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8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87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8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9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9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92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9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4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9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9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0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7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0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1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3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5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8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0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2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2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2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3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3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0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4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4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5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4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7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5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5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1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3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6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6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0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7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2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7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7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5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7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7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8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7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8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5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2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9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9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5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29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0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0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0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0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0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1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1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1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6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2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3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2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2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3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3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3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4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5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2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5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6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6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6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64" style:parent-style-name="ParágrafodaLista" style:master-page-name="MP9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1pt" style:font-size-asian="11pt" style:font-size-complex="8pt"/>
    </style:style>
    <style:style style:name="P365" style:parent-style-name="SBCparagraph" style:family="paragraph">
      <style:paragraph-properties fo:margin-bottom="0.1666in" fo:text-indent="0.2958in"/>
    </style:style>
    <style:style style:name="T366" style:parent-style-name="Fonteparág.padrão" style:family="text">
      <style:text-properties style:font-name="Times New Roman"/>
    </style:style>
    <style:style style:name="T367" style:parent-style-name="Fonteparág.padrão" style:family="text">
      <style:text-properties style:font-name="Times New Roman" fo:color="#4472C4"/>
    </style:style>
    <style:style style:name="T368" style:parent-style-name="Fonteparág.padrão" style:family="text">
      <style:text-properties style:font-name="Times New Roman" fo:color="#4472C4"/>
    </style:style>
    <style:style style:name="T369" style:parent-style-name="Fonteparág.padrão" style:family="text">
      <style:text-properties style:font-name="Times New Roman"/>
    </style:style>
    <style:style style:name="P370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371" style:parent-style-name="Normal" style:family="paragraph">
      <style:paragraph-properties fo:widows="2" fo:orphans="2" style:text-autospace="none" style:vertical-align="auto" fo:text-indent="0.2958in"/>
    </style:style>
    <style:style style:name="T372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7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74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375" style:parent-style-name="Normal" style:family="paragraph">
      <style:paragraph-properties fo:widows="2" fo:orphans="2" style:text-autospace="none" style:vertical-align="auto" fo:text-indent="0.2958in"/>
    </style:style>
    <style:style style:name="T376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7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78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79" style:parent-style-name="Normal" style:family="paragraph">
      <style:paragraph-properties fo:widows="2" fo:orphans="2" style:text-autospace="none" style:vertical-align="auto" fo:text-indent="0.2958in"/>
    </style:style>
    <style:style style:name="T380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8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2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83" style:parent-style-name="Normal" style:family="paragraph">
      <style:paragraph-properties fo:widows="2" fo:orphans="2" style:text-autospace="none" style:vertical-align="auto" fo:text-indent="0.2958in"/>
    </style:style>
    <style:style style:name="T384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8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6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8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89" style:parent-style-name="Normal" style:family="paragraph">
      <style:paragraph-properties fo:widows="2" fo:orphans="2" style:text-autospace="none" style:vertical-align="auto" fo:text-indent="0.2958in"/>
    </style:style>
    <style:style style:name="T39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9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92" style:parent-style-name="Normal" style:family="paragraph">
      <style:paragraph-properties fo:widows="2" fo:orphans="2" style:text-autospace="none" style:vertical-align="auto" fo:text-indent="0.2958in"/>
    </style:style>
    <style:style style:name="T393" style:parent-style-name="Fonteparág.padrão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/>
    </style:style>
    <style:style style:name="T39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5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9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9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99" style:parent-style-name="Normal" style:family="paragraph">
      <style:paragraph-properties fo:widows="2" fo:orphans="2" style:text-autospace="none" style:vertical-align="auto" fo:text-indent="0.2958in"/>
    </style:style>
    <style:style style:name="T40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4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0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06" style:parent-style-name="Normal" style:family="paragraph">
      <style:paragraph-properties fo:widows="2" fo:orphans="2" style:text-autospace="none" style:vertical-align="auto" fo:text-indent="0.2958in"/>
    </style:style>
    <style:style style:name="T40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0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1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2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413" style:parent-style-name="Normal" style:family="paragraph">
      <style:paragraph-properties fo:widows="2" fo:orphans="2" style:text-autospace="none" style:vertical-align="auto" fo:text-indent="0.2958in"/>
    </style:style>
    <style:style style:name="T41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1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9" style:parent-style-name="Normal" style:family="paragraph">
      <style:paragraph-properties fo:widows="2" fo:orphans="2" style:text-autospace="none" style:vertical-align="auto" fo:text-indent="0.2958in"/>
    </style:style>
    <style:style style:name="T42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4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2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26" style:parent-style-name="Normal" style:family="paragraph">
      <style:paragraph-properties fo:widows="2" fo:orphans="2" style:text-autospace="none" style:vertical-align="auto" fo:text-indent="0.2958in"/>
    </style:style>
    <style:style style:name="T4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8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42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3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31" style:parent-style-name="Normal" style:family="paragraph">
      <style:paragraph-properties fo:widows="2" fo:orphans="2" style:text-autospace="none" style:vertical-align="auto" fo:text-indent="0.2958in"/>
    </style:style>
    <style:style style:name="T43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3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7" style:parent-style-name="Normal" style:family="paragraph">
      <style:paragraph-properties fo:widows="2" fo:orphans="2" style:text-autospace="none" style:vertical-align="auto" fo:text-indent="0.2958in"/>
    </style:style>
    <style:style style:name="T43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2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4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4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45" style:parent-style-name="Normal" style:family="paragraph">
      <style:paragraph-properties fo:widows="2" fo:orphans="2" style:text-autospace="none" style:vertical-align="auto" fo:text-indent="0.2958in"/>
    </style:style>
    <style:style style:name="T44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5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1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5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3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54" style:parent-style-name="Normal" style:family="paragraph">
      <style:paragraph-properties fo:widows="2" fo:orphans="2" style:text-autospace="none" style:vertical-align="auto" fo:text-indent="0.2958in"/>
    </style:style>
    <style:style style:name="T45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6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57" style:parent-style-name="Normal" style:family="paragraph">
      <style:paragraph-properties fo:widows="2" fo:orphans="2" style:text-autospace="none" style:vertical-align="auto" fo:text-indent="0.2958in"/>
    </style:style>
    <style:style style:name="T45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9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46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61" style:parent-style-name="Normal" style:family="paragraph">
      <style:paragraph-properties fo:widows="2" fo:orphans="2" style:text-autospace="none" style:vertical-align="auto" fo:text-indent="0.2958in"/>
    </style:style>
    <style:style style:name="T4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6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64" style:parent-style-name="Normal" style:family="paragraph">
      <style:paragraph-properties fo:widows="2" fo:orphans="2" style:text-autospace="none" style:vertical-align="auto" fo:text-indent="0.2958in"/>
    </style:style>
    <style:style style:name="T46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66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46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68" style:parent-style-name="Normal" style:family="paragraph">
      <style:paragraph-properties fo:widows="2" fo:orphans="2" style:text-autospace="none" style:vertical-align="auto" fo:text-indent="0.2958in"/>
    </style:style>
    <style:style style:name="T46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7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72" style:parent-style-name="Normal" style:family="paragraph">
      <style:paragraph-properties fo:widows="2" fo:orphans="2" style:text-autospace="none" style:vertical-align="auto" fo:text-indent="0.2958in"/>
    </style:style>
    <style:style style:name="T47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7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76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7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7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7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0" style:parent-style-name="Normal" style:family="paragraph">
      <style:paragraph-properties fo:widows="2" fo:orphans="2" style:text-autospace="none" style:vertical-align="auto" fo:text-indent="0.2958in"/>
    </style:style>
    <style:style style:name="T48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8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8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5" style:parent-style-name="Normal" style:family="paragraph">
      <style:paragraph-properties fo:widows="2" fo:orphans="2" style:text-autospace="none" style:vertical-align="auto" fo:text-indent="0.2958in"/>
    </style:style>
    <style:style style:name="T4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8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8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90" style:parent-style-name="Normal" style:family="paragraph">
      <style:paragraph-properties fo:widows="2" fo:orphans="2" style:text-autospace="none" style:vertical-align="auto" fo:text-indent="0.2958in"/>
    </style:style>
    <style:style style:name="T49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2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93" style:parent-style-name="Normal" style:family="paragraph">
      <style:paragraph-properties fo:widows="2" fo:orphans="2" style:text-autospace="none" style:vertical-align="auto" fo:text-indent="0.2958in"/>
    </style:style>
    <style:style style:name="T49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9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7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9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0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2" style:parent-style-name="Normal" style:family="paragraph">
      <style:paragraph-properties fo:widows="2" fo:orphans="2" style:text-autospace="none" style:vertical-align="auto" fo:text-indent="0.2958in"/>
    </style:style>
    <style:style style:name="T50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04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0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9" style:parent-style-name="Normal" style:family="paragraph">
      <style:paragraph-properties fo:widows="2" fo:orphans="2" style:text-autospace="none" style:vertical-align="auto" fo:text-indent="0.2958in"/>
    </style:style>
    <style:style style:name="T51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12" style:parent-style-name="Normal" style:family="paragraph">
      <style:paragraph-properties fo:widows="2" fo:orphans="2" style:text-autospace="none" style:vertical-align="auto" fo:text-indent="0.2958in"/>
    </style:style>
    <style:style style:name="T51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6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2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1" style:parent-style-name="Normal" style:family="paragraph">
      <style:paragraph-properties fo:widows="2" fo:orphans="2" style:text-autospace="none" style:vertical-align="auto" fo:text-indent="0.2958in"/>
    </style:style>
    <style:style style:name="T52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3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2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5" style:parent-style-name="Normal" style:family="paragraph">
      <style:paragraph-properties fo:widows="2" fo:orphans="2" style:text-autospace="none" style:vertical-align="auto" fo:text-indent="0.2958in"/>
    </style:style>
    <style:style style:name="T52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2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2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30" style:parent-style-name="Normal" style:family="paragraph">
      <style:paragraph-properties fo:widows="2" fo:orphans="2" style:text-autospace="none" style:vertical-align="auto" fo:text-indent="0.2958in"/>
    </style:style>
    <style:style style:name="T53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2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33" style:parent-style-name="Normal" style:family="paragraph">
      <style:paragraph-properties fo:widows="2" fo:orphans="2" style:text-autospace="none" style:vertical-align="auto" fo:text-indent="0.2958in"/>
    </style:style>
    <style:style style:name="T5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5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3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37" style:parent-style-name="Normal" style:family="paragraph">
      <style:paragraph-properties fo:widows="2" fo:orphans="2" style:text-autospace="none" style:vertical-align="auto" fo:text-indent="0.2958in"/>
    </style:style>
    <style:style style:name="T53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9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4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1" style:parent-style-name="Normal" style:family="paragraph">
      <style:paragraph-properties fo:widows="2" fo:orphans="2" style:text-autospace="none" style:vertical-align="auto" fo:text-indent="0.2958in"/>
    </style:style>
    <style:style style:name="T54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4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4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46" style:parent-style-name="ParágrafodaLista" style:master-page-name="MP10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style:font-size-complex="9pt"/>
    </style:style>
    <style:style style:name="P547" style:parent-style-name="SBCparagraph" style:family="paragraph">
      <style:paragraph-properties fo:margin-bottom="0.1666in"/>
      <style:text-properties style:font-name="Times New Roman"/>
    </style:style>
    <style:style style:name="P548" style:parent-style-name="SBCparagraph" style:family="paragraph">
      <style:paragraph-properties fo:text-indent="0.2958in"/>
      <style:text-properties style:font-name="Times New Roman" fo:font-weight="bold" style:font-weight-asian="bold" style:font-weight-complex="bold"/>
    </style:style>
    <style:style style:name="P549" style:parent-style-name="SBCparagraph" style:family="paragraph">
      <style:paragraph-properties fo:margin-left="0.2958in" fo:text-indent="0in">
        <style:tab-stops/>
      </style:paragraph-properties>
      <style:text-properties style:font-name="Times New Roman"/>
    </style:style>
    <style:style style:name="P5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1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5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53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55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5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5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57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5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9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6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1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6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6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6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65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6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6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6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7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7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7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7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7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7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8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8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8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8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9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9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9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0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0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0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0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1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3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1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1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1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62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2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5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2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2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3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3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4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4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4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4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5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5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5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4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5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5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5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6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6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7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7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7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7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7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68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8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88" style:parent-style-name="ParágrafodaLista" style:master-page-name="MP11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style:font-size-complex="9pt"/>
    </style:style>
    <style:style style:name="P689" style:parent-style-name="SBCparagraph" style:family="paragraph">
      <style:paragraph-properties fo:margin-bottom="0.1666in" fo:text-indent="0.2958in"/>
    </style:style>
    <style:style style:name="T690" style:parent-style-name="Fonteparág.padrão" style:family="text">
      <style:text-properties style:font-name="Times New Roman"/>
    </style:style>
    <style:style style:name="T691" style:parent-style-name="Fonteparág.padrão" style:family="text">
      <style:text-properties style:font-name="Times New Roman"/>
    </style:style>
    <style:style style:name="T692" style:parent-style-name="Fonteparág.padrão" style:family="text">
      <style:text-properties style:font-name="Times New Roman" fo:color="#4472C4"/>
    </style:style>
    <style:style style:name="T693" style:parent-style-name="Fonteparág.padrão" style:family="text">
      <style:text-properties style:font-name="Times New Roman" fo:color="#4472C4"/>
    </style:style>
    <style:style style:name="T694" style:parent-style-name="Fonteparág.padrão" style:family="text">
      <style:text-properties style:font-name="Times New Roman" fo:color="#4472C4"/>
    </style:style>
    <style:style style:name="T695" style:parent-style-name="Fonteparág.padrão" style:family="text">
      <style:text-properties style:font-name="Times New Roman" fo:color="#4472C4"/>
    </style:style>
    <style:style style:name="T696" style:parent-style-name="Fonteparág.padrão" style:family="text">
      <style:text-properties style:font-name="Times New Roman" fo:color="#4472C4"/>
    </style:style>
    <style:style style:name="T697" style:parent-style-name="Fonteparág.padrão" style:family="text">
      <style:text-properties style:font-name="Times New Roman"/>
    </style:style>
    <style:style style:name="P698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6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0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0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02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70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4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0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06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0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8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0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1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1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12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1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4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1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6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1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1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3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3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3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4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3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4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5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5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5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5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5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4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6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6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6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6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7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2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7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7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79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78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8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8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4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8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8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9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79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9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9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9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0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4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0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0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1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1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3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1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1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2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2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2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2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2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2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0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3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3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37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3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4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6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8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9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5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5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5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5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4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85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5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6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6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6" style:parent-style-name="ParágrafodaLista" style:master-page-name="MP12" style:list-style-name="LFO7" style:family="paragraph">
      <style:paragraph-properties fo:break-before="page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867" style:parent-style-name="Normal" style:family="paragraph">
      <style:paragraph-properties fo:text-align="justify" fo:margin-bottom="0.1666in" fo:text-indent="0.2958in"/>
    </style:style>
    <style:style style:name="T868" style:parent-style-name="Fonteparág.padrão" style:family="text">
      <style:text-properties style:font-name="Times New Roman"/>
    </style:style>
    <style:style style:name="T869" style:parent-style-name="Fonteparág.padrão" style:family="text">
      <style:text-properties style:font-name="Times New Roman" fo:font-weight="bold" style:font-weight-asian="bold" style:font-weight-complex="bold"/>
    </style:style>
    <style:style style:name="T870" style:parent-style-name="Fonteparág.padrão" style:family="text">
      <style:text-properties style:font-name="Times New Roman"/>
    </style:style>
    <style:style style:name="T871" style:parent-style-name="Fonteparág.padrão" style:family="text">
      <style:text-properties style:font-name="Times New Roman" fo:font-weight="bold" style:font-weight-asian="bold" style:font-weight-complex="bold"/>
    </style:style>
    <style:style style:name="T872" style:parent-style-name="Fonteparág.padrão" style:family="text">
      <style:text-properties style:font-name="Times New Roman"/>
    </style:style>
    <style:style style:name="T873" style:parent-style-name="Fonteparág.padrão" style:family="text">
      <style:text-properties style:font-name="Times New Roman" style:font-name-complex="Times New Roman"/>
    </style:style>
    <style:style style:name="T874" style:parent-style-name="Fonteparág.padrão" style:family="text">
      <style:text-properties style:font-name="Times New Roman"/>
    </style:style>
    <style:style style:name="T875" style:parent-style-name="Fonteparág.padrão" style:family="text">
      <style:text-properties style:font-name="Times New Roman" style:font-name-complex="Times New Roman"/>
    </style:style>
    <style:style style:name="T876" style:parent-style-name="Fonteparág.padrão" style:family="text">
      <style:text-properties style:font-name="Times New Roman"/>
    </style:style>
    <style:style style:name="T877" style:parent-style-name="Fonteparág.padrão" style:family="text">
      <style:text-properties style:font-name="Times New Roman"/>
    </style:style>
    <style:style style:name="T878" style:parent-style-name="Fonteparág.padrão" style:family="text">
      <style:text-properties style:font-name="Times New Roman"/>
    </style:style>
    <style:style style:name="P879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8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1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8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83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5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87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8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9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1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3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5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7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9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90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1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0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03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90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0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07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1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1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1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8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2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2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4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2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6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2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2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3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3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3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3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3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40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4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9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5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5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5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5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5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5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7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5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6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6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6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7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7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7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7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0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8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8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8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8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6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8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8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8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0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9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6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9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0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5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8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0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1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1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15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01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2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2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4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02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2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3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03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3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3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39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1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4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3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4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7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9" style:parent-style-name="Fonteparág.padrão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5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1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5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4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5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1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6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6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68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06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7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74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7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76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07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8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8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83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8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8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8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8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8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9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92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9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9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98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01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0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3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0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0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0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0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1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1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1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1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1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18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1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0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2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2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2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2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2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27" style:parent-style-name="Fonteparág.padrão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2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3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6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11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9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4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4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4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44" style:parent-style-name="Fonteparág.padrão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114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4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4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49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15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5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55" style:parent-style-name="Fonteparág.padrão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56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8" style:parent-style-name="Normal" style:family="paragraph">
      <style:paragraph-properties fo:text-align="justify" fo:margin-bottom="0.1666in" fo:text-indent="0.1972in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59" style:parent-style-name="Normal" style:family="paragraph">
      <style:paragraph-properties fo:text-align="justify" fo:margin-bottom="0.1666in" fo:text-indent="0.1972in"/>
    </style:style>
    <style:style style:name="P1160" style:parent-style-name="SBCcaption" style:family="paragraph">
      <style:paragraph-properties fo:line-height="200%"/>
      <style:text-properties style:font-name="Times New Roman"/>
    </style:style>
    <style:style style:name="P1161" style:parent-style-name="Normal" style:master-page-name="MP13" style:family="paragraph">
      <style:paragraph-properties fo:break-before="page" fo:text-align="justify" fo:margin-bottom="0.1666in" fo:text-indent="0.2958in"/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2" style:parent-style-name="Normal" style:family="paragraph">
      <style:paragraph-properties fo:text-align="justify" fo:margin-bottom="0.1666in" fo:text-indent="0.2958in"/>
    </style:style>
    <style:style style:name="T1163" style:parent-style-name="Fonteparág.padrão" style:family="text"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T1164" style:parent-style-name="Fonteparág.padrão" style:family="text">
      <style:text-properties style:font-name="Calibri" style:font-name-asian="Times New Roman" style:font-name-complex="Times New Roman" style:font-weight-complex="bold" fo:font-size="13pt" style:font-size-asian="13pt" style:font-size-complex="13pt"/>
    </style:style>
    <style:style style:name="T1165" style:parent-style-name="Fonteparág.padrão" style:family="text"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6" style:parent-style-name="Normal" style:family="paragraph">
      <style:paragraph-properties fo:text-align="justify" fo:margin-bottom="0.1666in" fo:text-indent="0.2958in"/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7" style:parent-style-name="ParágrafodaLista" style:list-style-name="LFO7" style:family="paragraph">
      <style:paragraph-properties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68" style:parent-style-name="SBCparagraph" style:family="paragraph">
      <style:paragraph-properties fo:text-indent="0.2958in"/>
      <style:text-properties style:font-name="Times New Roman" fo:font-size="13pt" style:font-size-asian="13pt" style:font-size-complex="13pt"/>
    </style:style>
    <style:style style:name="P1169" style:parent-style-name="SBCparagraph" style:family="paragraph">
      <style:paragraph-properties fo:text-indent="0.2958in"/>
      <style:text-properties style:font-name="Times New Roman" fo:font-size="13pt" style:font-size-asian="13pt" style:font-size-complex="13pt"/>
    </style:style>
    <style:style style:name="P117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3" style:parent-style-name="Normal" style:family="paragraph">
      <style:paragraph-properties fo:widows="2" fo:orphans="2" style:text-autospace="none" style:vertical-align="auto"/>
    </style:style>
    <style:style style:name="T118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85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9" style:parent-style-name="Normal" style:family="paragraph">
      <style:paragraph-properties fo:widows="2" fo:orphans="2" style:text-autospace="none" style:vertical-align="auto"/>
    </style:style>
    <style:style style:name="T119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9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92" style:parent-style-name="Normal" style:family="paragraph">
      <style:paragraph-properties fo:widows="2" fo:orphans="2" style:text-autospace="none" style:vertical-align="auto"/>
    </style:style>
    <style:style style:name="T119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94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8" style:parent-style-name="Normal" style:family="paragraph">
      <style:paragraph-properties fo:widows="2" fo:orphans="2" style:text-autospace="none" style:vertical-align="auto"/>
    </style:style>
    <style:style style:name="T119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0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0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0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10" style:parent-style-name="Normal" style:family="paragraph">
      <style:paragraph-properties fo:widows="2" fo:orphans="2" style:text-autospace="none" style:vertical-align="auto"/>
    </style:style>
    <style:style style:name="T121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1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4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4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7" style:parent-style-name="Normal" style:family="paragraph">
      <style:paragraph-properties fo:widows="2" fo:orphans="2" style:text-autospace="none" style:vertical-align="auto"/>
    </style:style>
    <style:style style:name="T125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5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6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61" style:parent-style-name="Normal" style:family="paragraph">
      <style:paragraph-properties fo:widows="2" fo:orphans="2" style:text-autospace="none" style:vertical-align="auto"/>
    </style:style>
    <style:style style:name="T126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63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6" style:parent-style-name="Normal" style:family="paragraph">
      <style:paragraph-properties fo:widows="2" fo:orphans="2" style:text-autospace="none" style:vertical-align="auto"/>
    </style:style>
    <style:style style:name="T1267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6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69" style:parent-style-name="Normal" style:family="paragraph">
      <style:paragraph-properties fo:widows="2" fo:orphans="2" style:text-autospace="none" style:vertical-align="auto"/>
    </style:style>
    <style:style style:name="T1270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71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7" style:parent-style-name="Normal" style:family="paragraph">
      <style:paragraph-properties fo:widows="2" fo:orphans="2" style:text-autospace="none" style:vertical-align="auto"/>
    </style:style>
    <style:style style:name="T1278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79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8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8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8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84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285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286" style:parent-style-name="ParágrafodaLista" style:list-style-name="LFO11" style:family="paragraph">
      <style:paragraph-properties fo:widows="2" fo:orphans="2" style:text-autospace="none" fo:text-align="justify" style:vertical-align="auto"/>
    </style:style>
    <style:style style:name="T128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88" style:parent-style-name="Fonteparág.padrão" style:family="text">
      <style:text-properties style:font-name="Times New Roman" style:font-name-complex="Times New Roman" fo:color="#000000" style:letter-kerning="false"/>
    </style:style>
    <style:style style:name="P1289" style:parent-style-name="ParágrafodaLista" style:list-style-name="LFO11" style:family="paragraph">
      <style:paragraph-properties fo:widows="2" fo:orphans="2" style:text-autospace="none" fo:text-align="justify" style:vertical-align="auto"/>
    </style:style>
    <style:style style:name="T129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91" style:parent-style-name="Fonteparág.padrão" style:family="text">
      <style:text-properties style:font-name="Times New Roman" style:font-name-complex="Times New Roman" fo:color="#000000" style:letter-kerning="false"/>
    </style:style>
    <style:style style:name="P1292" style:parent-style-name="ParágrafodaLista" style:list-style-name="LFO11" style:family="paragraph">
      <style:paragraph-properties fo:widows="2" fo:orphans="2" style:text-autospace="none" fo:text-align="justify" style:vertical-align="auto"/>
    </style:style>
    <style:style style:name="T129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94" style:parent-style-name="Fonteparág.padrão" style:family="text">
      <style:text-properties style:font-name="Times New Roman" style:font-name-complex="Times New Roman" fo:color="#000000" style:letter-kerning="false"/>
    </style:style>
    <style:style style:name="P1295" style:parent-style-name="ParágrafodaLista" style:list-style-name="LFO11" style:family="paragraph">
      <style:paragraph-properties fo:widows="2" fo:orphans="2" style:text-autospace="none" fo:text-align="justify" style:vertical-align="auto"/>
    </style:style>
    <style:style style:name="T1296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97" style:parent-style-name="Fonteparág.padrão" style:family="text">
      <style:text-properties style:font-name="Times New Roman" style:font-name-complex="Times New Roman" fo:color="#000000" style:letter-kerning="false"/>
    </style:style>
    <style:style style:name="P1298" style:parent-style-name="ParágrafodaLista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299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30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/>
    </style:style>
    <style:style style:name="P1301" style:parent-style-name="Normal" style:family="paragraph">
      <style:paragraph-properties fo:widows="2" fo:orphans="2" style:text-autospace="none" style:vertical-align="auto"/>
    </style:style>
    <style:style style:name="T1302" style:parent-style-name="Fonteparág.padrão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303" style:parent-style-name="SBCcaption" style:family="paragraph">
      <style:paragraph-properties fo:line-height="200%"/>
      <style:text-properties style:font-name="Times New Roman"/>
    </style:style>
    <style:style style:name="P1304" style:parent-style-name="ParágrafodaLista" style:master-page-name="MP14" style:list-style-name="LFO7" style:family="paragraph">
      <style:paragraph-properties fo:break-before="page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305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06" style:parent-style-name="Fonteparág.padrão" style:family="text">
      <style:text-properties style:font-name="Times New Roman"/>
    </style:style>
    <style:style style:name="T1307" style:parent-style-name="Hyperlink" style:family="text">
      <style:text-properties style:font-name="Times New Roman"/>
    </style:style>
    <style:style style:name="T1308" style:parent-style-name="Fonteparág.padrão" style:family="text">
      <style:text-properties style:font-name="Times New Roman"/>
    </style:style>
    <style:style style:name="P1309" style:parent-style-name="SBCparagraphfirst" style:list-style-name="LFO12" style:family="paragraph">
      <style:paragraph-properties fo:margin-left="0.3937in" fo:text-indent="-0.3937in">
        <style:tab-stops/>
      </style:paragraph-properties>
    </style:style>
    <style:style style:name="T1310" style:parent-style-name="Fonteparág.padrão" style:family="text">
      <style:text-properties style:font-name="Times New Roman"/>
    </style:style>
    <style:style style:name="T1311" style:parent-style-name="Hyperlink" style:family="text">
      <style:text-properties style:font-name="Times New Roman"/>
    </style:style>
    <style:style style:name="T1312" style:parent-style-name="Fonteparág.padrão" style:family="text">
      <style:text-properties style:font-name="Times New Roman"/>
    </style:style>
    <style:style style:name="P1313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14" style:parent-style-name="Fonteparág.padrão" style:family="text">
      <style:text-properties style:font-name="Times New Roman"/>
    </style:style>
    <style:style style:name="T1315" style:parent-style-name="Hyperlink" style:family="text">
      <style:text-properties style:font-name="Times New Roman"/>
    </style:style>
    <style:style style:name="T1316" style:parent-style-name="Fonteparág.padrão" style:family="text">
      <style:text-properties style:font-name="Times New Roman"/>
    </style:style>
    <style:style style:name="P1317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18" style:parent-style-name="Fonteparág.padrão" style:family="text">
      <style:text-properties style:font-name="Times New Roman" fo:language="en" fo:country="US"/>
    </style:style>
    <style:style style:name="T1319" style:parent-style-name="Hyperlink" style:family="text">
      <style:text-properties style:font-name="Times New Roman"/>
    </style:style>
    <style:style style:name="T1320" style:parent-style-name="Fonteparág.padrão" style:family="text">
      <style:text-properties style:font-name="Times New Roman"/>
    </style:style>
    <style:style style:name="P1321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22" style:parent-style-name="Fonteparág.padrão" style:family="text">
      <style:text-properties style:font-name="Times New Roman" fo:language="en" fo:country="US"/>
    </style:style>
    <style:style style:name="T1323" style:parent-style-name="Hyperlink" style:family="text">
      <style:text-properties style:font-name="Times New Roman"/>
    </style:style>
    <style:style style:name="T1324" style:parent-style-name="Fonteparág.padrão" style:family="text">
      <style:text-properties style:font-name="Times New Roman"/>
    </style:style>
    <style:style style:name="P1325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26" style:parent-style-name="Fonteparág.padrão" style:family="text">
      <style:text-properties style:font-name="Times New Roman" fo:language="en" fo:country="US"/>
    </style:style>
    <style:style style:name="T1327" style:parent-style-name="Hyperlink" style:family="text">
      <style:text-properties style:font-name="Times New Roman"/>
    </style:style>
    <style:style style:name="T1328" style:parent-style-name="Fonteparág.padrão" style:family="text">
      <style:text-properties style:font-name="Times New Roman"/>
    </style:style>
    <style:style style:name="P1329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30" style:parent-style-name="Fonteparág.padrão" style:family="text">
      <style:text-properties style:font-name="Times New Roman" fo:language="en" fo:country="US"/>
    </style:style>
    <style:style style:name="T1331" style:parent-style-name="Hyperlink" style:family="text">
      <style:text-properties style:font-name="Times New Roman"/>
    </style:style>
    <style:style style:name="T1332" style:parent-style-name="Fonteparág.padrão" style:family="text">
      <style:text-properties style:font-name="Times New Roman"/>
    </style:style>
    <style:style style:name="P1333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34" style:parent-style-name="Fonteparág.padrão" style:family="text">
      <style:text-properties style:font-name="Times New Roman"/>
    </style:style>
    <style:style style:name="T1335" style:parent-style-name="Hyperlink" style:family="text">
      <style:text-properties style:font-name="Times New Roman"/>
    </style:style>
    <style:style style:name="T1336" style:parent-style-name="Fonteparág.padrão" style:family="text">
      <style:text-properties style:font-name="Times New Roman"/>
    </style:style>
    <style:style style:name="P1337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38" style:parent-style-name="Fonteparág.padrão" style:family="text">
      <style:text-properties style:font-name="Times New Roman"/>
    </style:style>
    <style:style style:name="T1339" style:parent-style-name="Hyperlink" style:family="text">
      <style:text-properties style:font-name="Times New Roman"/>
    </style:style>
    <style:style style:name="T1340" style:parent-style-name="Fonteparág.padrão" style:family="text">
      <style:text-properties style:font-name="Times New Roman"/>
    </style:style>
    <style:style style:name="P1341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42" style:parent-style-name="Fonteparág.padrão" style:family="text">
      <style:text-properties style:font-name="Times New Roman" fo:language="en" fo:country="US"/>
    </style:style>
    <style:style style:name="T1343" style:parent-style-name="Hyperlink" style:family="text">
      <style:text-properties style:font-name="Times New Roman"/>
    </style:style>
    <style:style style:name="T1344" style:parent-style-name="Fonteparág.padrão" style:family="text">
      <style:text-properties style:font-name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.28896in, 0in)"/>
    </style:style>
    <style:style style:family="graphic" style:name="a10" style:parent-style-name="Graphics">
      <style:graphic-properties fo:border="0.01042in none" fo:background-color="transparent" fo:clip="rect(3.30905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.3990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1.73649in, 0in)"/>
    </style:style>
  </office:automatic-styles>
  <office:body>
    <office:text text:use-soft-page-breaks="true">
      <text:p text:style-name="P1">PROJETO 1: FAMILIARIZAÇÃO COM MÁQUINA VIRTUAL E SINCRONIZAÇÃO DE PROCESSOS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list text:style-name="LFO7" text:continue-numbering="true">
        <text:list-item>
          <text:p text:style-name="P8">Tarefa 1: preparação do sistema</text:p>
          <text:list text:continue-numbering="true">
            <text:list-item>
              <text:p text:style-name="P9">Descrição</text:p>
            </text:list-item>
          </text:list>
        </text:list-item>
      </text:list>
      <text:p text:style-name="P10">Neste projeto, deliberadamente escolhemos adotar um ambiente de trabalho personalizado, impulsionado pelo fato de que o nosso computador hospedeiro ostenta configurações de hardware verdadeiramente high-end. Equipado com um processador Ryzen 3 2600G (4 núcleos), um impressionante total de 80GB de RAM operando a 3000MHz e um SSD NVMe de 2TB, o nosso sistema não apenas atende, mas ultrapassa as demandas de desempenho exigidas por este projeto. Além disso, o host está configurado com windows 10 Pro e com a tecnologia de virtualização da AMD-V ativada na BIOS do computador que permite que processadores AMD executem máquinas virtuais de forma mais eficiente, melhorando o desempenho e a eficiência do sistema.</text:p>
      <text:p text:style-name="P11">Em contrapartida, foi utilizado o Oracle VirtualBox para criar a máquina virtualizada, denominada convidado (guest), <text:s/>que opera com o sistema operacional Linux Debian 12.2.0 (bookworm). Sua instalação foi realizada utilizando a imagem do instalador via rede, uma escolha estratégica que permite o download dos pacotes do sistema durante o processo de instalação. Essa opção foi especialmente vantajosa dada a velocidade de conexão com a internet no momento da instalação, que atingiu notáveis 430.03 Mbit/s (download) e 287.58 Mbit/s (upload).</text:p>
      <text:list text:style-name="LFO7" text:continue-numbering="true">
        <text:list-item>
          <text:list>
            <text:list-item>
              <text:p text:style-name="P12">Passo-a-passo da configuração da Máquina Virtual</text:p>
              <text:list text:continue-numbering="true">
                <text:list-item>
                  <text:p text:style-name="P13">Instalação do Linux Debian</text:p>
                </text:list-item>
              </text:list>
            </text:list-item>
          </text:list>
        </text:list-item>
      </text:list>
      <text:p text:style-name="P14"><text:span text:style-name="T15">O Linux Debian 12 encontra-se disponível para download no seguinte endereço:<text:s/></text:span><text:a xlink:href="https://www.debian.org/distrib/netinst" office:target-frame-name="_top" xlink:show="replace"><text:span text:style-name="T16">https://www.debian.org/distrib/netinst</text:span></text:a><text:span text:style-name="T17">. Optamos por baixar a versão netinst, que é o instalador via rede<text:s/></text:span><text:span text:style-name="T18"><text:bookmark-ref text:ref-name="_Ref151322939" text:reference-format="text">[1</text:bookmark-ref></text:span><text:span text:style-name="T19">,</text:span><text:span text:style-name="T20"><text:bookmark-ref text:ref-name="_Ref151322942" text:reference-format="text"> 2]</text:bookmark-ref></text:span><text:span text:style-name="T21">.</text:span></text:p>
      <text:p text:style-name="P22">Para a virtualização do Debian, escolhemos utilizar o Oracle VirtualBox como plataforma de hospedagem. Na figura 1 abaixo, compartilhamos a configuração inicial realizada por meio do assistente.</text:p>
      <text:p text:style-name="P23"><text:span text:style-name="T24"><draw:frame draw:style-name="a0" draw:name="Picture 1" text:anchor-type="as-char" svg:x="0in" svg:y="0in" svg:width="4.98261in" svg:height="2.60146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25">Figura 1. Criar máquina virtual</text:p>
      <text:p text:style-name="P26">Na implementação do projeto, foi escolhido adotar uma estratégia eficiente por meio da instalação desassistida do sistema operacional convidado, utilizando a interface de configuração disponibilizada durante o assistente de instalação. Essa abordagem simplifica e automatiza o processo, eliminando a necessidade de intervenção manual repetitiva.</text:p>
      <text:p text:style-name="P27">Durante a etapa de configuração desassistida na janela do assistente, antecipei a criação do usuário necessário para o sistema. Essa medida tem como objetivo otimizar a eficiência do processo, garantindo a padronização e consistência na implementação.</text:p>
      <text:p text:style-name="P28"><text:bookmark-start text:name="_Hlk151062120"/>Ao definir<text:s/><text:bookmark-end text:name="_Hlk151062120"/>previamente detalhes como nome de usuário e senha diretamente na interface de configuração, assegurei que o sistema operacional convidado seja instalado com as configurações desejadas de forma rápida e precisa conforme a Figura 2 abaixo.</text:p>
      <text:p text:style-name="P29"><text:span text:style-name="T30"><draw:frame draw:style-name="a1" draw:name="Picture 1" text:anchor-type="as-char" svg:x="0in" svg:y="0in" svg:width="5.0114in" svg:height="2.6094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1">Figura 2. Configuração de Instalação Dessasistida de SO guest</text:p>
      <text:p text:style-name="P32">Sobre a definição do hardware utilizado para a máquina guest, foi realizado uma configuração bem interessante para evitar quedas de desempenho. Optei por utilizar uma quantidade razoavel de memoria RAM 52Gb RAM (52*1024) e todos os núcleos do processador (4 núcleos) conforme a figura 3 abaixo.</text:p>
      <text:p text:style-name="P33"><text:span text:style-name="T34"><draw:frame draw:style-name="a2" draw:name="Picture 1" text:anchor-type="as-char" svg:x="0in" svg:y="0in" svg:width="4.99879in" svg:height="2.6204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35"><text:s/>Figura 3. Hardware Guest</text:p>
      <text:p text:style-name="P36">Sobre o disco rígido da máquina virtual, consideramos um tamanho bastante exagerado para termos certeza que não iriamos ter problemas com armazenamento e aproveitar da máquina host que possui muito armazenamento livre disponivel, sendo assim, foi utilizado 60Gb de armazenamento (60*1024) conforme a figura 4 abaixo.</text:p>
      <text:p text:style-name="P37"><text:span text:style-name="T38"><draw:frame draw:style-name="a3" draw:name="Picture 1" text:anchor-type="as-char" svg:x="0in" svg:y="0in" svg:width="4.92077in" svg:height="2.5703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39">Figura 4. Armazenamento Guest</text:p>
      <text:p text:style-name="P40">Abaixo está o resumo da configuração da máquina.</text:p>
      <text:p text:style-name="P41"><text:span text:style-name="T42"><draw:frame draw:style-name="a4" draw:name="Picture 1" text:anchor-type="as-char" svg:x="0in" svg:y="0in" svg:width="4.61782in" svg:height="2.84867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span></text:p>
      <text:p text:style-name="P43">Figura 4. Resumo</text:p>
      <text:p text:style-name="P44"><text:span text:style-name="T45">Com aproximadamente 7 minutos a máquina virtual foi instalada com sucesso.</text:span><text:span text:style-name="T46"><text:line-break/></text:span><text:span text:style-name="T47"><draw:frame draw:style-name="a5" draw:name="Picture 1" text:anchor-type="as-char" svg:x="0in" svg:y="0in" svg:width="4.9206in" svg:height="4.1157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48">Figura 5. Maquina Virtual Instalada</text:p>
      <text:list text:style-name="LFO7" text:continue-numbering="true">
        <text:list-item>
          <text:list>
            <text:list-item>
              <text:p text:style-name="P49">Configuração da Máquina Virtual</text:p>
            </text:list-item>
          </text:list>
        </text:list-item>
      </text:list>
      <text:p text:style-name="P50"><text:span text:style-name="T51">Após a instalação do debian, foi necessário atribuir o usuário vboxuser como administrador para ter acesso ao root no arquivo /etc/sudoers (arquivo de permissão de usuários)<text:s/></text:span><text:span text:style-name="T52"><text:bookmark-ref text:ref-name="_Ref151322999" text:reference-format="text">[3]</text:bookmark-ref></text:span><text:span text:style-name="T53">.</text:span></text:p>
      <text:list text:style-name="LFO8" text:continue-numbering="true">
        <text:list-item>
          <text:p text:style-name="P54"><text:span text:style-name="T55">su</text:span><text:span text:style-name="T56"><text:s/>+ sua senha (para mudar seu user);</text:span></text:p>
        </text:list-item>
        <text:list-item>
          <text:p text:style-name="P57"><text:span text:style-name="T58">sudo nano /etc/sudoers</text:span><text:span text:style-name="T59"><text:s/>(para editar o arquivo de permissões de usuários);</text:span></text:p>
        </text:list-item>
        <text:list-item>
          <text:p text:style-name="P60"><text:span text:style-name="T61">A baixo da linha onde se encontra essa frase: %sudo ALL=(ALL:ALL) ALL, tem que adicionar outra linha, escrevendo-se o seguinte:<text:s/></text:span><text:span text:style-name="T62">nomeUsuario</text:span><text:span text:style-name="T63"><text:s/></text:span><text:span text:style-name="T64">ALL=(ALL) ALL</text:span><text:span text:style-name="T65"><text:s/>(Agora seu user tem acesso root). Lembrando que o nomeUsuario no caso do projeto é o<text:s/></text:span><text:span text:style-name="T66">vboxuser</text:span><text:span text:style-name="T67">;</text:span></text:p>
        </text:list-item>
        <text:list-item>
          <text:p text:style-name="P68">Após alterar, apertar Ctrl + O (Salvar), Ctrl + X (Fechar ), Ctrl + D (Sair do modo root).</text:p>
        </text:list-item>
      </text:list>
      <text:p text:style-name="P69">Adicionalmente, não houve a necessidade de modificar o arquivo sources.list, um componente crucial na configuração do sistema Debian e distribuições relacionadas. Esse arquivo desempenha o papel vital de listar os repositórios de onde o sistema operacional obtém seus pacotes de software. Sua configuração precisa é crucial para o sucesso da execução do comando 'apt-get update'.</text:p>
      <text:p text:style-name="P70"><text:span text:style-name="T71">Além disso, como optamos por instalar o Debian utilizando a conexão de rede, o<text:s/></text:span><text:span text:style-name="T72">sistema automaticamente baixou as versões mais recentes disponíveis</text:span><text:span text:style-name="T73"><text:s/>durante o processo de instalação. Nesse contexto, o sources.list foi configurado como Debian Bookworm, direcionando-se exclusivamente ao repositório de atualizações (bookworm-updates) com os componentes 'main' e 'non-free-firmware'. Essa configuração atende adequadamente às nossas necessidades atuais e proporciona um ambiente estável e atualizado para as operações previstas.</text:span></text:p>
      <text:p text:style-name="P74"><text:span text:style-name="T75">Ao abordar a<text:s/></text:span><text:span text:style-name="T76">configuração da rede na máquina virtual</text:span><text:span text:style-name="T77">, é importante destacar que o próprio VirtualBox oferece uma interface intuitiva para essa configuração. Nesse sentido, a escolha mais comum foi habilitar a comunicação entre a máquina virtual e o sistema operacional hospedeiro através da<text:s/></text:span><text:span text:style-name="T78">configuração da placa de rede em modo bridge</text:span><text:span text:style-name="T79">, conforme ilustrado na Figura 6 abaixo.</text:span></text:p>
      <text:p text:style-name="P80"><text:span text:style-name="T81"><draw:frame draw:style-name="a6" draw:name="Picture 1" text:anchor-type="as-char" svg:x="0in" svg:y="0in" svg:width="4.14387in" svg:height="2.4203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82">Figura 6. Configurando rede</text:p>
      <text:p text:style-name="P83">Agora que a rede está sendo aparentemente conhecida, vamos fazer o teste no debian e provar que está tudo funcionando. Conquanto, os testes abaixo serve apenas para comprovar essa funcionalidade.</text:p>
      <text:p text:style-name="P84">Utilizando o comando ip a, conseguimos verificar as interfaces de rede e suas configurações e obtivemos o IP 192.168.0.103 conforme na Figura 7.</text:p>
      <text:p text:style-name="P85"><text:span text:style-name="T86"><draw:frame draw:style-name="a7" draw:name="Picture 1" text:anchor-type="as-char" svg:x="0in" svg:y="0in" svg:width="5.5391in" svg:height="2.87459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87">Figura 7. Interface de rede</text:p>
      <text:p text:style-name="P88">Foi utilizado também ferramentas especificas para medir a velocidade da internet como por exemplo o speedtest-cli conforme na Figura 8.</text:p>
      <text:p text:style-name="P89"><text:span text:style-name="T90"><draw:frame draw:style-name="a8" draw:name="Picture 1" text:anchor-type="as-char" svg:x="0in" svg:y="0in" svg:width="4.17832in" svg:height="1.94129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span></text:p>
      <text:p text:style-name="P91">Figura 8. Teste com speedtest-cli</text:p>
      <text:p text:style-name="P92">E também utilizado o comando traceroute para verificar as rotas que os pacotes estão tomando para alcançar um destino, no nosso exemplo utilizamos o site da google conforme a Figura 9.</text:p>
      <text:p text:style-name="P93"><text:span text:style-name="T94"><draw:frame draw:style-name="a9" draw:name="Picture 1" text:anchor-type="as-char" svg:x="0in" svg:y="0in" svg:width="5.05335in" svg:height="2.01302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95">Figura 9. Verificando rotas dos pacotes</text:p>
      <text:p text:style-name="P96">E por ultimo utilizamos o comando netstat para verificar as conexões de rede e o estado das portas conforme a Figura 10.</text:p>
      <text:p text:style-name="P97"><text:span text:style-name="T98"><draw:frame draw:style-name="a10" draw:name="Picture 752484224" text:anchor-type="as-char" svg:x="0in" svg:y="0in" svg:width="5.05335in" svg:height="1.05223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99">Figura 10. Verificando as conexões e estado das portas</text:p>
      <text:list text:style-name="LFO7" text:continue-numbering="true">
        <text:list-item>
          <text:list>
            <text:list-item>
              <text:p text:style-name="P100">Instalação/Configuração e acesso remoto via SSH</text:p>
            </text:list-item>
          </text:list>
        </text:list-item>
      </text:list>
      <text:p text:style-name="P101">Agora que a conexão com a rede está funcionando, vamos partir para o próximo passo que é a instalação e configuração do SSH para realizar a comunicação entre as duas máquinas.</text:p>
      <text:p text:style-name="P102"><text:span text:style-name="T103">De inicio, foi realizado a instalação do openssh-server através do comando<text:s/></text:span><text:span text:style-name="T104">sudo apt-get install openssh-server<text:s/></text:span><text:span text:style-name="T105">na máquina virtual (guest).</text:span></text:p>
      <text:p text:style-name="P106"><text:span text:style-name="T107">Após isso, iremos realizar o acesso à máquina virtual via SSH (acesso remoto), na qual iremos precisar do IP (obtivemos na Figura 7) e iremos executar o seguinte codigo na maquina hospedeira para inicializar a comunicação:<text:s/></text:span><text:span text:style-name="T108">ssh vboxuser@192.168.0.103.</text:span></text:p>
      <text:p text:style-name="P109">Ao executar o SSH no ambiente Windows, você encontrará uma mensagem crucial para autenticação e segurança ao conectar-se a um servidor. A ECDSA Key Fingerprint representa uma identificação única da chave do servidor, usando o algoritmo de assinatura digital de curva elíptica (ECDSA). Essa impressão digital é uma forma segura de garantir a consistência da chave do servidor em várias conexões. A mensagem de aviso, ao perguntar se você deseja continuar, indica que o cliente SSH detectou uma nova chave ECDSA para o host 192.168.0.103, não presente na lista de "hosts conhecidos". Como esta é a primeira conexão com esse host, o cliente SSH avisa que a chave será adicionada permanentemente à lista de hosts conhecidos e pedirá a senha do user root da máquina virtual, então basta inseri-la conforme na Figura 11 e Figura 12 abaixo.</text:p>
      <text:p text:style-name="P110"><text:span text:style-name="T111"><draw:frame draw:style-name="a11" draw:name="Picture 1" text:anchor-type="as-char" svg:x="0in" svg:y="0in" svg:width="5.56132in" svg:height="2.91211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112">Figura 11. Conexão bem sucedida</text:p>
      <text:p text:style-name="P113"><text:span text:style-name="T114"><draw:frame draw:style-name="a12" draw:name="Picture 1" text:anchor-type="as-char" svg:x="0in" svg:y="0in" svg:width="5.66172in" svg:height="3.84882in" style:rel-width="scale" style:rel-height="scale"><draw:image xlink:href="media/image12.png" xlink:type="simple" xlink:show="embed" xlink:actuate="onLoad"/><svg:title/><svg:desc>Screens screenshot of a computer screen

Description automatically generated</svg:desc></draw:frame></text:span></text:p>
      <text:p text:style-name="P115">Figura 12. Print – Visão Geral</text:p>
      <text:list text:style-name="LFO7" text:continue-numbering="true">
        <text:list-item>
          <text:list>
            <text:list-item>
              <text:p text:style-name="P116">Transferência de Arquivos</text:p>
            </text:list-item>
          </text:list>
        </text:list-item>
      </text:list>
      <text:p text:style-name="P117">Agora que temos tudo configurado, iremos tranferir um <text:s/>arquivo do computador Hospedeiro para a nossa Máquina Virtual.</text:p>
      <text:p text:style-name="P118">Para isso, pensando numa forma bem simples e estratégica, pensamos em criar um arquivo .txt no host utilizando o CMD como administrador e salvarmos ele na raiz do disco conforme o seguinte comando abaixo:</text:p>
      <text:list text:style-name="LFO9" text:continue-numbering="true">
        <text:list-item>
          <text:p text:style-name="P119"><text:span text:style-name="T120">Cd C:/</text:span></text:p>
        </text:list-item>
        <text:list-item>
          <text:p text:style-name="P121">echo "Hello World!" &gt; teste.txt</text:p>
        </text:list-item>
      </text:list>
      <text:p text:style-name="P122">Após termos criado o arquivo iremos transferi-lo para máquina virtual utilizando o servidor de SSH recém instalado.</text:p>
      <text:p text:style-name="P123">Para isto, usaremos o protocolo de comunicação SCP (Secure Copy Protocol) que utiliza o SSH (Secure Shell) como mecanismo subjacente para autenticação e criptografia. SCP permite a transferência segura de arquivos entre hosts em uma rede.</text:p>
      <text:p text:style-name="P124">Quando usamos o comando scp para copiar arquivos, ele estabelece uma conexão SSH para autenticação e, em seguida, utiliza essa conexão para transferir os dados de forma segura. Assim, a criptografia e autenticação fornecidas pelo SSH também se aplicam às transferências de arquivos SCP.</text:p>
      <text:p text:style-name="P125">Conquanto, em uma nova janela do terminal utilizaremos o seguinte comando:<text:s/></text:p>
      <text:p text:style-name="P126">scp C:/teste.txt vboxuser@192.168.0.103:/home/vboxuser/Downloads/</text:p>
      <text:p text:style-name="P127">Irá pedir a senha então basta inserir e após isto o arquivo será copiado conforme as Figuras 13 e 14 abaixo.</text:p>
      <text:p text:style-name="P128"><text:span text:style-name="T129"><draw:frame draw:style-name="a13" draw:name="Picture 1" text:anchor-type="as-char" svg:x="0in" svg:y="0in" svg:width="4.60196in" svg:height="0.71719in" style:rel-width="scale" style:rel-height="scale"><draw:image xlink:href="media/image13.png" xlink:type="simple" xlink:show="embed" xlink:actuate="onLoad"/><svg:title/><svg:desc>A black screen with white text

Description automatically generated</svg:desc></draw:frame></text:span></text:p>
      <text:p text:style-name="P130">Figura 13. Protocolo SCP</text:p>
      <text:p text:style-name="P131"><text:span text:style-name="T132"><draw:frame draw:style-name="a14" draw:name="Picture 1" text:anchor-type="as-char" svg:x="0in" svg:y="0in" svg:width="4.5213in" svg:height="2.4781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133">Figura 14. Protocolo SCP – Visão Geral</text:p>
      <text:list text:style-name="LFO7" text:continue-numbering="true">
        <text:list-item>
          <text:list>
            <text:list-item>
              <text:p text:style-name="P134">Criação de Conta de Usuário</text:p>
            </text:list-item>
          </text:list>
        </text:list-item>
      </text:list>
      <text:p text:style-name="P135"><text:span text:style-name="T136">Agora iremos criar uma conta de usuario para mim sem utilizar o root. E para isto usamos o comando<text:s/></text:span><text:span text:style-name="T137">sudo adduser &lt;NOVO_USUARIO&gt;.</text:span></text:p>
      <text:p text:style-name="P138"><text:span text:style-name="T139"><draw:frame draw:style-name="a15" draw:name="Picture 1" text:anchor-type="as-char" svg:x="0in" svg:y="0in" svg:width="4.9765in" svg:height="3.38945in" style:rel-width="scale" style:rel-height="scale"><draw:image xlink:href="media/image15.png" xlink:type="simple" xlink:show="embed" xlink:actuate="onLoad"/><svg:title/><svg:desc>A screenshot of a computer program

Description automatically generated</svg:desc></draw:frame></text:span></text:p>
      <text:p text:style-name="P140">Figura 15. Adicionando novo Usuário</text:p>
      <text:p text:style-name="P141"><text:span text:style-name="T142">Agora que está tudo Ok, vamos testar também a conexão SSH com novo usuario na máquina hospedeira repetindo o mesmo comando da Figura 13 porém com o novo usuario “</text:span><text:span text:style-name="T143">ggust</text:span><text:span text:style-name="T144">”.</text:span></text:p>
      <text:p text:style-name="P145"><text:span text:style-name="T146"><draw:frame draw:style-name="a16" draw:name="Picture 1" text:anchor-type="as-char" svg:x="0in" svg:y="0in" svg:width="5.07809in" svg:height="0.72612in" style:rel-width="scale" style:rel-height="scale"><draw:image xlink:href="media/image16.png" xlink:type="simple" xlink:show="embed" xlink:actuate="onLoad"/><svg:title/><svg:desc>A black screen with white text

Description automatically generated</svg:desc></draw:frame></text:span></text:p>
      <text:p text:style-name="P147">Figura 16. Adicionando novo Usuário</text:p>
      <text:list text:style-name="LFO7" text:continue-numbering="true">
        <text:list-item>
          <text:list>
            <text:list-item>
              <text:p text:style-name="P148">Configuração do Bash</text:p>
            </text:list-item>
          </text:list>
        </text:list-item>
      </text:list>
      <text:p text:style-name="P149">Agora que temos o usuario “ggust” iremos configurar o shell padrão para este novo usuario no sistema Linux. Esta é uma operação opcional e pode ser útil se o usuário preferir usar o Bash em vez da shell padrão definida no momento da criação do usuário.</text:p>
      <text:p text:style-name="SBCparagraph"><text:span text:style-name="T150">Para isso basta executar<text:s/></text:span><text:span text:style-name="T151">sudo chsh -s /bin/bash &lt;NOVO_USUARIO&gt;</text:span></text:p>
      <text:p text:style-name="P152"><text:span text:style-name="T153"><draw:frame draw:style-name="a17" draw:name="Picture 1" text:anchor-type="as-char" svg:x="0in" svg:y="0in" svg:width="5.10488in" svg:height="0.47923in" style:rel-width="scale" style:rel-height="scale"><draw:image xlink:href="media/image17.png" xlink:type="simple" xlink:show="embed" xlink:actuate="onLoad"/><svg:title/><svg:desc/></draw:frame></text:span></text:p>
      <text:p text:style-name="P154">Figura 17. Configurando Bash para o novo user</text:p>
      <text:list text:style-name="LFO7" text:continue-numbering="true">
        <text:list-item>
          <text:list>
            <text:list-item>
              <text:p text:style-name="P155">Instalação de Softwares</text:p>
            </text:list-item>
          </text:list>
        </text:list-item>
      </text:list>
      <text:p text:style-name="P156">Os softwares no Debian podem ser instalados de diversas maneiras, seja através da interface gráfica ou da linha de comando no terminal. A ferramenta principal para instalação de softwares é o apt, um poderoso sistema de gerenciamento de pacotes.</text:p>
      <text:p text:style-name="P157">Na máquina Debian que utilizei, a preferência foi pela instalação via linha de comando, utilizando o terminal. Isso proporcionou maior controle sobre o processo de instalação e permitiu uma abordagem mais personalizada para atender às necessidades específicas.</text:p>
      <text:p text:style-name="P158">Em diversos casos, foi necessário adicionar repositórios de software para viabilizar a instalação de determinados softwares. Isso possibilitou o acesso a uma variedade mais ampla de aplicativos e versões, garantindo a flexibilidade na escolha e personalização do ambiente de trabalho.</text:p>
      <text:p text:style-name="P159">Essa abordagem, embora demandasse algum conhecimento adicional, revelou-se eficaz para garantir a disponibilidade e atualização dos softwares desejados, contribuindo para a estabilidade e desempenho do sistema operacional Debian.</text:p>
      <text:list text:style-name="LFO7" text:continue-numbering="true">
        <text:list-item>
          <text:p text:style-name="P160">Tarefa 2</text:p>
          <text:list text:continue-numbering="true">
            <text:list-item>
              <text:p text:style-name="P161">Sincronização de processos</text:p>
            </text:list-item>
          </text:list>
        </text:list-item>
      </text:list>
      <text:p text:style-name="P162">Essa tarefa tem como o objetivo recapitular conceitos fundamentais de sistemas operacionais, vistos em SO1. Nas seções a seguir serão apresentados os códigos desenvolvidos pelo grupo.</text:p>
      <text:list text:style-name="LFO7" text:continue-numbering="true">
        <text:list-item>
          <text:list>
            <text:list-item>
              <text:list>
                <text:list-item>
                  <text:p text:style-name="P163">Solução de Peterson</text:p>
                </text:list-item>
              </text:list>
            </text:list-item>
          </text:list>
        </text:list-item>
      </text:list>
      <text:p text:style-name="P164">Para a resolução dessa atividade foram usadas como base os códigos apresentados pelo professor nos slides disponibilizados no google classroom.</text:p>
      <text:list text:style-name="LFO10" text:continue-numbering="true">
        <text:list-item>
          <text:p text:style-name="P165">A implementação da proteção da seção crítica está de acordo com as diretrizes fornecidas no enunciado, seguindo a abordagem proposta.</text:p>
        </text:list-item>
        <text:list-item>
          <text:p text:style-name="P166">A estratégia de Peterson assegura a exclusão mútua na seção crítica. O código permanece em um loop enquanto um processo está dentro de sua seção crítica, e quando ele a libera, o loop é interrompido, permitindo que outros processos possam acessar a seção crítica.</text:p>
        </text:list-item>
        <text:list-item>
          <text:p text:style-name="P167">Para lidar com possíveis erros, foi incorporada uma verificação condicional utilizando um if. Se a função responsável pela criação de threads retornar 0, isso indica que a thread foi criada com sucesso. Caso contrário, a execução do programa é encerrada, indicando que houve um problema na criação da thread.</text:p>
        </text:list-item>
        <text:list-item>
          <text:p text:style-name="P168"><text:span text:style-name="T169">A adaptação do código envolve a criação de duas threads, pi e pj, utilizando exclusivamente a seção de código da função void * cria(void *arg). Essa modificação foi realizada com base na documentação da função pthread_create() conforme apresentada por Kerrisk (2023)<text:s/></text:span><text:span text:style-name="T170"><text:bookmark-ref text:ref-name="_Ref151324063" text:reference-format="text">[10]</text:bookmark-ref></text:span><text:span text:style-name="T171">.</text:span></text:p>
        </text:list-item>
      </text:list>
      <text:p text:style-name="P172">Código trabalhado peterson.c</text:p>
      <text:p text:style-name="P173"><text:span text:style-name="T174">#include</text:span><text:span text:style-name="T175"><text:s/></text:span><text:span text:style-name="T176">&lt;stdio.h&gt;</text:span></text:p>
      <text:p text:style-name="P177"><text:span text:style-name="T178">#include</text:span><text:span text:style-name="T179"><text:s/></text:span><text:span text:style-name="T180">&lt;stdlib.h&gt;</text:span></text:p>
      <text:p text:style-name="P181"><text:span text:style-name="T182">#include</text:span><text:span text:style-name="T183"><text:s/></text:span><text:span text:style-name="T184">&lt;pthread.h&gt;</text:span></text:p>
      <text:p text:style-name="P185"/>
      <text:p text:style-name="P186"><text:span text:style-name="T187">#define</text:span><text:span text:style-name="T188"><text:s/></text:span><text:span text:style-name="T189">true</text:span><text:span text:style-name="T190"><text:s/>1</text:span></text:p>
      <text:p text:style-name="P191"><text:span text:style-name="T192">#define</text:span><text:span text:style-name="T193"><text:s/></text:span><text:span text:style-name="T194">false</text:span><text:span text:style-name="T195"><text:s/>0</text:span></text:p>
      <text:p text:style-name="P196"/>
      <text:p text:style-name="P197">pthread_t flag[2];</text:p>
      <text:p text:style-name="P198"><text:span text:style-name="T199">int</text:span><text:span text:style-name="T200"><text:s/>turn, counter = 0;</text:span></text:p>
      <text:p text:style-name="P201"/>
      <text:p text:style-name="P202"><text:span text:style-name="T203">void</text:span><text:span text:style-name="T204"><text:s/>enterSC (</text:span><text:span text:style-name="T205">int</text:span><text:span text:style-name="T206"><text:s/></text:span><text:span text:style-name="T207">i</text:span><text:span text:style-name="T208">){</text:span></text:p>
      <text:p text:style-name="P209"><text:span text:style-name="T210"><text:s text:c="3"/></text:span><text:span text:style-name="T211">int</text:span><text:span text:style-name="T212"><text:s/>j = 1 -<text:s/></text:span><text:span text:style-name="T213">i</text:span><text:span text:style-name="T214">; <text:s/></text:span><text:span text:style-name="T215">//J sempre vai ser oposto de i: caso i == 0, j == 1 e vice-versa</text:span></text:p>
      <text:p text:style-name="P216"><text:span text:style-name="T217"><text:s text:c="3"/>flag[</text:span><text:span text:style-name="T218">i</text:span><text:span text:style-name="T219">] =<text:s/></text:span><text:span text:style-name="T220">true</text:span><text:span text:style-name="T221">;<text:s/></text:span><text:span text:style-name="T222">//Thread que solicita entrada na seção crítica</text:span></text:p>
      <text:p text:style-name="P223"><text:s text:c="3"/>turn = j;</text:p>
      <text:p text:style-name="P224"><text:span text:style-name="T225"><text:s text:c="3"/></text:span><text:span text:style-name="T226">while</text:span><text:span text:style-name="T227">(flag[j] &amp;&amp; turn == j); <text:s/></text:span><text:span text:style-name="T228">//Laço para segurar a seção crítica</text:span></text:p>
      <text:p text:style-name="P229"><text:span text:style-name="T230"><text:s text:c="3"/></text:span><text:span text:style-name="T231">return</text:span><text:span text:style-name="T232">;</text:span></text:p>
      <text:p text:style-name="P233">}</text:p>
      <text:p text:style-name="P234"/>
      <text:p text:style-name="P235"><text:span text:style-name="T236">void</text:span><text:span text:style-name="T237"><text:s/>leaveSC (</text:span><text:span text:style-name="T238">int</text:span><text:span text:style-name="T239"><text:s/></text:span><text:span text:style-name="T240">i</text:span><text:span text:style-name="T241">){</text:span></text:p>
      <text:p text:style-name="P242"><text:span text:style-name="T243"><text:s text:c="3"/></text:span><text:span text:style-name="T244">flag[</text:span><text:span text:style-name="T245">i</text:span><text:span text:style-name="T246">] =<text:s/></text:span><text:span text:style-name="T247">false</text:span><text:span text:style-name="T248">; <text:s/></text:span><text:span text:style-name="T249">//Thread que solicita sair da seção crítica</text:span></text:p>
      <text:p text:style-name="P250"><text:span text:style-name="T251"><text:s text:c="3"/></text:span><text:span text:style-name="T252">return</text:span><text:span text:style-name="T253">;</text:span></text:p>
      <text:p text:style-name="P254">}</text:p>
      <text:p text:style-name="P255"/>
      <text:p text:style-name="P256"><text:span text:style-name="T257">void</text:span><text:span text:style-name="T258"><text:s/>* cria (</text:span><text:span text:style-name="T259">void</text:span><text:span text:style-name="T260"><text:s/>*</text:span><text:span text:style-name="T261">arg</text:span><text:span text:style-name="T262">){<text:s/></text:span><text:span text:style-name="T263">//Função para a thread</text:span></text:p>
      <text:p text:style-name="P264"><text:span text:style-name="T265"><text:s text:c="3"/></text:span><text:span text:style-name="T266">int</text:span><text:span text:style-name="T267"><text:s/>aux = (</text:span><text:span text:style-name="T268">int</text:span><text:span text:style-name="T269"><text:s/>*)</text:span><text:span text:style-name="T270">arg</text:span><text:span text:style-name="T271">, i = 0; <text:s/></text:span><text:span text:style-name="T272">//Pegar o índice da thread</text:span></text:p>
      <text:p text:style-name="P273"><text:span text:style-name="T274"><text:s text:c="3"/>enterSC(aux); <text:s/></text:span><text:span text:style-name="T275">//Chamada da função para entrar na seção crítica</text:span></text:p>
      <text:p text:style-name="P276"><text:span text:style-name="T277"><text:s text:c="3"/>printf(</text:span><text:span text:style-name="T278">"\nP%d: A região crítica é minha!!!\n"</text:span><text:span text:style-name="T279">, aux);</text:span></text:p>
      <text:p text:style-name="P280"><text:span text:style-name="T281"><text:s text:c="3"/></text:span><text:span text:style-name="T282">counter++;</text:span></text:p>
      <text:p text:style-name="P283"><text:span text:style-name="T284"><text:s text:c="3"/>printf(</text:span><text:span text:style-name="T285">"\n\nP%d: counter = %d\n\n"</text:span><text:span text:style-name="T286">, aux, counter);</text:span></text:p>
      <text:p text:style-name="P287"><text:span text:style-name="T288"><text:s text:c="3"/></text:span><text:span text:style-name="T289">leaveSC(aux); <text:s/></text:span><text:span text:style-name="T290">//Função para sair da seção crítica</text:span></text:p>
      <text:p text:style-name="P291"><text:span text:style-name="T292"><text:s text:c="3"/></text:span><text:span text:style-name="T293">return</text:span><text:span text:style-name="T294"><text:s/></text:span><text:span text:style-name="T295">NULL</text:span><text:span text:style-name="T296">;</text:span></text:p>
      <text:p text:style-name="P297">}</text:p>
      <text:p text:style-name="P298"/>
      <text:p text:style-name="P299"><text:span text:style-name="T300">int</text:span><text:span text:style-name="T301"><text:s/>main (</text:span><text:span text:style-name="T302">void</text:span><text:span text:style-name="T303">){</text:span></text:p>
      <text:p text:style-name="P304"><text:span text:style-name="T305"><text:s text:c="3"/></text:span><text:span text:style-name="T306">pthread_t thi, thj;<text:s/></text:span><text:span text:style-name="T307">//Duas variáveis para a criação das threads</text:span></text:p>
      <text:p text:style-name="P308"/>
      <text:p text:style-name="P309"><text:span text:style-name="T310"><text:s text:c="3"/></text:span><text:span text:style-name="T311">//Verifica se as threads foram criadas corretamente</text:span></text:p>
      <text:p text:style-name="P312"><text:span text:style-name="T313"><text:s text:c="3"/></text:span><text:span text:style-name="T314">if</text:span><text:span text:style-name="T315">(pthread_create (&amp;thi,<text:s/></text:span><text:span text:style-name="T316">NULL</text:span><text:span text:style-name="T317">, cria, (</text:span><text:span text:style-name="T318">int</text:span><text:span text:style-name="T319"><text:s/>*)0) !=<text:s/></text:span><text:span text:style-name="T320">0){</text:span></text:p>
      <text:p text:style-name="P321"><text:span text:style-name="T322"><text:s text:c="6"/>printf(</text:span><text:span text:style-name="T323">"Algum erro ocorreu na criação das threads!\n"</text:span><text:span text:style-name="T324">);</text:span></text:p>
      <text:p text:style-name="P325"><text:span text:style-name="T326"><text:s text:c="6"/></text:span><text:span text:style-name="T327">exit(1);</text:span></text:p>
      <text:p text:style-name="P328"><text:s text:c="3"/>}</text:p>
      <text:p text:style-name="P329"><text:span text:style-name="T330"><text:s text:c="3"/></text:span><text:span text:style-name="T331">if</text:span><text:span text:style-name="T332">(pthread_create (&amp;thj,<text:s/></text:span><text:span text:style-name="T333">NULL</text:span><text:span text:style-name="T334">, cria, (</text:span><text:span text:style-name="T335">int</text:span><text:span text:style-name="T336">* )1) !=<text:s/></text:span><text:span text:style-name="T337">0){</text:span></text:p>
      <text:p text:style-name="P338"><text:span text:style-name="T339"><text:s text:c="6"/>printf(</text:span><text:span text:style-name="T340">"Algum erro ocorreu na criação das threads!\n"</text:span><text:span text:style-name="T341">);</text:span></text:p>
      <text:p text:style-name="P342"><text:span text:style-name="T343"><text:s text:c="6"/></text:span><text:span text:style-name="T344">exit(1);</text:span></text:p>
      <text:p text:style-name="P345"><text:s text:c="3"/>}</text:p>
      <text:p text:style-name="P346"/>
      <text:p text:style-name="P347"><text:span text:style-name="T348"><text:s text:c="3"/></text:span><text:span text:style-name="T349">//Inicia as threads</text:span></text:p>
      <text:p text:style-name="P350"><text:span text:style-name="T351"><text:s text:c="3"/>pthread_join (thi,<text:s/></text:span><text:span text:style-name="T352">NULL</text:span><text:span text:style-name="T353">);</text:span></text:p>
      <text:p text:style-name="P354"><text:span text:style-name="T355"><text:s text:c="3"/>pthread_join (thj,<text:s/></text:span><text:span text:style-name="T356">NULL</text:span><text:span text:style-name="T357">);</text:span></text:p>
      <text:p text:style-name="P358"/>
      <text:p text:style-name="P359"><text:span text:style-name="T360"><text:s text:c="3"/></text:span><text:span text:style-name="T361">return</text:span><text:span text:style-name="T362"><text:s/>0;</text:span></text:p>
      <text:p text:style-name="P363">}</text:p>
      <text:list text:style-name="LFO7" text:continue-numbering="true">
        <text:list-item>
          <text:list>
            <text:list-item>
              <text:list>
                <text:list-item>
                  <text:p text:style-name="P364">Implementação de Locks "Test and Set" e Solução de Peterson em Hardware</text:p>
                </text:list-item>
              </text:list>
            </text:list-item>
          </text:list>
        </text:list-item>
      </text:list>
      <text:p text:style-name="P365"><text:span text:style-name="T366">Para realizar esta atividade foram usados como base o material disponibilizado pelo professor e também uma breve descrição das funções atomic_flag_test_and_set e atomic_flag_clear, apresentadas em uma homepage<text:s/></text:span><text:span text:style-name="T367"><text:bookmark-ref text:ref-name="_Ref151323378" text:reference-format="text">[4</text:bookmark-ref></text:span><text:span text:style-name="T368"><text:bookmark-ref text:ref-name="_Ref151323379" text:reference-format="text">, 5]</text:bookmark-ref></text:span><text:span text:style-name="T369">.</text:span></text:p>
      <text:p text:style-name="P370">Código trabalhado atomic.c</text:p>
      <text:p text:style-name="P371"><text:span text:style-name="T372">#include</text:span><text:span text:style-name="T373"><text:s/></text:span><text:span text:style-name="T374">&lt;stdio.h&gt;</text:span></text:p>
      <text:p text:style-name="P375"><text:span text:style-name="T376">#include</text:span><text:span text:style-name="T377"><text:s/></text:span><text:span text:style-name="T378">&lt;stdlib.h&gt;</text:span></text:p>
      <text:p text:style-name="P379"><text:span text:style-name="T380">#include</text:span><text:span text:style-name="T381"><text:s/></text:span><text:span text:style-name="T382">&lt;pthread.h&gt;</text:span></text:p>
      <text:p text:style-name="P383"><text:span text:style-name="T384">#include</text:span><text:span text:style-name="T385"><text:s/></text:span><text:span text:style-name="T386">&lt;stdatomic.h&gt;</text:span><text:span text:style-name="T387"><text:s text:c="2"/></text:span><text:span text:style-name="T388">//Biblioteca atomic</text:span></text:p>
      <text:p text:style-name="P389"><text:span text:style-name="T390">int</text:span><text:span text:style-name="T391"><text:s/>counter;</text:span></text:p>
      <text:p text:style-name="P392"><text:span text:style-name="T393">atomic_flag</text:span><text:span text:style-name="T394"><text:s/>lock =<text:s/></text:span><text:span text:style-name="T395">ATOMIC_FLAG_INIT</text:span><text:span text:style-name="T396">; <text:s/></text:span><text:span text:style-name="T397">//Variável atômica</text:span></text:p>
      <text:p text:style-name="P398"/>
      <text:p text:style-name="P399"><text:span text:style-name="T400">void</text:span><text:span text:style-name="T401"><text:s/>enterSC(</text:span><text:span text:style-name="T402">int</text:span><text:span text:style-name="T403"><text:s/></text:span><text:span text:style-name="T404">i</text:span><text:span text:style-name="T405">) {</text:span></text:p>
      <text:p text:style-name="P406"><text:span text:style-name="T407"><text:s text:c="4"/></text:span><text:span text:style-name="T408">while</text:span><text:span text:style-name="T409"><text:s/>(</text:span><text:span text:style-name="T410">atomic_flag_test_and_set</text:span><text:span text:style-name="T411">(&amp;lock));<text:s/></text:span><text:span text:style-name="T412">//Laço para travar a SC</text:span></text:p>
      <text:p text:style-name="P413"><text:span text:style-name="T414"><text:s text:c="4"/></text:span><text:span text:style-name="T415">return</text:span><text:span text:style-name="T416">;</text:span></text:p>
      <text:p text:style-name="P417">}</text:p>
      <text:p text:style-name="P418"/>
      <text:p text:style-name="P419"><text:span text:style-name="T420">void</text:span><text:span text:style-name="T421"><text:s/>leaveSC(</text:span><text:span text:style-name="T422">int</text:span><text:span text:style-name="T423"><text:s/></text:span><text:span text:style-name="T424">i</text:span><text:span text:style-name="T425">) {</text:span></text:p>
      <text:p text:style-name="P426"><text:span text:style-name="T427"><text:s text:c="4"/></text:span><text:span text:style-name="T428">atomic_flag_clear</text:span><text:span text:style-name="T429">(&amp;lock);<text:s/></text:span><text:span text:style-name="T430">//Libera a seção crítica</text:span></text:p>
      <text:p text:style-name="P431"><text:span text:style-name="T432"><text:s text:c="4"/></text:span><text:span text:style-name="T433">return</text:span><text:span text:style-name="T434">;</text:span></text:p>
      <text:p text:style-name="P435">}</text:p>
      <text:p text:style-name="P436"/>
      <text:p text:style-name="P437"><text:span text:style-name="T438">void</text:span><text:span text:style-name="T439">* cria(</text:span><text:span text:style-name="T440">void</text:span><text:span text:style-name="T441">*<text:s/></text:span><text:span text:style-name="T442">arg</text:span><text:span text:style-name="T443">) {<text:s/></text:span><text:span text:style-name="T444">//Função para a thread</text:span></text:p>
      <text:p text:style-name="P445"><text:span text:style-name="T446"><text:s text:c="4"/></text:span><text:span text:style-name="T447">int</text:span><text:span text:style-name="T448"><text:s/>aux = (</text:span><text:span text:style-name="T449">int</text:span><text:span text:style-name="T450">*)</text:span><text:span text:style-name="T451">arg</text:span><text:span text:style-name="T452">, i = 0; <text:s/></text:span><text:span text:style-name="T453">//Pegar o índice da thread</text:span></text:p>
      <text:p text:style-name="P454"><text:span text:style-name="T455"><text:s text:c="4"/>enterSC(aux); <text:s/></text:span><text:span text:style-name="T456">//Chamada da função para entrar na seção crítica</text:span></text:p>
      <text:p text:style-name="P457"><text:span text:style-name="T458"><text:s text:c="4"/>printf(</text:span><text:span text:style-name="T459">"\nP%d: A região crítica é minha!!!\n"</text:span><text:span text:style-name="T460">, aux);</text:span></text:p>
      <text:p text:style-name="P461"><text:span text:style-name="T462"><text:s text:c="4"/></text:span><text:span text:style-name="T463">counter++;</text:span></text:p>
      <text:p text:style-name="P464"><text:span text:style-name="T465"><text:s text:c="4"/>printf(</text:span><text:span text:style-name="T466">"\n\nP%d: counter = %d\n\n"</text:span><text:span text:style-name="T467">, aux, counter);</text:span></text:p>
      <text:p text:style-name="P468"><text:span text:style-name="T469"><text:s text:c="4"/></text:span><text:span text:style-name="T470">leaveSC(aux); <text:s/></text:span><text:span text:style-name="T471">//Função para sair da seção crítica</text:span></text:p>
      <text:p text:style-name="P472"><text:span text:style-name="T473"><text:s text:c="4"/></text:span><text:span text:style-name="T474">return</text:span><text:span text:style-name="T475"><text:s/></text:span><text:span text:style-name="T476">NULL</text:span><text:span text:style-name="T477">;</text:span></text:p>
      <text:p text:style-name="P478">}</text:p>
      <text:p text:style-name="P479"/>
      <text:p text:style-name="P480"><text:span text:style-name="T481">int</text:span><text:span text:style-name="T482"><text:s/>main(</text:span><text:span text:style-name="T483">void</text:span><text:span text:style-name="T484">) {</text:span></text:p>
      <text:p text:style-name="P485"><text:span text:style-name="T486"><text:s text:c="4"/></text:span><text:span text:style-name="T487">pthread_t thi, thj;<text:s/></text:span><text:span text:style-name="T488">//Duas variáveis para a criação das threads</text:span></text:p>
      <text:p text:style-name="P489"/>
      <text:p text:style-name="P490"><text:span text:style-name="T491"><text:s text:c="4"/></text:span><text:span text:style-name="T492">//Verifica se a thread foi criada corretamente</text:span></text:p>
      <text:p text:style-name="P493"><text:span text:style-name="T494"><text:s text:c="4"/></text:span><text:span text:style-name="T495">if</text:span><text:span text:style-name="T496"><text:s/>(pthread_create(&amp;thi,<text:s/></text:span><text:span text:style-name="T497">NULL</text:span><text:span text:style-name="T498">, cria, (</text:span><text:span text:style-name="T499">int</text:span><text:span text:style-name="T500">*)0) !=<text:s/></text:span><text:span text:style-name="T501">0) {</text:span></text:p>
      <text:p text:style-name="P502"><text:span text:style-name="T503"><text:s text:c="8"/>printf(</text:span><text:span text:style-name="T504">"Algum erro ocorreu na criação das threads!\n"</text:span><text:span text:style-name="T505">);</text:span></text:p>
      <text:p text:style-name="P506"><text:s text:c="8"/>exit(1);</text:p>
      <text:p text:style-name="P507"><text:s text:c="4"/>}</text:p>
      <text:p text:style-name="P508"/>
      <text:p text:style-name="P509"><text:span text:style-name="T510"><text:s text:c="4"/></text:span><text:span text:style-name="T511">//Verifica se a thread foi criada corretamente</text:span></text:p>
      <text:p text:style-name="P512"><text:span text:style-name="T513"><text:s text:c="4"/></text:span><text:span text:style-name="T514">if</text:span><text:span text:style-name="T515"><text:s/>(pthread_create(&amp;thj,<text:s/></text:span><text:span text:style-name="T516">NULL</text:span><text:span text:style-name="T517">, cria, (</text:span><text:span text:style-name="T518">int</text:span><text:span text:style-name="T519">*)1) !=<text:s/></text:span><text:span text:style-name="T520">0) {</text:span></text:p>
      <text:p text:style-name="P521"><text:span text:style-name="T522"><text:s text:c="8"/>printf(</text:span><text:span text:style-name="T523">"Algum erro ocorreu na criação das threads!\n"</text:span><text:span text:style-name="T524">);</text:span></text:p>
      <text:p text:style-name="P525"><text:span text:style-name="T526"><text:s text:c="8"/></text:span><text:span text:style-name="T527">exit(1);</text:span></text:p>
      <text:p text:style-name="P528"><text:s text:c="4"/>}</text:p>
      <text:p text:style-name="P529"/>
      <text:p text:style-name="P530"><text:span text:style-name="T531"><text:s text:c="4"/></text:span><text:span text:style-name="T532">//Inicia as threads</text:span></text:p>
      <text:p text:style-name="P533"><text:span text:style-name="T534"><text:s text:c="4"/>pthread_join(thi,<text:s/></text:span><text:span text:style-name="T535">NULL</text:span><text:span text:style-name="T536">);</text:span></text:p>
      <text:p text:style-name="P537"><text:span text:style-name="T538"><text:s text:c="4"/>pthread_join(thj,<text:s/></text:span><text:span text:style-name="T539">NULL</text:span><text:span text:style-name="T540">);</text:span></text:p>
      <text:p text:style-name="P541"><text:span text:style-name="T542"><text:s text:c="4"/></text:span><text:span text:style-name="T543">return</text:span><text:span text:style-name="T544"><text:s/>0;</text:span></text:p>
      <text:p text:style-name="P545">}</text:p>
      <text:list text:style-name="LFO7" text:continue-numbering="true">
        <text:list-item>
          <text:list>
            <text:list-item>
              <text:list>
                <text:list-item>
                  <text:p text:style-name="P546">Solução de hardware usando locks do tipo mutex</text:p>
                </text:list-item>
              </text:list>
            </text:list-item>
          </text:list>
        </text:list-item>
      </text:list>
      <text:p text:style-name="P547">Para solucionar o problema proposto foi usado como base o material disponibilizado pelo professor (slides) do google classroom.</text:p>
      <text:p text:style-name="P548">Código trabalhado mutex.c</text:p>
      <text:p text:style-name="P549"/>
      <text:p text:style-name="P550"><text:span text:style-name="T551">#include</text:span><text:span text:style-name="T552"><text:s/></text:span><text:span text:style-name="T553">&lt;stdio.h&gt;</text:span></text:p>
      <text:p text:style-name="P554"><text:span text:style-name="T555">#include</text:span><text:span text:style-name="T556"><text:s/></text:span><text:span text:style-name="T557">&lt;stdlib.h&gt;</text:span></text:p>
      <text:p text:style-name="P558"><text:span text:style-name="T559">#include</text:span><text:span text:style-name="T560"><text:s/></text:span><text:span text:style-name="T561">&lt;pthread.h&gt;</text:span></text:p>
      <text:p text:style-name="P562"/>
      <text:p text:style-name="P563"><text:span text:style-name="T564">pthread_mutex_t lock;<text:s/></text:span><text:span text:style-name="T565">//Variável para travamento da SC</text:span></text:p>
      <text:p text:style-name="P566"><text:span text:style-name="T567">int</text:span><text:span text:style-name="T568"><text:s/>counter = 0; <text:s/></text:span><text:span text:style-name="T569">//Contador</text:span></text:p>
      <text:p text:style-name="P570"/>
      <text:p text:style-name="P571"><text:span text:style-name="T572">void</text:span><text:span text:style-name="T573"><text:s/>enterSC() {</text:span></text:p>
      <text:p text:style-name="P574"><text:span text:style-name="T575"><text:s text:c="4"/></text:span><text:span text:style-name="T576">pthread_mutex_lock(&amp;lock);<text:s/></text:span><text:span text:style-name="T577">//Trava a seção crítica pela variável lock</text:span></text:p>
      <text:p text:style-name="P578"><text:span text:style-name="T579"><text:s text:c="4"/></text:span><text:span text:style-name="T580">return</text:span><text:span text:style-name="T581">;</text:span></text:p>
      <text:p text:style-name="P582">}</text:p>
      <text:p text:style-name="P583"/>
      <text:p text:style-name="P584"><text:span text:style-name="T585">void</text:span><text:span text:style-name="T586"><text:s/>leaveSC() {</text:span></text:p>
      <text:p text:style-name="P587"><text:span text:style-name="T588"><text:s text:c="4"/>pthread_mutex_unlock(&amp;lock); <text:s/></text:span><text:span text:style-name="T589">//Libera a SC pela variável lock</text:span></text:p>
      <text:p text:style-name="P590"><text:span text:style-name="T591"><text:s text:c="4"/></text:span><text:span text:style-name="T592">return</text:span><text:span text:style-name="T593">;</text:span></text:p>
      <text:p text:style-name="P594">}</text:p>
      <text:p text:style-name="P595"/>
      <text:p text:style-name="P596"><text:span text:style-name="T597">void</text:span><text:span text:style-name="T598">* cria(</text:span><text:span text:style-name="T599">void</text:span><text:span text:style-name="T600">* arg) {</text:span></text:p>
      <text:p text:style-name="P601"><text:span text:style-name="T602"><text:s text:c="4"/></text:span><text:span text:style-name="T603">int</text:span><text:span text:style-name="T604"><text:s/>aux = (</text:span><text:span text:style-name="T605">int</text:span><text:span text:style-name="T606">*)arg, i = 0; <text:s/></text:span><text:span text:style-name="T607">//Pegar o índice da thread</text:span></text:p>
      <text:p text:style-name="P608"><text:span text:style-name="T609"><text:s text:c="4"/>enterSC(); <text:s/></text:span><text:span text:style-name="T610">//Chamada da função para entrar na seção crítica</text:span></text:p>
      <text:p text:style-name="P611"><text:span text:style-name="T612"><text:s text:c="4"/>printf(</text:span><text:span text:style-name="T613">"\nP%d: A região crítica é minha!!!\n"</text:span><text:span text:style-name="T614">, aux);</text:span></text:p>
      <text:p text:style-name="P615"><text:span text:style-name="T616"><text:s text:c="4"/></text:span><text:span text:style-name="T617">counter++;</text:span></text:p>
      <text:p text:style-name="P618"><text:span text:style-name="T619"><text:s text:c="4"/>printf(</text:span><text:span text:style-name="T620">"\n\nP%d: counter = %d\n\n"</text:span><text:span text:style-name="T621">, aux, counter);</text:span></text:p>
      <text:p text:style-name="P622"><text:span text:style-name="T623"><text:s text:c="4"/></text:span><text:span text:style-name="T624">leaveSC(); <text:s/></text:span><text:span text:style-name="T625">//Função para sair da seção crítica</text:span></text:p>
      <text:p text:style-name="P626"><text:span text:style-name="T627"><text:s text:c="4"/></text:span><text:span text:style-name="T628">return</text:span><text:span text:style-name="T629"><text:s/>NULL;</text:span></text:p>
      <text:p text:style-name="P630">}</text:p>
      <text:p text:style-name="P631"/>
      <text:p text:style-name="P632"><text:span text:style-name="T633">int</text:span><text:span text:style-name="T634"><text:s/>main(</text:span><text:span text:style-name="T635">void</text:span><text:span text:style-name="T636">) {</text:span></text:p>
      <text:p text:style-name="P637"><text:span text:style-name="T638"><text:s text:c="4"/></text:span><text:span text:style-name="T639">pthread_t thi, thj;<text:s/></text:span><text:span text:style-name="T640">//Duas variáveis para a criação das threads</text:span></text:p>
      <text:p text:style-name="P641"/>
      <text:p text:style-name="P642"><text:span text:style-name="T643"><text:s text:c="4"/></text:span><text:span text:style-name="T644">//Verifica se a thread foi criada corretamente</text:span></text:p>
      <text:p text:style-name="P645"><text:span text:style-name="T646"><text:s text:c="4"/></text:span><text:span text:style-name="T647">if</text:span><text:span text:style-name="T648"><text:s/>(pthread_create(&amp;thi, NULL, cria, (</text:span><text:span text:style-name="T649">int</text:span><text:span text:style-name="T650">*)0) !=<text:s/></text:span><text:span text:style-name="T651">0) {</text:span></text:p>
      <text:p text:style-name="P652"><text:span text:style-name="T653"><text:s text:c="8"/>printf(</text:span><text:span text:style-name="T654">"Algum erro ocorreu na criação das threads!\n"</text:span><text:span text:style-name="T655">);</text:span></text:p>
      <text:p text:style-name="P656"><text:span text:style-name="T657"><text:s text:c="8"/></text:span><text:span text:style-name="T658">exit(1);</text:span></text:p>
      <text:p text:style-name="P659"><text:s text:c="4"/>}</text:p>
      <text:p text:style-name="P660"/>
      <text:p text:style-name="P661"><text:span text:style-name="T662"><text:s text:c="4"/></text:span><text:span text:style-name="T663">if</text:span><text:span text:style-name="T664"><text:s/>(pthread_create(&amp;thj, NULL, cria, (</text:span><text:span text:style-name="T665">int</text:span><text:span text:style-name="T666">*)1) !=<text:s/></text:span><text:span text:style-name="T667">0) {</text:span></text:p>
      <text:p text:style-name="P668"><text:span text:style-name="T669"><text:s text:c="8"/>printf(</text:span><text:span text:style-name="T670">"Algum erro ocorreu na criação das threads!\n"</text:span><text:span text:style-name="T671">);</text:span></text:p>
      <text:p text:style-name="P672"><text:span text:style-name="T673"><text:s text:c="8"/></text:span><text:span text:style-name="T674">exit(1);</text:span></text:p>
      <text:p text:style-name="P675"><text:s text:c="4"/>}</text:p>
      <text:p text:style-name="P676"/>
      <text:p text:style-name="P677"><text:span text:style-name="T678"><text:s text:c="4"/></text:span><text:span text:style-name="T679">//Inicia as threads</text:span></text:p>
      <text:p text:style-name="P680"><text:s text:c="4"/>pthread_join(thi, NULL);</text:p>
      <text:p text:style-name="P681"><text:s text:c="4"/>pthread_join(thj, NULL);</text:p>
      <text:p text:style-name="P682"/>
      <text:p text:style-name="P683"><text:span text:style-name="T684"><text:s text:c="4"/></text:span><text:span text:style-name="T685">return</text:span><text:span text:style-name="T686"><text:s/>0;</text:span></text:p>
      <text:p text:style-name="P687">}</text:p>
      <text:list text:style-name="LFO7" text:continue-numbering="true">
        <text:list-item>
          <text:list>
            <text:list-item>
              <text:list>
                <text:list-item>
                  <text:p text:style-name="P688">Solução de hardware usando semáforo</text:p>
                </text:list-item>
              </text:list>
            </text:list-item>
          </text:list>
        </text:list-item>
      </text:list>
      <text:p text:style-name="P689"><text:bookmark-start text:name="_Hlk151928324"/><text:span text:style-name="T690">Para a conclusão<text:s/></text:span><text:bookmark-end text:name="_Hlk151928324"/><text:span text:style-name="T691">dessa tarefa, recorri ao conteúdo fornecido pelo instrutor, incluindo os slides da disciplina de SO1. Além disso, consultei uma descrição das funções de semáforo disponíveis em uma fonte online<text:s/></text:span><text:span text:style-name="T692"><text:bookmark-ref text:ref-name="_Ref151324125" text:reference-format="text">[6, </text:bookmark-ref></text:span><text:span text:style-name="T693"><text:bookmark-ref text:ref-name="_Ref151324127" text:reference-format="text">7,</text:bookmark-ref></text:span><text:span text:style-name="T694"><text:s/></text:span><text:span text:style-name="T695"><text:bookmark-ref text:ref-name="_Ref151324128" text:reference-format="text">8, </text:bookmark-ref></text:span><text:span text:style-name="T696"><text:bookmark-ref text:ref-name="_Ref151324129" text:reference-format="text">9]</text:bookmark-ref></text:span><text:span text:style-name="T697">.</text:span></text:p>
      <text:p text:style-name="P698">Código trabalhado semaphore.c</text:p>
      <text:p text:style-name="P699"><text:span text:style-name="T700">#include</text:span><text:span text:style-name="T701"><text:s/></text:span><text:span text:style-name="T702">&lt;stdio.h&gt;</text:span></text:p>
      <text:p text:style-name="P703"><text:span text:style-name="T704">#include</text:span><text:span text:style-name="T705"><text:s/></text:span><text:span text:style-name="T706">&lt;stdlib.h&gt;</text:span></text:p>
      <text:p text:style-name="P707"><text:span text:style-name="T708">#include</text:span><text:span text:style-name="T709"><text:s/></text:span><text:span text:style-name="T710">&lt;pthread.h&gt;</text:span></text:p>
      <text:p text:style-name="P711"><text:span text:style-name="T712">#include</text:span><text:span text:style-name="T713"><text:s/></text:span><text:span text:style-name="T714">&lt;semaphore.h&gt;</text:span><text:span text:style-name="T715"><text:s text:c="2"/></text:span><text:span text:style-name="T716">//Bilbioteca para o uso de semáforos</text:span></text:p>
      <text:p text:style-name="P717"><text:span text:style-name="T718">sem_t semaphore; <text:s/></text:span><text:span text:style-name="T719">//Variável de semáforo</text:span></text:p>
      <text:p text:style-name="P720"><text:span text:style-name="T721">int</text:span><text:span text:style-name="T722"><text:s/>counter = 0;</text:span></text:p>
      <text:p text:style-name="P723"/>
      <text:p text:style-name="P724"><text:span text:style-name="T725">void</text:span><text:span text:style-name="T726"><text:s/>enterSC() { <text:s/></text:span><text:span text:style-name="T727">//Função para controlar entrada na seção crítica</text:span></text:p>
      <text:p text:style-name="P728"><text:span text:style-name="T729"><text:s text:c="4"/>sem_wait(&amp;semaphore);<text:s/></text:span><text:span text:style-name="T730">//Para fazer o lock do semáforo</text:span></text:p>
      <text:p text:style-name="P731"><text:span text:style-name="T732"><text:s text:c="4"/></text:span><text:span text:style-name="T733">return</text:span><text:span text:style-name="T734">;</text:span></text:p>
      <text:p text:style-name="P735">}</text:p>
      <text:p text:style-name="P736"/>
      <text:p text:style-name="P737"><text:span text:style-name="T738">void</text:span><text:span text:style-name="T739"><text:s/>leaveSC() { <text:s/></text:span><text:span text:style-name="T740">//Função para sair da seção crítica</text:span></text:p>
      <text:p text:style-name="P741"><text:span text:style-name="T742"><text:s text:c="4"/>sem_post(&amp;semaphore);<text:s/></text:span><text:span text:style-name="T743">//Função que libera o semáforo</text:span></text:p>
      <text:p text:style-name="P744"><text:span text:style-name="T745"><text:s text:c="4"/></text:span><text:span text:style-name="T746">return</text:span><text:span text:style-name="T747">;</text:span></text:p>
      <text:p text:style-name="P748">}</text:p>
      <text:p text:style-name="P749"/>
      <text:p text:style-name="P750"><text:span text:style-name="T751">void</text:span><text:span text:style-name="T752">* cria(</text:span><text:span text:style-name="T753">void</text:span><text:span text:style-name="T754">*<text:s/></text:span><text:span text:style-name="T755">arg</text:span><text:span text:style-name="T756">) { <text:s/></text:span><text:span text:style-name="T757">//Função para a thread</text:span></text:p>
      <text:p text:style-name="P758"><text:span text:style-name="T759"><text:s text:c="4"/></text:span><text:span text:style-name="T760">int</text:span><text:span text:style-name="T761"><text:s/>aux = (</text:span><text:span text:style-name="T762">int</text:span><text:span text:style-name="T763">*)</text:span><text:span text:style-name="T764">arg</text:span><text:span text:style-name="T765">, i = 0; <text:s/></text:span><text:span text:style-name="T766">//Pegar o índice da thread</text:span></text:p>
      <text:p text:style-name="P767"><text:span text:style-name="T768"><text:s text:c="4"/>enterSC(); <text:s/></text:span><text:span text:style-name="T769">//Chamada da função para entrar na seção crítica</text:span></text:p>
      <text:p text:style-name="P770"><text:span text:style-name="T771"><text:s text:c="4"/>printf(</text:span><text:span text:style-name="T772">"\nP%d: A região crítica é minha!!!\n"</text:span><text:span text:style-name="T773">, aux);</text:span></text:p>
      <text:p text:style-name="P774"><text:span text:style-name="T775"><text:s text:c="4"/></text:span><text:span text:style-name="T776">counter++;</text:span></text:p>
      <text:p text:style-name="P777"><text:span text:style-name="T778"><text:s text:c="4"/>printf(</text:span><text:span text:style-name="T779">"\n\nP%d: counter = %d\n\n"</text:span><text:span text:style-name="T780">, aux, counter);</text:span></text:p>
      <text:p text:style-name="P781"><text:span text:style-name="T782"><text:s text:c="4"/></text:span><text:span text:style-name="T783">leaveSC(); <text:s/></text:span><text:span text:style-name="T784">//Função para sair da seção crítica</text:span></text:p>
      <text:p text:style-name="P785"><text:span text:style-name="T786"><text:s text:c="4"/></text:span><text:span text:style-name="T787">return</text:span><text:span text:style-name="T788"><text:s/></text:span><text:span text:style-name="T789">NULL</text:span><text:span text:style-name="T790">;</text:span></text:p>
      <text:p text:style-name="P791">}</text:p>
      <text:p text:style-name="P792"/>
      <text:p text:style-name="P793"><text:span text:style-name="T794">int</text:span><text:span text:style-name="T795"><text:s/>main(</text:span><text:span text:style-name="T796">void</text:span><text:span text:style-name="T797">) {</text:span></text:p>
      <text:p text:style-name="P798"><text:span text:style-name="T799"><text:s text:c="4"/></text:span><text:span text:style-name="T800">pthread_t thi, thj;<text:s/></text:span><text:span text:style-name="T801">//Duas variáveis para a criação das threads</text:span></text:p>
      <text:p text:style-name="P802"><text:span text:style-name="T803"><text:s text:c="4"/>sem_init(&amp;semaphore, 0, 1);<text:s/></text:span><text:span text:style-name="T804">//Função inicializar a var. de semáforo</text:span></text:p>
      <text:p text:style-name="P805"/>
      <text:p text:style-name="P806"><text:span text:style-name="T807"><text:s text:c="4"/></text:span><text:span text:style-name="T808">//Verifica se a thread foi criada corretamente</text:span></text:p>
      <text:p text:style-name="P809"><text:span text:style-name="T810"><text:s text:c="4"/></text:span><text:span text:style-name="T811">if</text:span><text:span text:style-name="T812"><text:s/>(pthread_create(&amp;thi,<text:s/></text:span><text:span text:style-name="T813">NULL</text:span><text:span text:style-name="T814">, cria, (</text:span><text:span text:style-name="T815">int</text:span><text:span text:style-name="T816">*)0) !=<text:s/></text:span><text:span text:style-name="T817">0) {</text:span></text:p>
      <text:p text:style-name="P818"><text:span text:style-name="T819"><text:s text:c="8"/>printf(</text:span><text:span text:style-name="T820">"Algum erro ocorreu na criação das threads!\n"</text:span><text:span text:style-name="T821">);</text:span></text:p>
      <text:p text:style-name="P822"><text:span text:style-name="T823"><text:s text:c="8"/></text:span><text:span text:style-name="T824">exit(1);</text:span></text:p>
      <text:p text:style-name="P825"><text:s text:c="4"/>}</text:p>
      <text:p text:style-name="P826"><text:span text:style-name="T827"><text:s text:c="4"/></text:span><text:span text:style-name="T828">if</text:span><text:span text:style-name="T829"><text:s/>(pthread_create(&amp;thj,<text:s/></text:span><text:span text:style-name="T830">NULL</text:span><text:span text:style-name="T831">, cria, (</text:span><text:span text:style-name="T832">int</text:span><text:span text:style-name="T833">*)1) !=<text:s/></text:span><text:span text:style-name="T834">0) {</text:span></text:p>
      <text:p text:style-name="P835"><text:span text:style-name="T836"><text:s text:c="8"/>printf(</text:span><text:span text:style-name="T837">"Algum erro ocorreu na criação das threads!\n"</text:span><text:span text:style-name="T838">);</text:span></text:p>
      <text:p text:style-name="P839"><text:span text:style-name="T840"><text:s text:c="8"/></text:span><text:span text:style-name="T841">exit(1);</text:span></text:p>
      <text:p text:style-name="P842"><text:s text:c="4"/>}</text:p>
      <text:p text:style-name="P843"/>
      <text:p text:style-name="P844"><text:span text:style-name="T845"><text:s text:c="4"/></text:span><text:span text:style-name="T846">//Inicia as threads</text:span></text:p>
      <text:p text:style-name="P847"><text:span text:style-name="T848"><text:s text:c="4"/>pthread_join(thi,<text:s/></text:span><text:span text:style-name="T849">NULL</text:span><text:span text:style-name="T850">);</text:span></text:p>
      <text:p text:style-name="P851"><text:span text:style-name="T852"><text:s text:c="4"/></text:span><text:span text:style-name="T853">pthread_join(thj,<text:s/></text:span><text:span text:style-name="T854">NULL</text:span><text:span text:style-name="T855">);</text:span></text:p>
      <text:p text:style-name="P856"/>
      <text:p text:style-name="P857"><text:span text:style-name="T858"><text:s text:c="4"/></text:span><text:span text:style-name="T859">//Destrói a variável do semáforo ao fim do programa</text:span></text:p>
      <text:p text:style-name="P860"><text:s text:c="4"/>sem_destroy(&amp;semaphore);</text:p>
      <text:p text:style-name="P861"><text:span text:style-name="T862"><text:s text:c="4"/></text:span><text:span text:style-name="T863">return</text:span><text:span text:style-name="T864"><text:s/>0;</text:span></text:p>
      <text:p text:style-name="P865">}</text:p>
      <text:list text:style-name="LFO7" text:continue-numbering="true">
        <text:list-item>
          <text:p text:style-name="P866">Tarefa 3</text:p>
        </text:list-item>
      </text:list>
      <text:p text:style-name="P867"><text:bookmark-start text:name="_Hlk151928346"/><text:span text:style-name="T868">Para resolver esta tarefa, utilizei a abordagem de semáforos discutida na seção 2.1.4 como referência. Na prática, desenvolvi uma simulação na qual dois processos são executados de maneira simultânea. Porém devido alguns problemas com o codigo, tive que utilizar a biblioteca<text:s/></text:span><text:span text:style-name="T869">stdint</text:span><text:span text:style-name="T870"><text:s/>para realizar o casting do ponteiro para o tipo inteiro original e<text:s/></text:span><text:span text:style-name="T871">unistd</text:span><text:span text:style-name="T872"><text:s/>para utilização do comando sleep. O processo<text:s/></text:span><draw:frame draw:style-name="a18" text:anchor-type="as-char" svg:x="0in" svg:y="0in" svg:width="0.17708in" svg:height="0.19792in" style:rel-width="scale" style:rel-height="scale"><draw:object xlink:href="Object 1/" xlink:type="simple" xlink:show="embed" xlink:actuate="onLoad"/></draw:frame><text:span text:style-name="T873"><text:s/></text:span><text:span text:style-name="T874">em um determinado momento, solicita o recurso Q, enquanto simultaneamente o processo<text:s/></text:span><draw:frame draw:style-name="a19" text:anchor-type="as-char" svg:x="0in" svg:y="0in" svg:width="0.20833in" svg:height="0.19792in" style:rel-width="scale" style:rel-height="scale"><draw:object xlink:href="Object 2/" xlink:type="simple" xlink:show="embed" xlink:actuate="onLoad"/></draw:frame><text:span text:style-name="T875"><text:s/></text:span><text:span text:style-name="T876">solicita o recurso S. Após essa fase, ambos os processos entram em um estado de espera por 1 segundo (com utilização do sleep). Posteriormente, o processo<text:s/></text:span><draw:frame draw:style-name="a20" text:anchor-type="as-char" svg:x="0in" svg:y="0in" svg:width="0.17708in" svg:height="0.19792in" style:rel-width="scale" style:rel-height="scale"><draw:object xlink:href="Object 3/" xlink:type="simple" xlink:show="embed" xlink:actuate="onLoad"/></draw:frame><text:span text:style-name="T877"><text:s/>solicita o recurso S, enquanto o processo<text:s/></text:span><draw:frame draw:style-name="a21" text:anchor-type="as-char" svg:x="0in" svg:y="0in" svg:width="0.20833in" svg:height="0.19792in" style:rel-width="scale" style:rel-height="scale"><draw:object xlink:href="Object 4/" xlink:type="simple" xlink:show="embed" xlink:actuate="onLoad"/></draw:frame><text:span text:style-name="T878"><text:s/>solicita o recurso Q. Dado que ambos os recursos já estavam previamente alocados, o programa entra em uma situação de impasse (deadlock). O código resultante dessa implementação está apresentado a seguir.</text:span></text:p>
      <text:p text:style-name="P879">Código trabalhado semaphore.c</text:p>
      <text:p text:style-name="P880"><text:span text:style-name="T881">#include</text:span><text:span text:style-name="T882"><text:s/></text:span><text:span text:style-name="T883">&lt;stdio.h&gt;</text:span></text:p>
      <text:p text:style-name="P884"><text:span text:style-name="T885">#include</text:span><text:span text:style-name="T886"><text:s/></text:span><text:span text:style-name="T887">&lt;stdlib.h&gt;</text:span></text:p>
      <text:p text:style-name="P888"><text:span text:style-name="T889">#include</text:span><text:span text:style-name="T890"><text:s/></text:span><text:span text:style-name="T891">&lt;pthread.h&gt;</text:span></text:p>
      <text:p text:style-name="P892"><text:span text:style-name="T893">#include</text:span><text:span text:style-name="T894"><text:s/></text:span><text:span text:style-name="T895">&lt;semaphore.h&gt;</text:span></text:p>
      <text:p text:style-name="P896"><text:span text:style-name="T897">#include</text:span><text:span text:style-name="T898"><text:s/></text:span><text:span text:style-name="T899">&lt;unistd.h&gt;</text:span></text:p>
      <text:p text:style-name="P900"><text:span text:style-name="T901">#include</text:span><text:span text:style-name="T902"><text:s/></text:span><text:span text:style-name="T903">&lt;stdint.h&gt;</text:span></text:p>
      <text:p text:style-name="P904"/>
      <text:p text:style-name="P905"><text:span text:style-name="T906">sem_t semaphore, semaphore2; <text:s/></text:span><text:span text:style-name="T907">//Variáveis do tipo semáforo</text:span></text:p>
      <text:p text:style-name="P908"><text:span text:style-name="T909">int</text:span><text:span text:style-name="T910"><text:s/>counter = 0; <text:s/></text:span><text:span text:style-name="T911">//Variável contadora</text:span></text:p>
      <text:p text:style-name="P912"/>
      <text:p text:style-name="P913"><text:span text:style-name="T914">void</text:span><text:span text:style-name="T915"><text:s/>enterSCQ(</text:span><text:span text:style-name="T916">int</text:span><text:span text:style-name="T917"><text:s/></text:span><text:span text:style-name="T918">i</text:span><text:span text:style-name="T919">){<text:s/></text:span><text:span text:style-name="T920">//Função para pegar o recurso Q</text:span></text:p>
      <text:p text:style-name="P921"><text:s text:c="3"/>sem_wait(&amp;semaphore);</text:p>
      <text:p text:style-name="P922"><text:span text:style-name="T923"><text:s text:c="3"/>printf(</text:span><text:span text:style-name="T924">"O processo %d pegou o recurso Q e aguarda pelo recurso S!!\n"</text:span><text:span text:style-name="T925">,<text:s/></text:span><text:span text:style-name="T926">i</text:span><text:span text:style-name="T927">);</text:span></text:p>
      <text:p text:style-name="P928"><text:span text:style-name="T929"><text:s text:c="3"/></text:span><text:span text:style-name="T930">return</text:span><text:span text:style-name="T931">;</text:span></text:p>
      <text:p text:style-name="P932">}</text:p>
      <text:p text:style-name="P933"/>
      <text:p text:style-name="P934"><text:span text:style-name="T935">void</text:span><text:span text:style-name="T936"><text:s/>leaveSCQ (){</text:span></text:p>
      <text:p text:style-name="P937"><text:s text:c="3"/>sem_post(&amp;semaphore);</text:p>
      <text:p text:style-name="P938"><text:span text:style-name="T939"><text:s text:c="3"/></text:span><text:span text:style-name="T940">return</text:span><text:span text:style-name="T941">;</text:span></text:p>
      <text:p text:style-name="P942">}</text:p>
      <text:p text:style-name="P943"/>
      <text:p text:style-name="P944"><text:span text:style-name="T945">void</text:span><text:span text:style-name="T946"><text:s/>enterSCS(</text:span><text:span text:style-name="T947">int</text:span><text:span text:style-name="T948"><text:s/></text:span><text:span text:style-name="T949">i</text:span><text:span text:style-name="T950">){<text:s/></text:span><text:span text:style-name="T951">//Função para pegar o recurso S</text:span></text:p>
      <text:p text:style-name="P952"><text:s text:c="3"/>sem_wait(&amp;semaphore2);</text:p>
      <text:p text:style-name="P953"><text:span text:style-name="T954"><text:s text:c="3"/>printf(</text:span><text:span text:style-name="T955">"O processo %d pegou o recurso S e aguarda pelo recurso Q!!\n"</text:span><text:span text:style-name="T956">,<text:s/></text:span><text:span text:style-name="T957">i</text:span><text:span text:style-name="T958">);</text:span></text:p>
      <text:p text:style-name="P959"><text:span text:style-name="T960"><text:s text:c="3"/></text:span><text:span text:style-name="T961">return</text:span><text:span text:style-name="T962">;</text:span></text:p>
      <text:p text:style-name="P963">}</text:p>
      <text:p text:style-name="P964"/>
      <text:p text:style-name="P965"><text:span text:style-name="T966">void</text:span><text:span text:style-name="T967"><text:s/>leaveSCS (){</text:span></text:p>
      <text:p text:style-name="P968"><text:s text:c="3"/>sem_post(&amp;semaphore2);</text:p>
      <text:p text:style-name="P969"><text:span text:style-name="T970"><text:s text:c="3"/></text:span><text:span text:style-name="T971">return</text:span><text:span text:style-name="T972">;</text:span></text:p>
      <text:p text:style-name="P973">}</text:p>
      <text:p text:style-name="P974"/>
      <text:p text:style-name="P975"><text:span text:style-name="T976">void</text:span><text:span text:style-name="T977"><text:s/>* pi (</text:span><text:span text:style-name="T978">void</text:span><text:span text:style-name="T979"><text:s/>*</text:span><text:span text:style-name="T980">arg</text:span><text:span text:style-name="T981">){</text:span></text:p>
      <text:p text:style-name="P982"><text:span text:style-name="T983"><text:s text:c="3"/></text:span><text:span text:style-name="T984">intptr_t</text:span><text:span text:style-name="T985"><text:s/>aux = (</text:span><text:span text:style-name="T986">intptr_t</text:span><text:span text:style-name="T987">)</text:span><text:span text:style-name="T988">arg</text:span><text:span text:style-name="T989">;<text:s/></text:span><text:span text:style-name="T990">//Faz cast do ponteiro p/ tipo original</text:span></text:p>
      <text:p text:style-name="P991"><text:span text:style-name="T992"><text:s text:c="3"/>int</text:span><text:span text:style-name="T993"><text:s/>indice = (</text:span><text:span text:style-name="T994">int</text:span><text:span text:style-name="T995">)</text:span><text:span text:style-name="T996">aux</text:span><text:span text:style-name="T997">;<text:s/></text:span><text:span text:style-name="T998">//Faz cast do intptr_t para int</text:span></text:p>
      <text:p text:style-name="P999"><text:span text:style-name="T1000"><text:s text:c="3"/>enterSCS(aux); <text:s/></text:span><text:span text:style-name="T1001">//Tenta alocar o recruso S</text:span></text:p>
      <text:p text:style-name="P1002"><text:s text:c="3"/>sleep(1);</text:p>
      <text:p text:style-name="P1003"><text:span text:style-name="T1004"><text:s text:c="3"/>enterSCQ(aux); <text:s/></text:span><text:span text:style-name="T1005">//Tenta alocar o recurso Q</text:span></text:p>
      <text:p text:style-name="P1006"><text:span text:style-name="T1007"><text:s text:c="3"/>printf(</text:span><text:span text:style-name="T1008">"\nPi: A região crítica é minha!!!\n"</text:span><text:span text:style-name="T1009">);</text:span></text:p>
      <text:p text:style-name="P1010"><text:span text:style-name="T1011"><text:s text:c="3"/></text:span><text:span text:style-name="T1012">counter++;</text:span></text:p>
      <text:p text:style-name="P1013"><text:span text:style-name="T1014"><text:s text:c="3"/>printf(</text:span><text:span text:style-name="T1015">"\n\nPi: counter = %d\n\n"</text:span><text:span text:style-name="T1016">, counter);</text:span></text:p>
      <text:p text:style-name="P1017"><text:span text:style-name="T1018"><text:s text:c="3"/>leaveSCS();</text:span></text:p>
      <text:p text:style-name="P1019"><text:s text:c="3"/>leaveSCQ();</text:p>
      <text:p text:style-name="P1020"><text:span text:style-name="T1021"><text:s text:c="3"/></text:span><text:span text:style-name="T1022">return</text:span><text:span text:style-name="T1023"><text:s/></text:span><text:span text:style-name="T1024">NULL</text:span><text:span text:style-name="T1025">;</text:span></text:p>
      <text:p text:style-name="P1026">}</text:p>
      <text:p text:style-name="P1027"/>
      <text:p text:style-name="P1028"><text:span text:style-name="T1029">void</text:span><text:span text:style-name="T1030"><text:s/>* pj (</text:span><text:span text:style-name="T1031">void</text:span><text:span text:style-name="T1032"><text:s/>*</text:span><text:span text:style-name="T1033">arg</text:span><text:span text:style-name="T1034">){</text:span></text:p>
      <text:p text:style-name="P1035"><text:span text:style-name="T1036"><text:s text:c="3"/></text:span><text:span text:style-name="T1037">intptr_t</text:span><text:span text:style-name="T1038"><text:s/>aux = (</text:span><text:span text:style-name="T1039">intptr_t</text:span><text:span text:style-name="T1040">)</text:span><text:span text:style-name="T1041">arg</text:span><text:span text:style-name="T1042">;<text:s/></text:span><text:span text:style-name="T1043">//Faz cast do ponteiro p/ tipo original</text:span></text:p>
      <text:p text:style-name="P1044"><text:span text:style-name="T1045"><text:s text:c="3"/>int</text:span><text:span text:style-name="T1046"><text:s/>indice = (</text:span><text:span text:style-name="T1047">int</text:span><text:span text:style-name="T1048">)</text:span><text:span text:style-name="T1049">aux</text:span><text:span text:style-name="T1050">;<text:s/></text:span><text:span text:style-name="T1051">//Faz cast do intptr_t para int</text:span></text:p>
      <text:p text:style-name="P1052"><text:span text:style-name="T1053"><text:s text:c="3"/>enterSCQ(aux); <text:s/></text:span><text:span text:style-name="T1054">//Tenta alocar o recruso Q</text:span></text:p>
      <text:p text:style-name="P1055"><text:s text:c="3"/>sleep(1);</text:p>
      <text:p text:style-name="P1056"><text:span text:style-name="T1057"><text:s text:c="3"/>enterSCS(aux); <text:s/></text:span><text:span text:style-name="T1058">//Tenta alocar o recruso S</text:span></text:p>
      <text:p text:style-name="P1059"><text:span text:style-name="T1060"><text:s text:c="3"/>printf(</text:span><text:span text:style-name="T1061">"\nPj: A região crítica é minha!!!\n"</text:span><text:span text:style-name="T1062">);</text:span></text:p>
      <text:p text:style-name="P1063"><text:span text:style-name="T1064"><text:s text:c="3"/></text:span><text:span text:style-name="T1065">counter++;</text:span></text:p>
      <text:p text:style-name="P1066"><text:span text:style-name="T1067"><text:s text:c="3"/>printf(</text:span><text:span text:style-name="T1068">"\n\nPj: counter = %d\n\n"</text:span><text:span text:style-name="T1069">, counter);</text:span></text:p>
      <text:p text:style-name="P1070"><text:s text:c="3"/>leaveSCQ();</text:p>
      <text:p text:style-name="P1071"><text:s text:c="3"/>leaveSCS();</text:p>
      <text:p text:style-name="P1072"><text:span text:style-name="T1073"><text:s text:c="3"/></text:span><text:span text:style-name="T1074">return</text:span><text:span text:style-name="T1075"><text:s/></text:span><text:span text:style-name="T1076">NULL</text:span><text:span text:style-name="T1077">;</text:span></text:p>
      <text:p text:style-name="P1078">}</text:p>
      <text:p text:style-name="P1079"/>
      <text:p text:style-name="P1080"><text:span text:style-name="T1081">int</text:span><text:span text:style-name="T1082"><text:s/>main (</text:span><text:span text:style-name="T1083">void</text:span><text:span text:style-name="T1084">){</text:span></text:p>
      <text:p text:style-name="P1085"><text:span text:style-name="T1086"><text:s text:c="3"/></text:span><text:span text:style-name="T1087">pthread_t thi, thj;<text:s/></text:span><text:span text:style-name="T1088">//Variáveis para a criação de threads</text:span></text:p>
      <text:p text:style-name="P1089"/>
      <text:p text:style-name="P1090"><text:span text:style-name="T1091"><text:s text:c="3"/></text:span><text:span text:style-name="T1092">//Iniciação de semáforos</text:span></text:p>
      <text:p text:style-name="P1093"><text:s text:c="3"/>sem_init(&amp;semaphore, 0, 1);</text:p>
      <text:p text:style-name="P1094"><text:s text:c="3"/>sem_init(&amp;semaphore2, 0, 1);</text:p>
      <text:p text:style-name="P1095"/>
      <text:p text:style-name="P1096"><text:span text:style-name="T1097"><text:s text:c="3"/></text:span><text:span text:style-name="T1098">//Verificação se as threads foram criadas corretamente</text:span></text:p>
      <text:p text:style-name="P1099"><text:span text:style-name="T1100"><text:s text:c="3"/></text:span><text:span text:style-name="T1101">if</text:span><text:span text:style-name="T1102">(pthread_create (&amp;thi,<text:s/></text:span><text:span text:style-name="T1103">NULL</text:span><text:span text:style-name="T1104">, pi, (</text:span><text:span text:style-name="T1105">int</text:span><text:span text:style-name="T1106"><text:s/>*)0) !=<text:s/></text:span><text:span text:style-name="T1107">0){</text:span></text:p>
      <text:p text:style-name="P1108"><text:span text:style-name="T1109"><text:s text:c="6"/>printf(</text:span><text:span text:style-name="T1110">"Algum erro ocorreu na criação das threads!\n"</text:span><text:span text:style-name="T1111">);</text:span></text:p>
      <text:p text:style-name="P1112"><text:span text:style-name="T1113"><text:s text:c="6"/></text:span><text:span text:style-name="T1114">exit(1);</text:span></text:p>
      <text:p text:style-name="P1115"><text:s text:c="3"/>}</text:p>
      <text:p text:style-name="P1116"><text:span text:style-name="T1117"><text:s text:c="3"/></text:span><text:span text:style-name="T1118">if</text:span><text:span text:style-name="T1119">(pthread_create (&amp;thj,<text:s/></text:span><text:span text:style-name="T1120">NULL</text:span><text:span text:style-name="T1121">, pj, (</text:span><text:span text:style-name="T1122">int</text:span><text:span text:style-name="T1123">* )1) !=<text:s/></text:span><text:span text:style-name="T1124">0){</text:span></text:p>
      <text:p text:style-name="P1125"><text:span text:style-name="T1126"><text:s text:c="6"/>printf(</text:span><text:span text:style-name="T1127">"Algum erro ocorreu na criação das threads!\n"</text:span><text:span text:style-name="T1128">);</text:span></text:p>
      <text:p text:style-name="P1129"><text:span text:style-name="T1130"><text:s text:c="6"/></text:span><text:span text:style-name="T1131">exit(1);</text:span></text:p>
      <text:p text:style-name="P1132"><text:s text:c="3"/>}</text:p>
      <text:p text:style-name="P1133"/>
      <text:p text:style-name="P1134"><text:span text:style-name="T1135"><text:s text:c="3"/></text:span><text:span text:style-name="T1136">//Iniciando as threads</text:span></text:p>
      <text:p text:style-name="P1137"><text:span text:style-name="T1138"><text:s text:c="3"/>pthread_join (thi,<text:s/></text:span><text:span text:style-name="T1139">NULL</text:span><text:span text:style-name="T1140">);</text:span></text:p>
      <text:p text:style-name="P1141"><text:span text:style-name="T1142"><text:s text:c="3"/></text:span><text:span text:style-name="T1143">pthread_join (thj,<text:s/></text:span><text:span text:style-name="T1144">NULL</text:span><text:span text:style-name="T1145">);</text:span></text:p>
      <text:p text:style-name="P1146"/>
      <text:p text:style-name="P1147"><text:span text:style-name="T1148"><text:s text:c="3"/></text:span><text:span text:style-name="T1149">//Destruindo os semáforos</text:span></text:p>
      <text:p text:style-name="P1150"><text:s text:c="3"/>sem_destroy(&amp;semaphore);</text:p>
      <text:p text:style-name="P1151"><text:s text:c="3"/>sem_destroy(&amp;semaphore2);</text:p>
      <text:p text:style-name="P1152"/>
      <text:p text:style-name="P1153"><text:span text:style-name="T1154"><text:s text:c="3"/></text:span><text:span text:style-name="T1155">return</text:span><text:span text:style-name="T1156"><text:s/>0;</text:span></text:p>
      <text:p text:style-name="P1157">}</text:p>
      <text:p text:style-name="P1158"/>
      <text:p text:style-name="P1159"><draw:frame draw:style-name="a22" draw:name="Picture 1" text:anchor-type="as-char" svg:x="0in" svg:y="0in" svg:width="5.38542in" svg:height="0.97917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P1160">Figura 18. Deadlock ocorrido</text:p>
      <text:p text:style-name="P1161">O programa está funcionando até certo ponto, mas está preso em um deadlock, o que é consistente com o propósito do código.</text:p>
      <text:p text:style-name="P1162"><text:span text:style-name="T1163">Um deadlock ocorre quando dois ou mais processos não conseguem continuar porque cada um está esperando que o outro libere um recurso. No c</text:span><text:span text:style-name="T1164">ódigo demonstrado,</text:span><text:span text:style-name="T1165"><text:s/>isso acontece quando o processo 0 (pi) bloqueia o recurso S e aguarda pelo recurso Q, enquanto o processo 1 (pj) bloqueia o recurso Q e aguarda pelo recurso S. Como ambos estão aguardando a liberação de recursos pelo outro, eles ficam em um impasse.</text:span></text:p>
      <text:p text:style-name="P1166">Para evitar o deadlock, seria necessário modificar a lógica do código para evitar que dois processos bloqueiem recursos que o outro está esperando. Este é um problema clássico em sistemas concorrentes, e resolvê-lo muitas vezes envolve uma cuidadosa sincronização de recursos.</text:p>
      <text:list text:style-name="LFO7" text:continue-numbering="true">
        <text:list-item>
          <text:p text:style-name="P1167"><text:bookmark-end text:name="_Hlk151928346"/>Tarefa 4</text:p>
        </text:list-item>
      </text:list>
      <text:p text:style-name="P1168">A proposta consiste em fornecer uma implementação do algoritmo conhecido como "jantar dos filósofos" utilizando threads e semáforos. Na abordagem adotada, cada filósofo é associado a um semáforo, e um vetor é utilizado para indicar o status de cada filósofo (Pensando, Faminto, Comendo). Quando um filósofo se encontra no estado "Faminto", ele verifica se os garfos à sua esquerda e direita estão disponíveis. Se estiverem, ele tem a condição de começar a comer; caso contrário, aguarda até que ambos os garfos estejam disponíveis. O código correspondente será apresentado a seguir, e ao ser executado, fornece uma descrição detalhada da situação de cada filósofo e de cada garfo.</text:p>
      <text:p text:style-name="P1169"/>
      <text:p text:style-name="P1170">#include &lt;stdio.h&gt;</text:p>
      <text:p text:style-name="P1171">#include &lt;pthread.h&gt;</text:p>
      <text:p text:style-name="P1172">#include &lt;semaphore.h&gt;</text:p>
      <text:p text:style-name="P1173">#include &lt;unistd.h&gt;</text:p>
      <text:p text:style-name="P1174"/>
      <text:p text:style-name="P1175">#define NUM_FILOSOFOS 5</text:p>
      <text:p text:style-name="P1176"/>
      <text:p text:style-name="P1177">enum { PENSANDO, FAMINTO, COMENDO } estado_filosofo[NUM_FILOSOFOS];</text:p>
      <text:p text:style-name="P1178">sem_t semaforos_filosofos[NUM_FILOSOFOS];</text:p>
      <text:p text:style-name="P1179">sem_t semaforo_mutex;</text:p>
      <text:p text:style-name="P1180"/>
      <text:p text:style-name="P1181">void pensar(int id) {</text:p>
      <text:p text:style-name="P1182"><text:s text:c="4"/>printf("Filósofo %d está pensando.\n", id);</text:p>
      <text:p text:style-name="P1183"><text:span text:style-name="T1184"><text:s text:c="4"/></text:span><text:span text:style-name="T1185">sleep(2);</text:span></text:p>
      <text:p text:style-name="P1186">}</text:p>
      <text:p text:style-name="P1187"/>
      <text:p text:style-name="P1188">void comer(int id) {</text:p>
      <text:p text:style-name="P1189"><text:span text:style-name="T1190"><text:s text:c="4"/></text:span><text:span text:style-name="T1191">printf("Filósofo %d está comendo.\n", id);</text:span></text:p>
      <text:p text:style-name="P1192"><text:span text:style-name="T1193"><text:s text:c="4"/></text:span><text:span text:style-name="T1194">sleep(2);</text:span></text:p>
      <text:p text:style-name="P1195">}</text:p>
      <text:p text:style-name="P1196"/>
      <text:p text:style-name="P1197">void pegar_garfos(int id) {</text:p>
      <text:p text:style-name="P1198"><text:span text:style-name="T1199"><text:s text:c="4"/></text:span><text:span text:style-name="T1200">sem_wait(&amp;semaforo_mutex);</text:span></text:p>
      <text:p text:style-name="P1201"><text:s text:c="4"/>estado_filosofo[id] = FAMINTO;</text:p>
      <text:p text:style-name="P1202"><text:s text:c="4"/>printf("Filósofo %d está faminto.\n", id);</text:p>
      <text:p text:style-name="P1203"><text:s text:c="4"/>sem_post(&amp;semaforo_mutex);</text:p>
      <text:p text:style-name="P1204"/>
      <text:p text:style-name="P1205"><text:s text:c="4"/>sem_wait(&amp;semaforos_filosofos[id]);</text:p>
      <text:p text:style-name="P1206"><text:s text:c="4"/>printf("Filósofo %d pegou os garfos e está comendo.\n", id);</text:p>
      <text:p text:style-name="P1207">}</text:p>
      <text:p text:style-name="P1208"/>
      <text:p text:style-name="P1209">void liberar_garfos(int id) {</text:p>
      <text:p text:style-name="P1210"><text:span text:style-name="T1211"><text:s text:c="4"/></text:span><text:span text:style-name="T1212">sem_wait(&amp;semaforo_mutex);</text:span></text:p>
      <text:p text:style-name="P1213"><text:s text:c="4"/>estado_filosofo[id] = PENSANDO;</text:p>
      <text:p text:style-name="P1214"><text:s text:c="4"/>printf("Filósofo %d terminou de comer e está pensando.\n", id);</text:p>
      <text:p text:style-name="P1215"/>
      <text:p text:style-name="P1216"><text:s text:c="4"/>int filosofo_esquerda = (id + NUM_FILOSOFOS - 1) % NUM_FILOSOFOS;</text:p>
      <text:p text:style-name="P1217"><text:s text:c="4"/>int filosofo_direita = (id + 1) % NUM_FILOSOFOS;</text:p>
      <text:p text:style-name="P1218"/>
      <text:p text:style-name="P1219"><text:s text:c="4"/>if (estado_filosofo[filosofo_esquerda] == FAMINTO &amp;&amp;</text:p>
      <text:p text:style-name="P1220"><text:s text:c="8"/>estado_filosofo[(filosofo_esquerda + NUM_FILOSOFOS - 1) % NUM_FILOSOFOS] != COMENDO) {</text:p>
      <text:p text:style-name="P1221"><text:s text:c="8"/>estado_filosofo[filosofo_esquerda] = COMENDO;</text:p>
      <text:p text:style-name="P1222"><text:s text:c="8"/>sem_post(&amp;semaforos_filosofos[filosofo_esquerda]);</text:p>
      <text:p text:style-name="P1223"><text:s text:c="4"/>}</text:p>
      <text:p text:style-name="P1224"/>
      <text:p text:style-name="P1225"><text:s text:c="4"/>if (estado_filosofo[filosofo_direita] == FAMINTO &amp;&amp;</text:p>
      <text:p text:style-name="P1226"><text:s text:c="8"/>estado_filosofo[(filosofo_direita + NUM_FILOSOFOS - 1) % NUM_FILOSOFOS] != COMENDO) {</text:p>
      <text:p text:style-name="P1227"><text:s text:c="8"/>estado_filosofo[filosofo_direita] = COMENDO;</text:p>
      <text:p text:style-name="P1228"><text:s text:c="8"/>sem_post(&amp;semaforos_filosofos[filosofo_direita]);</text:p>
      <text:p text:style-name="P1229"><text:s text:c="4"/>}</text:p>
      <text:p text:style-name="P1230"/>
      <text:p text:style-name="P1231"><text:s text:c="4"/>sem_post(&amp;semaforo_mutex);</text:p>
      <text:p text:style-name="P1232"><text:s text:c="4"/>printf("Filósofo %d liberou os garfos.\n", id);</text:p>
      <text:p text:style-name="P1233">}</text:p>
      <text:p text:style-name="P1234"/>
      <text:p text:style-name="P1235"/>
      <text:p text:style-name="P1236">void *filosofo(void *arg) {</text:p>
      <text:p text:style-name="P1237"><text:s text:c="4"/>int id = *(int *)arg;</text:p>
      <text:p text:style-name="P1238"/>
      <text:p text:style-name="P1239"><text:s text:c="4"/>while (1) {</text:p>
      <text:p text:style-name="P1240"><text:s text:c="8"/>pensar(id);</text:p>
      <text:p text:style-name="P1241"><text:s text:c="8"/>pegar_garfos(id);</text:p>
      <text:p text:style-name="P1242"><text:s text:c="8"/>comer(id);</text:p>
      <text:p text:style-name="P1243"><text:s text:c="8"/>liberar_garfos(id);</text:p>
      <text:p text:style-name="P1244"><text:s text:c="4"/>}</text:p>
      <text:p text:style-name="P1245"/>
      <text:p text:style-name="P1246"><text:s text:c="4"/>pthread_exit(NULL);</text:p>
      <text:p text:style-name="P1247">}</text:p>
      <text:p text:style-name="P1248"/>
      <text:p text:style-name="P1249">int main() {</text:p>
      <text:p text:style-name="P1250"><text:s text:c="4"/>pthread_t filosofos[NUM_FILOSOFOS];</text:p>
      <text:p text:style-name="P1251"><text:s text:c="4"/>int ids[NUM_FILOSOFOS];</text:p>
      <text:p text:style-name="P1252"/>
      <text:p text:style-name="P1253"><text:s text:c="4"/>sem_init(&amp;semaforo_mutex, 0, 1);</text:p>
      <text:p text:style-name="P1254"/>
      <text:p text:style-name="P1255"><text:s text:c="4"/>for (int i = 0; i &lt; NUM_FILOSOFOS; ++i) {</text:p>
      <text:p text:style-name="P1256"><text:s text:c="8"/>sem_init(&amp;semaforos_filosofos[i], 0, 0);</text:p>
      <text:p text:style-name="P1257"><text:span text:style-name="T1258"><text:s text:c="8"/></text:span><text:span text:style-name="T1259">ids[i] = i;</text:span></text:p>
      <text:p text:style-name="P1260"><text:s text:c="8"/>pthread_create(&amp;filosofos[i], NULL, filosofo, &amp;ids[i]);</text:p>
      <text:p text:style-name="P1261"><text:span text:style-name="T1262"><text:s text:c="4"/></text:span><text:span text:style-name="T1263">}</text:span></text:p>
      <text:p text:style-name="P1264"/>
      <text:p text:style-name="P1265"><text:s text:c="4"/>for (int i = 0; i &lt; NUM_FILOSOFOS; ++i) {</text:p>
      <text:p text:style-name="P1266"><text:span text:style-name="T1267"><text:s text:c="8"/></text:span><text:span text:style-name="T1268">pthread_join(filosofos[i], NULL);</text:span></text:p>
      <text:p text:style-name="P1269"><text:span text:style-name="T1270"><text:s text:c="4"/></text:span><text:span text:style-name="T1271">}</text:span></text:p>
      <text:p text:style-name="P1272"/>
      <text:p text:style-name="P1273"><text:s text:c="4"/>sem_destroy(&amp;semaforo_mutex);</text:p>
      <text:p text:style-name="P1274"/>
      <text:p text:style-name="P1275"><text:s text:c="4"/>for (int i = 0; i &lt; NUM_FILOSOFOS; ++i) {</text:p>
      <text:p text:style-name="P1276"><text:s text:c="8"/>sem_destroy(&amp;semaforos_filosofos[i]);</text:p>
      <text:p text:style-name="P1277"><text:span text:style-name="T1278"><text:s text:c="4"/></text:span><text:span text:style-name="T1279">}</text:span></text:p>
      <text:p text:style-name="P1280"/>
      <text:p text:style-name="P1281"><text:s text:c="4"/>return 0;</text:p>
      <text:p text:style-name="P1282">}</text:p>
      <text:p text:style-name="P1283"/>
      <text:p text:style-name="P1284">Após executar o código, o retorno é seguinte:</text:p>
      <text:p text:style-name="P1285"/>
      <text:list text:style-name="LFO11" text:continue-numbering="true">
        <text:list-item>
          <text:p text:style-name="P1286"><text:span text:style-name="T1287">Inicialização</text:span><text:span text:style-name="T1288">: cada filósofo começa pensando, indicado pela mensagem "Filósofo X está pensando", onde X é o número do filósofo.</text:span></text:p>
        </text:list-item>
        <text:list-item>
          <text:p text:style-name="P1289"><text:span text:style-name="T1290">Faminto</text:span><text:span text:style-name="T1291">: Em algum ponto, todos os filósofos decidem que estão famintos, indicado pela mensagem "Filósofo X está faminto".</text:span></text:p>
        </text:list-item>
        <text:list-item>
          <text:p text:style-name="P1292"><text:span text:style-name="T1293">Condição de Deadlock</text:span><text:span text:style-name="T1294">: a lógica do programa cria uma condição de deadlock. Cada filósofo está esperando pelos garfos à sua esquerda e à sua direita para começar a comer. No entanto, como todos os filósofos decidiram ficar famintos ao mesmo tempo, eles estão todos esperando uns pelos outros para liberar os garfos, e nenhum deles pode progredir.</text:span></text:p>
        </text:list-item>
        <text:list-item>
          <text:p text:style-name="P1295"><text:span text:style-name="T1296">Deadlock</text:span><text:span text:style-name="T1297">: programa está parado nesse ponto porque atingiu um deadlock. Não há progresso possível, já que cada filósofo está esperando por um garfo que está sendo segurado por outro filósofo.</text:span></text:p>
        </text:list-item>
      </text:list>
      <text:p text:style-name="P1298"/>
      <text:p text:style-name="P1299">Essa simulação representa uma situação clássica do "Jantar dos Filósofos" em que um deadlock ocorre conforme a figura abaixo. Para resolver isso, seria necessário implementar uma lógica adicional, como um método para liberar automaticamente os garfos após um certo tempo ou introduzir alguma forma de detecção e recuperação de deadlock.</text:p>
      <text:p text:style-name="P1300"/>
      <text:p text:style-name="P1301"><text:span text:style-name="T1302"><draw:frame draw:style-name="a23" draw:name="Picture 1" text:anchor-type="as-char" svg:x="0in" svg:y="0in" svg:width="5.40136in" svg:height="2.30439in" style:rel-width="scale" style:rel-height="scale"><draw:image xlink:href="media/image19.png" xlink:type="simple" xlink:show="embed" xlink:actuate="onLoad"/><svg:title/><svg:desc>A screenshot of a computer

Description automatically generated</svg:desc></draw:frame></text:span></text:p>
      <text:p text:style-name="P1303">Figura 19. Deadlock ocorrido</text:p>
      <text:list text:style-name="LFO7" text:continue-numbering="true">
        <text:list-item>
          <text:p text:style-name="P1304">Referências</text:p>
        </text:list-item>
      </text:list>
      <text:list text:style-name="LFO12" text:continue-numbering="true">
        <text:list-item>
          <text:p text:style-name="P1305"><text:bookmark-start text:name="_Ref151322939"/><text:span text:style-name="T1306">Debian, (2023) “Instalando o Debian via Internet”,<text:s/></text:span><text:a xlink:href="https://www.debian.org/distrib/netinst" office:target-frame-name="_top" xlink:show="replace"><text:span text:style-name="T1307">https://www.debian.org/distrib/netinst</text:span></text:a><text:span text:style-name="T1308">, Junho.</text:span><text:bookmark-end text:name="_Ref151322939"/></text:p>
        </text:list-item>
        <text:list-item>
          <text:p text:style-name="P1309"><text:bookmark-start text:name="_Ref151322942"/><text:span text:style-name="T1310">Vinicius Andrade Ribeiro, (2019) “Instalar o Debian 10.0 no VirtualBox 5.2.22”,<text:s/></text:span><text:a xlink:href="https://eteourinhos.com.br/wp-content/uploads/2019/08/02-Instalar-o-Debian-10.pdf" office:target-frame-name="_top" xlink:show="replace"><text:span text:style-name="T1311">https://eteourinhos.com.br/wp-content/uploads/2019/08/02-Instalar-o-Debian-10.pdf</text:span></text:a><text:span text:style-name="T1312">, Agosto.</text:span><text:bookmark-end text:name="_Ref151322942"/></text:p>
        </text:list-item>
        <text:list-item>
          <text:p text:style-name="P1313"><text:bookmark-start text:name="_Ref151322999"/><text:span text:style-name="T1314">Gustavo Sobreira, Gabriel Fernandes, Fórum Alura (2022) “[Sugestão] [Resolvido] user is not in the sudoers file. this incident will be reported”,<text:s/></text:span><text:a xlink:href="https://cursos.alura.com.br/forum/topico-sugestao-resolvido-user-is-not-in-the-sudoers-file-this-incident-will-be-reported-259842" office:target-frame-name="_top" xlink:show="replace"><text:span text:style-name="T1315">https://cursos.alura.com.br/forum/topico-sugestao-resolvido-user-is-not-in-the-sudoers-file-this-incident-will-be-reported-259842</text:span></text:a><text:span text:style-name="T1316">, Dezembro.</text:span><text:bookmark-end text:name="_Ref151322999"/></text:p>
        </text:list-item>
        <text:list-item>
          <text:p text:style-name="P1317"><text:bookmark-start text:name="_Ref151323378"/><text:span text:style-name="T1318">ATOMIC_FLAG_CLEAR (2022) “atomic_flag_clear_explicit”.<text:s/></text:span><text:a xlink:href="https://en.cppreference.com/w/c/atomic/atomic_flag_clear" office:target-frame-name="_top" xlink:show="replace"><text:span text:style-name="T1319">https://en.cppreference.com/w/c/atomic/atomic_flag_clear</text:span></text:a><text:span text:style-name="T1320">, Março.</text:span><text:bookmark-end text:name="_Ref151323378"/></text:p>
        </text:list-item>
        <text:list-item>
          <text:p text:style-name="P1321"><text:bookmark-start text:name="_Ref151323379"/><text:span text:style-name="T1322">ATOMIC_FLAG_TEST_AND_SET (2022) “atomic_flag_test_and_set_explicit”.<text:s/></text:span><text:a xlink:href="https://en.cppreference.com/w/c/atomic/atomic_flag_test_and_set" office:target-frame-name="_top" xlink:show="replace"><text:span text:style-name="T1323">https://en.cppreference.com/w/c/atomic/atomic_flag_test_and_set</text:span></text:a><text:span text:style-name="T1324">, Março.</text:span><text:bookmark-end text:name="_Ref151323379"/></text:p>
        </text:list-item>
        <text:list-item>
          <text:p text:style-name="P1325"><text:bookmark-start text:name="_Ref151324125"/><text:span text:style-name="T1326">[SEM_WAIT, Michael Kerrisk 2023], “sem_wait(3) — Linux manual page”.<text:s/></text:span><text:a xlink:href="http://man7.org/linux/man-pages/man3/sem_wait.3.html" office:target-frame-name="_top" xlink:show="replace"><text:span text:style-name="T1327">http://man7.org/linux/man-pages/man3/sem_wait.3.html</text:span></text:a><text:span text:style-name="T1328">, Março.</text:span><text:bookmark-end text:name="_Ref151324125"/></text:p>
        </text:list-item>
        <text:list-item>
          <text:p text:style-name="P1329"><text:bookmark-start text:name="_Ref151324127"/><text:span text:style-name="T1330">[SEM_POST, Michael Kerrisk 2023], “sem_post(3) — Linux manual page”.<text:s/></text:span><text:a xlink:href="http://man7.org/linux/man-pages/man3/sem_post.3.html" office:target-frame-name="_top" xlink:show="replace"><text:span text:style-name="T1331">http://man7.org/linux/man-pages/man3/sem_post.3.html</text:span></text:a><text:span text:style-name="T1332">, Março.</text:span><text:bookmark-end text:name="_Ref151324127"/></text:p>
        </text:list-item>
        <text:list-item>
          <text:p text:style-name="P1333"><text:bookmark-start text:name="_Ref151324128"/><text:span text:style-name="T1334">[SEM_INIT, Michael Kerrisk 2023], “sem_init(3) — Linux manual page”.<text:s/></text:span><text:a xlink:href="http://man7.org/linux/man-pages/man3/sem_init.3.html" office:target-frame-name="_top" xlink:show="replace"><text:span text:style-name="T1335">http://man7.org/linux/man-pages/man3/sem_init.3.html</text:span></text:a><text:span text:style-name="T1336">, Março.</text:span><text:bookmark-end text:name="_Ref151324128"/></text:p>
        </text:list-item>
        <text:list-item>
          <text:p text:style-name="P1337"><text:bookmark-start text:name="_Ref151324129"/><text:span text:style-name="T1338">[SEM_DESTROY, Michael Kerrisk 2023], “sem_destroy(3) — Linux manual page”.<text:s/></text:span><text:a xlink:href="http://man7.org/linux/man-pages/man3/sem_destroy.3.htm" office:target-frame-name="_top" xlink:show="replace"><text:span text:style-name="T1339">http://man7.org/linux/man-pages/man3/sem_destroy.3.htm</text:span></text:a><text:span text:style-name="T1340">, Março.</text:span><text:bookmark-end text:name="_Ref151324129"/></text:p>
        </text:list-item>
        <text:list-item>
          <text:p text:style-name="P1341"><text:bookmark-start text:name="_Ref151324063"/><text:span text:style-name="T1342">[PTHREAD_CREATE, Michael Kerrisk 2023], “pthread_create(3) — Linux manual page”.<text:s/></text:span><text:a xlink:href="http://man7.org/linux/man-pages/man3/pthread_create.3.html" office:target-frame-name="_top" xlink:show="replace"><text:span text:style-name="T1343">http://man7.org/linux/man-pages/man3/pthread_create.3.html</text:span></text:a><text:span text:style-name="T1344">, Março.</text:span><text:bookmark-end text:name="_Ref151324063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Título2" style:display-name="Título 2" style:family="paragraph" style:parent-style-name="Título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Título3" style:display-name="Título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Título5" style:display-name="Título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Título6" style:display-name="Título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Título7" style:display-name="Título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Título8" style:display-name="Título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Título9" style:display-name="Título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Lista" style:display-name="Lista" style:family="paragraph" style:parent-style-name="Textbody">
      <style:text-properties style:font-name-complex="Lucidasan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1.0798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6.3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Númerodepágina" style:display-name="Número de página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TextodoEspaçoReservado" style:display-name="Texto do Espaço Reservado" style:family="text" style:parent-style-name="Fonteparág.padrão">
      <style:text-properties fo:color="#666666"/>
    </style:style>
    <text:list-style style:name="WW_OutlineListStyle_2" style:display-name="WW_OutlineListStyle_2">
      <text:list-level-style-number text:level="1" style:num-suffix="." style:num-list-format-name="NLF0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list-format-name="NLF1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1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list-format-name="NLF2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list-format-name="NLF3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list-format-name="NLF3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list-format-name="NLF3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list-format-name="NLF3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list-format-name="NLF3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list-format-name="NLF3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list-format-name="NLF3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list-format-name="NLF3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list-format-name="NLF3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list-format-name="NLF2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prefix="[" style:num-suffix="]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2.2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[%1%]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Gustavo Borges</dc:creator>
    <meta:creation-date>2024-12-06T22:50:00Z</meta:creation-date>
    <dc:date>2024-12-06T22:50:00Z</dc:date>
    <meta:template xlink:href="Normal.dotm" xlink:type="simple"/>
    <meta:editing-cycles>4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59" meta:word-count="4671" meta:character-count="29836" meta:row-count="210" meta:non-whitespace-character-count="2522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p</mml:mi>
    </mml:mrow>
    <mml:mrow>
      <mml:mi>m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p</mml:mi>
    </mml:mrow>
    <mml:mrow>
      <mml:mi>m</mml:mi>
    </mml:mrow>
  </mml:msub>
</mml:math>
</file>