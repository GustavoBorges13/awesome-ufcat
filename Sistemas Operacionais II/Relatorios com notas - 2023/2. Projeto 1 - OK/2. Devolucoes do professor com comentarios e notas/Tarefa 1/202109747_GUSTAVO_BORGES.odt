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style style:name="P1" style:parent-style-name="SBCtitle" style:master-page-name="MP0" style:family="paragraph">
      <style:paragraph-properties fo:break-before="page"/>
    </style:style>
    <style:style style:name="T2" style:parent-style-name="CommentReference" style:family="text">
      <style:text-properties style:font-name="Bitstream Vera Serif" style:font-name-asian="Bitstream Vera Sans" style:font-name-complex="Lucidasans" fo:font-weight="normal" style:font-weight-asian="normal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style:text-position="super 66.6%"/>
    </style:style>
    <style:style style:name="P5" style:parent-style-name="SBCparagraph" style:family="paragraph">
      <style:paragraph-properties fo:text-indent="0.2958in"/>
    </style:style>
    <style:style style:name="P6" style:parent-style-name="SBCparagraph" style:family="paragraph">
      <style:paragraph-properties fo:text-indent="0.2958in"/>
    </style:style>
    <style:style style:name="P7" style:parent-style-name="SBCparagraph" style:family="paragraph">
      <style:paragraph-properties fo:text-indent="0.2958in"/>
    </style:style>
    <style:style style:name="P8" style:parent-style-name="SBCparagraph" style:family="paragraph">
      <style:paragraph-properties fo:text-indent="0.2958in"/>
    </style:style>
    <style:style style:name="P9" style:parent-style-name="SBCparagraph" style:family="paragraph">
      <style:paragraph-properties fo:text-align="center"/>
    </style:style>
    <style:style style:name="T10" style:parent-style-name="DefaultParagraphFont" style:family="text">
      <style:text-properties style:font-name="Calibri"/>
    </style:style>
    <style:style style:name="P11" style:parent-style-name="SBCcaption" style:family="paragraph">
      <style:paragraph-properties fo:line-height="200%" fo:margin-left="0in">
        <style:tab-stops/>
      </style:paragraph-properties>
    </style:style>
    <style:style style:name="P12" style:parent-style-name="SBCparagraph" style:family="paragraph">
      <style:paragraph-properties fo:text-indent="0.2958in"/>
      <style:text-properties style:font-name="Calibri"/>
    </style:style>
    <style:style style:name="P13" style:parent-style-name="SBCparagraph" style:family="paragraph">
      <style:paragraph-properties fo:text-indent="0.2958in"/>
      <style:text-properties style:font-name="Calibri"/>
    </style:style>
    <style:style style:name="P14" style:parent-style-name="SBCparagraph" style:family="paragraph">
      <style:paragraph-properties fo:text-indent="0.2958in"/>
      <style:text-properties style:font-name="Calibri"/>
    </style:style>
    <style:style style:name="P15" style:parent-style-name="SBCparagraph" style:family="paragraph">
      <style:paragraph-properties fo:text-align="center"/>
    </style:style>
    <style:style style:name="T16" style:parent-style-name="DefaultParagraphFont" style:family="text">
      <style:text-properties style:font-name="Calibri"/>
    </style:style>
    <style:style style:name="P17" style:parent-style-name="SBCcaption" style:family="paragraph">
      <style:paragraph-properties fo:line-height="200%"/>
    </style:style>
    <style:style style:name="P18" style:parent-style-name="SBCparagraph" style:master-page-name="MP1" style:family="paragraph">
      <style:paragraph-properties fo:break-before="page" fo:text-indent="0.2958in"/>
      <style:text-properties style:font-name="Calibri"/>
    </style:style>
    <style:style style:name="P19" style:parent-style-name="SBCparagraph" style:family="paragraph">
      <style:paragraph-properties fo:text-align="center"/>
    </style:style>
    <style:style style:name="T20" style:parent-style-name="DefaultParagraphFont" style:family="text">
      <style:text-properties style:font-name="Calibri"/>
    </style:style>
    <style:style style:name="P21" style:parent-style-name="SBCcaption" style:family="paragraph">
      <style:paragraph-properties fo:line-height="200%"/>
    </style:style>
    <style:style style:name="T22" style:parent-style-name="DefaultParagraphFont" style:family="text">
      <style:text-properties style:font-name="Calibri"/>
    </style:style>
    <style:style style:name="P23" style:parent-style-name="SBCparagraph" style:family="paragraph">
      <style:paragraph-properties fo:text-indent="0.2958in"/>
      <style:text-properties style:font-name="Calibri"/>
    </style:style>
    <style:style style:name="P24" style:parent-style-name="SBCparagraph" style:family="paragraph">
      <style:paragraph-properties fo:text-align="center"/>
    </style:style>
    <style:style style:name="T25" style:parent-style-name="DefaultParagraphFont" style:family="text">
      <style:text-properties style:font-name="Calibri"/>
    </style:style>
    <style:style style:name="P26" style:parent-style-name="SBCcaption" style:family="paragraph">
      <style:paragraph-properties fo:line-height="200%"/>
    </style:style>
    <style:style style:name="P27" style:parent-style-name="SBCparagraph" style:master-page-name="MP2" style:family="paragraph">
      <style:paragraph-properties fo:break-before="page" fo:text-indent="0.2958in"/>
      <style:text-properties style:font-name="Calibri"/>
    </style:style>
    <style:style style:name="P28" style:parent-style-name="SBCparagraph" style:family="paragraph">
      <style:paragraph-properties fo:text-align="center"/>
    </style:style>
    <style:style style:name="T29" style:parent-style-name="DefaultParagraphFont" style:family="text">
      <style:text-properties style:font-name="Calibri"/>
    </style:style>
    <style:style style:name="P30" style:parent-style-name="SBCcaption" style:family="paragraph">
      <style:paragraph-properties fo:line-height="200%"/>
    </style:style>
    <style:style style:name="P31" style:parent-style-name="SBCparagraph" style:family="paragraph">
      <style:paragraph-properties fo:text-indent="0.2958in"/>
      <style:text-properties style:font-name="Calibri"/>
    </style:style>
    <style:style style:name="P32" style:parent-style-name="SBCparagraph" style:family="paragraph">
      <style:paragraph-properties fo:text-align="center" fo:text-indent="0in"/>
    </style:style>
    <style:style style:name="T33" style:parent-style-name="DefaultParagraphFont" style:family="text">
      <style:text-properties style:font-name="Calibri"/>
    </style:style>
    <style:style style:name="P34" style:parent-style-name="SBCcaption" style:family="paragraph">
      <style:paragraph-properties fo:line-height="200%"/>
    </style:style>
    <style:style style:name="P35" style:parent-style-name="SBCtitle2" style:master-page-name="MP3" style:family="paragraph">
      <style:paragraph-properties fo:break-before="page"/>
    </style:style>
    <style:style style:name="P36" style:parent-style-name="SBCparagraphfirst" style:family="paragraph">
      <style:paragraph-properties fo:text-indent="0.2958in"/>
    </style:style>
    <style:style style:name="T37" style:parent-style-name="DefaultParagraphFont" style:family="text">
      <style:text-properties style:font-name="Calibri"/>
    </style:style>
    <style:style style:name="P38" style:parent-style-name="SBCparagraph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style:font-name="Calibri"/>
    </style:style>
    <style:style style:name="P41" style:parent-style-name="SBCparagraph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BCparagraph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style:font-name="Calibri"/>
    </style:style>
    <style:style style:name="T47" style:parent-style-name="DefaultParagraphFont" style:family="text">
      <style:text-properties style:font-name="Calibri" fo:font-weight="bold" style:font-weight-asian="bold" style:font-weight-complex="bold"/>
    </style:style>
    <style:style style:name="T48" style:parent-style-name="DefaultParagraphFont" style:family="text">
      <style:text-properties style:font-name="Calibri"/>
    </style:style>
    <style:style style:name="P49" style:parent-style-name="SBCparagraph" style:family="paragraph"/>
    <style:style style:name="P50" style:parent-style-name="SBCparagraph" style:family="paragraph">
      <style:paragraph-properties fo:text-indent="0.2958in"/>
    </style:style>
    <style:style style:name="P51" style:parent-style-name="SBCparagraph" style:family="paragraph">
      <style:paragraph-properties fo:text-indent="0.2958in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SBCparagraph" style:family="paragraph">
      <style:paragraph-properties fo:text-indent="0.2958in"/>
    </style:style>
    <style:style style:name="P54" style:parent-style-name="SBCparagraph" style:family="paragraph">
      <style:paragraph-properties fo:text-align="center" fo:text-indent="0.2958in"/>
    </style:style>
    <style:style style:name="T55" style:parent-style-name="DefaultParagraphFont" style:family="text">
      <style:text-properties style:font-name="Calibri"/>
    </style:style>
    <style:style style:name="P56" style:parent-style-name="SBCcaption" style:family="paragraph">
      <style:paragraph-properties fo:line-height="200%"/>
    </style:style>
    <style:style style:name="P57" style:parent-style-name="SBCparagraph" style:master-page-name="MP4" style:family="paragraph">
      <style:paragraph-properties fo:break-before="page" fo:text-indent="0.2958in"/>
      <style:text-properties style:font-name="Calibri"/>
    </style:style>
    <style:style style:name="P58" style:parent-style-name="SBCparagraph" style:family="paragraph">
      <style:paragraph-properties fo:margin-bottom="0.1666in" fo:text-indent="0.2958in"/>
      <style:text-properties style:font-name="Calibri"/>
    </style:style>
    <style:style style:name="P59" style:parent-style-name="SBCparagraph" style:family="paragraph">
      <style:paragraph-properties fo:text-align="center" fo:text-indent="0.2958in"/>
    </style:style>
    <style:style style:name="P60" style:parent-style-name="SBCcaption" style:family="paragraph">
      <style:paragraph-properties fo:line-height="200%"/>
    </style:style>
    <style:style style:name="P61" style:parent-style-name="SBCparagraph" style:family="paragraph">
      <style:paragraph-properties fo:text-indent="0.2958in"/>
      <style:text-properties style:font-name="Calibri"/>
    </style:style>
    <style:style style:name="P62" style:parent-style-name="SBCparagraph" style:family="paragraph">
      <style:paragraph-properties fo:text-align="center" fo:text-indent="0.2958in"/>
    </style:style>
    <style:style style:name="P63" style:parent-style-name="SBCcaption" style:family="paragraph">
      <style:paragraph-properties fo:line-height="200%"/>
    </style:style>
    <style:style style:name="P64" style:parent-style-name="SBCparagraph" style:family="paragraph">
      <style:paragraph-properties fo:text-align="center"/>
    </style:style>
    <style:style style:name="P65" style:parent-style-name="SBCcaption" style:family="paragraph">
      <style:paragraph-properties fo:line-height="200%"/>
    </style:style>
    <style:style style:name="P66" style:parent-style-name="SBCparagraph" style:family="paragraph">
      <style:paragraph-properties fo:margin-bottom="0.1666in"/>
    </style:style>
    <style:style style:name="P67" style:parent-style-name="SBCparagraph" style:family="paragraph">
      <style:paragraph-properties fo:text-align="center"/>
    </style:style>
    <style:style style:name="P68" style:parent-style-name="SBCcaption" style:family="paragraph">
      <style:paragraph-properties fo:line-height="200%"/>
    </style:style>
    <style:style style:name="P69" style:parent-style-name="SBCparagraphfirst" style:family="paragraph">
      <style:paragraph-properties fo:text-indent="0.2958in"/>
    </style:style>
    <style:style style:name="P70" style:parent-style-name="SBCparagraph" style:family="paragraph">
      <style:paragraph-properties fo:text-indent="0.2958in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SBCparagraph" style:family="paragraph">
      <style:paragraph-properties fo:text-indent="0.2958in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style:font-name="Calibri" fo:font-weight="bold" style:font-weight-asian="bold" style:font-weight-complex="bold"/>
    </style:style>
    <style:style style:name="P75" style:parent-style-name="SBCparagraph" style:family="paragraph">
      <style:paragraph-properties fo:text-indent="0.2958in"/>
    </style:style>
    <style:style style:name="P76" style:parent-style-name="SBCparagraph" style:family="paragraph">
      <style:paragraph-properties fo:text-align="center" fo:text-indent="0.2958in"/>
    </style:style>
    <style:style style:name="P77" style:parent-style-name="SBCcaption" style:family="paragraph">
      <style:paragraph-properties fo:line-height="200%"/>
    </style:style>
    <style:style style:name="P78" style:parent-style-name="SBCparagraph" style:family="paragraph">
      <style:paragraph-properties fo:text-indent="0.2958in"/>
    </style:style>
    <style:style style:name="P79" style:parent-style-name="SBCcaption" style:family="paragraph">
      <style:paragraph-properties fo:line-height="200%"/>
    </style:style>
    <style:style style:name="P80" style:parent-style-name="SBCtitle2" style:master-page-name="MP5" style:family="paragraph">
      <style:paragraph-properties fo:break-before="page"/>
    </style:style>
    <style:style style:name="P81" style:parent-style-name="SBCparagraphfirst" style:family="paragraph">
      <style:paragraph-properties fo:text-indent="0.2958in"/>
    </style:style>
    <style:style style:name="P82" style:parent-style-name="SBCparagraph" style:family="paragraph">
      <style:paragraph-properties fo:text-indent="0.2958in"/>
    </style:style>
    <style:style style:name="P83" style:parent-style-name="SBCparagraph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font-name="Calibri" fo:font-weight="bold" style:font-weight-asian="bold" style:font-weight-complex="bold"/>
    </style:style>
    <style:style style:name="P86" style:parent-style-name="SBCparagraph" style:family="paragraph">
      <style:text-properties fo:font-weight="bold" style:font-weight-asian="bold" style:font-weight-complex="bold"/>
    </style:style>
    <style:style style:name="P87" style:parent-style-name="SBCparagraph" style:family="paragraph">
      <style:paragraph-properties fo:text-indent="0.2958in"/>
    </style:style>
    <style:style style:name="T88" style:parent-style-name="DefaultParagraphFont" style:family="text">
      <style:text-properties style:font-name="Calibri"/>
    </style:style>
    <style:style style:name="P89" style:parent-style-name="SBCparagraph" style:family="paragraph">
      <style:paragraph-properties fo:text-indent="0.2958in"/>
      <style:text-properties style:font-name="Calibri"/>
    </style:style>
    <style:style style:name="P90" style:parent-style-name="SBCparagraph" style:family="paragraph">
      <style:paragraph-properties fo:text-indent="0.2958in"/>
      <style:text-properties style:font-name="Calibri"/>
    </style:style>
    <style:style style:name="P91" style:parent-style-name="SBCparagraph" style:family="paragraph">
      <style:paragraph-properties fo:text-indent="0in"/>
      <style:text-properties style:font-name="Calibri" fo:font-weight="bold" style:font-weight-asian="bold" style:font-weight-complex="bold" fo:language="en" fo:country="US"/>
    </style:style>
    <style:style style:name="P92" style:parent-style-name="SBCparagraph" style:family="paragraph">
      <style:paragraph-properties fo:text-indent="0.2958in"/>
      <style:text-properties style:font-name="Calibri"/>
    </style:style>
    <style:style style:name="P93" style:parent-style-name="SBCparagraph" style:family="paragraph">
      <style:paragraph-properties fo:text-align="center" fo:margin-left="0.5458in" fo:text-indent="0in">
        <style:tab-stops/>
      </style:paragraph-properties>
    </style:style>
    <style:style style:name="T94" style:parent-style-name="DefaultParagraphFont" style:family="text">
      <style:text-properties style:font-name="Calibri"/>
    </style:style>
    <style:style style:name="P95" style:parent-style-name="SBCcaption" style:family="paragraph">
      <style:paragraph-properties fo:line-height="200%"/>
    </style:style>
    <style:style style:name="P96" style:parent-style-name="SBCparagraph" style:family="paragraph">
      <style:paragraph-properties fo:text-align="center"/>
    </style:style>
    <style:style style:name="P97" style:parent-style-name="SBCcaption" style:family="paragraph">
      <style:paragraph-properties fo:line-height="200%"/>
    </style:style>
    <style:style style:name="P98" style:parent-style-name="SBCtitle2" style:master-page-name="MP6" style:family="paragraph">
      <style:paragraph-properties fo:break-before="page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SBCcaption" style:family="paragraph">
      <style:paragraph-properties fo:line-height="200%"/>
    </style:style>
    <style:style style:name="T101" style:parent-style-name="DefaultParagraphFont" style:family="text">
      <style:text-properties style:font-name="Calibri"/>
    </style:style>
    <style:style style:name="T102" style:parent-style-name="DefaultParagraphFont" style:family="text">
      <style:text-properties style:font-name="Calibri"/>
    </style:style>
    <style:style style:name="P103" style:parent-style-name="SBCcaption" style:family="paragraph">
      <style:paragraph-properties fo:line-height="200%"/>
    </style:style>
    <style:style style:name="P104" style:parent-style-name="SBCparagraphfirst" style:family="paragraph">
      <style:paragraph-properties fo:text-indent="0.2958in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style:font-name="Calibri"/>
    </style:style>
    <style:style style:name="P107" style:parent-style-name="SBCcaption" style:family="paragraph">
      <style:paragraph-properties fo:line-height="200%"/>
    </style:style>
    <style:style style:name="P108" style:parent-style-name="SBCtitle2" style:master-page-name="MP7" style:family="paragraph">
      <style:paragraph-properties fo:break-before="page"/>
    </style:style>
    <style:style style:name="P109" style:parent-style-name="SBCparagraph" style:family="paragraph">
      <style:text-properties style:font-name="Calibri"/>
    </style:style>
    <style:style style:name="P110" style:parent-style-name="SBCparagraph" style:family="paragraph">
      <style:text-properties style:font-name="Calibri"/>
    </style:style>
    <style:style style:name="P111" style:parent-style-name="SBCparagraph" style:family="paragraph">
      <style:text-properties style:font-name="Calibri"/>
    </style:style>
    <style:style style:name="P112" style:parent-style-name="SBCparagraph" style:family="paragraph">
      <style:text-properties style:font-name="Calibri"/>
    </style:style>
    <style:style style:name="P113" style:parent-style-name="SBCparagraph" style:family="paragraph">
      <style:text-properties style:font-name="Calibri"/>
    </style:style>
    <style:style style:name="T114" style:parent-style-name="DefaultParagraphFont" style:family="text">
      <style:text-properties style:font-name="Calibri"/>
    </style:style>
    <style:style style:name="P115" style:parent-style-name="SBCparagraph" style:family="paragraph">
      <style:paragraph-properties fo:text-indent="0in"/>
    </style:style>
    <style:style style:name="P116" style:parent-style-name="SBCparagraph" style:family="paragraph">
      <style:paragraph-properties fo:text-indent="0in"/>
    </style:style>
    <style:style style:name="T117" style:parent-style-name="DefaultParagraphFont" style:family="text">
      <style:text-properties style:font-name="Calibri"/>
    </style:style>
    <style:style style:family="graphic" style:name="a10" style:parent-style-name="Graphics">
      <style:graphic-properties fo:border="0.01042in none" fo:background-color="transparent" fo:clip="rect(3.30905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.39905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1.73649in, 0in)"/>
    </style:style>
  </office:automatic-styles>
  <office:body>
    <office:text text:use-soft-page-breaks="true">
      <text:p text:style-name="P1"><office:annotation office:name="0" xml:id="193578512"><dc:creator>Dalton Tavares</dc:creator><dc:date>2023-11-29T00:45:00</dc:date><text:p text:style-name="CommentText">Parabéns. Foi o melhor trabalho desta leva. Muito claro e bem realizado.</text:p></office:annotation>PROJETO 1: FAMILIARIZAÇÃO COM MÁQUINA VIRTUAL E SINCRONIZAÇÃO DE PROCESSOS<text:span text:style-name="T2"><office:annotation-end office:name="0"/></text:span></text:p>
      <text:p text:style-name="SBCauthors">Gustavo Borges Peres da Silva<text:span text:style-name="T3">1</text:span></text:p>
      <text:p text:style-name="SBCinstitution"><text:span text:style-name="T4">1</text:span>Departamento de Ciência da Computação – Universidade Federal de Catalão (UFCAT)</text:p>
      <text:p text:style-name="SBCemail">gustavo.silva@discente.ufcat.edu.br</text:p>
      <text:p text:style-name="SBCresumo"/>
      <text:h text:style-name="SBCtitle1" text:outline-level="1">Tarefa 1: preparação do sistema</text:h>
      <text:h text:style-name="SBCtitle2" text:outline-level="2">Descrição</text:h>
      <text:p text:style-name="P5">Neste projeto, deliberadamente escolhemos adotar um ambiente de trabalho personalizado, impulsionado pelo fato de que o nosso computador hospedeiro ostenta configurações de hardware verdadeiramente high-end. Equipado com um processador Ryzen 3 2600G (4 núcleos), um impressionante total de 80GB de RAM operando a 3000MHz e um SSD NVMe de 2TB, o nosso sistema não apenas atende, mas ultrapassa as demandas de desempenho exigidas por este projeto. Além disso, o host está configurado com windows 10 Pro, Virtualization ativado na BIOS e com a tecnologia ADM<text:s/></text:p>
      <text:p text:style-name="P6">Em contrapartida, foi utilizado o Oracle VirtualBox para criar a máquina virtualizada, denominada convidado (guest), <text:s/>que opera com o sistema operacional Linux Debian 12.2.0 (bookworm). Sua instalação foi realizada utilizando a imagem do instalador via rede, uma escolha estratégica que permite o download dos pacotes do sistema durante o processo de instalação. Essa opção foi especialmente vantajosa dada a velocidade de conexão com a internet no momento da instalação, que atingiu notáveis 430.03 Mbit/s (download) e 287.58 Mbit/s (upload).</text:p>
      <text:h text:style-name="SBCtitle2" text:outline-level="2">Passo-a-passo da configuração da Máquina Virtual</text:h>
      <text:h text:style-name="SBCtitle2" text:outline-level="2">Instalação do Linux Debian</text:h>
      <text:p text:style-name="P7">O Linux Debian 12 encontra-se disponível para download no seguinte endereço:<text:s/><text:a xlink:href="https://www.debian.org/distrib/netinst" office:target-frame-name="_top" xlink:show="replace"><text:span text:style-name="Hyperlink">https://www.debian.org/distrib/netinst</text:span></text:a>. Optamos por baixar a versão netinst, que é o instalador via rede.</text:p>
      <text:p text:style-name="P8">Para a virtualização do Debian, escolhemos utilizar o Oracle VirtualBox como plataforma de hospedagem. Na figura 1 abaixo, compartilhamos a configuração inicial realizada por meio do assistente.</text:p>
      <text:soft-page-break/>
      <text:p text:style-name="P9"><text:span text:style-name="T10"><draw:frame draw:style-name="a0" draw:name="Picture 1" text:anchor-type="as-char" svg:x="0in" svg:y="0in" svg:width="4.98261in" svg:height="2.60146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11">Figura 1. Criar máquina virtual</text:p>
      <text:p text:style-name="P12">Na implementação do projeto, foi escolhido adotar uma estratégia eficiente por meio da instalação desassistida do sistema operacional convidado, utilizando a interface de configuração disponibilizada durante o assistente de instalação. Essa abordagem simplifica e automatiza o processo, eliminando a necessidade de intervenção manual repetitiva.</text:p>
      <text:p text:style-name="P13">Durante a etapa de configuração desassistida na janela do assistente, antecipei a criação do usuário necessário para o sistema. Essa medida tem como objetivo otimizar a eficiência do processo, garantindo a padronização e consistência na implementação.</text:p>
      <text:p text:style-name="P14"><text:bookmark-start text:name="_Hlk151062120"/>Ao definir<text:s/><text:bookmark-end text:name="_Hlk151062120"/>previamente detalhes como nome de usuário e senha diretamente na interface de configuração, assegurei que o sistema operacional convidado seja instalado com as configurações desejadas de forma rápida e precisa conforme a Figura 2 abaixo.</text:p>
      <text:p text:style-name="P15"><text:span text:style-name="T16"><draw:frame draw:style-name="a1" draw:name="Picture 1" text:anchor-type="as-char" svg:x="0in" svg:y="0in" svg:width="5.0114in" svg:height="2.60942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17">Figura 2. Configuração de Instalação Dessasistida de SO guest</text:p>
      <text:soft-page-break/>
      <text:p text:style-name="P18">Sobre a definição do hardware utilizado para a máquina guest, foi realizado uma configuração bem interessante para evitar quedas de desempenho. Optei por utilizar uma quantidade razoavel de memoria RAM 52Gb RAM (52*1024) e todos os núcleos do processador (4 núcleos) conforme a figura 3 abaixo.</text:p>
      <text:p text:style-name="P19"><text:span text:style-name="T20"><draw:frame draw:style-name="a2" draw:name="Picture 1" text:anchor-type="as-char" svg:x="0in" svg:y="0in" svg:width="4.99879in" svg:height="2.62048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span></text:p>
      <text:p text:style-name="P21"><text:span text:style-name="T22"><text:s/></text:span>Figura 3. Hardware Guest</text:p>
      <text:p text:style-name="P23">Sobre o disco rígido da máquina virtual, consideramos um tamanho bastante exagerado para termos certeza que não iriamos ter problemas com armazenamento e aproveitar da máquina host que possui muito armazenamento livre disponivel, sendo assim, foi utilizado 60Gb de armazenamento (60*1024) conforme a figura 4 abaixo.</text:p>
      <text:p text:style-name="P24"><text:span text:style-name="T25"><draw:frame draw:style-name="a3" draw:name="Picture 1" text:anchor-type="as-char" svg:x="0in" svg:y="0in" svg:width="4.92077in" svg:height="2.57033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26">Figura 4. Armazenamento Guest</text:p>
      <text:soft-page-break/>
      <text:p text:style-name="P27">Abaixo está o resumo da configuração da máquina.</text:p>
      <text:p text:style-name="P28"><text:span text:style-name="T29"><draw:frame draw:style-name="a4" draw:name="Picture 1" text:anchor-type="as-char" svg:x="0in" svg:y="0in" svg:width="4.61782in" svg:height="2.84867in" style:rel-width="scale" style:rel-height="scale"><draw:image xlink:href="media/image5.png" xlink:type="simple" xlink:show="embed" xlink:actuate="onLoad"/><svg:title/><svg:desc>A screenshot of a computer program

Description automatically generated</svg:desc></draw:frame></text:span></text:p>
      <text:p text:style-name="P30">Figura 4. Resumo</text:p>
      <text:p text:style-name="P31">Com aproximadamente 7 minutos a máquina virtual foi instalada com sucesso.</text:p>
      <text:p text:style-name="P32"><text:span text:style-name="T33"><text:line-break/></text:span><draw:frame draw:style-name="a5" draw:name="Picture 1" text:anchor-type="as-char" svg:x="0in" svg:y="0in" svg:width="4.9206in" svg:height="4.11574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P34">Figura 5. Maquina Virtual Instalada</text:p>
      <text:soft-page-break/>
      <text:h text:style-name="P35" text:outline-level="2">Configuração da Máquina Virtual</text:h>
      <text:p text:style-name="P36">Após a instalação do debian, foi necessário atribuir o usuário vboxuser como administrador para ter acesso ao root no arquivo /etc/sudoers (arquivo de permiss<text:span text:style-name="T37">ão de usuários).</text:span></text:p>
      <text:list text:style-name="LFO6" text:continue-numbering="true">
        <text:list-item>
          <text:p text:style-name="P38"><text:span text:style-name="T39">su</text:span><text:s/>+ sua senha (para mudar seu user)<text:span text:style-name="T40">;</text:span></text:p>
        </text:list-item>
        <text:list-item>
          <text:p text:style-name="P41"><text:span text:style-name="T42">sudo nano /etc/sudoers</text:span><text:s/>(para editar o arquivo de permissões de usuários);</text:p>
        </text:list-item>
        <text:list-item>
          <text:p text:style-name="P43">A baixo da linha onde se encontra essa frase: %sudo ALL=(ALL:ALL) ALL, tem que adicionar outra linha, escrevendo-se o seguinte:<text:s/><text:span text:style-name="T44">nomeUsuario</text:span><text:s/><text:span text:style-name="T45">ALL=(ALL) ALL</text:span><text:s/>(Agora seu user tem acesso root). Lembrando que o nomeUsuario<text:s/><text:span text:style-name="T46">no caso do projeto é o<text:s/></text:span><text:span text:style-name="T47">vboxuser</text:span><text:span text:style-name="T48">;</text:span></text:p>
        </text:list-item>
        <text:list-item>
          <text:p text:style-name="P49">Após alterar, apertar Ctrl + O (Salvar), Ctrl + X (Fechar ), Ctrl + D (Sair do modo root).</text:p>
        </text:list-item>
      </text:list>
      <text:p text:style-name="P50">Adicionalmente, não houve a necessidade de modificar o arquivo sources.list, um componente crucial na configuração do sistema Debian e distribuições relacionadas. Esse arquivo desempenha o papel vital de listar os repositórios de onde o sistema operacional obtém seus pacotes de software. Sua configuração precisa é crucial para o sucesso da execução do comando 'apt-get update'.</text:p>
      <text:p text:style-name="P51">Além disso, como optamos por instalar o Debian utilizando a conexão de rede, o<text:s/><text:span text:style-name="T52">sistema automaticamente baixou as versões mais recentes disponíveis</text:span><text:s/>durante o processo de instalação. Nesse contexto, o sources.list foi configurado como Debian Bookworm, direcionando-se exclusivamente ao repositório de atualizações (bookworm-updates) com os componentes 'main' e 'non-free-firmware'. Essa configuração atende adequadamente às nossas necessidades atuais e proporciona um ambiente estável e atualizado para as operações previstas.</text:p>
      <text:p text:style-name="P53">Ao abordar a configuração da rede na máquina virtual, é importante destacar que o próprio VirtualBox oferece uma interface intuitiva para essa configuração. Nesse sentido, a escolha mais comum foi habilitar a comunicação entre a máquina virtual e o sistema operacional hospedeiro através da configuração da placa de rede em modo bridge, conforme ilustrado na Figura 6 abaixo.</text:p>
      <text:p text:style-name="P54"><text:span text:style-name="T55"><draw:frame draw:style-name="a6" draw:name="Picture 1" text:anchor-type="as-char" svg:x="0in" svg:y="0in" svg:width="4.14387in" svg:height="2.4203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56">Figura 6. Configurando rede</text:p>
      <text:soft-page-break/>
      <text:p text:style-name="P57">Agora que a rede está sendo aparentemente conhecida, vamos fazer o teste no debian e provar que está tudo funcionando. Conquanto, os testes abaixo serve apenas para comprovar essa funcionalidade.</text:p>
      <text:p text:style-name="P58">Utilizando o comando ip a, conseguimos verificar as interfaces de rede e suas configurações e obtivemos o IP 192.168.0.103 conforme na Figura 7.</text:p>
      <text:p text:style-name="P59"><draw:frame draw:style-name="a7" draw:name="Picture 1" text:anchor-type="as-char" svg:x="0in" svg:y="0in" svg:width="5.5391in" svg:height="2.87459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P60">Figura 7. Interface de rede</text:p>
      <text:p text:style-name="P61">Foi utilizado também ferramentas especificas para medir a velocidade da internet como por exemplo o speedtest-cli conforme na Figura 8.</text:p>
      <text:p text:style-name="P62"><draw:frame draw:style-name="a8" draw:name="Picture 1" text:anchor-type="as-char" svg:x="0in" svg:y="0in" svg:width="4.17832in" svg:height="1.94129in" style:rel-width="scale" style:rel-height="scale"><draw:image xlink:href="media/image9.png" xlink:type="simple" xlink:show="embed" xlink:actuate="onLoad"/><svg:title/><svg:desc>A screenshot of a computer program

Description automatically generated</svg:desc></draw:frame></text:p>
      <text:p text:style-name="P63">Figura 8. Teste com speedtest-cli</text:p>
      <text:p text:style-name="SBCparagraph">E também utilizado o comando traceroute para verificar as rotas que os pacotes estão tomando para alcançar um destino, no nosso exemplo utilizamos o site da google conforme a Figura 9.</text:p>
      <text:soft-page-break/>
      <text:p text:style-name="P64"><draw:frame draw:style-name="a9" draw:name="Picture 1" text:anchor-type="as-char" svg:x="0in" svg:y="0in" svg:width="5.05335in" svg:height="2.01302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p>
      <text:p text:style-name="P65">Figura 9. Verificando rotas dos pacotes</text:p>
      <text:p text:style-name="P66">E por ultimo utilizamos o comando netstat para verificar as conexões de rede e o estado das portas conforme a Figura 10.</text:p>
      <text:p text:style-name="P67"><draw:frame draw:style-name="a10" draw:name="Picture 752484224" text:anchor-type="as-char" svg:x="0in" svg:y="0in" svg:width="5.05335in" svg:height="1.05223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p>
      <text:p text:style-name="P68">Figura 10. Verificando as conexões e estado das portas</text:p>
      <text:h text:style-name="SBCtitle2" text:outline-level="2">Instalação/Configuração e acesso remoto via SSH</text:h>
      <text:p text:style-name="P69">Agora que a conexão com a rede está funcionando, vamos partir para o próximo passo que é a instalação e configuração do SSH para realizar a comunicação entre as duas máquinas.</text:p>
      <text:p text:style-name="P70">De inicio, foi realizado a instalação do openssh-server através do comando<text:s/><text:span text:style-name="T71">sudo apt-get install openssh-server<text:s/></text:span>na máquina virtual (guest).</text:p>
      <text:p text:style-name="P72">Após isso, iremos realizar o acesso à máquina virtual via SSH (acesso remoto), na qual iremos precisar do IP (obtivemos na Figura 7) e iremos executar o seguinte codigo na maquina hospedeira para inicializar a comunicação:<text:s/><text:span text:style-name="T73">ssh vboxuser@</text:span><text:span text:style-name="T74">192.168.0.103.</text:span></text:p>
      <text:p text:style-name="P75">Ao executar o SSH no ambiente Windows, você encontrará uma mensagem crucial para autenticação e segurança ao conectar-se a um servidor. A ECDSA Key Fingerprint representa uma identificação única da chave do servidor, usando o algoritmo de assinatura digital de curva elíptica (ECDSA). Essa impressão digital é uma forma segura de garantir a consistência da chave do servidor em várias conexões. A mensagem de aviso, ao perguntar se você deseja continuar, indica que o cliente SSH detectou uma nova chave ECDSA para o host 192.168.0.103, não presente na lista de "hosts conhecidos". Como esta é a primeira conexão com esse host, o cliente SSH avisa que a chave será adicionada permanentemente à lista de hosts conhecidos e pedirá a senha do user root da máquina virtual, então basta inseri-la conforme na Figura 11 e Figura 12 abaixo.</text:p>
      <text:soft-page-break/>
      <text:p text:style-name="P76"><draw:frame draw:style-name="a11" draw:name="Picture 1" text:anchor-type="as-char" svg:x="0in" svg:y="0in" svg:width="5.56132in" svg:height="2.91211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p text:style-name="P77">Figura 11. Conexão bem sucedida</text:p>
      <text:p text:style-name="P78"><draw:frame draw:style-name="a12" draw:name="Picture 1" text:anchor-type="as-char" svg:x="0in" svg:y="0in" svg:width="5.90556in" svg:height="4.01458in" style:rel-width="scale" style:rel-height="scale"><draw:image xlink:href="media/image12.png" xlink:type="simple" xlink:show="embed" xlink:actuate="onLoad"/><svg:title/><svg:desc>Screens screenshot of a computer screen

Description automatically generated</svg:desc></draw:frame></text:p>
      <text:p text:style-name="P79">Figura 12. Print – Visão Geral</text:p>
      <text:soft-page-break/>
      <text:h text:style-name="P80" text:outline-level="2">Transferência de Arquivos</text:h>
      <text:p text:style-name="P81">Agora que temos tudo configurado, iremos tranferir um <text:s/>arquivo do computador Hospedeiro para a nossa Máquina Virtual.</text:p>
      <text:p text:style-name="P82">Para isso, pensando numa forma bem simples e estratégica, pensamos em criar um arquivo .txt no host utilizando o CMD como administrador e salvarmos ele na raiz do disco conforme o seguinte comando abaixo:</text:p>
      <text:list text:style-name="LFO7" text:continue-numbering="true">
        <text:list-item>
          <text:p text:style-name="P83"><text:span text:style-name="T84">Cd C</text:span><text:span text:style-name="T85">:/</text:span></text:p>
        </text:list-item>
        <text:list-item>
          <text:p text:style-name="P86">echo "Hello World!" &gt; teste.txt</text:p>
        </text:list-item>
      </text:list>
      <text:p text:style-name="SBCparagraph">Após termos criado o arquivo iremos transferi-lo para máquina virtual utilizando o servidor de SSH recém instalado.</text:p>
      <text:p text:style-name="P87">Para isto, usarem<text:span text:style-name="T88">os o protocolo de comunicação SCP (Secure Copy Protocol) que utiliza o SSH (Secure Shell) como mecanismo subjacente para autenticação e criptografia. SCP permite a transferência segura de arquivos entre hosts em uma rede.</text:span></text:p>
      <text:p text:style-name="P89">Quando usamos o comando scp para copiar arquivos, ele estabelece uma conexão SSH para autenticação e, em seguida, utiliza essa conexão para transferir os dados de forma segura. Assim, a criptografia e autenticação fornecidas pelo SSH também se aplicam às transferências de arquivos SCP.</text:p>
      <text:p text:style-name="P90">Conquanto, em uma nova janela do terminal utilizaremos o seguinte comando:<text:s/></text:p>
      <text:p text:style-name="P91">scp C:/teste.txt vboxuser@192.168.0.103:/home/vboxuser/Downloads/</text:p>
      <text:p text:style-name="P92">Irá pedir a senha então basta inserir e após isto o arquivo será copiado conforme as Figuras 13 e 14 abaixo.</text:p>
      <text:p text:style-name="P93"><text:span text:style-name="T94"><draw:frame draw:style-name="a13" draw:name="Picture 1" text:anchor-type="as-char" svg:x="0in" svg:y="0in" svg:width="4.60196in" svg:height="0.71719in" style:rel-width="scale" style:rel-height="scale"><draw:image xlink:href="media/image13.png" xlink:type="simple" xlink:show="embed" xlink:actuate="onLoad"/><svg:title/><svg:desc>A black screen with white text

Description automatically generated</svg:desc></draw:frame></text:span></text:p>
      <text:p text:style-name="P95">Figura 13. Protocolo SCP</text:p>
      <text:p text:style-name="P96"><draw:frame draw:style-name="a14" draw:name="Picture 1" text:anchor-type="as-char" svg:x="0in" svg:y="0in" svg:width="4.5213in" svg:height="2.4781in" style:rel-width="scale" style:rel-height="scale"><draw:image xlink:href="media/image14.png" xlink:type="simple" xlink:show="embed" xlink:actuate="onLoad"/><svg:title/><svg:desc>A screenshot of a computer

Description automatically generated</svg:desc></draw:frame></text:p>
      <text:p text:style-name="P97">Figura 14. Protocolo SCP – Visão Geral</text:p>
      <text:soft-page-break/>
      <text:h text:style-name="P98" text:outline-level="2">Criação de Conta de Usuário</text:h>
      <text:p text:style-name="SBCparagraphfirst">Agora iremos criar uma conta de usuario para mim sem utilizar o root. E para isto usamos o comando<text:s/><text:span text:style-name="T99">sudo adduser &lt;NOVO_USUARIO&gt;.</text:span></text:p>
      <text:p text:style-name="SBCparagraph"><draw:frame draw:style-name="a15" draw:name="Picture 1" text:anchor-type="as-char" svg:x="0in" svg:y="0in" svg:width="4.9765in" svg:height="3.38945in" style:rel-width="scale" style:rel-height="scale"><draw:image xlink:href="media/image15.png" xlink:type="simple" xlink:show="embed" xlink:actuate="onLoad"/><svg:title/><svg:desc>A screenshot of a computer program

Description automatically generated</svg:desc></draw:frame></text:p>
      <text:p text:style-name="P100">Figura 15. Adicionando novo Usuário</text:p>
      <text:p text:style-name="SBCparagraph">Agora que está tudo Ok, vamos testar também a conex<text:span text:style-name="T101">ão SSH com novo usuario na máquina hospedeira repetindo o mesmo comando da Figura 13 porém com o novo usuario “ggus”.</text:span></text:p>
      <text:p text:style-name="SBCparagraph"><text:span text:style-name="T102"><draw:frame draw:style-name="a16" draw:name="Picture 1" text:anchor-type="as-char" svg:x="0in" svg:y="0in" svg:width="5.07809in" svg:height="0.72612in" style:rel-width="scale" style:rel-height="scale"><draw:image xlink:href="media/image16.png" xlink:type="simple" xlink:show="embed" xlink:actuate="onLoad"/><svg:title/><svg:desc>A black screen with white text

Description automatically generated</svg:desc></draw:frame></text:span></text:p>
      <text:p text:style-name="P103">Figura 16. Adicionando novo Usuário</text:p>
      <text:h text:style-name="SBCtitle2" text:outline-level="2">Configuração do Bash</text:h>
      <text:p text:style-name="P104">Agora que temos o usuario “ggust” iremos configurar o shell padrão para este novo usuario no sistema Linux. Esta é uma operação opcional e pode ser útil se o usuário preferir usar o Bash em vez da shell padrão definida no momento da criação do usuário.</text:p>
      <text:p text:style-name="SBCparagraph">Para isso basta executar<text:s/><text:span text:style-name="T105">sudo chsh -s /bin/bash &lt;NOVO_USUARIO&gt;</text:span></text:p>
      <text:p text:style-name="SBCparagraph"><text:span text:style-name="T106"><draw:frame draw:style-name="a17" draw:name="Picture 1" text:anchor-type="as-char" svg:x="0in" svg:y="0in" svg:width="5.10488in" svg:height="0.47923in" style:rel-width="scale" style:rel-height="scale"><draw:image xlink:href="media/image17.png" xlink:type="simple" xlink:show="embed" xlink:actuate="onLoad"/><svg:title/><svg:desc/></draw:frame></text:span></text:p>
      <text:p text:style-name="P107">Figura 17. Configurando Bash para o novo user</text:p>
      <text:soft-page-break/>
      <text:h text:style-name="P108" text:outline-level="2">Instalação de Softwares</text:h>
      <text:p text:style-name="P109">Os softwares no Debian podem ser instalados de diversas maneiras, seja através da interface gráfica ou da linha de comando no terminal. A ferramenta principal para instalação de softwares é o apt, um poderoso sistema de gerenciamento de pacotes.</text:p>
      <text:p text:style-name="P110">Na máquina Debian que utilizei, a preferência foi pela instalação via linha de comando, utilizando o terminal. Isso proporcionou maior controle sobre o processo de instalação e permitiu uma abordagem mais personalizada para atender às necessidades específicas.</text:p>
      <text:p text:style-name="P111">Em diversos casos, foi necessário adicionar repositórios de software para viabilizar a instalação de determinados softwares. Isso possibilitou o acesso a uma variedade mais ampla de aplicativos e versões, garantindo a flexibilidade na escolha e personalização do ambiente de trabalho.</text:p>
      <text:p text:style-name="P112">Essa abordagem, embora demandasse algum conhecimento adicional, revelou-se eficaz para garantir a disponibilidade e atualização dos softwares desejados, contribuindo para a estabilidade e desempenho do sistema operacional Debian.</text:p>
      <text:p text:style-name="P113"/>
      <text:h text:style-name="SBCtitle1" text:outline-level="1">Tarefa 2</text:h>
      <text:p text:style-name="SBCparagraph">...</text:p>
      <text:h text:style-name="SBCtitle1" text:outline-level="1">Tarefa 3</text:h>
      <text:p text:style-name="SBCparagraphfirst"><text:tab/>...</text:p>
      <text:h text:style-name="SBCtitle1" text:outline-level="1">Tarefa 4</text:h>
      <text:p text:style-name="SBCparagraphfirst"><text:tab/>...</text:p>
      <text:h text:style-name="SBCtitle1" text:outline-level="1">Refer<text:span text:style-name="T114">ências</text:span></text:h>
      <text:p text:style-name="P115">Debian, (2023) “Instalando o Debian via Internet”,<text:s/><text:a xlink:href="https://www.debian.org/distrib/netinst" office:target-frame-name="_top" xlink:show="replace"><text:span text:style-name="Hyperlink">https://www.debian.org/distrib/netinst</text:span></text:a>, Junho.</text:p>
      <text:p text:style-name="SBCparagraphfirst">Vinicius Andrade Ribeiro, (2019) “Instalar o Debian 10.0 no VirtualBox 5.2.22”,<text:s/><text:a xlink:href="https://eteourinhos.com.br/wp-content/uploads/2019/08/02-Instalar-o-Debian-10.pdf" office:target-frame-name="_top" xlink:show="replace"><text:span text:style-name="Hyperlink">https://eteourinhos.com.br/wp-content/uploads/2019/08/02-Instalar-o-Debian-10.pdf</text:span></text:a>, Agosto.</text:p>
      <text:p text:style-name="P116">Gustavo Sobreira, Gabriel Fernandes, F<text:span text:style-name="T117">órum Alura</text:span><text:s/>(2022) “[Sugestão] [Resolvido] user is not in the sudoers file. this incident will be reported”,<text:s/><text:a xlink:href="https://cursos.alura.com.br/forum/topico-sugestao-resolvido-user-is-not-in-the-sudoers-file-this-incident-will-be-reported-259842" office:target-frame-name="_top" xlink:show="replace"><text:span text:style-name="Hyperlink">https://cursos.alura.com.br/forum/topico-sugestao-resolvido-user-is-not-in-the-sudoers-file-this-incident-will-be-reported-259842</text:span></text:a>, Dezembro.</text:p>
      <text:p text:style-name="SBC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Heading1" style:display-name="Heading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normal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0.0972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2.362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="StarSymbol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text:list-style style:name="SBCnumberlist" style:display-name="SBC:number:list">
      <text:list-level-style-bullet text:level="1" text:style-name="WW_CharLFO4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outline-level-style>
      <text:outline-level-style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alton Tavares</dc:creator>
    <meta:creation-date>2010-08-03T10:11:00Z</meta:creation-date>
    <dc:date>2023-11-29T03:45:00Z</dc:date>
    <meta:template xlink:href="Normal.dotm" xlink:type="simple"/>
    <meta:editing-cycles>19</meta:editing-cycles>
    <meta:editing-duration>PT14760S</meta:editing-duration>
    <meta:user-defined meta:name="Info 1"/>
    <meta:user-defined meta:name="Info 2"/>
    <meta:user-defined meta:name="Info 3"/>
    <meta:user-defined meta:name="Info 4"/>
    <meta:document-statistic meta:page-count="11" meta:paragraph-count="24" meta:word-count="1907" meta:character-count="12184" meta:row-count="85" meta:non-whitespace-character-count="10301"/>
  </office:meta>
</office:document-meta>
</file>