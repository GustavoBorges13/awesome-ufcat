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1.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1.2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text:style-name="WW_CharLFO20LVL2" style:num-suffix=".1.3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1.4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2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BCtitle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 style:text-position="super 66.6%"/>
    </style:style>
    <style:style style:name="T4" style:parent-style-name="DefaultParagraphFont" style:family="text">
      <style:text-properties style:font-name="Times New Roman" style:text-position="super 66.6%"/>
    </style:style>
    <style:style style:name="T5" style:parent-style-name="DefaultParagraphFont" style:family="text">
      <style:text-properties style:font-name="Times New Roman"/>
    </style:style>
    <style:style style:name="P6" style:parent-style-name="SBCemail" style:family="paragraph">
      <style:text-properties style:font-name="Times New Roman" style:font-name-complex="Times New Roman"/>
    </style:style>
    <style:style style:name="P7" style:parent-style-name="SBCresumo" style:family="paragraph">
      <style:text-properties style:font-name="Times New Roman"/>
    </style:style>
    <style:style style:name="P8" style:parent-style-name="SBCtitle1" style:family="paragraph">
      <style:text-properties style:font-name="Times New Roman"/>
    </style:style>
    <style:style style:name="P9" style:parent-style-name="SBCtitle2" style:family="paragraph">
      <style:text-properties style:font-name="Times New Roman"/>
    </style:style>
    <style:style style:name="P10" style:parent-style-name="SBCparagraph" style:family="paragraph">
      <style:paragraph-properties fo:text-indent="0.2958in"/>
      <style:text-properties style:font-name="Times New Roman"/>
    </style:style>
    <style:style style:name="P11" style:parent-style-name="SBCparagraph" style:family="paragraph">
      <style:paragraph-properties fo:text-indent="0.2958in"/>
      <style:text-properties style:font-name="Times New Roman"/>
    </style:style>
    <style:style style:name="P12" style:parent-style-name="SBCtitle2" style:family="paragraph">
      <style:text-properties style:font-name="Times New Roman"/>
    </style:style>
    <style:style style:name="P13" style:parent-style-name="SBCtitle2" style:family="paragraph">
      <style:text-properties style:font-name="Times New Roman"/>
    </style:style>
    <style:style style:name="P14" style:parent-style-name="SBCparagraph" style:family="paragraph">
      <style:paragraph-properties fo:text-indent="0.2958in"/>
    </style:style>
    <style:style style:name="T15" style:parent-style-name="DefaultParagraphFont" style:family="text">
      <style:text-properties style:font-name="Times New Roman"/>
    </style:style>
    <style:style style:name="T16" style:parent-style-name="Hyperlink" style:family="text">
      <style:text-properties style:font-name="Times New Roman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4472C4"/>
    </style:style>
    <style:style style:name="T20" style:parent-style-name="DefaultParagraphFont" style:family="text">
      <style:text-properties style:font-name="Times New Roman" fo:color="#4472C4"/>
    </style:style>
    <style:style style:name="T21" style:parent-style-name="DefaultParagraphFont" style:family="text">
      <style:text-properties style:font-name="Times New Roman" fo:color="#4472C4"/>
    </style:style>
    <style:style style:name="T22" style:parent-style-name="DefaultParagraphFont" style:family="text">
      <style:text-properties style:font-name="Times New Roman"/>
    </style:style>
    <style:style style:name="P23" style:parent-style-name="SBCparagraph" style:family="paragraph">
      <style:paragraph-properties fo:text-indent="0.2958in"/>
      <style:text-properties style:font-name="Times New Roman"/>
    </style:style>
    <style:style style:name="P24" style:parent-style-name="SBCparagraph" style:family="paragraph">
      <style:paragraph-properties fo:text-align="center" fo:text-indent="0.2958in"/>
    </style:style>
    <style:style style:name="T25" style:parent-style-name="DefaultParagraphFont" style:family="text">
      <style:text-properties style:font-name="Times New Roman"/>
    </style:style>
    <style:style style:name="P26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27" style:parent-style-name="SBCparagraph" style:family="paragraph">
      <style:paragraph-properties fo:text-indent="0.2958in"/>
      <style:text-properties style:font-name="Times New Roman"/>
    </style:style>
    <style:style style:name="P28" style:parent-style-name="SBCparagraph" style:family="paragraph">
      <style:paragraph-properties fo:text-indent="0.2958in"/>
      <style:text-properties style:font-name="Times New Roman"/>
    </style:style>
    <style:style style:name="P29" style:parent-style-name="SBCparagraph" style:family="paragraph">
      <style:paragraph-properties fo:text-indent="0.2958in"/>
      <style:text-properties style:font-name="Times New Roman"/>
    </style:style>
    <style:style style:name="P30" style:parent-style-name="SBCparagraph" style:family="paragraph">
      <style:paragraph-properties fo:text-align="center" fo:text-indent="0.2958in"/>
    </style:style>
    <style:style style:name="T31" style:parent-style-name="DefaultParagraphFont" style:family="text">
      <style:text-properties style:font-name="Times New Roman"/>
    </style:style>
    <style:style style:name="P32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33" style:parent-style-name="SBCparagraph" style:master-page-name="MP1" style:family="paragraph">
      <style:paragraph-properties fo:break-before="page" fo:text-indent="0.2958in"/>
      <style:text-properties style:font-name="Times New Roman"/>
    </style:style>
    <style:style style:name="P34" style:parent-style-name="SBCparagraph" style:family="paragraph">
      <style:paragraph-properties fo:text-align="center" fo:text-indent="0.2958in"/>
    </style:style>
    <style:style style:name="T35" style:parent-style-name="DefaultParagraphFont" style:family="text">
      <style:text-properties style:font-name="Times New Roman"/>
    </style:style>
    <style:style style:name="P36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37" style:parent-style-name="SBCparagraph" style:family="paragraph">
      <style:paragraph-properties fo:text-indent="0.2958in"/>
      <style:text-properties style:font-name="Times New Roman"/>
    </style:style>
    <style:style style:name="P38" style:parent-style-name="SBCparagraph" style:family="paragraph">
      <style:paragraph-properties fo:text-align="center" fo:text-indent="0.2958in"/>
    </style:style>
    <style:style style:name="T39" style:parent-style-name="DefaultParagraphFont" style:family="text">
      <style:text-properties style:font-name="Times New Roman"/>
    </style:style>
    <style:style style:name="P40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1" style:parent-style-name="SBCparagraph" style:master-page-name="MP2" style:family="paragraph">
      <style:paragraph-properties fo:break-before="page" fo:text-indent="0.2958in"/>
      <style:text-properties style:font-name="Times New Roman"/>
    </style:style>
    <style:style style:name="P42" style:parent-style-name="SBCparagraph" style:family="paragraph">
      <style:paragraph-properties fo:text-align="center" fo:text-indent="0.2958in"/>
    </style:style>
    <style:style style:name="T43" style:parent-style-name="DefaultParagraphFont" style:family="text">
      <style:text-properties style:font-name="Times New Roman"/>
    </style:style>
    <style:style style:name="P44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5" style:parent-style-name="SBCparagraph" style:family="paragraph">
      <style:paragraph-properties fo:text-align="center" fo:line-height="150%" fo:text-indent="0.2958i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P49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50" style:parent-style-name="SBCtitle2" style:master-page-name="MP3" style:family="paragraph">
      <style:paragraph-properties fo:break-before="page"/>
      <style:text-properties style:font-name="Times New Roman"/>
    </style:style>
    <style:style style:name="P51" style:parent-style-name="SBCparagraphfirst" style:family="paragraph">
      <style:paragraph-properties fo:text-indent="0.2958i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 fo:color="#4472C4"/>
    </style:style>
    <style:style style:name="T57" style:parent-style-name="DefaultParagraphFont" style:family="text">
      <style:text-properties style:font-name="Times New Roman"/>
    </style:style>
    <style:style style:name="P58" style:parent-style-name="SBCparagraph" style:family="paragraph"/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P62" style:parent-style-name="SBCparagraph" style:family="paragraph"/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64" style:parent-style-name="DefaultParagraphFont" style:family="text">
      <style:text-properties style:font-name="Times New Roman"/>
    </style:style>
    <style:style style:name="P65" style:parent-style-name="SBCparagraph" style:family="paragraph"/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/>
    </style:style>
    <style:style style:name="P74" style:parent-style-name="SBCparagraph" style:family="paragraph">
      <style:text-properties style:font-name="Times New Roman"/>
    </style:style>
    <style:style style:name="P75" style:parent-style-name="SBCparagraph" style:family="paragraph">
      <style:paragraph-properties fo:text-indent="0.2958in"/>
      <style:text-properties style:font-name="Times New Roman"/>
    </style:style>
    <style:style style:name="P76" style:parent-style-name="SBCparagraph" style:family="paragraph">
      <style:paragraph-properties fo:text-indent="0.2958in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/>
    </style:style>
    <style:style style:name="P80" style:parent-style-name="SBCparagraph" style:family="paragraph">
      <style:paragraph-properties fo:text-indent="0.2958i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 fo:font-weight="bold" style:font-weight-asian="bold" style:font-weight-complex="bold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/>
    </style:style>
    <style:style style:name="P86" style:parent-style-name="SBCparagraph" style:family="paragraph">
      <style:paragraph-properties fo:text-align="center" fo:text-indent="0.2958in"/>
    </style:style>
    <style:style style:name="T87" style:parent-style-name="DefaultParagraphFont" style:family="text">
      <style:text-properties style:font-name="Times New Roman"/>
    </style:style>
    <style:style style:name="P88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89" style:parent-style-name="SBCparagraph" style:master-page-name="MP4" style:family="paragraph">
      <style:paragraph-properties fo:break-before="page" fo:text-indent="0.2958in"/>
      <style:text-properties style:font-name="Times New Roman"/>
    </style:style>
    <style:style style:name="P90" style:parent-style-name="SBCparagraph" style:family="paragraph">
      <style:paragraph-properties fo:margin-bottom="0.1666in" fo:text-indent="0.2958in"/>
      <style:text-properties style:font-name="Times New Roman"/>
    </style:style>
    <style:style style:name="P91" style:parent-style-name="SBCparagraph" style:family="paragraph">
      <style:paragraph-properties fo:text-align="center" fo:text-indent="0.2958in"/>
    </style:style>
    <style:style style:name="T92" style:parent-style-name="DefaultParagraphFont" style:family="text">
      <style:text-properties style:font-name="Times New Roman"/>
    </style:style>
    <style:style style:name="P93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94" style:parent-style-name="SBCparagraph" style:family="paragraph">
      <style:paragraph-properties fo:text-indent="0.2958in"/>
      <style:text-properties style:font-name="Times New Roman"/>
    </style:style>
    <style:style style:name="P95" style:parent-style-name="SBCparagraph" style:family="paragraph">
      <style:paragraph-properties fo:text-align="center" fo:text-indent="0.2958in"/>
    </style:style>
    <style:style style:name="T96" style:parent-style-name="DefaultParagraphFont" style:family="text">
      <style:text-properties style:font-name="Times New Roman"/>
    </style:style>
    <style:style style:name="P97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98" style:parent-style-name="SBCparagraph" style:family="paragraph">
      <style:paragraph-properties fo:text-indent="0.2958in"/>
      <style:text-properties style:font-name="Times New Roman"/>
    </style:style>
    <style:style style:name="P99" style:parent-style-name="SBCparagraph" style:family="paragraph">
      <style:paragraph-properties fo:text-align="center" fo:text-indent="0.2958in"/>
    </style:style>
    <style:style style:name="T100" style:parent-style-name="DefaultParagraphFont" style:family="text">
      <style:text-properties style:font-name="Times New Roman"/>
    </style:style>
    <style:style style:name="P101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102" style:parent-style-name="SBCparagraph" style:family="paragraph">
      <style:paragraph-properties fo:margin-bottom="0.1666in"/>
      <style:text-properties style:font-name="Times New Roman"/>
    </style:style>
    <style:style style:name="P103" style:parent-style-name="SBCparagraph" style:family="paragraph">
      <style:paragraph-properties fo:text-align="center" fo:text-indent="0.2958in"/>
    </style:style>
    <style:style style:name="T104" style:parent-style-name="DefaultParagraphFont" style:family="text">
      <style:text-properties style:font-name="Times New Roman"/>
    </style:style>
    <style:style style:name="P105" style:parent-style-name="SBCcaption" style:family="paragraph">
      <style:paragraph-properties fo:margin-bottom="0in" fo:line-height="200%" fo:margin-left="0in" fo:text-indent="0.2958in">
        <style:tab-stops/>
      </style:paragraph-properties>
      <style:text-properties style:font-name="Times New Roman"/>
    </style:style>
    <style:style style:name="P106" style:parent-style-name="SBCtitle2" style:family="paragraph">
      <style:text-properties style:font-name="Times New Roman"/>
    </style:style>
    <style:style style:name="P107" style:parent-style-name="SBCparagraphfirst" style:family="paragraph">
      <style:paragraph-properties fo:text-indent="0.2958in"/>
      <style:text-properties style:font-name="Times New Roman"/>
    </style:style>
    <style:style style:name="P108" style:parent-style-name="SBCparagraph" style:family="paragraph">
      <style:paragraph-properties fo:text-indent="0.2958in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 fo:font-weight="bold" style:font-weight-asian="bold" style:font-weight-complex="bold"/>
    </style:style>
    <style:style style:name="T111" style:parent-style-name="DefaultParagraphFont" style:family="text">
      <style:text-properties style:font-name="Times New Roman"/>
    </style:style>
    <style:style style:name="P112" style:parent-style-name="SBCparagraph" style:family="paragraph">
      <style:paragraph-properties fo:text-indent="0.2958i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 fo:font-weight="bold" style:font-weight-asian="bold" style:font-weight-complex="bold"/>
    </style:style>
    <style:style style:name="T116" style:parent-style-name="DefaultParagraphFont" style:family="text">
      <style:text-properties style:font-name="Times New Roman" fo:font-weight="bold" style:font-weight-asian="bold" style:font-weight-complex="bold"/>
    </style:style>
    <style:style style:name="P117" style:parent-style-name="SBCparagraph" style:family="paragraph">
      <style:paragraph-properties fo:text-indent="0.2958in"/>
      <style:text-properties style:font-name="Times New Roman"/>
    </style:style>
    <style:style style:name="P118" style:parent-style-name="SBCparagraph" style:family="paragraph">
      <style:paragraph-properties fo:text-align="center" fo:text-indent="0.2958in"/>
    </style:style>
    <style:style style:name="T119" style:parent-style-name="DefaultParagraphFont" style:family="text">
      <style:text-properties style:font-name="Times New Roman"/>
    </style:style>
    <style:style style:name="P120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121" style:parent-style-name="SBCparagraph" style:family="paragraph">
      <style:paragraph-properties fo:text-align="center" fo:text-indent="0.2958in"/>
    </style:style>
    <style:style style:name="T122" style:parent-style-name="DefaultParagraphFont" style:family="text">
      <style:text-properties style:font-name="Times New Roman"/>
    </style:style>
    <style:style style:name="P123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124" style:parent-style-name="SBCtitle2" style:master-page-name="MP5" style:family="paragraph">
      <style:paragraph-properties fo:break-before="page"/>
      <style:text-properties style:font-name="Times New Roman"/>
    </style:style>
    <style:style style:name="P125" style:parent-style-name="SBCparagraphfirst" style:family="paragraph">
      <style:paragraph-properties fo:text-indent="0.2958in"/>
      <style:text-properties style:font-name="Times New Roman"/>
    </style:style>
    <style:style style:name="P126" style:parent-style-name="SBCparagraph" style:family="paragraph">
      <style:paragraph-properties fo:text-indent="0.2958in"/>
      <style:text-properties style:font-name="Times New Roman"/>
    </style:style>
    <style:style style:name="P127" style:parent-style-name="SBCparagraph" style:family="paragraph"/>
    <style:style style:name="T128" style:parent-style-name="DefaultParagraphFont" style:family="text">
      <style:text-properties style:font-name="Times New Roman" fo:font-weight="bold" style:font-weight-asian="bold" style:font-weight-complex="bold"/>
    </style:style>
    <style:style style:name="T129" style:parent-style-name="DefaultParagraphFont" style:family="text">
      <style:text-properties style:font-name="Times New Roman" fo:font-weight="bold" style:font-weight-asian="bold" style:font-weight-complex="bold"/>
    </style:style>
    <style:style style:name="P130" style:parent-style-name="SBCparagraph" style:family="paragraph">
      <style:text-properties style:font-name="Times New Roman" fo:font-weight="bold" style:font-weight-asian="bold" style:font-weight-complex="bold"/>
    </style:style>
    <style:style style:name="P131" style:parent-style-name="SBCparagraph" style:family="paragraph">
      <style:text-properties style:font-name="Times New Roman"/>
    </style:style>
    <style:style style:name="P132" style:parent-style-name="SBCparagraph" style:family="paragraph">
      <style:paragraph-properties fo:text-indent="0.2958in"/>
      <style:text-properties style:font-name="Times New Roman"/>
    </style:style>
    <style:style style:name="P133" style:parent-style-name="SBCparagraph" style:family="paragraph">
      <style:paragraph-properties fo:text-indent="0.2958in"/>
      <style:text-properties style:font-name="Times New Roman"/>
    </style:style>
    <style:style style:name="P134" style:parent-style-name="SBCparagraph" style:family="paragraph">
      <style:paragraph-properties fo:text-indent="0.2958in"/>
      <style:text-properties style:font-name="Times New Roman"/>
    </style:style>
    <style:style style:name="P135" style:parent-style-name="SBCparagraph" style:family="paragraph">
      <style:paragraph-properties fo:text-indent="0in"/>
      <style:text-properties style:font-name="Times New Roman" fo:font-weight="bold" style:font-weight-asian="bold" style:font-weight-complex="bold" fo:language="en" fo:country="US"/>
    </style:style>
    <style:style style:name="P136" style:parent-style-name="SBCparagraph" style:family="paragraph">
      <style:paragraph-properties fo:text-indent="0.2958in"/>
      <style:text-properties style:font-name="Times New Roman"/>
    </style:style>
    <style:style style:name="P137" style:parent-style-name="SBCparagraph" style:family="paragraph">
      <style:paragraph-properties fo:text-align="center" fo:margin-left="0.5458in" fo:text-indent="0in">
        <style:tab-stops/>
      </style:paragraph-properties>
    </style:style>
    <style:style style:name="T138" style:parent-style-name="DefaultParagraphFont" style:family="text">
      <style:text-properties style:font-name="Times New Roman"/>
    </style:style>
    <style:style style:name="P139" style:parent-style-name="SBCcaption" style:family="paragraph">
      <style:paragraph-properties fo:line-height="200%"/>
      <style:text-properties style:font-name="Times New Roman"/>
    </style:style>
    <style:style style:name="P140" style:parent-style-name="SBCparagraph" style:family="paragraph">
      <style:paragraph-properties fo:text-align="center" fo:text-indent="0.2958in"/>
    </style:style>
    <style:style style:name="T141" style:parent-style-name="DefaultParagraphFont" style:family="text">
      <style:text-properties style:font-name="Times New Roman"/>
    </style:style>
    <style:style style:name="P142" style:parent-style-name="SBCcaption" style:family="paragraph">
      <style:paragraph-properties fo:line-height="200%"/>
      <style:text-properties style:font-name="Times New Roman"/>
    </style:style>
    <style:style style:name="P143" style:parent-style-name="SBCtitle2" style:master-page-name="MP6" style:family="paragraph">
      <style:paragraph-properties fo:break-before="page"/>
      <style:text-properties style:font-name="Times New Roman"/>
    </style:style>
    <style:style style:name="P144" style:parent-style-name="SBCparagraphfirst" style:family="paragraph">
      <style:paragraph-properties fo:text-indent="0.2958in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 fo:font-weight="bold" style:font-weight-asian="bold" style:font-weight-complex="bold"/>
    </style:style>
    <style:style style:name="P147" style:parent-style-name="SBCparagraph" style:family="paragraph">
      <style:paragraph-properties fo:text-align="center" fo:text-indent="0.2958in"/>
    </style:style>
    <style:style style:name="T148" style:parent-style-name="DefaultParagraphFont" style:family="text">
      <style:text-properties style:font-name="Times New Roman"/>
    </style:style>
    <style:style style:name="P149" style:parent-style-name="SBCcaption" style:family="paragraph">
      <style:paragraph-properties fo:line-height="200%" fo:text-indent="0.2958in"/>
      <style:text-properties style:font-name="Times New Roman"/>
    </style:style>
    <style:style style:name="P150" style:parent-style-name="SBCparagraph" style:family="paragraph">
      <style:paragraph-properties fo:text-indent="0.2958in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/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 fo:font-weight="bold" style:font-weight-asian="bold" style:font-weight-complex="bold"/>
    </style:style>
    <style:style style:name="T155" style:parent-style-name="DefaultParagraphFont" style:family="text">
      <style:text-properties style:font-name="Times New Roman"/>
    </style:style>
    <style:style style:name="P156" style:parent-style-name="SBCparagraph" style:family="paragraph">
      <style:paragraph-properties fo:text-align="center" fo:text-indent="0.2958in"/>
    </style:style>
    <style:style style:name="T157" style:parent-style-name="DefaultParagraphFont" style:family="text">
      <style:text-properties style:font-name="Times New Roman"/>
    </style:style>
    <style:style style:name="P158" style:parent-style-name="SBCcaption" style:family="paragraph">
      <style:paragraph-properties fo:line-height="200%"/>
      <style:text-properties style:font-name="Times New Roman"/>
    </style:style>
    <style:style style:name="P159" style:parent-style-name="SBCtitle2" style:family="paragraph">
      <style:text-properties style:font-name="Times New Roman"/>
    </style:style>
    <style:style style:name="P160" style:parent-style-name="SBCparagraphfirst" style:family="paragraph">
      <style:paragraph-properties fo:text-indent="0.2958in"/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 fo:font-weight="bold" style:font-weight-asian="bold" style:font-weight-complex="bold"/>
    </style:style>
    <style:style style:name="P163" style:parent-style-name="SBCparagraph" style:family="paragraph">
      <style:paragraph-properties fo:text-align="center" fo:text-indent="0.2958in"/>
    </style:style>
    <style:style style:name="T164" style:parent-style-name="DefaultParagraphFont" style:family="text">
      <style:text-properties style:font-name="Times New Roman"/>
    </style:style>
    <style:style style:name="P165" style:parent-style-name="SBCcaption" style:family="paragraph">
      <style:paragraph-properties fo:line-height="200%"/>
      <style:text-properties style:font-name="Times New Roman"/>
    </style:style>
    <style:style style:name="P166" style:parent-style-name="SBCtitle2" style:master-page-name="MP7" style:family="paragraph">
      <style:paragraph-properties fo:break-before="page"/>
      <style:text-properties style:font-name="Times New Roman"/>
    </style:style>
    <style:style style:name="P167" style:parent-style-name="SBCparagraph" style:family="paragraph">
      <style:paragraph-properties fo:text-indent="0.2958in"/>
      <style:text-properties style:font-name="Times New Roman"/>
    </style:style>
    <style:style style:name="P168" style:parent-style-name="SBCparagraph" style:family="paragraph">
      <style:paragraph-properties fo:text-indent="0.2958in"/>
      <style:text-properties style:font-name="Times New Roman"/>
    </style:style>
    <style:style style:name="P169" style:parent-style-name="SBCparagraph" style:family="paragraph">
      <style:paragraph-properties fo:text-indent="0.2958in"/>
      <style:text-properties style:font-name="Times New Roman"/>
    </style:style>
    <style:style style:name="P170" style:parent-style-name="SBCparagraph" style:family="paragraph">
      <style:paragraph-properties fo:text-indent="0.2958in"/>
      <style:text-properties style:font-name="Times New Roman"/>
    </style:style>
    <style:style style:name="P171" style:parent-style-name="SBCparagraph" style:family="paragraph">
      <style:text-properties style:font-name="Times New Roman"/>
    </style:style>
    <style:style style:name="P172" style:parent-style-name="SBCtitle1" style:family="paragraph">
      <style:text-properties style:font-name="Times New Roman"/>
    </style:style>
    <style:style style:name="P173" style:parent-style-name="SBCtitle2" style:family="paragraph">
      <style:paragraph-properties fo:margin-bottom="0.1666in"/>
      <style:text-properties style:font-name="Times New Roman"/>
    </style:style>
    <style:style style:name="P174" style:parent-style-name="SBCparagraph" style:family="paragraph">
      <style:paragraph-properties fo:text-indent="0.2958in"/>
      <style:text-properties style:font-name="Times New Roman"/>
    </style:style>
    <style:style style:name="P175" style:parent-style-name="SBCtitle2" style:family="paragraph">
      <style:paragraph-properties fo:margin-bottom="0.1666in"/>
      <style:text-properties style:font-name="Times New Roman"/>
    </style:style>
    <style:style style:name="P176" style:parent-style-name="SBCparagraph" style:family="paragraph">
      <style:paragraph-properties fo:text-indent="0.2958in"/>
      <style:text-properties style:font-name="Times New Roman"/>
    </style:style>
    <style:style style:name="P177" style:parent-style-name="SBCparagraph" style:family="paragraph">
      <style:text-properties style:font-name="Times New Roman"/>
    </style:style>
    <style:style style:name="P178" style:parent-style-name="SBCparagraph" style:family="paragraph">
      <style:text-properties style:font-name="Times New Roman"/>
    </style:style>
    <style:style style:name="P179" style:parent-style-name="SBCparagraph" style:family="paragraph">
      <style:text-properties style:font-name="Times New Roman"/>
    </style:style>
    <style:style style:name="P180" style:parent-style-name="SBCparagraph" style:family="paragraph"/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 fo:color="#4472C4"/>
    </style:style>
    <style:style style:name="T186" style:parent-style-name="DefaultParagraphFont" style:family="text">
      <style:text-properties style:font-name="Times New Roman"/>
    </style:style>
    <style:style style:name="P187" style:parent-style-name="SBCparagraph" style:master-page-name="MP8" style:family="paragraph">
      <style:paragraph-properties fo:break-before="page" fo:margin-bottom="0.1666in" fo:text-indent="0.2958in"/>
      <style:text-properties style:font-name="Times New Roman" fo:font-weight="bold" style:font-weight-asian="bold" style:font-weight-complex="bold"/>
    </style:style>
    <style:style style:name="P18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18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9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19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19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19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19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20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0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0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2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0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2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1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1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1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1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1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2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3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3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3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35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2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3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3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23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4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4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4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5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5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2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2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6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6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7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7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8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8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8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8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9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9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2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9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0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0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30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0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11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1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1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1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2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2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32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32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2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32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3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2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3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3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4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4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4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4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5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5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5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6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6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6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6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36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68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7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72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7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7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3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7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7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380" style:parent-style-name="SBCtitle2" style:master-page-name="MP9" style:family="paragraph">
      <style:paragraph-properties fo:break-before="page" fo:margin-bottom="0.1666in"/>
      <style:text-properties style:font-name="Times New Roman"/>
    </style:style>
    <style:style style:name="P381" style:parent-style-name="SBCparagraph" style:family="paragraph">
      <style:paragraph-properties fo:margin-bottom="0.1666in" fo:text-indent="0.2958in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/>
    </style:style>
    <style:style style:name="T384" style:parent-style-name="DefaultParagraphFont" style:family="text">
      <style:text-properties style:font-name="Times New Roman" fo:color="#4472C4"/>
    </style:style>
    <style:style style:name="T385" style:parent-style-name="DefaultParagraphFont" style:family="text">
      <style:text-properties style:font-name="Times New Roman" fo:color="#4472C4"/>
    </style:style>
    <style:style style:name="T386" style:parent-style-name="DefaultParagraphFont" style:family="text">
      <style:text-properties style:font-name="Times New Roman"/>
    </style:style>
    <style:style style:name="P387" style:parent-style-name="SBCparagraph" style:family="paragraph">
      <style:paragraph-properties fo:margin-bottom="0.1666in" fo:text-indent="0.2958in"/>
      <style:text-properties style:font-name="Times New Roman" fo:font-weight="bold" style:font-weight-asian="bold" style:font-weight-complex="bold"/>
    </style:style>
    <style:style style:name="P388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38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9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392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39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9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396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39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9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400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0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4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4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406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0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09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1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/>
    </style:style>
    <style:style style:name="T4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2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415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416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4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23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7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430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34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435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436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3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4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4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43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45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4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48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52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453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454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4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6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63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6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7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72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7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75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7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4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79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82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8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4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86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8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90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9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9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96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497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498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4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0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03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0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07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508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1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11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1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15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20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2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24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525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526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527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2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30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39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4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43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46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547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548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5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51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53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55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57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59" style:parent-style-name="Normal" style:family="paragraph">
      <style:paragraph-properties fo:widows="2" fo:orphans="2" style:text-autospace="none" style:vertical-align="auto" fo:text-indent="0.2958in"/>
      <style:text-properties fo:hyphenate="true"/>
    </style:style>
    <style:style style:name="T5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63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564" style:parent-style-name="SBCtitle2" style:master-page-name="MP10" style:family="paragraph">
      <style:paragraph-properties fo:break-before="page" fo:margin-bottom="0.1666in"/>
    </style:style>
    <style:style style:name="T565" style:parent-style-name="DefaultParagraphFont" style:family="text">
      <style:text-properties style:font-name="Times New Roman"/>
    </style:style>
    <style:style style:name="P566" style:parent-style-name="SBCparagraph" style:family="paragraph">
      <style:paragraph-properties fo:margin-bottom="0.1666in"/>
      <style:text-properties style:font-name="Times New Roman"/>
    </style:style>
    <style:style style:name="P567" style:parent-style-name="SBCparagraph" style:family="paragraph">
      <style:paragraph-properties fo:text-indent="0.2958in"/>
      <style:text-properties style:font-name="Times New Roman" fo:font-weight="bold" style:font-weight-asian="bold" style:font-weight-complex="bold"/>
    </style:style>
    <style:style style:name="P568" style:parent-style-name="SBCparagraph" style:family="paragraph">
      <style:paragraph-properties fo:margin-left="0.2958in" fo:text-indent="0in">
        <style:tab-stops/>
      </style:paragraph-properties>
      <style:text-properties style:font-name="Times New Roman"/>
    </style:style>
    <style:style style:name="P56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57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5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7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57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57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5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7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57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57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5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8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58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58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5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8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8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58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8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8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59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5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9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5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9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9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5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0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0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0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0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0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60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1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1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1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2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2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2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2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3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3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3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3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6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4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4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4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5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5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5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5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5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5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6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66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6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6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7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7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7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7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7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8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8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8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9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9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9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9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6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9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69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70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70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70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0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707" style:parent-style-name="SBCtitle2" style:master-page-name="MP11" style:family="paragraph">
      <style:paragraph-properties fo:break-before="page" fo:margin-bottom="0.1666in"/>
      <style:text-properties style:font-name="Times New Roman"/>
    </style:style>
    <style:style style:name="P708" style:parent-style-name="SBCparagraph" style:family="paragraph">
      <style:paragraph-properties fo:margin-bottom="0.1666in" fo:text-indent="0.2958in"/>
    </style:style>
    <style:style style:name="T709" style:parent-style-name="DefaultParagraphFont" style:family="text">
      <style:text-properties style:font-name="Times New Roman"/>
    </style:style>
    <style:style style:name="T710" style:parent-style-name="DefaultParagraphFont" style:family="text">
      <style:text-properties style:font-name="Times New Roman"/>
    </style:style>
    <style:style style:name="T711" style:parent-style-name="DefaultParagraphFont" style:family="text">
      <style:text-properties style:font-name="Times New Roman" fo:color="#4472C4"/>
    </style:style>
    <style:style style:name="T712" style:parent-style-name="DefaultParagraphFont" style:family="text">
      <style:text-properties style:font-name="Times New Roman" fo:color="#4472C4"/>
    </style:style>
    <style:style style:name="T713" style:parent-style-name="DefaultParagraphFont" style:family="text">
      <style:text-properties style:font-name="Times New Roman" fo:color="#4472C4"/>
    </style:style>
    <style:style style:name="T714" style:parent-style-name="DefaultParagraphFont" style:family="text">
      <style:text-properties style:font-name="Times New Roman" fo:color="#4472C4"/>
    </style:style>
    <style:style style:name="T715" style:parent-style-name="DefaultParagraphFont" style:family="text">
      <style:text-properties style:font-name="Times New Roman" fo:color="#4472C4"/>
    </style:style>
    <style:style style:name="T716" style:parent-style-name="DefaultParagraphFont" style:family="text">
      <style:text-properties style:font-name="Times New Roman"/>
    </style:style>
    <style:style style:name="P717" style:parent-style-name="SBCparagraph" style:family="paragraph">
      <style:paragraph-properties fo:margin-bottom="0.1666in" fo:text-indent="0.2958in"/>
      <style:text-properties style:font-name="Times New Roman" fo:font-weight="bold" style:font-weight-asian="bold" style:font-weight-complex="bold"/>
    </style:style>
    <style:style style:name="P71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1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2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72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2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7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2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72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2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2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73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3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3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3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3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3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3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4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74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4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4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5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5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75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75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6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6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6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76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76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7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7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8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8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9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9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7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9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7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0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0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08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1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1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1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1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1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2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2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2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2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82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2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2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3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2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3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3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4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4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4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5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5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5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6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6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6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6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86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68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7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73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8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7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87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7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7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88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fo:hyphenate="true"/>
    </style:style>
    <style:style style:name="T8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8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885" style:parent-style-name="SBCtitle1" style:master-page-name="MP12" style:family="paragraph">
      <style:paragraph-properties fo:break-before="page"/>
      <style:text-properties style:font-name="Times New Roman"/>
    </style:style>
    <style:style style:name="P886" style:parent-style-name="SBCparagraphfirst" style:family="paragraph">
      <style:text-properties style:font-name="Times New Roman"/>
    </style:style>
    <style:style style:name="P887" style:parent-style-name="SBCtitle1" style:family="paragraph">
      <style:text-properties style:font-name="Times New Roman"/>
    </style:style>
    <style:style style:name="P888" style:parent-style-name="SBCparagraphfirst" style:family="paragraph">
      <style:text-properties style:font-name="Times New Roman"/>
    </style:style>
    <style:style style:name="P889" style:parent-style-name="SBCtitle1" style:family="paragraph">
      <style:paragraph-properties fo:margin-bottom="0.1666in"/>
      <style:text-properties style:font-name="Times New Roman"/>
    </style:style>
    <style:style style:name="P890" style:parent-style-name="SBCparagraph" style:family="paragraph">
      <style:paragraph-properties fo:margin-left="0.3937in" fo:text-indent="-0.3937in">
        <style:tab-stops/>
      </style:paragraph-properties>
    </style:style>
    <style:style style:name="T891" style:parent-style-name="DefaultParagraphFont" style:family="text">
      <style:text-properties style:font-name="Times New Roman"/>
    </style:style>
    <style:style style:name="T892" style:parent-style-name="Hyperlink" style:family="text">
      <style:text-properties style:font-name="Times New Roman"/>
    </style:style>
    <style:style style:name="T893" style:parent-style-name="DefaultParagraphFont" style:family="text">
      <style:text-properties style:font-name="Times New Roman"/>
    </style:style>
    <style:style style:name="P894" style:parent-style-name="SBCparagraphfirst" style:family="paragraph">
      <style:paragraph-properties fo:margin-left="0.3937in" fo:text-indent="-0.3937in">
        <style:tab-stops/>
      </style:paragraph-properties>
    </style:style>
    <style:style style:name="T895" style:parent-style-name="DefaultParagraphFont" style:family="text">
      <style:text-properties style:font-name="Times New Roman"/>
    </style:style>
    <style:style style:name="T896" style:parent-style-name="Hyperlink" style:family="text">
      <style:text-properties style:font-name="Times New Roman"/>
    </style:style>
    <style:style style:name="T897" style:parent-style-name="DefaultParagraphFont" style:family="text">
      <style:text-properties style:font-name="Times New Roman"/>
    </style:style>
    <style:style style:name="P898" style:parent-style-name="SBCparagraph" style:family="paragraph">
      <style:paragraph-properties fo:margin-left="0.3937in" fo:text-indent="-0.3937in">
        <style:tab-stops/>
      </style:paragraph-properties>
    </style:style>
    <style:style style:name="T899" style:parent-style-name="DefaultParagraphFont" style:family="text">
      <style:text-properties style:font-name="Times New Roman"/>
    </style:style>
    <style:style style:name="T900" style:parent-style-name="DefaultParagraphFont" style:family="text">
      <style:text-properties style:font-name="Times New Roman"/>
    </style:style>
    <style:style style:name="T901" style:parent-style-name="DefaultParagraphFont" style:family="text">
      <style:text-properties style:font-name="Times New Roman"/>
    </style:style>
    <style:style style:name="T902" style:parent-style-name="Hyperlink" style:family="text">
      <style:text-properties style:font-name="Times New Roman"/>
    </style:style>
    <style:style style:name="T903" style:parent-style-name="DefaultParagraphFont" style:family="text">
      <style:text-properties style:font-name="Times New Roman"/>
    </style:style>
    <style:style style:name="P904" style:parent-style-name="SBCparagraph" style:family="paragraph">
      <style:paragraph-properties fo:margin-left="0.3937in" fo:text-indent="-0.3937in">
        <style:tab-stops/>
      </style:paragraph-properties>
    </style:style>
    <style:style style:name="T905" style:parent-style-name="DefaultParagraphFont" style:family="text">
      <style:text-properties style:font-name="Times New Roman" fo:language="en" fo:country="US"/>
    </style:style>
    <style:style style:name="T906" style:parent-style-name="DefaultParagraphFont" style:family="text">
      <style:text-properties style:font-name="Times New Roman" fo:language="en" fo:country="US"/>
    </style:style>
    <style:style style:name="T907" style:parent-style-name="DefaultParagraphFont" style:family="text">
      <style:text-properties style:font-name="Times New Roman" fo:language="en" fo:country="US"/>
    </style:style>
    <style:style style:name="T908" style:parent-style-name="Hyperlink" style:family="text">
      <style:text-properties style:font-name="Times New Roman"/>
    </style:style>
    <style:style style:name="T909" style:parent-style-name="DefaultParagraphFont" style:family="text">
      <style:text-properties style:font-name="Times New Roman"/>
    </style:style>
    <style:style style:name="T910" style:parent-style-name="DefaultParagraphFont" style:family="text">
      <style:text-properties style:font-name="Times New Roman"/>
    </style:style>
    <style:style style:name="T911" style:parent-style-name="DefaultParagraphFont" style:family="text">
      <style:text-properties style:font-name="Times New Roman"/>
    </style:style>
    <style:style style:name="P912" style:parent-style-name="SBCparagraph" style:family="paragraph">
      <style:paragraph-properties fo:margin-left="0.3937in" fo:text-indent="-0.3937in">
        <style:tab-stops/>
      </style:paragraph-properties>
    </style:style>
    <style:style style:name="T913" style:parent-style-name="DefaultParagraphFont" style:family="text">
      <style:text-properties style:font-name="Times New Roman" fo:language="en" fo:country="US"/>
    </style:style>
    <style:style style:name="T914" style:parent-style-name="DefaultParagraphFont" style:family="text">
      <style:text-properties style:font-name="Times New Roman" fo:language="en" fo:country="US"/>
    </style:style>
    <style:style style:name="T915" style:parent-style-name="DefaultParagraphFont" style:family="text">
      <style:text-properties style:font-name="Times New Roman" fo:language="en" fo:country="US"/>
    </style:style>
    <style:style style:name="T916" style:parent-style-name="DefaultParagraphFont" style:family="text">
      <style:text-properties style:font-name="Times New Roman" fo:language="en" fo:country="US"/>
    </style:style>
    <style:style style:name="T917" style:parent-style-name="DefaultParagraphFont" style:family="text">
      <style:text-properties style:font-name="Times New Roman" fo:language="en" fo:country="US"/>
    </style:style>
    <style:style style:name="T918" style:parent-style-name="DefaultParagraphFont" style:family="text">
      <style:text-properties style:font-name="Times New Roman" fo:language="en" fo:country="US"/>
    </style:style>
    <style:style style:name="T919" style:parent-style-name="Hyperlink" style:family="text">
      <style:text-properties style:font-name="Times New Roman"/>
    </style:style>
    <style:style style:name="T920" style:parent-style-name="DefaultParagraphFont" style:family="text">
      <style:text-properties style:font-name="Times New Roman"/>
    </style:style>
    <style:style style:name="T921" style:parent-style-name="DefaultParagraphFont" style:family="text">
      <style:text-properties style:font-name="Times New Roman"/>
    </style:style>
    <style:style style:name="T922" style:parent-style-name="DefaultParagraphFont" style:family="text">
      <style:text-properties style:font-name="Times New Roman"/>
    </style:style>
    <style:style style:name="P923" style:parent-style-name="SBCparagraph" style:family="paragraph">
      <style:paragraph-properties fo:margin-left="0.3937in" fo:text-indent="-0.3937in">
        <style:tab-stops/>
      </style:paragraph-properties>
    </style:style>
    <style:style style:name="T924" style:parent-style-name="DefaultParagraphFont" style:family="text">
      <style:text-properties style:font-name="Times New Roman" fo:language="en" fo:country="US"/>
    </style:style>
    <style:style style:name="T925" style:parent-style-name="DefaultParagraphFont" style:family="text">
      <style:text-properties style:font-name="Times New Roman" fo:language="en" fo:country="US"/>
    </style:style>
    <style:style style:name="T926" style:parent-style-name="DefaultParagraphFont" style:family="text">
      <style:text-properties style:font-name="Times New Roman" fo:language="en" fo:country="US"/>
    </style:style>
    <style:style style:name="T927" style:parent-style-name="DefaultParagraphFont" style:family="text">
      <style:text-properties style:font-name="Times New Roman" fo:language="en" fo:country="US"/>
    </style:style>
    <style:style style:name="T928" style:parent-style-name="DefaultParagraphFont" style:family="text">
      <style:text-properties style:font-name="Times New Roman" fo:language="en" fo:country="US"/>
    </style:style>
    <style:style style:name="T929" style:parent-style-name="DefaultParagraphFont" style:family="text">
      <style:text-properties style:font-name="Times New Roman" fo:language="en" fo:country="US"/>
    </style:style>
    <style:style style:name="T930" style:parent-style-name="DefaultParagraphFont" style:family="text">
      <style:text-properties style:font-name="Times New Roman" fo:language="en" fo:country="US"/>
    </style:style>
    <style:style style:name="T931" style:parent-style-name="DefaultParagraphFont" style:family="text">
      <style:text-properties style:font-name="Times New Roman" fo:language="en" fo:country="US"/>
    </style:style>
    <style:style style:name="T932" style:parent-style-name="DefaultParagraphFont" style:family="text">
      <style:text-properties style:font-name="Times New Roman" fo:language="en" fo:country="US"/>
    </style:style>
    <style:style style:name="T933" style:parent-style-name="Hyperlink" style:family="text">
      <style:text-properties style:font-name="Times New Roman"/>
    </style:style>
    <style:style style:name="T934" style:parent-style-name="DefaultParagraphFont" style:family="text">
      <style:text-properties style:font-name="Times New Roman"/>
    </style:style>
    <style:style style:name="T935" style:parent-style-name="DefaultParagraphFont" style:family="text">
      <style:text-properties style:font-name="Times New Roman"/>
    </style:style>
    <style:style style:name="P936" style:parent-style-name="SBCparagraph" style:family="paragraph">
      <style:paragraph-properties fo:margin-left="0.3937in" fo:text-indent="-0.3937in">
        <style:tab-stops/>
      </style:paragraph-properties>
    </style:style>
    <style:style style:name="T937" style:parent-style-name="DefaultParagraphFont" style:family="text">
      <style:text-properties style:font-name="Times New Roman" fo:language="en" fo:country="US"/>
    </style:style>
    <style:style style:name="T938" style:parent-style-name="DefaultParagraphFont" style:family="text">
      <style:text-properties style:font-name="Times New Roman" fo:language="en" fo:country="US"/>
    </style:style>
    <style:style style:name="T939" style:parent-style-name="DefaultParagraphFont" style:family="text">
      <style:text-properties style:font-name="Times New Roman" fo:language="en" fo:country="US"/>
    </style:style>
    <style:style style:name="T940" style:parent-style-name="DefaultParagraphFont" style:family="text">
      <style:text-properties style:font-name="Times New Roman" fo:language="en" fo:country="US"/>
    </style:style>
    <style:style style:name="T941" style:parent-style-name="DefaultParagraphFont" style:family="text">
      <style:text-properties style:font-name="Times New Roman" fo:language="en" fo:country="US"/>
    </style:style>
    <style:style style:name="T942" style:parent-style-name="DefaultParagraphFont" style:family="text">
      <style:text-properties style:font-name="Times New Roman" fo:language="en" fo:country="US"/>
    </style:style>
    <style:style style:name="T943" style:parent-style-name="DefaultParagraphFont" style:family="text">
      <style:text-properties style:font-name="Times New Roman" fo:language="en" fo:country="US"/>
    </style:style>
    <style:style style:name="T944" style:parent-style-name="Hyperlink" style:family="text">
      <style:text-properties style:font-name="Times New Roman"/>
    </style:style>
    <style:style style:name="T945" style:parent-style-name="DefaultParagraphFont" style:family="text">
      <style:text-properties style:font-name="Times New Roman"/>
    </style:style>
    <style:style style:name="T946" style:parent-style-name="DefaultParagraphFont" style:family="text">
      <style:text-properties style:font-name="Times New Roman"/>
    </style:style>
    <style:style style:name="P947" style:parent-style-name="SBCparagraph" style:family="paragraph">
      <style:paragraph-properties fo:margin-left="0.3937in" fo:text-indent="-0.3937in">
        <style:tab-stops/>
      </style:paragraph-properties>
    </style:style>
    <style:style style:name="T948" style:parent-style-name="DefaultParagraphFont" style:family="text">
      <style:text-properties style:font-name="Times New Roman"/>
    </style:style>
    <style:style style:name="T949" style:parent-style-name="DefaultParagraphFont" style:family="text">
      <style:text-properties style:font-name="Times New Roman"/>
    </style:style>
    <style:style style:name="T950" style:parent-style-name="DefaultParagraphFont" style:family="text">
      <style:text-properties style:font-name="Times New Roman"/>
    </style:style>
    <style:style style:name="T951" style:parent-style-name="DefaultParagraphFont" style:family="text">
      <style:text-properties style:font-name="Times New Roman" fo:language="en" fo:country="US"/>
    </style:style>
    <style:style style:name="T952" style:parent-style-name="DefaultParagraphFont" style:family="text">
      <style:text-properties style:font-name="Times New Roman" fo:language="en" fo:country="US"/>
    </style:style>
    <style:style style:name="T953" style:parent-style-name="DefaultParagraphFont" style:family="text">
      <style:text-properties style:font-name="Times New Roman" fo:language="en" fo:country="US"/>
    </style:style>
    <style:style style:name="T954" style:parent-style-name="DefaultParagraphFont" style:family="text">
      <style:text-properties style:font-name="Times New Roman" fo:language="en" fo:country="US"/>
    </style:style>
    <style:style style:name="T955" style:parent-style-name="DefaultParagraphFont" style:family="text">
      <style:text-properties style:font-name="Times New Roman"/>
    </style:style>
    <style:style style:name="T956" style:parent-style-name="DefaultParagraphFont" style:family="text">
      <style:text-properties style:font-name="Times New Roman"/>
    </style:style>
    <style:style style:name="T957" style:parent-style-name="DefaultParagraphFont" style:family="text">
      <style:text-properties style:font-name="Times New Roman"/>
    </style:style>
    <style:style style:name="T958" style:parent-style-name="Hyperlink" style:family="text">
      <style:text-properties style:font-name="Times New Roman"/>
    </style:style>
    <style:style style:name="T959" style:parent-style-name="DefaultParagraphFont" style:family="text">
      <style:text-properties style:font-name="Times New Roman"/>
    </style:style>
    <style:style style:name="P960" style:parent-style-name="SBCparagraph" style:family="paragraph">
      <style:paragraph-properties fo:margin-left="0.3937in" fo:text-indent="-0.3937in">
        <style:tab-stops/>
      </style:paragraph-properties>
    </style:style>
    <style:style style:name="T961" style:parent-style-name="DefaultParagraphFont" style:family="text">
      <style:text-properties style:font-name="Times New Roman"/>
    </style:style>
    <style:style style:name="T962" style:parent-style-name="DefaultParagraphFont" style:family="text">
      <style:text-properties style:font-name="Times New Roman"/>
    </style:style>
    <style:style style:name="T963" style:parent-style-name="DefaultParagraphFont" style:family="text">
      <style:text-properties style:font-name="Times New Roman"/>
    </style:style>
    <style:style style:name="T964" style:parent-style-name="DefaultParagraphFont" style:family="text">
      <style:text-properties style:font-name="Times New Roman"/>
    </style:style>
    <style:style style:name="T965" style:parent-style-name="DefaultParagraphFont" style:family="text">
      <style:text-properties style:font-name="Times New Roman"/>
    </style:style>
    <style:style style:name="T966" style:parent-style-name="DefaultParagraphFont" style:family="text">
      <style:text-properties style:font-name="Times New Roman"/>
    </style:style>
    <style:style style:name="T967" style:parent-style-name="DefaultParagraphFont" style:family="text">
      <style:text-properties style:font-name="Times New Roman"/>
    </style:style>
    <style:style style:name="T968" style:parent-style-name="Hyperlink" style:family="text">
      <style:text-properties style:font-name="Times New Roman"/>
    </style:style>
    <style:style style:name="T969" style:parent-style-name="DefaultParagraphFont" style:family="text">
      <style:text-properties style:font-name="Times New Roman"/>
    </style:style>
    <style:style style:name="P970" style:parent-style-name="SBCparagraph" style:family="paragraph">
      <style:paragraph-properties fo:margin-left="0.3937in" fo:text-indent="-0.3937in">
        <style:tab-stops/>
      </style:paragraph-properties>
    </style:style>
    <style:style style:name="T971" style:parent-style-name="DefaultParagraphFont" style:family="text">
      <style:text-properties style:font-name="Times New Roman" fo:language="en" fo:country="US"/>
    </style:style>
    <style:style style:name="T972" style:parent-style-name="DefaultParagraphFont" style:family="text">
      <style:text-properties style:font-name="Times New Roman" fo:language="en" fo:country="US"/>
    </style:style>
    <style:style style:name="T973" style:parent-style-name="DefaultParagraphFont" style:family="text">
      <style:text-properties style:font-name="Times New Roman" fo:language="en" fo:country="US"/>
    </style:style>
    <style:style style:name="T974" style:parent-style-name="DefaultParagraphFont" style:family="text">
      <style:text-properties style:font-name="Times New Roman" fo:language="en" fo:country="US"/>
    </style:style>
    <style:style style:name="T975" style:parent-style-name="DefaultParagraphFont" style:family="text">
      <style:text-properties style:font-name="Times New Roman" fo:language="en" fo:country="US"/>
    </style:style>
    <style:style style:name="T976" style:parent-style-name="DefaultParagraphFont" style:family="text">
      <style:text-properties style:font-name="Times New Roman" fo:language="en" fo:country="US"/>
    </style:style>
    <style:style style:name="T977" style:parent-style-name="DefaultParagraphFont" style:family="text">
      <style:text-properties style:font-name="Times New Roman" fo:language="en" fo:country="US"/>
    </style:style>
    <style:style style:name="T978" style:parent-style-name="DefaultParagraphFont" style:family="text">
      <style:text-properties style:font-name="Times New Roman" fo:language="en" fo:country="US"/>
    </style:style>
    <style:style style:name="T979" style:parent-style-name="DefaultParagraphFont" style:family="text">
      <style:text-properties style:font-name="Times New Roman" fo:language="en" fo:country="US"/>
    </style:style>
    <style:style style:name="T980" style:parent-style-name="Hyperlink" style:family="text">
      <style:text-properties style:font-name="Times New Roman"/>
    </style:style>
    <style:style style:name="T981" style:parent-style-name="DefaultParagraphFont" style:family="text">
      <style:text-properties style:font-name="Times New Roman"/>
    </style:style>
    <style:style style:name="T982" style:parent-style-name="DefaultParagraphFont" style:family="text">
      <style:text-properties style:font-name="Times New Roman"/>
    </style:style>
    <style:style style:family="graphic" style:name="a10" style:parent-style-name="Graphics">
      <style:graphic-properties fo:border="0.01042in none" fo:background-color="transparent" fo:clip="rect(3.30905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.39905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1.73649in, 0in)"/>
    </style:style>
  </office:automatic-styles>
  <office:body>
    <office:text text:use-soft-page-breaks="true">
      <text:p text:style-name="P1">PROJETO 1: FAMILIARIZAÇÃO COM MÁQUINA VIRTUAL E SINCRONIZAÇÃO DE PROCESSOS</text:p>
      <text:p text:style-name="SBCauthors"><text:span text:style-name="T2">Gustavo Borges Peres da Silva</text:span><text:span text:style-name="T3">1</text:span></text:p>
      <text:p text:style-name="SBCinstitution"><text:span text:style-name="T4">1</text:span><text:span text:style-name="T5">Departamento de Ciência da Computação – Universidade Federal de Catalão (UFCAT)</text:span></text:p>
      <text:p text:style-name="P6">gustavo.silva@discente.ufcat.edu.br</text:p>
      <text:p text:style-name="P7"/>
      <text:h text:style-name="P8" text:outline-level="1">Tarefa 1: preparação do sistema</text:h>
      <text:h text:style-name="P9" text:outline-level="2">Descrição</text:h>
      <text:p text:style-name="P10">Neste projeto, deliberadamente escolhemos adotar um ambiente de trabalho personalizado, impulsionado pelo fato de que o nosso computador hospedeiro ostenta configurações de hardware verdadeiramente high-end. Equipado com um processador Ryzen 3 2600G (4 núcleos), um impressionante total de 80GB de RAM operando a 3000MHz e um SSD NVMe de 2TB, o nosso sistema não apenas atende, mas ultrapassa as demandas de desempenho exigidas por este projeto. Além disso, o host está configurado com windows 10 Pro<text:s/>e com a<text:s/>tecnologia de virtualização da AMD-V ativada na BIOS do computador<text:s/>que permite que processadores AMD executem máquinas virtuais de forma mais eficiente, melhorando o desempenho e a eficiência do sistema.</text:p>
      <text:p text:style-name="P11">Em contrapartida, foi utilizado o Oracle VirtualBox para criar a máquina virtualizada, denominada convidado (guest), <text:s/>que opera com o sistema operacional Linux Debian 12.2.0 (bookworm). Sua instalação foi realizada utilizando a imagem do instalador via rede, uma escolha estratégica que permite o download dos pacotes do sistema durante o processo de instalação. Essa opção foi especialmente vantajosa dada a velocidade de conexão com a internet no momento da instalação, que atingiu notáveis 430.03 Mbit/s (download) e 287.58 Mbit/s (upload).</text:p>
      <text:h text:style-name="P12" text:outline-level="2">Passo-a-passo da configuração da Máquina Virtual</text:h>
      <text:h text:style-name="P13" text:outline-level="2">Instalação do Linux Debian</text:h>
      <text:p text:style-name="P14"><text:span text:style-name="T15">O Linux Debian 12 encontra-se disponível para download no seguinte endereço:<text:s/></text:span><text:a xlink:href="https://www.debian.org/distrib/netinst" office:target-frame-name="_top" xlink:show="replace"><text:span text:style-name="T16">https://www.debian.org/distrib/netinst</text:span></text:a><text:span text:style-name="T17">. Optamos por baixar a versão netinst, que é o instalador via rede</text:span><text:span text:style-name="T18"><text:s/></text:span><text:span text:style-name="T19"><text:bookmark-ref text:ref-name="_Ref151322939" text:reference-format="text">[1</text:bookmark-ref></text:span><text:span text:style-name="T20">,</text:span><text:span text:style-name="T21"><text:bookmark-ref text:ref-name="_Ref151322942" text:reference-format="text"> 2]</text:bookmark-ref></text:span><text:span text:style-name="T22">.</text:span></text:p>
      <text:p text:style-name="P23">Para a virtualização do Debian, escolhemos utilizar o Oracle VirtualBox como plataforma de hospedagem. Na figura 1 abaixo, compartilhamos a configuração inicial realizada por meio do assistente.</text:p>
      <text:soft-page-break/>
      <text:p text:style-name="P24"><text:span text:style-name="T25"><draw:frame draw:style-name="a0" draw:name="Picture 1" text:anchor-type="as-char" svg:x="0in" svg:y="0in" svg:width="4.98261in" svg:height="2.60146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26">Figura 1. Criar máquina virtual</text:p>
      <text:p text:style-name="P27">Na implementação do<text:s/>projeto, foi escolhido adotar uma estratégia eficiente por meio da instalação desassistida do sistema operacional convidado, utilizando a interface de configuração disponibilizada durante o assistente de instalação. Essa abordagem simplifica e automatiza o processo, eliminando a necessidade de intervenção manual repetitiva.</text:p>
      <text:p text:style-name="P28">Durante a etapa de configuração desassistida na janela do assistente, antecipei a criação do usuário necessário para o sistema. Essa medida tem como objetivo otimizar a eficiência do processo, garantindo a padronização e consistência na implementação.</text:p>
      <text:p text:style-name="P29"><text:bookmark-start text:name="_Hlk151062120"/>Ao definir<text:s/><text:bookmark-end text:name="_Hlk151062120"/>previamente detalhes como nome de usuário e senha diretamente na interface de configuração, assegurei que o sistema operacional convidado seja instalado com as configurações desejadas de forma rápida e precisa conforme a Figura 2 abaixo.</text:p>
      <text:p text:style-name="P30"><text:span text:style-name="T31"><draw:frame draw:style-name="a1" draw:name="Picture 1" text:anchor-type="as-char" svg:x="0in" svg:y="0in" svg:width="5.0114in" svg:height="2.60942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32">Figura 2. Configuração de Instalação Dessasistida de SO guest</text:p>
      <text:soft-page-break/>
      <text:p text:style-name="P33">Sobre a definição do hardware utilizado para a máquina guest, foi realizado uma configuração bem interessante para evitar quedas de desempenho. Optei por utilizar uma quantidade razoavel de memoria RAM 52Gb RAM (52*1024) e todos os núcleos do processador (4 núcleos) conforme a figura 3 abaixo.</text:p>
      <text:p text:style-name="P34"><text:span text:style-name="T35"><draw:frame draw:style-name="a2" draw:name="Picture 1" text:anchor-type="as-char" svg:x="0in" svg:y="0in" svg:width="4.99879in" svg:height="2.62048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span></text:p>
      <text:p text:style-name="P36"><text:s/>Figura 3. Hardware Guest</text:p>
      <text:p text:style-name="P37">Sobre o disco rígido da máquina virtual, consideramos um tamanho bastante exagerado para termos certeza que não iriamos ter problemas com armazenamento e aproveitar da máquina host que possui muito armazenamento livre disponivel, sendo assim, foi utilizado 60Gb de armazenamento (60*1024) conforme a figura 4 abaixo.</text:p>
      <text:p text:style-name="P38"><text:span text:style-name="T39"><draw:frame draw:style-name="a3" draw:name="Picture 1" text:anchor-type="as-char" svg:x="0in" svg:y="0in" svg:width="4.92077in" svg:height="2.57033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40">Figura 4. Armazenamento Guest</text:p>
      <text:soft-page-break/>
      <text:p text:style-name="P41">Abaixo está o resumo da configuração da máquina.</text:p>
      <text:p text:style-name="P42"><text:span text:style-name="T43"><draw:frame draw:style-name="a4" draw:name="Picture 1" text:anchor-type="as-char" svg:x="0in" svg:y="0in" svg:width="4.61782in" svg:height="2.84867in" style:rel-width="scale" style:rel-height="scale"><draw:image xlink:href="media/image5.png" xlink:type="simple" xlink:show="embed" xlink:actuate="onLoad"/><svg:title/><svg:desc>A screenshot of a computer program

Description automatically generated</svg:desc></draw:frame></text:span></text:p>
      <text:p text:style-name="P44">Figura 4. Resumo</text:p>
      <text:p text:style-name="P45"><text:span text:style-name="T46">Com aproximadamente 7 minutos a máquina virtual foi instalada com sucesso.</text:span><text:span text:style-name="T47"><text:line-break/></text:span><text:span text:style-name="T48"><draw:frame draw:style-name="a5" draw:name="Picture 1" text:anchor-type="as-char" svg:x="0in" svg:y="0in" svg:width="4.9206in" svg:height="4.11574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49">Figura 5. Maquina Virtual Instalada</text:p>
      <text:soft-page-break/>
      <text:h text:style-name="P50" text:outline-level="2">Configuração da Máquina Virtual</text:h>
      <text:p text:style-name="P51"><text:span text:style-name="T52">Após a<text:s/></text:span><text:span text:style-name="T53">instalação do debian, foi necessário atribuir o usuário vboxuser como administrador para ter acesso ao root no arquivo /etc/sudoers (arquivo de permiss</text:span><text:span text:style-name="T54">ão de usuários)</text:span><text:span text:style-name="T55"><text:s/></text:span><text:span text:style-name="T56"><text:bookmark-ref text:ref-name="_Ref151322999" text:reference-format="text">[3]</text:bookmark-ref></text:span><text:span text:style-name="T57">.</text:span></text:p>
      <text:list text:style-name="LFO6" text:continue-numbering="true">
        <text:list-item>
          <text:p text:style-name="P58"><text:span text:style-name="T59">su</text:span><text:span text:style-name="T60"><text:s/>+ sua senha (para mudar seu user)</text:span><text:span text:style-name="T61">;</text:span></text:p>
        </text:list-item>
        <text:list-item>
          <text:p text:style-name="P62"><text:span text:style-name="T63">sudo nano /etc/sudoers</text:span><text:span text:style-name="T64"><text:s/>(para editar o arquivo de permissões de usuários);</text:span></text:p>
        </text:list-item>
        <text:list-item>
          <text:p text:style-name="P65"><text:span text:style-name="T66">A baixo da linha onde se encontra essa frase: %sudo ALL=(ALL:ALL) ALL, tem que adicionar outra linha, escrevendo-se o seguinte:<text:s/></text:span><text:span text:style-name="T67">nomeUsuario</text:span><text:span text:style-name="T68"><text:s/></text:span><text:span text:style-name="T69">ALL=(ALL) ALL</text:span><text:span text:style-name="T70"><text:s/>(Agora seu user tem acesso root). Lembrando que o nomeUsuario<text:s/></text:span><text:span text:style-name="T71">no caso do projeto é o<text:s/></text:span><text:span text:style-name="T72">vboxuser</text:span><text:span text:style-name="T73">;</text:span></text:p>
        </text:list-item>
        <text:list-item>
          <text:p text:style-name="P74">Após alterar, apertar Ctrl + O (Salvar), Ctrl + X (Fechar ), Ctrl + D (Sair do modo root).</text:p>
        </text:list-item>
      </text:list>
      <text:p text:style-name="P75">Adicionalmente, não houve a necessidade de modificar o arquivo sources.list, um componente crucial na configuração do sistema Debian e<text:s/>distribuições relacionadas. Esse arquivo desempenha o papel vital de listar os repositórios de onde o sistema operacional obtém seus pacotes de software. Sua configuração precisa é crucial para o sucesso da execução do comando 'apt-get update'.</text:p>
      <text:p text:style-name="P76"><text:span text:style-name="T77">Além disso, como optamos por instalar o Debian utilizando a conexão de rede, o<text:s/></text:span><text:span text:style-name="T78">sistema automaticamente baixou as versões mais recentes disponíveis</text:span><text:span text:style-name="T79"><text:s/>durante o processo de instalação. Nesse contexto, o sources.list foi configurado como Debian Bookworm, direcionando-se exclusivamente ao repositório de atualizações (bookworm-updates) com os componentes 'main' e 'non-free-firmware'. Essa configuração atende adequadamente às nossas necessidades atuais e proporciona um ambiente estável e atualizado para as operações previstas.</text:span></text:p>
      <text:p text:style-name="P80"><text:span text:style-name="T81">Ao abordar a<text:s/></text:span><text:span text:style-name="T82">configuração da rede na máquina virtual</text:span><text:span text:style-name="T83">, é importante destacar que o próprio VirtualBox oferece uma interface intuitiva para essa configuração. Nesse sentido, a escolha mais comum foi habilitar a comunicação entre a máquina virtual e o sistema operacional hospedeiro através da<text:s/></text:span><text:span text:style-name="T84">configuração da placa de rede em modo bridge</text:span><text:span text:style-name="T85">, conforme ilustrado na Figura 6 abaixo.</text:span></text:p>
      <text:p text:style-name="P86"><text:span text:style-name="T87"><draw:frame draw:style-name="a6" draw:name="Picture 1" text:anchor-type="as-char" svg:x="0in" svg:y="0in" svg:width="4.14387in" svg:height="2.4203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88">Figura 6. Configurando rede</text:p>
      <text:soft-page-break/>
      <text:p text:style-name="P89">Agora que a rede está sendo aparentemente conhecida, vamos fazer o teste no debian e provar que está tudo funcionando. Conquanto, os testes abaixo serve apenas para comprovar essa funcionalidade.</text:p>
      <text:p text:style-name="P90">Utilizando o comando ip a, conseguimos verificar as interfaces de rede e suas configurações e obtivemos o IP 192.168.0.103 conforme na Figura 7.</text:p>
      <text:p text:style-name="P91"><text:span text:style-name="T92"><draw:frame draw:style-name="a7" draw:name="Picture 1" text:anchor-type="as-char" svg:x="0in" svg:y="0in" svg:width="5.5391in" svg:height="2.87459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93">Figura 7. Interface de rede</text:p>
      <text:p text:style-name="P94">Foi utilizado também ferramentas especificas para medir a velocidade da internet como por exemplo o speedtest-cli conforme na Figura 8.</text:p>
      <text:p text:style-name="P95"><text:span text:style-name="T96"><draw:frame draw:style-name="a8" draw:name="Picture 1" text:anchor-type="as-char" svg:x="0in" svg:y="0in" svg:width="4.17832in" svg:height="1.94129in" style:rel-width="scale" style:rel-height="scale"><draw:image xlink:href="media/image9.png" xlink:type="simple" xlink:show="embed" xlink:actuate="onLoad"/><svg:title/><svg:desc>A screenshot of a computer program

Description automatically generated</svg:desc></draw:frame></text:span></text:p>
      <text:p text:style-name="P97">Figura 8. Teste com speedtest-cli</text:p>
      <text:p text:style-name="P98">E também utilizado o comando traceroute para verificar as rotas que os pacotes estão tomando para alcançar um destino, no nosso exemplo utilizamos o site da google conforme a Figura 9.</text:p>
      <text:soft-page-break/>
      <text:p text:style-name="P99"><text:span text:style-name="T100"><draw:frame draw:style-name="a9" draw:name="Picture 1" text:anchor-type="as-char" svg:x="0in" svg:y="0in" svg:width="5.05335in" svg:height="2.01302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span></text:p>
      <text:p text:style-name="P101">Figura 9. Verificando rotas dos pacotes</text:p>
      <text:p text:style-name="P102">E por ultimo utilizamos o comando netstat para verificar as conexões de rede e o estado das portas conforme a Figura 10.</text:p>
      <text:p text:style-name="P103"><text:span text:style-name="T104"><draw:frame draw:style-name="a10" draw:name="Picture 752484224" text:anchor-type="as-char" svg:x="0in" svg:y="0in" svg:width="5.05335in" svg:height="1.05223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span></text:p>
      <text:p text:style-name="P105">Figura 10. Verificando as conexões e estado das portas</text:p>
      <text:h text:style-name="P106" text:outline-level="2">Instalação/Configuração e acesso remoto via SSH</text:h>
      <text:p text:style-name="P107">Agora que a conexão com a rede está funcionando, vamos partir para o próximo passo que é a instalação e configuração do SSH para realizar a comunicação entre as duas máquinas.</text:p>
      <text:p text:style-name="P108"><text:span text:style-name="T109">De inicio, foi realizado a instalação do openssh-server através do comando<text:s/></text:span><text:span text:style-name="T110">sudo apt-get install openssh-server<text:s/></text:span><text:span text:style-name="T111">na máquina virtual (guest).</text:span></text:p>
      <text:p text:style-name="P112"><text:span text:style-name="T113">Após isso, iremos realizar o acesso à máquina virtual via SSH<text:s/></text:span><text:span text:style-name="T114">(acesso remoto), na qual iremos precisar do IP (obtivemos na Figura 7) e iremos executar o seguinte codigo na maquina hospedeira para inicializar a comunicação:<text:s/></text:span><text:span text:style-name="T115">ssh vboxuser@</text:span><text:span text:style-name="T116">192.168.0.103.</text:span></text:p>
      <text:p text:style-name="P117">Ao executar o SSH no ambiente Windows, você encontrará uma mensagem crucial para autenticação e segurança ao conectar-se a um servidor. A ECDSA Key Fingerprint representa uma identificação única da chave do servidor, usando o algoritmo de assinatura digital de curva elíptica (ECDSA). Essa impressão digital é uma forma segura de garantir a consistência da chave do servidor em várias conexões. A mensagem de aviso, ao perguntar se você deseja continuar, indica que o cliente SSH detectou uma nova chave ECDSA para o host 192.168.0.103, não presente na lista de "hosts conhecidos". Como esta é a primeira conexão com esse host, o cliente SSH avisa que a chave será adicionada permanentemente à lista de hosts conhecidos e pedirá a senha do user root da máquina virtual, então basta inseri-la conforme na Figura 11 e Figura 12 abaixo.</text:p>
      <text:soft-page-break/>
      <text:p text:style-name="P118"><text:span text:style-name="T119"><draw:frame draw:style-name="a11" draw:name="Picture 1" text:anchor-type="as-char" svg:x="0in" svg:y="0in" svg:width="5.56132in" svg:height="2.91211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p text:style-name="P120">Figura 11. Conexão bem sucedida</text:p>
      <text:p text:style-name="P121"><text:span text:style-name="T122"><draw:frame draw:style-name="a12" draw:name="Picture 1" text:anchor-type="as-char" svg:x="0in" svg:y="0in" svg:width="5.66172in" svg:height="3.84882in" style:rel-width="scale" style:rel-height="scale"><draw:image xlink:href="media/image12.png" xlink:type="simple" xlink:show="embed" xlink:actuate="onLoad"/><svg:title/><svg:desc>Screens screenshot of a computer screen

Description automatically generated</svg:desc></draw:frame></text:span></text:p>
      <text:p text:style-name="P123">Figura 12. Print – Visão Geral</text:p>
      <text:soft-page-break/>
      <text:h text:style-name="P124" text:outline-level="2">Transferência de Arquivos</text:h>
      <text:p text:style-name="P125">Agora que temos tudo configurado, iremos tranferir um <text:s/>arquivo do computador Hospedeiro para a nossa Máquina Virtual.</text:p>
      <text:p text:style-name="P126">Para isso, pensando numa forma bem<text:s/>simples e estratégica, pensamos em criar um arquivo .txt no host utilizando o CMD como administrador e salvarmos ele na raiz do disco conforme o seguinte comando abaixo:</text:p>
      <text:list text:style-name="LFO7" text:continue-numbering="true">
        <text:list-item>
          <text:p text:style-name="P127"><text:span text:style-name="T128">Cd C</text:span><text:span text:style-name="T129">:/</text:span></text:p>
        </text:list-item>
        <text:list-item>
          <text:p text:style-name="P130">echo "Hello World!" &gt; teste.txt</text:p>
        </text:list-item>
      </text:list>
      <text:p text:style-name="P131">Após termos criado o arquivo iremos transferi-lo para máquina virtual utilizando o servidor de SSH recém instalado.</text:p>
      <text:p text:style-name="P132">Para isto, usaremos o protocolo de comunicação SCP (Secure Copy Protocol) que utiliza o SSH (Secure Shell) como mecanismo subjacente para autenticação e criptografia. SCP permite a transferência segura de arquivos entre hosts em uma rede.</text:p>
      <text:p text:style-name="P133">Quando usamos o comando scp para copiar arquivos, ele estabelece uma conexão SSH para autenticação e, em seguida, utiliza essa conexão para transferir os dados de forma segura. Assim, a criptografia e autenticação fornecidas pelo SSH também se aplicam às transferências de arquivos SCP.</text:p>
      <text:p text:style-name="P134">Conquanto, em uma nova janela do terminal utilizaremos o seguinte comando:<text:s/></text:p>
      <text:p text:style-name="P135">scp C:/teste.txt vboxuser@192.168.0.103:/home/vboxuser/Downloads/</text:p>
      <text:p text:style-name="P136">Irá pedir a senha então basta inserir e após isto o arquivo será copiado conforme as Figuras 13 e 14 abaixo.</text:p>
      <text:p text:style-name="P137"><text:span text:style-name="T138"><draw:frame draw:style-name="a13" draw:name="Picture 1" text:anchor-type="as-char" svg:x="0in" svg:y="0in" svg:width="4.60196in" svg:height="0.71719in" style:rel-width="scale" style:rel-height="scale"><draw:image xlink:href="media/image13.png" xlink:type="simple" xlink:show="embed" xlink:actuate="onLoad"/><svg:title/><svg:desc>A black screen with white text

Description automatically generated</svg:desc></draw:frame></text:span></text:p>
      <text:p text:style-name="P139">Figura 13. Protocolo SCP</text:p>
      <text:p text:style-name="P140"><text:span text:style-name="T141"><draw:frame draw:style-name="a14" draw:name="Picture 1" text:anchor-type="as-char" svg:x="0in" svg:y="0in" svg:width="4.5213in" svg:height="2.4781in" style:rel-width="scale" style:rel-height="scale"><draw:image xlink:href="media/image14.png" xlink:type="simple" xlink:show="embed" xlink:actuate="onLoad"/><svg:title/><svg:desc>A screenshot of a computer

Description automatically generated</svg:desc></draw:frame></text:span></text:p>
      <text:p text:style-name="P142">Figura 14. Protocolo SCP – Visão Geral</text:p>
      <text:soft-page-break/>
      <text:h text:style-name="P143" text:outline-level="2">Criação de Conta de Usuário</text:h>
      <text:p text:style-name="P144"><text:span text:style-name="T145">Agora iremos criar uma conta de usuario para mim sem utilizar o root. E para isto usamos o comando<text:s/></text:span><text:span text:style-name="T146">sudo adduser &lt;NOVO_USUARIO&gt;.</text:span></text:p>
      <text:p text:style-name="P147"><text:span text:style-name="T148"><draw:frame draw:style-name="a15" draw:name="Picture 1" text:anchor-type="as-char" svg:x="0in" svg:y="0in" svg:width="4.9765in" svg:height="3.38945in" style:rel-width="scale" style:rel-height="scale"><draw:image xlink:href="media/image15.png" xlink:type="simple" xlink:show="embed" xlink:actuate="onLoad"/><svg:title/><svg:desc>A screenshot of a computer program

Description automatically generated</svg:desc></draw:frame></text:span></text:p>
      <text:p text:style-name="P149">Figura 15. Adicionando novo Usuário</text:p>
      <text:p text:style-name="P150"><text:span text:style-name="T151">Agora que está tudo Ok, vamos testar também a conex</text:span><text:span text:style-name="T152">ão SSH com novo usuario na máquina hospedeira repetindo o mesmo comando da Figura 13 porém com o novo usuario “</text:span><text:span text:style-name="T153">ggus</text:span><text:span text:style-name="T154">t</text:span><text:span text:style-name="T155">”.</text:span></text:p>
      <text:p text:style-name="P156"><text:span text:style-name="T157"><draw:frame draw:style-name="a16" draw:name="Picture 1" text:anchor-type="as-char" svg:x="0in" svg:y="0in" svg:width="5.07809in" svg:height="0.72612in" style:rel-width="scale" style:rel-height="scale"><draw:image xlink:href="media/image16.png" xlink:type="simple" xlink:show="embed" xlink:actuate="onLoad"/><svg:title/><svg:desc>A black screen with white text

Description automatically generated</svg:desc></draw:frame></text:span></text:p>
      <text:p text:style-name="P158">Figura 16. Adicionando novo Usuário</text:p>
      <text:h text:style-name="P159" text:outline-level="2">Configuração do Bash</text:h>
      <text:p text:style-name="P160">Agora que temos o usuario “ggust” iremos configurar o shell padrão para este novo usuario no sistema Linux. Esta é uma operação opcional e pode ser útil se o usuário preferir usar o Bash em vez da shell padrão definida no momento da criação do usuário.</text:p>
      <text:p text:style-name="SBCparagraph"><text:span text:style-name="T161">Para isso basta executar<text:s/></text:span><text:span text:style-name="T162">sudo chsh -s /bin/bash &lt;NOVO_USUARIO&gt;</text:span></text:p>
      <text:p text:style-name="P163"><text:span text:style-name="T164"><draw:frame draw:style-name="a17" draw:name="Picture 1" text:anchor-type="as-char" svg:x="0in" svg:y="0in" svg:width="5.10488in" svg:height="0.47923in" style:rel-width="scale" style:rel-height="scale"><draw:image xlink:href="media/image17.png" xlink:type="simple" xlink:show="embed" xlink:actuate="onLoad"/><svg:title/><svg:desc/></draw:frame></text:span></text:p>
      <text:p text:style-name="P165">Figura 17. Configurando Bash para o novo user</text:p>
      <text:soft-page-break/>
      <text:h text:style-name="P166" text:outline-level="2">Instalação de Softwares</text:h>
      <text:p text:style-name="P167">Os softwares no Debian podem ser instalados de diversas maneiras, seja através da interface gráfica ou da linha de comando no terminal. A ferramenta principal para instalação de softwares é o apt, um poderoso sistema de gerenciamento de pacotes.</text:p>
      <text:p text:style-name="P168">Na máquina Debian que utilizei, a preferência foi pela instalação via linha de comando, utilizando o terminal. Isso proporcionou maior controle sobre o processo de instalação e permitiu uma abordagem mais personalizada para atender às necessidades específicas.</text:p>
      <text:p text:style-name="P169">Em diversos casos, foi necessário adicionar repositórios de software para viabilizar a instalação de determinados softwares. Isso possibilitou o acesso a uma variedade mais ampla de aplicativos e versões, garantindo a flexibilidade na escolha e personalização do ambiente de trabalho.</text:p>
      <text:p text:style-name="P170">Essa abordagem, embora demandasse algum conhecimento adicional, revelou-se eficaz para garantir a disponibilidade e atualização dos softwares desejados, contribuindo para a estabilidade e desempenho do sistema operacional Debian.</text:p>
      <text:p text:style-name="P171"/>
      <text:h text:style-name="P172" text:outline-level="1">Tarefa 2</text:h>
      <text:h text:style-name="P173" text:outline-level="2"><text:bookmark-start text:name="_Hlk151319948"/>Sincronização de processos</text:h>
      <text:p text:style-name="P174"><text:bookmark-end text:name="_Hlk151319948"/>Essa tarefa tem como o objetivo recapitular conceitos fundamentais de sistemas operacionais, vistos em SO1. Nas seções a seguir serão apresentados os códigos desenvolvidos pelo grupo.</text:p>
      <text:h text:style-name="P175" text:outline-level="2">Solução de Peterson</text:h>
      <text:p text:style-name="P176">Para a resolução dessa atividade foram usadas como base os códigos apresentados pelo professor nos slides<text:s/>disponibilizados no google classroom.</text:p>
      <text:list text:style-name="LFO18" text:continue-numbering="true">
        <text:list-item>
          <text:p text:style-name="P177">A implementação da proteção da seção crítica está de acordo com as diretrizes fornecidas no enunciado, seguindo a abordagem proposta.</text:p>
        </text:list-item>
        <text:list-item>
          <text:p text:style-name="P178">A estratégia de Peterson assegura a exclusão mútua na seção crítica. O código permanece em um loop enquanto um processo está dentro de sua seção crítica, e quando ele a libera, o loop é interrompido, permitindo que outros processos possam acessar a seção crítica.</text:p>
        </text:list-item>
        <text:list-item>
          <text:p text:style-name="P179">Para lidar com possíveis erros, foi incorporada uma verificação condicional utilizando um if. Se a função responsável pela criação de threads retornar 0, isso indica que a thread foi criada com sucesso. Caso contrário, a execução do programa é encerrada, indicando que houve um problema na criação da thread.</text:p>
        </text:list-item>
        <text:list-item>
          <text:p text:style-name="P180"><text:span text:style-name="T181">A adaptação do código envolve a criação de duas threads, pi e pj, utilizando exclusivamente a seção de código da função void * cria(void *arg). Essa modificação foi realizada com base na documentação da função pthread_create() conforme apresentada por Kerrisk (20</text:span><text:span text:style-name="T182">23</text:span><text:span text:style-name="T183">)</text:span><text:span text:style-name="T184"><text:s/></text:span><text:span text:style-name="T185"><text:bookmark-ref text:ref-name="_Ref151324063" text:reference-format="text">[10]</text:bookmark-ref></text:span><text:span text:style-name="T186">.</text:span></text:p>
        </text:list-item>
      </text:list>
      <text:soft-page-break/>
      <text:p text:style-name="P187">Código<text:s/>trabalhado peterson.c</text:p>
      <text:p text:style-name="P188"><text:span text:style-name="T189">#include</text:span><text:span text:style-name="T190"><text:s/></text:span><text:span text:style-name="T191">&lt;stdio.h&gt;</text:span></text:p>
      <text:p text:style-name="P192"><text:span text:style-name="T193">#include</text:span><text:span text:style-name="T194"><text:s/></text:span><text:span text:style-name="T195">&lt;stdlib.h&gt;</text:span></text:p>
      <text:p text:style-name="P196"><text:span text:style-name="T197">#include</text:span><text:span text:style-name="T198"><text:s/></text:span><text:span text:style-name="T199">&lt;pthread.h&gt;</text:span></text:p>
      <text:p text:style-name="P200"/>
      <text:p text:style-name="P201"><text:span text:style-name="T202">#define</text:span><text:span text:style-name="T203"><text:s/></text:span><text:span text:style-name="T204">true</text:span><text:span text:style-name="T205"><text:s/>1</text:span></text:p>
      <text:p text:style-name="P206"><text:span text:style-name="T207">#define</text:span><text:span text:style-name="T208"><text:s/></text:span><text:span text:style-name="T209">false</text:span><text:span text:style-name="T210"><text:s/>0</text:span></text:p>
      <text:p text:style-name="P211"/>
      <text:p text:style-name="P212">pthread_t flag[2];</text:p>
      <text:p text:style-name="P213"><text:span text:style-name="T214">int</text:span><text:span text:style-name="T215"><text:s/>turn, counter = 0;</text:span></text:p>
      <text:p text:style-name="P216"/>
      <text:p text:style-name="P217"><text:span text:style-name="T218">void</text:span><text:span text:style-name="T219"><text:s/>enterSC (</text:span><text:span text:style-name="T220">int</text:span><text:span text:style-name="T221"><text:s/></text:span><text:span text:style-name="T222">i</text:span><text:span text:style-name="T223">){</text:span></text:p>
      <text:p text:style-name="P224"><text:span text:style-name="T225"><text:s text:c="3"/></text:span><text:span text:style-name="T226">int</text:span><text:span text:style-name="T227"><text:s/>j = 1 -<text:s/></text:span><text:span text:style-name="T228">i</text:span><text:span text:style-name="T229">; <text:s/></text:span><text:span text:style-name="T230">//J sempre vai ser oposto de i: caso i == 0, j == 1 e vice-versa</text:span></text:p>
      <text:p text:style-name="P231"><text:span text:style-name="T232"><text:s text:c="3"/>flag[</text:span><text:span text:style-name="T233">i</text:span><text:span text:style-name="T234">] =<text:s/></text:span><text:span text:style-name="T235">true</text:span><text:span text:style-name="T236">;<text:s/></text:span><text:span text:style-name="T237">//Thread que solicita entrada na seção crítica</text:span></text:p>
      <text:p text:style-name="P238"><text:s text:c="3"/>turn = j;</text:p>
      <text:p text:style-name="P239"><text:span text:style-name="T240"><text:s text:c="3"/></text:span><text:span text:style-name="T241">while</text:span><text:span text:style-name="T242">(flag[j] &amp;&amp; turn == j); <text:s/></text:span><text:span text:style-name="T243">//Laço para segurar a seção crítica</text:span></text:p>
      <text:p text:style-name="P244"><text:span text:style-name="T245"><text:s text:c="3"/></text:span><text:span text:style-name="T246">return</text:span><text:span text:style-name="T247">;</text:span></text:p>
      <text:p text:style-name="P248">}</text:p>
      <text:p text:style-name="P249"/>
      <text:p text:style-name="P250"><text:span text:style-name="T251">void</text:span><text:span text:style-name="T252"><text:s/>leaveSC (</text:span><text:span text:style-name="T253">int</text:span><text:span text:style-name="T254"><text:s/></text:span><text:span text:style-name="T255">i</text:span><text:span text:style-name="T256">){</text:span></text:p>
      <text:p text:style-name="P257"><text:span text:style-name="T258"><text:s text:c="3"/></text:span><text:span text:style-name="T259">flag[</text:span><text:span text:style-name="T260">i</text:span><text:span text:style-name="T261">] =<text:s/></text:span><text:span text:style-name="T262">false</text:span><text:span text:style-name="T263">; <text:s/></text:span><text:span text:style-name="T264">//Thread que solicita sair da seção crítica</text:span></text:p>
      <text:p text:style-name="P265"><text:span text:style-name="T266"><text:s text:c="3"/></text:span><text:span text:style-name="T267">return</text:span><text:span text:style-name="T268">;</text:span></text:p>
      <text:p text:style-name="P269">}</text:p>
      <text:p text:style-name="P270"/>
      <text:p text:style-name="P271"><text:span text:style-name="T272">void</text:span><text:span text:style-name="T273"><text:s/>* cria (</text:span><text:span text:style-name="T274">void</text:span><text:span text:style-name="T275"><text:s/>*</text:span><text:span text:style-name="T276">arg</text:span><text:span text:style-name="T277">){</text:span><text:span text:style-name="T278"><text:s/></text:span><text:span text:style-name="T279">//Função para a thread</text:span></text:p>
      <text:p text:style-name="P280"><text:span text:style-name="T281"><text:s text:c="3"/></text:span><text:span text:style-name="T282">int</text:span><text:span text:style-name="T283"><text:s/>aux = (</text:span><text:span text:style-name="T284">int</text:span><text:span text:style-name="T285"><text:s/>*)</text:span><text:span text:style-name="T286">arg</text:span><text:span text:style-name="T287">, i = 0; <text:s/></text:span><text:span text:style-name="T288">//Pegar o índice da thread</text:span></text:p>
      <text:p text:style-name="P289"><text:span text:style-name="T290"><text:s text:c="3"/>enterSC(aux); <text:s/></text:span><text:span text:style-name="T291">//Chamada da função para entrar na seção crítica</text:span></text:p>
      <text:p text:style-name="P292"><text:span text:style-name="T293"><text:s text:c="3"/>printf(</text:span><text:span text:style-name="T294">"\nP%d: A região crítica é minha!!!\n"</text:span><text:span text:style-name="T295">, aux);</text:span></text:p>
      <text:p text:style-name="P296"><text:span text:style-name="T297"><text:s text:c="3"/></text:span><text:span text:style-name="T298">counter++;</text:span></text:p>
      <text:p text:style-name="P299"><text:span text:style-name="T300"><text:s text:c="3"/>printf(</text:span><text:span text:style-name="T301">"\n\nP%d: counter = %d\n\n"</text:span><text:span text:style-name="T302">, aux, counter);</text:span></text:p>
      <text:p text:style-name="P303"><text:span text:style-name="T304"><text:s text:c="3"/></text:span><text:span text:style-name="T305">leaveSC(aux); <text:s/></text:span><text:span text:style-name="T306">//Função para sair da seção crítica</text:span></text:p>
      <text:p text:style-name="P307"><text:span text:style-name="T308"><text:s text:c="3"/></text:span><text:span text:style-name="T309">return</text:span><text:span text:style-name="T310"><text:s/></text:span><text:span text:style-name="T311">NULL</text:span><text:span text:style-name="T312">;</text:span></text:p>
      <text:p text:style-name="P313">}</text:p>
      <text:p text:style-name="P314"/>
      <text:p text:style-name="P315"><text:span text:style-name="T316">int</text:span><text:span text:style-name="T317"><text:s/>main (</text:span><text:span text:style-name="T318">void</text:span><text:span text:style-name="T319">){</text:span></text:p>
      <text:p text:style-name="P320"><text:span text:style-name="T321"><text:s text:c="3"/></text:span><text:span text:style-name="T322">pthread_t thi, thj;<text:s/></text:span><text:span text:style-name="T323">//Duas variáveis para a criação das threads</text:span></text:p>
      <text:p text:style-name="P324"/>
      <text:p text:style-name="P325"><text:span text:style-name="T326"><text:s text:c="3"/></text:span><text:span text:style-name="T327">//Verifica se as threads foram criadas corretamente</text:span></text:p>
      <text:p text:style-name="P328"><text:span text:style-name="T329"><text:s text:c="3"/></text:span><text:span text:style-name="T330">if</text:span><text:span text:style-name="T331">(pthread_create (&amp;thi,<text:s/></text:span><text:span text:style-name="T332">NULL</text:span><text:span text:style-name="T333">, cria, (</text:span><text:span text:style-name="T334">int</text:span><text:span text:style-name="T335"><text:s/>*)0) !=<text:s/></text:span><text:span text:style-name="T336">0){</text:span></text:p>
      <text:p text:style-name="P337"><text:span text:style-name="T338"><text:s text:c="6"/>printf(</text:span><text:span text:style-name="T339">"Algum erro ocorreu na criação das threads!\n"</text:span><text:span text:style-name="T340">);</text:span></text:p>
      <text:p text:style-name="P341"><text:span text:style-name="T342"><text:s text:c="6"/></text:span><text:span text:style-name="T343">exit(1);</text:span></text:p>
      <text:p text:style-name="P344"><text:s text:c="3"/>}</text:p>
      <text:p text:style-name="P345"><text:span text:style-name="T346"><text:s text:c="3"/></text:span><text:span text:style-name="T347">if</text:span><text:span text:style-name="T348">(pthread_create (&amp;thj,<text:s/></text:span><text:span text:style-name="T349">NULL</text:span><text:span text:style-name="T350">, cria, (</text:span><text:span text:style-name="T351">int</text:span><text:span text:style-name="T352">* )1) !=<text:s/></text:span><text:span text:style-name="T353">0){</text:span></text:p>
      <text:p text:style-name="P354"><text:span text:style-name="T355"><text:s text:c="6"/>printf(</text:span><text:span text:style-name="T356">"Algum erro ocorreu na criação das threads!\n"</text:span><text:span text:style-name="T357">);</text:span></text:p>
      <text:p text:style-name="P358"><text:span text:style-name="T359"><text:s text:c="6"/></text:span><text:span text:style-name="T360">exit(1);</text:span></text:p>
      <text:p text:style-name="P361"><text:s text:c="3"/>}</text:p>
      <text:p text:style-name="P362"/>
      <text:p text:style-name="P363"><text:span text:style-name="T364"><text:s text:c="3"/></text:span><text:span text:style-name="T365">//Inicia as threads</text:span></text:p>
      <text:p text:style-name="P366"><text:span text:style-name="T367"><text:s text:c="3"/>pthread_join (thi,<text:s/></text:span><text:span text:style-name="T368">NULL</text:span><text:span text:style-name="T369">);</text:span></text:p>
      <text:p text:style-name="P370"><text:span text:style-name="T371"><text:s text:c="3"/>pthread_join (thj,<text:s/></text:span><text:span text:style-name="T372">NULL</text:span><text:span text:style-name="T373">);</text:span></text:p>
      <text:p text:style-name="P374"/>
      <text:p text:style-name="P375"><text:span text:style-name="T376"><text:s text:c="3"/></text:span><text:span text:style-name="T377">return</text:span><text:span text:style-name="T378"><text:s/>0;</text:span></text:p>
      <text:p text:style-name="P379">}</text:p>
      <text:soft-page-break/>
      <text:h text:style-name="P380" text:outline-level="2">Implementação de Locks "Test and Set" e Solução de Peterson em<text:s/>Hardware</text:h>
      <text:p text:style-name="P381"><text:span text:style-name="T382">Para realizar esta atividade foram usados como base o material disponibilizado pelo professor e também uma breve descrição das funções atomic_flag_test_and_set e atomic_flag_clear, apresentadas em uma homepage</text:span><text:span text:style-name="T383"><text:s/></text:span><text:span text:style-name="T384"><text:bookmark-ref text:ref-name="_Ref151323378" text:reference-format="text">[4</text:bookmark-ref></text:span><text:span text:style-name="T385"><text:bookmark-ref text:ref-name="_Ref151323379" text:reference-format="text">, 5]</text:bookmark-ref></text:span><text:span text:style-name="T386">.</text:span></text:p>
      <text:p text:style-name="P387">Código<text:s/>trabalhado<text:s/>atomic.c</text:p>
      <text:p text:style-name="P388"><text:span text:style-name="T389">#include</text:span><text:span text:style-name="T390"><text:s/></text:span><text:span text:style-name="T391">&lt;stdio.h&gt;</text:span></text:p>
      <text:p text:style-name="P392"><text:span text:style-name="T393">#include</text:span><text:span text:style-name="T394"><text:s/></text:span><text:span text:style-name="T395">&lt;stdlib.h&gt;</text:span></text:p>
      <text:p text:style-name="P396"><text:span text:style-name="T397">#include</text:span><text:span text:style-name="T398"><text:s/></text:span><text:span text:style-name="T399">&lt;pthread.h&gt;</text:span></text:p>
      <text:p text:style-name="P400"><text:span text:style-name="T401">#include</text:span><text:span text:style-name="T402"><text:s/></text:span><text:span text:style-name="T403">&lt;stdatomic.h&gt;</text:span><text:span text:style-name="T404"><text:s text:c="2"/></text:span><text:span text:style-name="T405">//Biblioteca atomic</text:span></text:p>
      <text:p text:style-name="P406"><text:span text:style-name="T407">int</text:span><text:span text:style-name="T408"><text:s/>counter;</text:span></text:p>
      <text:p text:style-name="P409"><text:span text:style-name="T410">atomic_flag</text:span><text:span text:style-name="T411"><text:s/>lock =<text:s/></text:span><text:span text:style-name="T412">ATOMIC_FLAG_INIT</text:span><text:span text:style-name="T413">; <text:s/></text:span><text:span text:style-name="T414">//Variável atômica</text:span></text:p>
      <text:p text:style-name="P415"/>
      <text:p text:style-name="P416"><text:span text:style-name="T417">void</text:span><text:span text:style-name="T418"><text:s/>enterSC(</text:span><text:span text:style-name="T419">int</text:span><text:span text:style-name="T420"><text:s/></text:span><text:span text:style-name="T421">i</text:span><text:span text:style-name="T422">) {</text:span></text:p>
      <text:p text:style-name="P423"><text:span text:style-name="T424"><text:s text:c="4"/></text:span><text:span text:style-name="T425">while</text:span><text:span text:style-name="T426"><text:s/>(</text:span><text:span text:style-name="T427">atomic_flag_test_and_set</text:span><text:span text:style-name="T428">(&amp;lock));<text:s/></text:span><text:span text:style-name="T429">//Laço para travar a SC</text:span></text:p>
      <text:p text:style-name="P430"><text:span text:style-name="T431"><text:s text:c="4"/></text:span><text:span text:style-name="T432">return</text:span><text:span text:style-name="T433">;</text:span></text:p>
      <text:p text:style-name="P434">}</text:p>
      <text:p text:style-name="P435"/>
      <text:p text:style-name="P436"><text:span text:style-name="T437">void</text:span><text:span text:style-name="T438"><text:s/>leaveSC(</text:span><text:span text:style-name="T439">int</text:span><text:span text:style-name="T440"><text:s/></text:span><text:span text:style-name="T441">i</text:span><text:span text:style-name="T442">) {</text:span></text:p>
      <text:p text:style-name="P443"><text:span text:style-name="T444"><text:s text:c="4"/></text:span><text:span text:style-name="T445">atomic_flag_clear</text:span><text:span text:style-name="T446">(&amp;lock);<text:s/></text:span><text:span text:style-name="T447">//Libera a seção crítica</text:span></text:p>
      <text:p text:style-name="P448"><text:span text:style-name="T449"><text:s text:c="4"/></text:span><text:span text:style-name="T450">return</text:span><text:span text:style-name="T451">;</text:span></text:p>
      <text:p text:style-name="P452">}</text:p>
      <text:p text:style-name="P453"/>
      <text:p text:style-name="P454"><text:span text:style-name="T455">void</text:span><text:span text:style-name="T456">* cria(</text:span><text:span text:style-name="T457">void</text:span><text:span text:style-name="T458">*<text:s/></text:span><text:span text:style-name="T459">arg</text:span><text:span text:style-name="T460">) {</text:span><text:span text:style-name="T461"><text:s/></text:span><text:span text:style-name="T462">//Função para a thread</text:span></text:p>
      <text:p text:style-name="P463"><text:span text:style-name="T464"><text:s text:c="4"/></text:span><text:span text:style-name="T465">int</text:span><text:span text:style-name="T466"><text:s/>aux = (</text:span><text:span text:style-name="T467">int</text:span><text:span text:style-name="T468">*)</text:span><text:span text:style-name="T469">arg</text:span><text:span text:style-name="T470">, i = 0; <text:s/></text:span><text:span text:style-name="T471">//Pegar o índice da thread</text:span></text:p>
      <text:p text:style-name="P472"><text:span text:style-name="T473"><text:s text:c="4"/>enterSC(aux); <text:s/></text:span><text:span text:style-name="T474">//Chamada da função para entrar na seção crítica</text:span></text:p>
      <text:p text:style-name="P475"><text:span text:style-name="T476"><text:s text:c="4"/>printf(</text:span><text:span text:style-name="T477">"\nP%d: A região crítica é minha!!!\n"</text:span><text:span text:style-name="T478">, aux);</text:span></text:p>
      <text:p text:style-name="P479"><text:span text:style-name="T480"><text:s text:c="4"/></text:span><text:span text:style-name="T481">counter++;</text:span></text:p>
      <text:p text:style-name="P482"><text:span text:style-name="T483"><text:s text:c="4"/>printf(</text:span><text:span text:style-name="T484">"\n\nP%d: counter = %d\n\n"</text:span><text:span text:style-name="T485">, aux, counter);</text:span></text:p>
      <text:p text:style-name="P486"><text:span text:style-name="T487"><text:s text:c="4"/></text:span><text:span text:style-name="T488">leaveSC(aux); <text:s/></text:span><text:span text:style-name="T489">//Função para sair da seção crítica</text:span></text:p>
      <text:p text:style-name="P490"><text:span text:style-name="T491"><text:s text:c="4"/></text:span><text:span text:style-name="T492">return</text:span><text:span text:style-name="T493"><text:s/></text:span><text:span text:style-name="T494">NULL</text:span><text:span text:style-name="T495">;</text:span></text:p>
      <text:p text:style-name="P496">}</text:p>
      <text:p text:style-name="P497"/>
      <text:p text:style-name="P498"><text:span text:style-name="T499">int</text:span><text:span text:style-name="T500"><text:s/>main(</text:span><text:span text:style-name="T501">void</text:span><text:span text:style-name="T502">) {</text:span></text:p>
      <text:p text:style-name="P503"><text:span text:style-name="T504"><text:s text:c="4"/></text:span><text:span text:style-name="T505">pthread_t thi, thj;<text:s/></text:span><text:span text:style-name="T506">//Duas variáveis para a criação das threads</text:span></text:p>
      <text:p text:style-name="P507"/>
      <text:p text:style-name="P508"><text:span text:style-name="T509"><text:s text:c="4"/></text:span><text:span text:style-name="T510">//Verifica se a thread foi criada corretamente</text:span></text:p>
      <text:p text:style-name="P511"><text:span text:style-name="T512"><text:s text:c="4"/></text:span><text:span text:style-name="T513">if</text:span><text:span text:style-name="T514"><text:s/>(pthread_create(&amp;thi,<text:s/></text:span><text:span text:style-name="T515">NULL</text:span><text:span text:style-name="T516">, cria, (</text:span><text:span text:style-name="T517">int</text:span><text:span text:style-name="T518">*)0) !=<text:s/></text:span><text:span text:style-name="T519">0) {</text:span></text:p>
      <text:p text:style-name="P520"><text:span text:style-name="T521"><text:s text:c="8"/>printf(</text:span><text:span text:style-name="T522">"Algum erro ocorreu na criação das threads!\n"</text:span><text:span text:style-name="T523">);</text:span></text:p>
      <text:p text:style-name="P524"><text:s text:c="8"/>exit(1);</text:p>
      <text:p text:style-name="P525"><text:s text:c="4"/>}</text:p>
      <text:p text:style-name="P526"/>
      <text:p text:style-name="P527"><text:span text:style-name="T528"><text:s text:c="4"/></text:span><text:span text:style-name="T529">//Verifica se a thread foi criada corretamente</text:span></text:p>
      <text:p text:style-name="P530"><text:span text:style-name="T531"><text:s text:c="4"/></text:span><text:span text:style-name="T532">if</text:span><text:span text:style-name="T533"><text:s/>(pthread_create(&amp;thj,<text:s/></text:span><text:span text:style-name="T534">NULL</text:span><text:span text:style-name="T535">, cria, (</text:span><text:span text:style-name="T536">int</text:span><text:span text:style-name="T537">*)1) !=<text:s/></text:span><text:span text:style-name="T538">0) {</text:span></text:p>
      <text:p text:style-name="P539"><text:span text:style-name="T540"><text:s text:c="8"/>printf(</text:span><text:span text:style-name="T541">"Algum erro ocorreu na criação das threads!\n"</text:span><text:span text:style-name="T542">);</text:span></text:p>
      <text:p text:style-name="P543"><text:span text:style-name="T544"><text:s text:c="8"/></text:span><text:span text:style-name="T545">exit(1);</text:span></text:p>
      <text:p text:style-name="P546"><text:s text:c="4"/>}</text:p>
      <text:p text:style-name="P547"/>
      <text:p text:style-name="P548"><text:span text:style-name="T549"><text:s text:c="4"/></text:span><text:span text:style-name="T550">//Inicia as threads</text:span></text:p>
      <text:p text:style-name="P551"><text:span text:style-name="T552"><text:s text:c="4"/>pthread_join(thi,<text:s/></text:span><text:span text:style-name="T553">NULL</text:span><text:span text:style-name="T554">);</text:span></text:p>
      <text:p text:style-name="P555"><text:span text:style-name="T556"><text:s text:c="4"/>pthread_join(thj,<text:s/></text:span><text:span text:style-name="T557">NULL</text:span><text:span text:style-name="T558">);</text:span></text:p>
      <text:p text:style-name="P559"><text:span text:style-name="T560"><text:s text:c="4"/></text:span><text:span text:style-name="T561">return</text:span><text:span text:style-name="T562"><text:s/>0;</text:span></text:p>
      <text:p text:style-name="P563">}</text:p>
      <text:soft-page-break/>
      <text:h text:style-name="P564" text:outline-level="2"><text:span text:style-name="T565">Solução de hardware usando locks do tipo mutex</text:span></text:h>
      <text:p text:style-name="P566">Para solucionar o problema proposto foi usado como base o material disponibilizado pelo professor (slides)<text:s/>do google classroom.</text:p>
      <text:p text:style-name="P567">Código<text:s/>trabalhado<text:s/>mutex.c</text:p>
      <text:p text:style-name="P568"/>
      <text:p text:style-name="P569"><text:span text:style-name="T570">#include</text:span><text:span text:style-name="T571"><text:s/></text:span><text:span text:style-name="T572">&lt;stdio.h&gt;</text:span></text:p>
      <text:p text:style-name="P573"><text:span text:style-name="T574">#include</text:span><text:span text:style-name="T575"><text:s/></text:span><text:span text:style-name="T576">&lt;stdlib.h&gt;</text:span></text:p>
      <text:p text:style-name="P577"><text:span text:style-name="T578">#include</text:span><text:span text:style-name="T579"><text:s/></text:span><text:span text:style-name="T580">&lt;pthread.h&gt;</text:span></text:p>
      <text:p text:style-name="P581"/>
      <text:p text:style-name="P582"><text:span text:style-name="T583">pthread_mutex_t lock;<text:s/></text:span><text:span text:style-name="T584">//Variável para travamento da SC</text:span></text:p>
      <text:p text:style-name="P585"><text:span text:style-name="T586">int</text:span><text:span text:style-name="T587"><text:s/>counter = 0; <text:s/></text:span><text:span text:style-name="T588">//Contador</text:span></text:p>
      <text:p text:style-name="P589"/>
      <text:p text:style-name="P590"><text:span text:style-name="T591">void</text:span><text:span text:style-name="T592"><text:s/>enterSC() {</text:span></text:p>
      <text:p text:style-name="P593"><text:span text:style-name="T594"><text:s text:c="4"/></text:span><text:span text:style-name="T595">pthread_mutex_lock(&amp;lock);<text:s/></text:span><text:span text:style-name="T596">//Trava a seção crítica pela variável lock</text:span></text:p>
      <text:p text:style-name="P597"><text:span text:style-name="T598"><text:s text:c="4"/></text:span><text:span text:style-name="T599">return</text:span><text:span text:style-name="T600">;</text:span></text:p>
      <text:p text:style-name="P601">}</text:p>
      <text:p text:style-name="P602"/>
      <text:p text:style-name="P603"><text:span text:style-name="T604">void</text:span><text:span text:style-name="T605"><text:s/>leaveSC() {</text:span></text:p>
      <text:p text:style-name="P606"><text:span text:style-name="T607"><text:s text:c="4"/>pthread_mutex_unlock(&amp;lock); <text:s/></text:span><text:span text:style-name="T608">//Libera a SC pela variável lock</text:span></text:p>
      <text:p text:style-name="P609"><text:span text:style-name="T610"><text:s text:c="4"/></text:span><text:span text:style-name="T611">return</text:span><text:span text:style-name="T612">;</text:span></text:p>
      <text:p text:style-name="P613">}</text:p>
      <text:p text:style-name="P614"/>
      <text:p text:style-name="P615"><text:span text:style-name="T616">void</text:span><text:span text:style-name="T617">* cria(</text:span><text:span text:style-name="T618">void</text:span><text:span text:style-name="T619">* arg) {</text:span></text:p>
      <text:p text:style-name="P620"><text:span text:style-name="T621"><text:s text:c="4"/></text:span><text:span text:style-name="T622">int</text:span><text:span text:style-name="T623"><text:s/>aux = (</text:span><text:span text:style-name="T624">int</text:span><text:span text:style-name="T625">*)arg, i = 0; <text:s/></text:span><text:span text:style-name="T626">//Pegar o índice da thread</text:span></text:p>
      <text:p text:style-name="P627"><text:span text:style-name="T628"><text:s text:c="4"/>enterSC(); <text:s/></text:span><text:span text:style-name="T629">//Chamada da função para entrar na seção crítica</text:span></text:p>
      <text:p text:style-name="P630"><text:span text:style-name="T631"><text:s text:c="4"/>printf(</text:span><text:span text:style-name="T632">"\nP%d: A região crítica é minha!!!\n"</text:span><text:span text:style-name="T633">, aux);</text:span></text:p>
      <text:p text:style-name="P634"><text:span text:style-name="T635"><text:s text:c="4"/></text:span><text:span text:style-name="T636">counter++;</text:span></text:p>
      <text:p text:style-name="P637"><text:span text:style-name="T638"><text:s text:c="4"/>printf(</text:span><text:span text:style-name="T639">"\n\nP%d: counter = %d\n\n"</text:span><text:span text:style-name="T640">, aux, counter);</text:span></text:p>
      <text:p text:style-name="P641"><text:span text:style-name="T642"><text:s text:c="4"/></text:span><text:span text:style-name="T643">leaveSC(); <text:s/></text:span><text:span text:style-name="T644">//Função para sair da seção crítica</text:span></text:p>
      <text:p text:style-name="P645"><text:span text:style-name="T646"><text:s text:c="4"/></text:span><text:span text:style-name="T647">return</text:span><text:span text:style-name="T648"><text:s/>NULL;</text:span></text:p>
      <text:p text:style-name="P649">}</text:p>
      <text:p text:style-name="P650"/>
      <text:p text:style-name="P651"><text:span text:style-name="T652">int</text:span><text:span text:style-name="T653"><text:s/>main(</text:span><text:span text:style-name="T654">void</text:span><text:span text:style-name="T655">) {</text:span></text:p>
      <text:p text:style-name="P656"><text:span text:style-name="T657"><text:s text:c="4"/></text:span><text:span text:style-name="T658">pthread_t thi, thj;<text:s/></text:span><text:span text:style-name="T659">//Duas variáveis para a criação das threads</text:span></text:p>
      <text:p text:style-name="P660"/>
      <text:p text:style-name="P661"><text:span text:style-name="T662"><text:s text:c="4"/></text:span><text:span text:style-name="T663">//Verifica se a thread foi criada corretamente</text:span></text:p>
      <text:p text:style-name="P664"><text:span text:style-name="T665"><text:s text:c="4"/></text:span><text:span text:style-name="T666">if</text:span><text:span text:style-name="T667"><text:s/>(pthread_create(&amp;thi, NULL, cria, (</text:span><text:span text:style-name="T668">int</text:span><text:span text:style-name="T669">*)0) !=<text:s/></text:span><text:span text:style-name="T670">0) {</text:span></text:p>
      <text:p text:style-name="P671"><text:span text:style-name="T672"><text:s text:c="8"/>printf(</text:span><text:span text:style-name="T673">"Algum erro ocorreu na criação das threads!\n"</text:span><text:span text:style-name="T674">);</text:span></text:p>
      <text:p text:style-name="P675"><text:span text:style-name="T676"><text:s text:c="8"/></text:span><text:span text:style-name="T677">exit(1);</text:span></text:p>
      <text:p text:style-name="P678"><text:s text:c="4"/>}</text:p>
      <text:p text:style-name="P679"/>
      <text:p text:style-name="P680"><text:span text:style-name="T681"><text:s text:c="4"/></text:span><text:span text:style-name="T682">if</text:span><text:span text:style-name="T683"><text:s/>(pthread_create(&amp;thj, NULL, cria, (</text:span><text:span text:style-name="T684">int</text:span><text:span text:style-name="T685">*)1) !=<text:s/></text:span><text:span text:style-name="T686">0) {</text:span></text:p>
      <text:p text:style-name="P687"><text:span text:style-name="T688"><text:s text:c="8"/>printf(</text:span><text:span text:style-name="T689">"Algum erro ocorreu na criação das threads!\n"</text:span><text:span text:style-name="T690">);</text:span></text:p>
      <text:p text:style-name="P691"><text:span text:style-name="T692"><text:s text:c="8"/></text:span><text:span text:style-name="T693">exit(1);</text:span></text:p>
      <text:p text:style-name="P694"><text:s text:c="4"/>}</text:p>
      <text:p text:style-name="P695"/>
      <text:p text:style-name="P696"><text:span text:style-name="T697"><text:s text:c="4"/></text:span><text:span text:style-name="T698">//Inicia as threads</text:span></text:p>
      <text:p text:style-name="P699"><text:s text:c="4"/>pthread_join(thi, NULL);</text:p>
      <text:p text:style-name="P700"><text:s text:c="4"/>pthread_join(thj, NULL);</text:p>
      <text:p text:style-name="P701"/>
      <text:p text:style-name="P702"><text:span text:style-name="T703"><text:s text:c="4"/></text:span><text:span text:style-name="T704">return</text:span><text:span text:style-name="T705"><text:s/>0;</text:span></text:p>
      <text:p text:style-name="P706">}</text:p>
      <text:soft-page-break/>
      <text:h text:style-name="P707" text:outline-level="2">Solução de hardware usando semáforo</text:h>
      <text:p text:style-name="P708"><text:span text:style-name="T709">Para a conclusão dessa tarefa, recorri ao conteúdo fornecido pelo instrutor, incluindo os slides da disciplina de SO1. Além disso, consultei uma descrição das funções de semáforo disponíveis em uma fonte online</text:span><text:span text:style-name="T710"><text:s/></text:span><text:span text:style-name="T711"><text:bookmark-ref text:ref-name="_Ref151324125" text:reference-format="text">[6, </text:bookmark-ref></text:span><text:span text:style-name="T712"><text:bookmark-ref text:ref-name="_Ref151324127" text:reference-format="text">7,</text:bookmark-ref></text:span><text:span text:style-name="T713"><text:s/></text:span><text:span text:style-name="T714"><text:bookmark-ref text:ref-name="_Ref151324128" text:reference-format="text">8, </text:bookmark-ref></text:span><text:span text:style-name="T715"><text:bookmark-ref text:ref-name="_Ref151324129" text:reference-format="text">9]</text:bookmark-ref></text:span><text:span text:style-name="T716">.</text:span></text:p>
      <text:p text:style-name="P717">Código<text:s/>trabalhado semaphore.c</text:p>
      <text:p text:style-name="P718"><text:span text:style-name="T719">#include</text:span><text:span text:style-name="T720"><text:s/></text:span><text:span text:style-name="T721">&lt;stdio.h&gt;</text:span></text:p>
      <text:p text:style-name="P722"><text:span text:style-name="T723">#include</text:span><text:span text:style-name="T724"><text:s/></text:span><text:span text:style-name="T725">&lt;stdlib.h&gt;</text:span></text:p>
      <text:p text:style-name="P726"><text:span text:style-name="T727">#include</text:span><text:span text:style-name="T728"><text:s/></text:span><text:span text:style-name="T729">&lt;pthread.h&gt;</text:span></text:p>
      <text:p text:style-name="P730"><text:span text:style-name="T731">#include</text:span><text:span text:style-name="T732"><text:s/></text:span><text:span text:style-name="T733">&lt;semaphore.h&gt;</text:span><text:span text:style-name="T734"><text:s text:c="2"/></text:span><text:span text:style-name="T735">//Bilbioteca para o uso de semáforos</text:span></text:p>
      <text:p text:style-name="P736"><text:span text:style-name="T737">sem_t semaphore; <text:s/></text:span><text:span text:style-name="T738">//Variável de semáforo</text:span></text:p>
      <text:p text:style-name="P739"><text:span text:style-name="T740">int</text:span><text:span text:style-name="T741"><text:s/>counter = 0;</text:span></text:p>
      <text:p text:style-name="P742"/>
      <text:p text:style-name="P743"><text:span text:style-name="T744">void</text:span><text:span text:style-name="T745"><text:s/>enterSC() { <text:s/></text:span><text:span text:style-name="T746">//Função para controlar entrada na seção crítica</text:span></text:p>
      <text:p text:style-name="P747"><text:span text:style-name="T748"><text:s text:c="4"/>sem_wait(&amp;semaphore);<text:s/></text:span><text:span text:style-name="T749">//Para fazer o lock do semáforo</text:span></text:p>
      <text:p text:style-name="P750"><text:span text:style-name="T751"><text:s text:c="4"/></text:span><text:span text:style-name="T752">return</text:span><text:span text:style-name="T753">;</text:span></text:p>
      <text:p text:style-name="P754">}</text:p>
      <text:p text:style-name="P755"/>
      <text:p text:style-name="P756"><text:span text:style-name="T757">void</text:span><text:span text:style-name="T758"><text:s/>leaveSC() { <text:s/></text:span><text:span text:style-name="T759">//Função para sair da seção crítica</text:span></text:p>
      <text:p text:style-name="P760"><text:span text:style-name="T761"><text:s text:c="4"/>sem_post(&amp;semaphore);<text:s/></text:span><text:span text:style-name="T762">//Função que libera o semáforo</text:span></text:p>
      <text:p text:style-name="P763"><text:span text:style-name="T764"><text:s text:c="4"/></text:span><text:span text:style-name="T765">return</text:span><text:span text:style-name="T766">;</text:span></text:p>
      <text:p text:style-name="P767">}</text:p>
      <text:p text:style-name="P768"/>
      <text:p text:style-name="P769"><text:span text:style-name="T770">void</text:span><text:span text:style-name="T771">* cria(</text:span><text:span text:style-name="T772">void</text:span><text:span text:style-name="T773">*<text:s/></text:span><text:span text:style-name="T774">arg</text:span><text:span text:style-name="T775">) { <text:s/></text:span><text:span text:style-name="T776">//Função para a thread</text:span></text:p>
      <text:p text:style-name="P777"><text:span text:style-name="T778"><text:s text:c="4"/></text:span><text:span text:style-name="T779">int</text:span><text:span text:style-name="T780"><text:s/>aux = (</text:span><text:span text:style-name="T781">int</text:span><text:span text:style-name="T782">*)</text:span><text:span text:style-name="T783">arg</text:span><text:span text:style-name="T784">, i = 0; <text:s/></text:span><text:span text:style-name="T785">//Pegar o índice da thread</text:span></text:p>
      <text:p text:style-name="P786"><text:span text:style-name="T787"><text:s text:c="4"/>enterSC(); <text:s/></text:span><text:span text:style-name="T788">//Chamada da função para entrar na seção crítica</text:span></text:p>
      <text:p text:style-name="P789"><text:span text:style-name="T790"><text:s text:c="4"/>printf(</text:span><text:span text:style-name="T791">"\nP%d: A região crítica é minha!!!\n"</text:span><text:span text:style-name="T792">, aux);</text:span></text:p>
      <text:p text:style-name="P793"><text:span text:style-name="T794"><text:s text:c="4"/></text:span><text:span text:style-name="T795">counter++;</text:span></text:p>
      <text:p text:style-name="P796"><text:span text:style-name="T797"><text:s text:c="4"/>printf(</text:span><text:span text:style-name="T798">"\n\nP%d: counter = %d\n\n"</text:span><text:span text:style-name="T799">, aux, counter);</text:span></text:p>
      <text:p text:style-name="P800"><text:span text:style-name="T801"><text:s text:c="4"/></text:span><text:span text:style-name="T802">leaveSC(); <text:s/></text:span><text:span text:style-name="T803">//Função para sair da seção crítica</text:span></text:p>
      <text:p text:style-name="P804"><text:span text:style-name="T805"><text:s text:c="4"/></text:span><text:span text:style-name="T806">return</text:span><text:span text:style-name="T807"><text:s/></text:span><text:span text:style-name="T808">NULL</text:span><text:span text:style-name="T809">;</text:span></text:p>
      <text:p text:style-name="P810">}</text:p>
      <text:p text:style-name="P811"/>
      <text:p text:style-name="P812"><text:span text:style-name="T813">int</text:span><text:span text:style-name="T814"><text:s/>main(</text:span><text:span text:style-name="T815">void</text:span><text:span text:style-name="T816">) {</text:span></text:p>
      <text:p text:style-name="P817"><text:span text:style-name="T818"><text:s text:c="4"/></text:span><text:span text:style-name="T819">pthread_t thi, thj;<text:s/></text:span><text:span text:style-name="T820">//Duas variáveis para a criação das threads</text:span></text:p>
      <text:p text:style-name="P821"><text:span text:style-name="T822"><text:s text:c="4"/>sem_init(&amp;semaphore, 0, 1);<text:s/></text:span><text:span text:style-name="T823">//Função inicializar a var. de semáforo</text:span></text:p>
      <text:p text:style-name="P824"/>
      <text:p text:style-name="P825"><text:span text:style-name="T826"><text:s text:c="4"/></text:span><text:span text:style-name="T827">//Verifica se a thread foi criada corretamente</text:span></text:p>
      <text:p text:style-name="P828"><text:span text:style-name="T829"><text:s text:c="4"/></text:span><text:span text:style-name="T830">if</text:span><text:span text:style-name="T831"><text:s/>(pthread_create(&amp;thi,<text:s/></text:span><text:span text:style-name="T832">NULL</text:span><text:span text:style-name="T833">, cria, (</text:span><text:span text:style-name="T834">int</text:span><text:span text:style-name="T835">*)0) !=<text:s/></text:span><text:span text:style-name="T836">0) {</text:span></text:p>
      <text:p text:style-name="P837"><text:span text:style-name="T838"><text:s text:c="8"/>printf(</text:span><text:span text:style-name="T839">"Algum erro ocorreu na criação das threads!\n"</text:span><text:span text:style-name="T840">);</text:span></text:p>
      <text:p text:style-name="P841"><text:span text:style-name="T842"><text:s text:c="8"/></text:span><text:span text:style-name="T843">exit(1);</text:span></text:p>
      <text:p text:style-name="P844"><text:s text:c="4"/>}</text:p>
      <text:p text:style-name="P845"><text:span text:style-name="T846"><text:s text:c="4"/></text:span><text:span text:style-name="T847">if</text:span><text:span text:style-name="T848"><text:s/>(pthread_create(&amp;thj,<text:s/></text:span><text:span text:style-name="T849">NULL</text:span><text:span text:style-name="T850">, cria, (</text:span><text:span text:style-name="T851">int</text:span><text:span text:style-name="T852">*)1) !=<text:s/></text:span><text:span text:style-name="T853">0) {</text:span></text:p>
      <text:p text:style-name="P854"><text:span text:style-name="T855"><text:s text:c="8"/>printf(</text:span><text:span text:style-name="T856">"Algum erro ocorreu na criação das threads!\n"</text:span><text:span text:style-name="T857">);</text:span></text:p>
      <text:p text:style-name="P858"><text:span text:style-name="T859"><text:s text:c="8"/></text:span><text:span text:style-name="T860">exit(1);</text:span></text:p>
      <text:p text:style-name="P861"><text:s text:c="4"/>}</text:p>
      <text:p text:style-name="P862"/>
      <text:p text:style-name="P863"><text:span text:style-name="T864"><text:s text:c="4"/></text:span><text:span text:style-name="T865">//Inicia as threads</text:span></text:p>
      <text:p text:style-name="P866"><text:span text:style-name="T867"><text:s text:c="4"/>pthread_join(thi,<text:s/></text:span><text:span text:style-name="T868">NULL</text:span><text:span text:style-name="T869">);</text:span></text:p>
      <text:p text:style-name="P870"><text:span text:style-name="T871"><text:s text:c="4"/></text:span><text:span text:style-name="T872">pthread_join(thj,<text:s/></text:span><text:span text:style-name="T873">NULL</text:span><text:span text:style-name="T874">);</text:span></text:p>
      <text:p text:style-name="P875"/>
      <text:p text:style-name="P876"><text:span text:style-name="T877"><text:s text:c="4"/></text:span><text:span text:style-name="T878">//Destrói a variável do semáforo ao fim do programa</text:span></text:p>
      <text:p text:style-name="P879"><text:s text:c="4"/>sem_destroy(&amp;semaphore);</text:p>
      <text:p text:style-name="P880"><text:span text:style-name="T881"><text:s text:c="4"/></text:span><text:span text:style-name="T882">return</text:span><text:span text:style-name="T883"><text:s/>0;</text:span></text:p>
      <text:p text:style-name="P884">}</text:p>
      <text:soft-page-break/>
      <text:h text:style-name="P885" text:outline-level="1">Tarefa 3</text:h>
      <text:p text:style-name="P886"><text:tab/>...</text:p>
      <text:h text:style-name="P887" text:outline-level="1">Tarefa 4</text:h>
      <text:p text:style-name="P888"><text:tab/>...</text:p>
      <text:h text:style-name="P889" text:outline-level="1">Referências</text:h>
      <text:list text:style-name="LFO22" text:continue-numbering="true">
        <text:list-item>
          <text:p text:style-name="P890"><text:bookmark-start text:name="_Ref151322939"/><text:span text:style-name="T891">Debian, (2023) “Instalando o Debian via Internet”,<text:s/></text:span><text:a xlink:href="https://www.debian.org/distrib/netinst" office:target-frame-name="_top" xlink:show="replace"><text:span text:style-name="T892">https://www.debian.org/distrib/netinst</text:span></text:a><text:span text:style-name="T893">, Junho.</text:span><text:bookmark-end text:name="_Ref151322939"/></text:p>
        </text:list-item>
        <text:list-item>
          <text:p text:style-name="P894"><text:bookmark-start text:name="_Ref151322942"/><text:span text:style-name="T895">Vinicius Andrade Ribeiro, (2019) “Instalar o Debian 10.0 no VirtualBox 5.2.22”,<text:s/></text:span><text:a xlink:href="https://eteourinhos.com.br/wp-content/uploads/2019/08/02-Instalar-o-Debian-10.pdf" office:target-frame-name="_top" xlink:show="replace"><text:span text:style-name="T896">https://eteourinhos.com.br/wp-content/uploads/2019/08/02-Instalar-o-Debian-10.pdf</text:span></text:a><text:span text:style-name="T897">, Agosto.</text:span><text:bookmark-end text:name="_Ref151322942"/></text:p>
        </text:list-item>
        <text:list-item>
          <text:p text:style-name="P898"><text:bookmark-start text:name="_Ref151322999"/><text:span text:style-name="T899">Gustavo Sobreira, Gabriel Fernandes, F</text:span><text:span text:style-name="T900">órum Alura</text:span><text:span text:style-name="T901"><text:s/>(2022) “[Sugestão] [Resolvido] user is not in the sudoers file. this incident will be reported”,<text:s/></text:span><text:a xlink:href="https://cursos.alura.com.br/forum/topico-sugestao-resolvido-user-is-not-in-the-sudoers-file-this-incident-will-be-reported-259842" office:target-frame-name="_top" xlink:show="replace"><text:span text:style-name="T902">https://cursos.alura.com.br/forum/topico-sugestao-resolvido-user-is-not-in-the-sudoers-file-this-incident-will-be-reported-259842</text:span></text:a><text:span text:style-name="T903">, Dezembro.</text:span><text:bookmark-end text:name="_Ref151322999"/></text:p>
        </text:list-item>
        <text:list-item>
          <text:p text:style-name="P904"><text:bookmark-start text:name="_Ref151323378"/><text:span text:style-name="T905">ATOMIC_FLAG_CLEAR (20</text:span><text:span text:style-name="T906">22</text:span><text:span text:style-name="T907">) “atomic_flag_clear_explicit”.<text:s/></text:span><text:a xlink:href="https://en.cppreference.com/w/c/atomic/atomic_flag_clear" office:target-frame-name="_top" xlink:show="replace"><text:span text:style-name="T908">https://en.cppreference.com/w/c/atomic/atomic_flag_clear</text:span></text:a><text:span text:style-name="T909">,<text:s/></text:span><text:span text:style-name="T910">Março</text:span><text:span text:style-name="T911">.</text:span><text:bookmark-end text:name="_Ref151323378"/></text:p>
        </text:list-item>
        <text:list-item>
          <text:p text:style-name="P912"><text:bookmark-start text:name="_Ref151323379"/><text:span text:style-name="T913">ATOMIC_FLAG_TEST_AND_SET<text:s/></text:span><text:span text:style-name="T914">(</text:span><text:span text:style-name="T915">2022</text:span><text:span text:style-name="T916">) “</text:span><text:span text:style-name="T917">atomic_flag_test_and_set_explicit</text:span><text:span text:style-name="T918">”.<text:s/></text:span><text:a xlink:href="https://en.cppreference.com/w/c/atomic/atomic_flag_test_and_set" office:target-frame-name="_top" xlink:show="replace"><text:span text:style-name="T919">https://en.cppreference.com/w/c/atomic/atomic_flag_test_and_set</text:span></text:a><text:span text:style-name="T920">,<text:s/></text:span><text:span text:style-name="T921">Março</text:span><text:span text:style-name="T922">.</text:span><text:bookmark-end text:name="_Ref151323379"/></text:p>
        </text:list-item>
        <text:list-item>
          <text:p text:style-name="P923"><text:bookmark-start text:name="_Ref151324125"/><text:span text:style-name="T924">[</text:span><text:span text:style-name="T925">SEM_WAIT</text:span><text:span text:style-name="T926">,<text:s/></text:span><text:span text:style-name="T927">Michael</text:span><text:span text:style-name="T928"><text:s/></text:span><text:span text:style-name="T929">K</text:span><text:span text:style-name="T930">errisk 2023],<text:s/></text:span><text:span text:style-name="T931">“sem_wait(3) — Linux manual page”.</text:span><text:span text:style-name="T932"><text:s/></text:span><text:a xlink:href="http://man7.org/linux/man-pages/man3/sem_wait.3.html" office:target-frame-name="_top" xlink:show="replace"><text:span text:style-name="T933">http://man7.org/linux/man-pages/man3/sem_wait.3.html</text:span></text:a><text:span text:style-name="T934">,<text:s/></text:span><text:span text:style-name="T935">Março.</text:span><text:bookmark-end text:name="_Ref151324125"/></text:p>
        </text:list-item>
        <text:list-item>
          <text:p text:style-name="P936"><text:bookmark-start text:name="_Ref151324127"/><text:span text:style-name="T937">[SEM_POST, Michael</text:span><text:span text:style-name="T938"><text:s/></text:span><text:span text:style-name="T939">K</text:span><text:span text:style-name="T940">errisk</text:span><text:span text:style-name="T941"><text:s/>2023]</text:span><text:span text:style-name="T942">,</text:span><text:span text:style-name="T943"><text:s/>“sem_post(3) — Linux manual page”.<text:s/></text:span><text:a xlink:href="http://man7.org/linux/man-pages/man3/sem_post.3.html" office:target-frame-name="_top" xlink:show="replace"><text:span text:style-name="T944">http://man7.org/linux/man-pages/man3/sem_post.3.html</text:span></text:a><text:span text:style-name="T945">,<text:s/></text:span><text:span text:style-name="T946">Março.</text:span><text:bookmark-end text:name="_Ref151324127"/></text:p>
        </text:list-item>
        <text:list-item>
          <text:p text:style-name="P947"><text:bookmark-start text:name="_Ref151324128"/><text:span text:style-name="T948">[</text:span><text:span text:style-name="T949">SEM_INIT</text:span><text:span text:style-name="T950">,<text:s/></text:span><text:span text:style-name="T951">Michael</text:span><text:span text:style-name="T952"><text:s/></text:span><text:span text:style-name="T953">K</text:span><text:span text:style-name="T954">errisk</text:span><text:span text:style-name="T955"><text:s/>2023], “</text:span><text:span text:style-name="T956">sem_init(3) — Linux manual page</text:span><text:span text:style-name="T957">”.<text:s/></text:span><text:a xlink:href="http://man7.org/linux/man-pages/man3/sem_init.3.html" office:target-frame-name="_top" xlink:show="replace"><text:span text:style-name="T958">http://man7.org/linux/man-pages/man3/sem_init.3.html</text:span></text:a><text:span text:style-name="T959">, Março.</text:span><text:bookmark-end text:name="_Ref151324128"/></text:p>
        </text:list-item>
        <text:list-item>
          <text:p text:style-name="P960"><text:bookmark-start text:name="_Ref151324129"/><text:span text:style-name="T961">[</text:span><text:span text:style-name="T962">SEM_DESTROY</text:span><text:span text:style-name="T963">,<text:s/></text:span><text:span text:style-name="T964">Michael Kerrisk</text:span><text:span text:style-name="T965"><text:s/>2023], “</text:span><text:span text:style-name="T966">sem_destroy(3) — Linux manual page</text:span><text:span text:style-name="T967">”.<text:s/></text:span><text:a xlink:href="http://man7.org/linux/man-pages/man3/sem_destroy.3.htm" office:target-frame-name="_top" xlink:show="replace"><text:span text:style-name="T968">http://man7.org/linux/man-pages/man3/sem_destroy.3.htm</text:span></text:a><text:span text:style-name="T969">, Março.</text:span><text:bookmark-end text:name="_Ref151324129"/></text:p>
        </text:list-item>
        <text:list-item>
          <text:p text:style-name="P970"><text:bookmark-start text:name="_Ref151324063"/><text:span text:style-name="T971">[PTHREAD_CREATE,<text:s/></text:span><text:span text:style-name="T972">Michael</text:span><text:span text:style-name="T973"><text:s/></text:span><text:span text:style-name="T974">K</text:span><text:span text:style-name="T975">errisk</text:span><text:span text:style-name="T976"><text:s/>2023</text:span><text:span text:style-name="T977">],</text:span><text:span text:style-name="T978"><text:s/>“pthread_create(3) — Linux manual page”.</text:span><text:span text:style-name="T979"><text:s/></text:span><text:a xlink:href="http://man7.org/linux/man-pages/man3/pthread_create.3.html" office:target-frame-name="_top" xlink:show="replace"><text:span text:style-name="T980">http://man7.org/linux/man-pages/man3/pthread_create.3.html</text:span></text:a><text:span text:style-name="T981">, Ma</text:span><text:span text:style-name="T982">rço.</text:span><text:bookmark-end text:name="_Ref151324063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Heading1" style:display-name="Heading 1" style:family="paragraph" style:parent-style-name="Standard" style:next-style-name="SBCparagraph" style:default-outline-level="1">
      <style:paragraph-properties fo:keep-with-next="always" fo:widows="2" fo:orphans="2" fo:margin-top="0.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normal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0.0972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2.362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font-name="StarSymbol"/>
    </style:style>
    <style:style style:name="WW_CharLFO4LVL2" style:family="text">
      <style:text-properties style:font-name="Star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text:list-style style:name="SBCnumberlist" style:display-name="SBC:number:list">
      <text:list-level-style-bullet text:level="1" text:style-name="WW_CharLFO4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outline-level-style>
      <text:outline-level-style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20LVL2" style:family="text">
      <style:text-properties fo:font-size="12pt" style:font-size-asian="12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1.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1.2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text:style-name="WW_CharLFO20LVL2" style:num-suffix=".1.3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1.4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2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Gustavo Borges</dc:creator>
    <meta:creation-date>2010-08-03T10:11:00Z</meta:creation-date>
    <dc:date>2023-11-20T01:10:00Z</dc:date>
    <meta:template xlink:href="Normal.dotm" xlink:type="simple"/>
    <meta:editing-cycles>33</meta:editing-cycles>
    <meta:editing-duration>PT18960S</meta:editing-duration>
    <meta:user-defined meta:name="Info 1"/>
    <meta:user-defined meta:name="Info 2"/>
    <meta:user-defined meta:name="Info 3"/>
    <meta:user-defined meta:name="Info 4"/>
    <meta:document-statistic meta:page-count="16" meta:paragraph-count="43" meta:word-count="3395" meta:character-count="21691" meta:row-count="152" meta:non-whitespace-character-count="18339"/>
  </office:meta>
</office:document-meta>
</file>