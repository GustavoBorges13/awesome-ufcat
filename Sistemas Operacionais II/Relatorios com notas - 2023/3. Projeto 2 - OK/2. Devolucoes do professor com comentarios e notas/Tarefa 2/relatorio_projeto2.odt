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emf" manifest:media-type=""/>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1.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38.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2.png" manifest:media-type="image/png"/>
  <manifest:file-entry manifest:full-path="media/image3.png" manifest:media-type="image/png"/>
  <manifest:file-entry manifest:full-path="media/image4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861in" text:min-label-width="0.25in" text:list-level-position-and-space-mode="label-alignment">
          <style:list-level-label-alignment text:label-followed-by="listtab" fo:margin-left="0.8361in" fo:text-indent="-0.25in"/>
        </style:list-level-properties>
        <style:text-properties style:font-name="Symbol"/>
      </text:list-level-style-bullet>
      <text:list-level-style-bullet text:level="2" text:style-name="WW_CharLFO11LVL2" text:bullet-char="o">
        <style:list-level-properties text:space-before="1.0861in" text:min-label-width="0.25in" text:list-level-position-and-space-mode="label-alignment">
          <style:list-level-label-alignment text:label-followed-by="listtab" fo:margin-left="1.3361in" fo:text-indent="-0.25in"/>
        </style:list-level-properties>
        <style:text-properties style:font-name="Courier New"/>
      </text:list-level-style-bullet>
      <text:list-level-style-bullet text:level="3" text:style-name="WW_CharLFO11LVL3" text:bullet-char="">
        <style:list-level-properties text:space-before="1.5861in" text:min-label-width="0.25in" text:list-level-position-and-space-mode="label-alignment">
          <style:list-level-label-alignment text:label-followed-by="listtab" fo:margin-left="1.8361in" fo:text-indent="-0.25in"/>
        </style:list-level-properties>
        <style:text-properties style:font-name="Wingdings"/>
      </text:list-level-style-bullet>
      <text:list-level-style-bullet text:level="4" text:style-name="WW_CharLFO11LVL4" text:bullet-char="">
        <style:list-level-properties text:space-before="2.0861in" text:min-label-width="0.25in" text:list-level-position-and-space-mode="label-alignment">
          <style:list-level-label-alignment text:label-followed-by="listtab" fo:margin-left="2.3361in" fo:text-indent="-0.25in"/>
        </style:list-level-properties>
        <style:text-properties style:font-name="Symbol"/>
      </text:list-level-style-bullet>
      <text:list-level-style-bullet text:level="5" text:style-name="WW_CharLFO11LVL5" text:bullet-char="o">
        <style:list-level-properties text:space-before="2.5861in" text:min-label-width="0.25in" text:list-level-position-and-space-mode="label-alignment">
          <style:list-level-label-alignment text:label-followed-by="listtab" fo:margin-left="2.8361in" fo:text-indent="-0.25in"/>
        </style:list-level-properties>
        <style:text-properties style:font-name="Courier New"/>
      </text:list-level-style-bullet>
      <text:list-level-style-bullet text:level="6" text:style-name="WW_CharLFO11LVL6" text:bullet-char="">
        <style:list-level-properties text:space-before="3.0861in" text:min-label-width="0.25in" text:list-level-position-and-space-mode="label-alignment">
          <style:list-level-label-alignment text:label-followed-by="listtab" fo:margin-left="3.3361in" fo:text-indent="-0.25in"/>
        </style:list-level-properties>
        <style:text-properties style:font-name="Wingdings"/>
      </text:list-level-style-bullet>
      <text:list-level-style-bullet text:level="7" text:style-name="WW_CharLFO11LVL7" text:bullet-char="">
        <style:list-level-properties text:space-before="3.5861in" text:min-label-width="0.25in" text:list-level-position-and-space-mode="label-alignment">
          <style:list-level-label-alignment text:label-followed-by="listtab" fo:margin-left="3.8361in" fo:text-indent="-0.25in"/>
        </style:list-level-properties>
        <style:text-properties style:font-name="Symbol"/>
      </text:list-level-style-bullet>
      <text:list-level-style-bullet text:level="8" text:style-name="WW_CharLFO11LVL8" text:bullet-char="o">
        <style:list-level-properties text:space-before="4.0861in" text:min-label-width="0.25in" text:list-level-position-and-space-mode="label-alignment">
          <style:list-level-label-alignment text:label-followed-by="listtab" fo:margin-left="4.3361in" fo:text-indent="-0.25in"/>
        </style:list-level-properties>
        <style:text-properties style:font-name="Courier New"/>
      </text:list-level-style-bullet>
      <text:list-level-style-bullet text:level="9" text:style-name="WW_CharLFO11LVL9" text:bullet-char="">
        <style:list-level-properties text:space-before="4.5861in" text:min-label-width="0.25in" text:list-level-position-and-space-mode="label-alignment">
          <style:list-level-label-alignment text:label-followed-by="listtab" fo:margin-left="4.836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2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2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2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2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2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2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2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2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BCtitle" style:master-page-name="MP0" style:family="paragraph">
      <style:paragraph-properties fo:break-before="page"/>
      <style:text-properties style:font-name="Times New Roman"/>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text-position="super 66.6%"/>
    </style:style>
    <style:style style:name="T4" style:parent-style-name="DefaultParagraphFont" style:family="text">
      <style:text-properties style:font-name="Times New Roman" style:text-position="super 66.6%"/>
    </style:style>
    <style:style style:name="T5" style:parent-style-name="DefaultParagraphFont" style:family="text">
      <style:text-properties style:font-name="Times New Roman"/>
    </style:style>
    <style:style style:name="P6" style:parent-style-name="SBCemail" style:family="paragraph">
      <style:text-properties style:font-name="Times New Roman" style:font-name-complex="Times New Roman"/>
    </style:style>
    <style:style style:name="P7" style:parent-style-name="SBCresumo" style:family="paragraph">
      <style:text-properties style:font-name="Times New Roman"/>
    </style:style>
    <style:style style:name="P8" style:parent-style-name="ListParagraph" style:list-style-name="LFO7" style:family="paragraph"/>
    <style:style style:name="T9" style:parent-style-name="DefaultParagraphFont" style:family="text">
      <style:text-properties style:font-name="Calibri"/>
    </style:style>
    <style:style style:name="P10" style:parent-style-name="ListParagraph" style:list-style-name="LFO7" style:family="paragraph">
      <style:text-properties style:font-name="Calibri"/>
    </style:style>
    <style:style style:name="P11" style:parent-style-name="ListParagraph" style:list-style-name="LFO7" style:family="paragraph">
      <style:text-properties style:font-name="Calibri"/>
    </style:style>
    <style:style style:name="P12" style:parent-style-name="ListParagraph" style:list-style-name="LFO7" style:family="paragraph">
      <style:text-properties style:font-name="Calibri"/>
    </style:style>
    <style:style style:name="P13" style:parent-style-name="Normal" style:family="paragraph">
      <style:text-properties style:font-name="Calibri"/>
    </style:style>
    <style:style style:name="P14" style:parent-style-name="SBCtitle1" style:list-style-name="LFO8" style:family="paragraph"/>
    <style:style style:name="P15" style:parent-style-name="ListParagraph" style:list-style-name="LFO8" style:family="paragraph">
      <style:text-properties fo:font-weight="bold" style:font-weight-asian="bold" style:font-weight-complex="bold"/>
    </style:style>
    <style:style style:name="P16" style:parent-style-name="ListParagraph" style:list-style-name="LFO8" style:family="paragraph">
      <style:text-properties fo:font-weight="bold" style:font-weight-asian="bold" style:font-weight-complex="bold"/>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Normal" style:family="paragraph">
      <style:paragraph-properties fo:text-align="center"/>
    </style:style>
    <style:style style:name="P2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text-align="center"/>
    </style:style>
    <style:style style:name="P2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7" style:parent-style-name="Normal" style:family="paragraph">
      <style:paragraph-properties fo:text-align="center" fo:text-indent="0in"/>
    </style:style>
    <style:style style:name="T28" style:parent-style-name="DefaultParagraphFont" style:family="text">
      <style:text-properties fo:language="en" fo:country="US"/>
    </style:style>
    <style:style style:name="P29" style:parent-style-name="Normal" style:family="paragraph">
      <style:paragraph-properties fo:margin-top="0in" fo:text-indent="0in"/>
      <style:text-properties fo:language="en" fo:country="US"/>
    </style:style>
    <style:style style:name="P30" style:parent-style-name="Normal" style:family="paragraph">
      <style:paragraph-properties fo:margin-top="0in" fo:text-indent="0in"/>
      <style:text-properties fo:language="en" fo:country="US"/>
    </style:style>
    <style:style style:name="P31" style:parent-style-name="Normal" style:family="paragraph">
      <style:paragraph-properties fo:margin-top="0in" fo:text-indent="0in"/>
      <style:text-properties fo:language="en" fo:country="US"/>
    </style:style>
    <style:style style:name="P32" style:parent-style-name="Normal" style:family="paragraph">
      <style:paragraph-properties fo:margin-top="0in" fo:text-indent="0in"/>
      <style:text-properties fo:language="en" fo:country="US"/>
    </style:style>
    <style:style style:name="P33" style:parent-style-name="Normal" style:family="paragraph">
      <style:paragraph-properties fo:margin-top="0in" fo:text-indent="0in"/>
      <style:text-properties fo:language="en" fo:country="US"/>
    </style:style>
    <style:style style:name="P34" style:parent-style-name="Normal" style:family="paragraph">
      <style:paragraph-properties fo:margin-top="0in" fo:text-indent="0in"/>
      <style:text-properties fo:language="en" fo:country="US"/>
    </style:style>
    <style:style style:name="P35" style:parent-style-name="Normal" style:family="paragraph">
      <style:paragraph-properties fo:margin-top="0in" fo:text-indent="0in"/>
      <style:text-properties fo:language="en" fo:country="US"/>
    </style:style>
    <style:style style:name="P36" style:parent-style-name="Normal" style:family="paragraph">
      <style:paragraph-properties fo:margin-top="0in" fo:text-indent="0in"/>
      <style:text-properties fo:language="en" fo:country="US"/>
    </style:style>
    <style:style style:name="P37" style:parent-style-name="Normal" style:family="paragraph">
      <style:paragraph-properties fo:margin-top="0in" fo:text-indent="0in"/>
      <style:text-properties fo:language="en" fo:country="US"/>
    </style:style>
    <style:style style:name="P38" style:parent-style-name="Normal" style:family="paragraph">
      <style:paragraph-properties fo:margin-top="0in" fo:text-indent="0in"/>
      <style:text-properties fo:language="en" fo:country="US"/>
    </style:style>
    <style:style style:name="P39" style:parent-style-name="Normal" style:family="paragraph">
      <style:paragraph-properties fo:margin-top="0in" fo:text-indent="0in"/>
      <style:text-properties fo:language="en" fo:country="US"/>
    </style:style>
    <style:style style:name="P4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1" style:parent-style-name="Normal" style:family="paragraph">
      <style:paragraph-properties fo:text-align="center"/>
    </style:style>
    <style:style style:name="P4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Normal" style:family="paragraph">
      <style:paragraph-properties fo:text-align="center"/>
    </style:style>
    <style:style style:name="P4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7" style:parent-style-name="Normal" style:family="paragraph">
      <style:paragraph-properties fo:text-align="center"/>
    </style:style>
    <style:style style:name="P4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Normal" style:family="paragraph">
      <style:paragraph-properties fo:text-align="center"/>
    </style:style>
    <style:style style:name="P5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53" style:parent-style-name="DefaultParagraphFont" style:family="text">
      <style:text-properties fo:font-weight="bold" style:font-weight-asian="bold" style:font-weight-complex="bold"/>
    </style:style>
    <style:style style:name="P54" style:parent-style-name="Normal" style:family="paragraph">
      <style:paragraph-properties fo:text-align="center"/>
    </style:style>
    <style:style style:name="P5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style:font-name="Calibri" fo:font-weight="bold" style:font-weight-asian="bold" style:font-weight-complex="bold"/>
    </style:style>
    <style:style style:name="T58" style:parent-style-name="DefaultParagraphFont" style:family="text">
      <style:text-properties style:font-name="Calibri"/>
    </style:style>
    <style:style style:name="P59" style:parent-style-name="Normal" style:family="paragraph">
      <style:paragraph-properties fo:text-align="center"/>
    </style:style>
    <style:style style:name="P6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61" style:parent-style-name="DefaultParagraphFont" style:family="text">
      <style:text-properties style:font-name="Calibri"/>
    </style:style>
    <style:style style:name="T62" style:parent-style-name="DefaultParagraphFont" style:family="text">
      <style:text-properties style:font-name="Calibri" fo:font-weight="bold" style:font-weight-asian="bold" style:font-weight-complex="bold"/>
    </style:style>
    <style:style style:name="T63" style:parent-style-name="DefaultParagraphFont" style:family="text">
      <style:text-properties style:font-name="Calibri"/>
    </style:style>
    <style:style style:name="P64" style:parent-style-name="ListParagraph" style:list-style-name="LFO9" style:family="paragraph">
      <style:text-properties style:font-name="Calibri"/>
    </style:style>
    <style:style style:name="P65" style:parent-style-name="ListParagraph" style:list-style-name="LFO9" style:family="paragraph">
      <style:text-properties style:font-name="Calibri"/>
    </style:style>
    <style:style style:name="P66" style:parent-style-name="ListParagraph" style:list-style-name="LFO9" style:family="paragraph">
      <style:text-properties style:font-name="Calibri"/>
    </style:style>
    <style:style style:name="P67" style:parent-style-name="ListParagraph" style:list-style-name="LFO9" style:family="paragraph">
      <style:text-properties style:font-name="Calibri"/>
    </style:style>
    <style:style style:name="T68" style:parent-style-name="DefaultParagraphFont" style:family="text">
      <style:text-properties style:font-name="Calibri"/>
    </style:style>
    <style:style style:name="T69" style:parent-style-name="DefaultParagraphFont" style:family="text">
      <style:text-properties style:font-name="Calibri" fo:font-weight="bold" style:font-weight-asian="bold" style:font-weight-complex="bold"/>
    </style:style>
    <style:style style:name="T70" style:parent-style-name="DefaultParagraphFont" style:family="text">
      <style:text-properties style:font-name="Calibri"/>
    </style:style>
    <style:style style:name="T71" style:parent-style-name="DefaultParagraphFont" style:family="text">
      <style:text-properties style:font-name="Calibri" fo:font-weight="bold" style:font-weight-asian="bold" style:font-weight-complex="bold"/>
    </style:style>
    <style:style style:name="T72" style:parent-style-name="DefaultParagraphFont" style:family="text">
      <style:text-properties style:font-name="Calibri"/>
    </style:style>
    <style:style style:name="P73" style:parent-style-name="Normal" style:family="paragraph">
      <style:paragraph-properties fo:text-align="center"/>
    </style:style>
    <style:style style:name="P7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75" style:parent-style-name="ListParagraph" style:list-style-name="LFO10" style:family="paragraph"/>
    <style:style style:name="P76" style:parent-style-name="ListParagraph" style:list-style-name="LFO10" style:family="paragraph"/>
    <style:style style:name="P77" style:parent-style-name="ListParagraph" style:list-style-name="LFO10" style:family="paragraph"/>
    <style:style style:name="P78" style:parent-style-name="Normal" style:family="paragraph">
      <style:paragraph-properties fo:text-align="center"/>
    </style:style>
    <style:style style:name="P7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80" style:parent-style-name="DefaultParagraphFont" style:family="text">
      <style:text-properties style:font-name="Calibri"/>
    </style:style>
    <style:style style:name="T81" style:parent-style-name="DefaultParagraphFont" style:family="text">
      <style:text-properties style:font-name="Calibri" fo:font-weight="bold" style:font-weight-asian="bold" style:font-weight-complex="bold"/>
    </style:style>
    <style:style style:name="T82" style:parent-style-name="DefaultParagraphFont" style:family="text">
      <style:text-properties style:font-name="Calibri"/>
    </style:style>
    <style:style style:name="T83" style:parent-style-name="DefaultParagraphFont" style:family="text">
      <style:text-properties style:font-name="Calibri" fo:font-weight="bold" style:font-weight-asian="bold" style:font-weight-complex="bold"/>
    </style:style>
    <style:style style:name="T84" style:parent-style-name="DefaultParagraphFont" style:family="text">
      <style:text-properties style:font-name="Calibri"/>
    </style:style>
    <style:style style:name="P85" style:parent-style-name="Normal" style:family="paragraph">
      <style:text-properties style:font-name="Calibri"/>
    </style:style>
    <style:style style:name="P86" style:parent-style-name="Normal" style:family="paragraph">
      <style:text-properties style:font-name="Calibri"/>
    </style:style>
    <style:style style:name="P87" style:parent-style-name="Normal" style:family="paragraph">
      <style:paragraph-properties fo:text-align="center" fo:text-indent="0in"/>
    </style:style>
    <style:style style:name="T88" style:parent-style-name="DefaultParagraphFont" style:family="text">
      <style:text-properties fo:language="en" fo:country="US"/>
    </style:style>
    <style:style style:name="P89" style:parent-style-name="Normal" style:family="paragraph">
      <style:paragraph-properties fo:margin-top="0in" fo:text-indent="0in"/>
      <style:text-properties fo:language="en" fo:country="US"/>
    </style:style>
    <style:style style:name="P90" style:parent-style-name="Normal" style:family="paragraph">
      <style:paragraph-properties fo:margin-top="0in" fo:text-indent="0in"/>
      <style:text-properties fo:language="en" fo:country="US"/>
    </style:style>
    <style:style style:name="P91" style:parent-style-name="Normal" style:family="paragraph">
      <style:paragraph-properties fo:margin-top="0in" fo:text-indent="0in"/>
      <style:text-properties fo:language="en" fo:country="US"/>
    </style:style>
    <style:style style:name="P92" style:parent-style-name="Normal" style:family="paragraph">
      <style:paragraph-properties fo:margin-top="0in" fo:text-indent="0in"/>
      <style:text-properties fo:language="en" fo:country="US"/>
    </style:style>
    <style:style style:name="P93" style:parent-style-name="Normal" style:family="paragraph">
      <style:paragraph-properties fo:margin-top="0in" fo:text-indent="0in"/>
      <style:text-properties fo:language="en" fo:country="US"/>
    </style:style>
    <style:style style:name="P94" style:parent-style-name="Normal" style:family="paragraph">
      <style:paragraph-properties fo:margin-top="0in" fo:text-indent="0in"/>
      <style:text-properties fo:language="en" fo:country="US"/>
    </style:style>
    <style:style style:name="P95" style:parent-style-name="Normal" style:family="paragraph">
      <style:paragraph-properties fo:margin-top="0in" fo:text-indent="0in"/>
      <style:text-properties fo:language="en" fo:country="US"/>
    </style:style>
    <style:style style:name="P96" style:parent-style-name="Normal" style:family="paragraph">
      <style:paragraph-properties fo:margin-top="0in" fo:text-indent="0in"/>
      <style:text-properties fo:language="en" fo:country="US"/>
    </style:style>
    <style:style style:name="P97" style:parent-style-name="Normal" style:family="paragraph">
      <style:paragraph-properties fo:margin-top="0in" fo:text-indent="0in"/>
      <style:text-properties fo:language="en" fo:country="US"/>
    </style:style>
    <style:style style:name="P98" style:parent-style-name="Normal" style:family="paragraph">
      <style:paragraph-properties fo:margin-top="0in" fo:text-indent="0in"/>
      <style:text-properties fo:language="en" fo:country="US"/>
    </style:style>
    <style:style style:name="P99" style:parent-style-name="Normal" style:family="paragraph">
      <style:paragraph-properties fo:margin-top="0in" fo:text-indent="0in"/>
      <style:text-properties fo:language="en" fo:country="US"/>
    </style:style>
    <style:style style:name="P100" style:parent-style-name="Normal" style:family="paragraph">
      <style:paragraph-properties fo:margin-top="0in" fo:text-indent="0in"/>
      <style:text-properties fo:language="en" fo:country="US"/>
    </style:style>
    <style:style style:name="P101" style:parent-style-name="Normal" style:family="paragraph">
      <style:paragraph-properties fo:margin-top="0in" fo:text-indent="0in"/>
      <style:text-properties fo:language="en" fo:country="US"/>
    </style:style>
    <style:style style:name="P10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03" style:parent-style-name="ListParagraph" style:master-page-name="MP1" style:list-style-name="LFO8" style:family="paragraph">
      <style:paragraph-properties fo:break-before="page"/>
      <style:text-properties style:font-name="Times New Roman" fo:font-weight="bold" style:font-weight-asian="bold" style:font-weight-complex="bold"/>
    </style:style>
    <style:style style:name="P104" style:parent-style-name="Normal" style:family="paragraph">
      <style:paragraph-properties fo:text-align="center"/>
    </style:style>
    <style:style style:name="P10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06" style:parent-style-name="Normal" style:family="paragraph">
      <style:text-properties style:font-name="Times New Roman"/>
    </style:style>
    <style:style style:name="P107" style:parent-style-name="ListParagraph" style:list-style-name="LFO11" style:family="paragraph"/>
    <style:style style:name="T108" style:parent-style-name="DefaultParagraphFont" style:family="text">
      <style:text-properties style:font-name="Times New Roman"/>
    </style:style>
    <style:style style:name="T109" style:parent-style-name="DefaultParagraphFont" style:family="text">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P111" style:parent-style-name="ListParagraph" style:list-style-name="LFO11" style:family="paragraph"/>
    <style:style style:name="T112" style:parent-style-name="DefaultParagraphFont" style:family="text">
      <style:text-properties style:font-name="Times New Roman"/>
    </style:style>
    <style:style style:name="T113" style:parent-style-name="DefaultParagraphFont" style:family="text">
      <style:text-properties style:font-name="Times New Roman" fo:font-weight="bold" style:font-weight-asian="bold" style:font-weight-complex="bold"/>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P117" style:parent-style-name="ListParagraph" style:list-style-name="LFO11" style:family="paragraph"/>
    <style:style style:name="T118" style:parent-style-name="DefaultParagraphFont" style:family="text">
      <style:text-properties style:font-name="Times New Roman"/>
    </style:style>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P121" style:parent-style-name="ListParagraph" style:list-style-name="LFO11" style:family="paragraph"/>
    <style:style style:name="T122" style:parent-style-name="DefaultParagraphFont" style:family="text">
      <style:text-properties style:font-name="Times New Roman"/>
    </style:style>
    <style:style style:name="T123" style:parent-style-name="DefaultParagraphFont" style:family="text">
      <style:text-properties style:font-name="Times New Roman" fo:font-weight="bold" style:font-weight-asian="bold" style:font-weight-complex="bold"/>
    </style:style>
    <style:style style:name="T124" style:parent-style-name="DefaultParagraphFont" style:family="text">
      <style:text-properties style:font-name="Times New Roman"/>
    </style:style>
    <style:style style:name="P125" style:parent-style-name="ListParagraph" style:list-style-name="LFO11" style:family="paragraph"/>
    <style:style style:name="T126" style:parent-style-name="DefaultParagraphFont" style:family="text">
      <style:text-properties style:font-name="Times New Roman"/>
    </style:style>
    <style:style style:name="T127" style:parent-style-name="DefaultParagraphFont" style:family="text">
      <style:text-properties style:font-name="Times New Roman" fo:font-weight="bold" style:font-weight-asian="bold" style:font-weight-complex="bold"/>
    </style:style>
    <style:style style:name="T128" style:parent-style-name="DefaultParagraphFont" style:family="text">
      <style:text-properties style:font-name="Times New Roman"/>
    </style:style>
    <style:style style:name="P129" style:parent-style-name="Normal" style:family="paragraph">
      <style:text-properties style:font-name="Times New Roman"/>
    </style:style>
    <style:style style:name="P130" style:parent-style-name="Normal" style:family="paragraph">
      <style:text-properties style:font-name="Times New Roman"/>
    </style:style>
    <style:style style:name="P131" style:parent-style-name="Normal" style:family="paragraph">
      <style:text-properties style:font-name="Times New Roman"/>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fo:font-weight="bold" style:font-weight-asian="bold" style:font-weight-complex="bold"/>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fo:font-weight="bold" style:font-weight-asian="bold" style:font-weight-complex="bold"/>
    </style:style>
    <style:style style:name="T136" style:parent-style-name="DefaultParagraphFont" style:family="text">
      <style:text-properties style:font-name="Times New Roman"/>
    </style:style>
    <style:style style:name="P137" style:parent-style-name="Normal" style:family="paragraph">
      <style:paragraph-properties fo:text-align="center"/>
    </style:style>
    <style:style style:name="T138" style:parent-style-name="DefaultParagraphFont" style:family="text">
      <style:text-properties fo:language="en" fo:country="US"/>
    </style:style>
    <style:style style:name="P139" style:parent-style-name="Normal" style:family="paragraph">
      <style:paragraph-properties fo:text-align="start" fo:margin-top="0in" fo:text-indent="0in"/>
      <style:text-properties fo:language="en" fo:country="US"/>
    </style:style>
    <style:style style:name="P140" style:parent-style-name="Normal" style:family="paragraph">
      <style:paragraph-properties fo:text-align="start" fo:margin-top="0in" fo:text-indent="0in"/>
      <style:text-properties fo:language="en" fo:country="US"/>
    </style:style>
    <style:style style:name="P141" style:parent-style-name="Normal" style:family="paragraph">
      <style:paragraph-properties fo:text-align="start" fo:margin-top="0in" fo:text-indent="0in"/>
      <style:text-properties fo:language="en" fo:country="US"/>
    </style:style>
    <style:style style:name="P142" style:parent-style-name="Normal" style:family="paragraph">
      <style:paragraph-properties fo:text-align="start" fo:margin-top="0in" fo:text-indent="0in"/>
      <style:text-properties fo:language="en" fo:country="US"/>
    </style:style>
    <style:style style:name="P143" style:parent-style-name="Normal" style:family="paragraph">
      <style:paragraph-properties fo:text-align="start" fo:margin-top="0in" fo:text-indent="0in"/>
      <style:text-properties fo:language="en" fo:country="US"/>
    </style:style>
    <style:style style:name="P144" style:parent-style-name="Normal" style:family="paragraph">
      <style:paragraph-properties fo:text-align="start" fo:margin-top="0in" fo:text-indent="0in"/>
      <style:text-properties fo:language="en" fo:country="US"/>
    </style:style>
    <style:style style:name="P145" style:parent-style-name="Normal" style:family="paragraph">
      <style:paragraph-properties fo:text-align="start" fo:margin-top="0in" fo:text-indent="0in"/>
      <style:text-properties fo:language="en" fo:country="US"/>
    </style:style>
    <style:style style:name="P146" style:parent-style-name="Normal" style:family="paragraph">
      <style:paragraph-properties fo:text-align="start" fo:margin-top="0in" fo:text-indent="0in"/>
      <style:text-properties fo:language="en" fo:country="US"/>
    </style:style>
    <style:style style:name="P147" style:parent-style-name="Normal" style:family="paragraph">
      <style:paragraph-properties fo:text-align="start" fo:margin-top="0in" fo:text-indent="0in"/>
      <style:text-properties fo:language="en" fo:country="US"/>
    </style:style>
    <style:style style:name="P148" style:parent-style-name="Normal" style:family="paragraph">
      <style:paragraph-properties fo:text-align="start" fo:margin-top="0in" fo:text-indent="0in"/>
      <style:text-properties fo:language="en" fo:country="US"/>
    </style:style>
    <style:style style:name="P149" style:parent-style-name="Normal" style:family="paragraph">
      <style:paragraph-properties fo:text-align="start" fo:margin-top="0in" fo:text-indent="0in"/>
      <style:text-properties fo:language="en" fo:country="US"/>
    </style:style>
    <style:style style:name="P150" style:parent-style-name="Normal" style:family="paragraph">
      <style:paragraph-properties fo:text-align="start" fo:margin-top="0in" fo:text-indent="0in"/>
      <style:text-properties fo:language="en" fo:country="US"/>
    </style:style>
    <style:style style:name="P151" style:parent-style-name="Normal" style:family="paragraph">
      <style:paragraph-properties fo:text-align="start" fo:margin-top="0in" fo:text-indent="0in"/>
      <style:text-properties fo:language="en" fo:country="US"/>
    </style:style>
    <style:style style:name="P15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53" style:parent-style-name="Normal" style:family="paragraph">
      <style:paragraph-properties fo:text-align="center" fo:text-indent="0in"/>
    </style:style>
    <style:style style:name="T154" style:parent-style-name="DefaultParagraphFont" style:family="text">
      <style:text-properties fo:language="en" fo:country="US"/>
    </style:style>
    <style:style style:name="P155" style:parent-style-name="Normal" style:family="paragraph">
      <style:paragraph-properties fo:text-align="start" fo:margin-top="0in" fo:text-indent="0in"/>
    </style:style>
    <style:style style:name="P156" style:parent-style-name="Normal" style:family="paragraph">
      <style:paragraph-properties fo:text-align="start" fo:margin-top="0in" fo:text-indent="0in"/>
    </style:style>
    <style:style style:name="P157" style:parent-style-name="Normal" style:family="paragraph">
      <style:paragraph-properties fo:text-align="start" fo:margin-top="0in" fo:text-indent="0.4923in"/>
    </style:style>
    <style:style style:name="P158" style:parent-style-name="Normal" style:family="paragraph">
      <style:paragraph-properties fo:text-align="start" fo:margin-top="0in" fo:text-indent="0.4923in"/>
    </style:style>
    <style:style style:name="P159" style:parent-style-name="Normal" style:family="paragraph">
      <style:paragraph-properties fo:text-align="start" fo:margin-top="0in" fo:text-indent="0.4923in"/>
    </style:style>
    <style:style style:name="P160" style:parent-style-name="Normal" style:family="paragraph">
      <style:paragraph-properties fo:text-align="start" fo:margin-top="0in" fo:text-indent="0in"/>
      <style:text-properties fo:language="en" fo:country="US"/>
    </style:style>
    <style:style style:name="P16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62" style:parent-style-name="Normal" style:family="paragraph">
      <style:paragraph-properties fo:text-align="center" fo:text-indent="0in"/>
    </style:style>
    <style:style style:name="T163" style:parent-style-name="DefaultParagraphFont" style:family="text">
      <style:text-properties fo:language="en" fo:country="US"/>
    </style:style>
    <style:style style:name="P164" style:parent-style-name="Normal" style:family="paragraph">
      <style:paragraph-properties fo:text-align="start" fo:margin-top="0in" fo:text-indent="0in"/>
      <style:text-properties fo:language="en" fo:country="US"/>
    </style:style>
    <style:style style:name="P165" style:parent-style-name="Normal" style:family="paragraph">
      <style:paragraph-properties fo:text-align="start" fo:margin-top="0in" fo:text-indent="0in"/>
      <style:text-properties fo:language="en" fo:country="US"/>
    </style:style>
    <style:style style:name="P166" style:parent-style-name="Normal" style:family="paragraph">
      <style:paragraph-properties fo:text-align="start" fo:margin-top="0in" fo:text-indent="0in"/>
      <style:text-properties fo:language="en" fo:country="US"/>
    </style:style>
    <style:style style:name="P167" style:parent-style-name="Normal" style:family="paragraph">
      <style:paragraph-properties fo:text-align="start" fo:margin-top="0in" fo:text-indent="0in"/>
      <style:text-properties fo:language="en" fo:country="US"/>
    </style:style>
    <style:style style:name="P168" style:parent-style-name="Normal" style:family="paragraph">
      <style:paragraph-properties fo:text-align="start" fo:margin-top="0in" fo:text-indent="0.4923in"/>
      <style:text-properties fo:language="en" fo:country="US"/>
    </style:style>
    <style:style style:name="P169" style:parent-style-name="Normal" style:family="paragraph">
      <style:paragraph-properties fo:text-align="start" fo:margin-top="0in" fo:text-indent="0.4923in"/>
      <style:text-properties fo:language="en" fo:country="US"/>
    </style:style>
    <style:style style:name="P170" style:parent-style-name="Normal" style:family="paragraph">
      <style:paragraph-properties fo:text-align="start" fo:margin-top="0in" fo:text-indent="0.4923in"/>
      <style:text-properties fo:language="en" fo:country="US"/>
    </style:style>
    <style:style style:name="P171" style:parent-style-name="Normal" style:family="paragraph">
      <style:paragraph-properties fo:text-align="start" fo:margin-top="0in" fo:text-indent="0.4923in"/>
    </style:style>
    <style:style style:name="P172" style:parent-style-name="Normal" style:family="paragraph">
      <style:paragraph-properties fo:text-align="start" fo:margin-top="0in" fo:text-indent="0in"/>
    </style:style>
    <style:style style:name="P17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74" style:parent-style-name="Normal" style:family="paragraph">
      <style:paragraph-properties fo:text-align="center"/>
    </style:style>
    <style:style style:name="T175" style:parent-style-name="DefaultParagraphFont" style:family="text">
      <style:text-properties fo:font-weight="bold" style:font-weight-asian="bold" style:font-weight-complex="bold"/>
    </style:style>
    <style:style style:name="P17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77" style:parent-style-name="DefaultParagraphFont" style:family="text">
      <style:text-properties style:font-name="Times New Roman"/>
    </style:style>
    <style:style style:name="T178" style:parent-style-name="DefaultParagraphFont" style:family="text">
      <style:text-properties fo:font-size="11pt" style:font-size-asian="11pt" style:font-size-complex="9pt"/>
    </style:style>
    <style:style style:name="T179" style:parent-style-name="DefaultParagraphFont" style:family="text">
      <style:text-properties fo:font-weight="bold" style:font-weight-asian="bold" style:font-weight-complex="bold" fo:font-size="11pt" style:font-size-asian="11pt" style:font-size-complex="9pt"/>
    </style:style>
    <style:style style:name="T180" style:parent-style-name="DefaultParagraphFont" style:family="text">
      <style:text-properties style:font-name="Times New Roman"/>
    </style:style>
    <style:style style:name="P181" style:parent-style-name="ListParagraph" style:list-style-name="LFO12" style:family="paragraph">
      <style:text-properties style:font-name="Times New Roman"/>
    </style:style>
    <style:style style:name="P182" style:parent-style-name="ListParagraph" style:list-style-name="LFO12" style:family="paragraph"/>
    <style:style style:name="T183" style:parent-style-name="DefaultParagraphFont" style:family="text">
      <style:text-properties style:font-name="Times New Roman"/>
    </style:style>
    <style:style style:name="T184" style:parent-style-name="DefaultParagraphFont" style:family="text">
      <style:text-properties style:font-name="Times New Roman" fo:font-weight="bold" style:font-weight-asian="bold" style:font-weight-complex="bold"/>
    </style:style>
    <style:style style:name="T185" style:parent-style-name="DefaultParagraphFont" style:family="text">
      <style:text-properties style:font-name="Times New Roman"/>
    </style:style>
    <style:style style:name="P186" style:parent-style-name="ListParagraph" style:list-style-name="LFO12" style:family="paragraph"/>
    <style:style style:name="T187" style:parent-style-name="DefaultParagraphFont" style:family="text">
      <style:text-properties style:font-name="Times New Roman"/>
    </style:style>
    <style:style style:name="T188" style:parent-style-name="DefaultParagraphFont" style:family="text">
      <style:text-properties style:font-name="Times New Roman" fo:font-weight="bold" style:font-weight-asian="bold" style:font-weight-complex="bold"/>
    </style:style>
    <style:style style:name="T189" style:parent-style-name="DefaultParagraphFont" style:family="text">
      <style:text-properties style:font-name="Times New Roman"/>
    </style:style>
    <style:style style:name="P190" style:parent-style-name="ListParagraph" style:list-style-name="LFO12" style:family="paragraph"/>
    <style:style style:name="T191" style:parent-style-name="DefaultParagraphFont" style:family="text">
      <style:text-properties style:font-name="Times New Roman"/>
    </style:style>
    <style:style style:name="T192" style:parent-style-name="DefaultParagraphFont" style:family="text">
      <style:text-properties style:font-name="Times New Roman" fo:font-weight="bold" style:font-weight-asian="bold" style:font-weight-complex="bold"/>
    </style:style>
    <style:style style:name="T193" style:parent-style-name="DefaultParagraphFont" style:family="text">
      <style:text-properties style:font-name="Times New Roman"/>
    </style:style>
    <style:style style:name="P194" style:parent-style-name="ListParagraph" style:list-style-name="LFO12" style:family="paragraph"/>
    <style:style style:name="T195" style:parent-style-name="DefaultParagraphFont" style:family="text">
      <style:text-properties style:font-name="Times New Roman"/>
    </style:style>
    <style:style style:name="T196" style:parent-style-name="DefaultParagraphFont" style:family="text">
      <style:text-properties style:font-name="Times New Roman" fo:font-weight="bold" style:font-weight-asian="bold" style:font-weight-complex="bold"/>
    </style:style>
    <style:style style:name="T197" style:parent-style-name="DefaultParagraphFont" style:family="text">
      <style:text-properties style:font-name="Times New Roman"/>
    </style:style>
    <style:style style:name="P198" style:parent-style-name="ListParagraph" style:list-style-name="LFO12" style:family="paragraph"/>
    <style:style style:name="T199" style:parent-style-name="DefaultParagraphFont" style:family="text">
      <style:text-properties style:font-name="Times New Roman"/>
    </style:style>
    <style:style style:name="T200" style:parent-style-name="DefaultParagraphFont" style:family="text">
      <style:text-properties style:font-name="Times New Roman" fo:font-weight="bold" style:font-weight-asian="bold" style:font-weight-complex="bold"/>
    </style:style>
    <style:style style:name="T201" style:parent-style-name="DefaultParagraphFont" style:family="text">
      <style:text-properties style:font-name="Times New Roman"/>
    </style:style>
    <style:style style:name="P202" style:parent-style-name="ListParagraph" style:list-style-name="LFO12" style:family="paragraph"/>
    <style:style style:name="T203" style:parent-style-name="DefaultParagraphFont" style:family="text">
      <style:text-properties style:font-name="Times New Roman"/>
    </style:style>
    <style:style style:name="T204" style:parent-style-name="DefaultParagraphFont" style:family="text">
      <style:text-properties style:font-name="Times New Roman" fo:font-weight="bold" style:font-weight-asian="bold" style:font-weight-complex="bold"/>
    </style:style>
    <style:style style:name="T205" style:parent-style-name="DefaultParagraphFont" style:family="text">
      <style:text-properties style:font-name="Times New Roman"/>
    </style:style>
    <style:style style:name="T206" style:parent-style-name="DefaultParagraphFont" style:family="text">
      <style:text-properties style:font-name="Times New Roman" fo:font-weight="bold" style:font-weight-asian="bold" style:font-weight-complex="bold"/>
    </style:style>
    <style:style style:name="T207" style:parent-style-name="DefaultParagraphFont" style:family="text">
      <style:text-properties style:font-name="Times New Roman"/>
    </style:style>
    <style:style style:name="P208" style:parent-style-name="ListParagraph" style:list-style-name="LFO12" style:family="paragraph"/>
    <style:style style:name="T209" style:parent-style-name="DefaultParagraphFont" style:family="text">
      <style:text-properties style:font-name="Times New Roman"/>
    </style:style>
    <style:style style:name="T210" style:parent-style-name="DefaultParagraphFont" style:family="text">
      <style:text-properties style:font-name="Times New Roman" fo:font-weight="bold" style:font-weight-asian="bold" style:font-weight-complex="bold"/>
    </style:style>
    <style:style style:name="T211" style:parent-style-name="DefaultParagraphFont" style:family="text">
      <style:text-properties style:font-name="Times New Roman"/>
    </style:style>
    <style:style style:name="P212" style:parent-style-name="ListParagraph" style:list-style-name="LFO12" style:family="paragraph"/>
    <style:style style:name="T213" style:parent-style-name="DefaultParagraphFont" style:family="text">
      <style:text-properties style:font-name="Times New Roman"/>
    </style:style>
    <style:style style:name="T214" style:parent-style-name="DefaultParagraphFont" style:family="text">
      <style:text-properties style:font-name="Times New Roman" fo:font-weight="bold" style:font-weight-asian="bold" style:font-weight-complex="bold"/>
    </style:style>
    <style:style style:name="T215" style:parent-style-name="DefaultParagraphFont" style:family="text">
      <style:text-properties style:font-name="Times New Roman"/>
    </style:style>
    <style:style style:name="T216" style:parent-style-name="DefaultParagraphFont" style:family="text">
      <style:text-properties style:font-name="Times New Roman" fo:font-weight="bold" style:font-weight-asian="bold" style:font-weight-complex="bold"/>
    </style:style>
    <style:style style:name="T217" style:parent-style-name="DefaultParagraphFont" style:family="text">
      <style:text-properties style:font-name="Times New Roman"/>
    </style:style>
    <style:style style:name="P218" style:parent-style-name="ListParagraph" style:list-style-name="LFO12" style:family="paragraph"/>
    <style:style style:name="T219" style:parent-style-name="DefaultParagraphFont" style:family="text">
      <style:text-properties style:font-name="Times New Roman"/>
    </style:style>
    <style:style style:name="T220" style:parent-style-name="DefaultParagraphFont" style:family="text">
      <style:text-properties style:font-name="Times New Roman" fo:font-weight="bold" style:font-weight-asian="bold" style:font-weight-complex="bold"/>
    </style:style>
    <style:style style:name="T221" style:parent-style-name="DefaultParagraphFont" style:family="text">
      <style:text-properties style:font-name="Times New Roman"/>
    </style:style>
    <style:style style:name="P222" style:parent-style-name="ListParagraph" style:list-style-name="LFO12" style:family="paragraph"/>
    <style:style style:name="T223" style:parent-style-name="DefaultParagraphFont" style:family="text">
      <style:text-properties style:font-name="Times New Roman"/>
    </style:style>
    <style:style style:name="T224" style:parent-style-name="DefaultParagraphFont" style:family="text">
      <style:text-properties style:font-name="Times New Roman" fo:font-weight="bold" style:font-weight-asian="bold" style:font-weight-complex="bold"/>
    </style:style>
    <style:style style:name="T225" style:parent-style-name="DefaultParagraphFont" style:family="text">
      <style:text-properties style:font-name="Times New Roman"/>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Normal" style:family="paragraph">
      <style:paragraph-properties fo:text-align="center"/>
    </style:style>
    <style:style style:name="T238" style:parent-style-name="DefaultParagraphFont" style:family="text">
      <style:text-properties fo:language="en" fo:country="US"/>
    </style:style>
    <style:style style:name="P239" style:parent-style-name="Normal" style:family="paragraph">
      <style:paragraph-properties fo:text-align="start" fo:margin-top="0in" fo:text-indent="0in"/>
      <style:text-properties fo:language="en" fo:country="US"/>
    </style:style>
    <style:style style:name="P240" style:parent-style-name="Normal" style:family="paragraph">
      <style:paragraph-properties fo:text-align="start" fo:margin-top="0in" fo:text-indent="0in"/>
      <style:text-properties fo:language="en" fo:country="US"/>
    </style:style>
    <style:style style:name="P241" style:parent-style-name="Normal" style:family="paragraph">
      <style:paragraph-properties fo:text-align="start" fo:margin-top="0in" fo:text-indent="0in"/>
      <style:text-properties fo:language="en" fo:country="US"/>
    </style:style>
    <style:style style:name="P242" style:parent-style-name="Normal" style:family="paragraph">
      <style:paragraph-properties fo:text-align="start" fo:margin-top="0in" fo:text-indent="0in"/>
      <style:text-properties fo:language="en" fo:country="US"/>
    </style:style>
    <style:style style:name="P24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44" style:parent-style-name="Normal" style:family="paragraph">
      <style:paragraph-properties fo:text-align="center"/>
    </style:style>
    <style:style style:name="T245" style:parent-style-name="DefaultParagraphFont" style:family="text">
      <style:text-properties fo:font-weight="bold" style:font-weight-asian="bold" style:font-weight-complex="bold"/>
    </style:style>
    <style:style style:name="P24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P254" style:parent-style-name="Normal" style:family="paragraph">
      <style:paragraph-properties fo:text-align="center"/>
    </style:style>
    <style:style style:name="P25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56" style:parent-style-name="Normal" style:family="paragraph">
      <style:text-properties style:font-name="Times New Roman"/>
    </style:style>
    <style:style style:name="P257" style:parent-style-name="ListParagraph" style:list-style-name="LFO13" style:family="paragraph"/>
    <style:style style:name="T258" style:parent-style-name="DefaultParagraphFont" style:family="text">
      <style:text-properties style:font-name="Times New Roman"/>
    </style:style>
    <style:style style:name="T259" style:parent-style-name="DefaultParagraphFont" style:family="text">
      <style:text-properties style:font-name="Times New Roman" fo:font-weight="bold" style:font-weight-asian="bold" style:font-weight-complex="bold"/>
    </style:style>
    <style:style style:name="T260" style:parent-style-name="DefaultParagraphFont" style:family="text">
      <style:text-properties style:font-name="Times New Roman" fo:font-weight="bold" style:font-weight-asian="bold" style:font-weight-complex="bold" fo:color="#FF0000"/>
    </style:style>
    <style:style style:name="T261" style:parent-style-name="DefaultParagraphFont" style:family="text">
      <style:text-properties style:font-name="Times New Roman" fo:font-weight="bold" style:font-weight-asian="bold" style:font-weight-complex="bold"/>
    </style:style>
    <style:style style:name="T262" style:parent-style-name="DefaultParagraphFont" style:family="text">
      <style:text-properties style:font-name="Times New Roman"/>
    </style:style>
    <style:style style:name="T263" style:parent-style-name="DefaultParagraphFont" style:family="text">
      <style:text-properties style:font-name="Times New Roman" fo:color="#4472C4"/>
    </style:style>
    <style:style style:name="T264" style:parent-style-name="DefaultParagraphFont" style:family="text">
      <style:text-properties style:font-name="Times New Roman" fo:color="#4472C4"/>
    </style:style>
    <style:style style:name="T265" style:parent-style-name="DefaultParagraphFont" style:family="text">
      <style:text-properties style:font-name="Times New Roman"/>
    </style:style>
    <style:style style:name="T266" style:parent-style-name="DefaultParagraphFont" style:family="text">
      <style:text-properties style:font-name="Times New Roman"/>
    </style:style>
    <style:style style:name="P267" style:parent-style-name="ListParagraph" style:list-style-name="LFO13" style:family="paragraph"/>
    <style:style style:name="T268" style:parent-style-name="DefaultParagraphFont" style:family="text">
      <style:text-properties style:font-name="Times New Roman"/>
    </style:style>
    <style:style style:name="T269" style:parent-style-name="DefaultParagraphFont" style:family="text">
      <style:text-properties style:font-name="Times New Roman" fo:font-weight="bold" style:font-weight-asian="bold" style:font-weight-complex="bold"/>
    </style:style>
    <style:style style:name="T270" style:parent-style-name="DefaultParagraphFont" style:family="text">
      <style:text-properties style:font-name="Times New Roman" fo:font-weight="bold" style:font-weight-asian="bold" style:font-weight-complex="bold" fo:color="#FF0000"/>
    </style:style>
    <style:style style:name="T271" style:parent-style-name="DefaultParagraphFont" style:family="text">
      <style:text-properties style:font-name="Times New Roman" fo:font-weight="bold" style:font-weight-asian="bold" style:font-weight-complex="bold"/>
    </style:style>
    <style:style style:name="T272" style:parent-style-name="DefaultParagraphFont" style:family="text">
      <style:text-properties style:font-name="Times New Roman"/>
    </style:style>
    <style:style style:name="T273" style:parent-style-name="DefaultParagraphFont" style:family="text">
      <style:text-properties style:font-name="Times New Roman" fo:color="#4472C4"/>
    </style:style>
    <style:style style:name="T274" style:parent-style-name="DefaultParagraphFont" style:family="text">
      <style:text-properties style:font-name="Times New Roman"/>
    </style:style>
    <style:style style:name="P275" style:parent-style-name="ListParagraph" style:list-style-name="LFO13" style:family="paragraph"/>
    <style:style style:name="T276" style:parent-style-name="DefaultParagraphFont" style:family="text">
      <style:text-properties style:font-name="Times New Roman" fo:font-weight="bold" style:font-weight-asian="bold" style:font-weight-complex="bold"/>
    </style:style>
    <style:style style:name="T277" style:parent-style-name="DefaultParagraphFont" style:family="text">
      <style:text-properties style:font-name="Times New Roman" fo:font-weight="bold" style:font-weight-asian="bold" style:font-weight-complex="bold" fo:color="#FF0000"/>
    </style:style>
    <style:style style:name="T278" style:parent-style-name="DefaultParagraphFont" style:family="text">
      <style:text-properties style:font-name="Times New Roman" fo:font-weight="bold" style:font-weight-asian="bold" style:font-weight-complex="bold"/>
    </style:style>
    <style:style style:name="T279" style:parent-style-name="DefaultParagraphFont" style:family="text">
      <style:text-properties style:font-name="Times New Roman"/>
    </style:style>
    <style:style style:name="T280" style:parent-style-name="DefaultParagraphFont" style:family="text">
      <style:text-properties style:font-name="Times New Roman" fo:color="#4472C4"/>
    </style:style>
    <style:style style:name="T281" style:parent-style-name="DefaultParagraphFont" style:family="text">
      <style:text-properties style:font-name="Times New Roman"/>
    </style:style>
    <style:style style:name="P282" style:parent-style-name="Normal" style:family="paragraph">
      <style:text-properties style:font-name="Times New Roman"/>
    </style:style>
    <style:style style:name="P283" style:parent-style-name="Normal" style:family="paragraph">
      <style:paragraph-properties fo:text-align="center"/>
    </style:style>
    <style:style style:name="T284" style:parent-style-name="DefaultParagraphFont" style:family="text">
      <style:text-properties style:font-name="Times New Roman"/>
    </style:style>
    <style:style style:name="P28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style:font-name="Calibri"/>
    </style:style>
    <style:style style:name="T289" style:parent-style-name="DefaultParagraphFont" style:family="text">
      <style:text-properties style:font-name="Times New Roman"/>
    </style:style>
    <style:style style:name="T290" style:parent-style-name="DefaultParagraphFont" style:family="text">
      <style:text-properties fo:font-weight="bold" style:font-weight-asian="bold" style:font-weight-complex="bold"/>
    </style:style>
    <style:style style:name="P291" style:parent-style-name="Normal" style:family="paragraph">
      <style:paragraph-properties fo:text-align="center"/>
    </style:style>
    <style:style style:name="P29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93" style:parent-style-name="DefaultParagraphFont" style:family="text">
      <style:text-properties style:font-name="Calibri"/>
    </style:style>
    <style:style style:name="T294" style:parent-style-name="DefaultParagraphFont" style:family="text">
      <style:text-properties style:font-name="Calibri" fo:font-weight="bold" style:font-weight-asian="bold" style:font-weight-complex="bold"/>
    </style:style>
    <style:style style:name="T295" style:parent-style-name="DefaultParagraphFont" style:family="text">
      <style:text-properties style:font-name="Calibri"/>
    </style:style>
    <style:style style:name="T296" style:parent-style-name="DefaultParagraphFont" style:family="text">
      <style:text-properties style:font-name="Calibri" fo:font-weight="bold" style:font-weight-asian="bold" style:font-weight-complex="bold"/>
    </style:style>
    <style:style style:name="T297" style:parent-style-name="DefaultParagraphFont" style:family="text">
      <style:text-properties style:font-name="Calibri"/>
    </style:style>
    <style:style style:name="T298" style:parent-style-name="DefaultParagraphFont" style:family="text">
      <style:text-properties style:font-name="Calibri" fo:font-weight="bold" style:font-weight-asian="bold" style:font-weight-complex="bold"/>
    </style:style>
    <style:style style:name="T299" style:parent-style-name="DefaultParagraphFont" style:family="text">
      <style:text-properties style:font-name="Calibri"/>
    </style:style>
    <style:style style:name="P300" style:parent-style-name="Normal" style:family="paragraph">
      <style:paragraph-properties fo:text-align="center"/>
    </style:style>
    <style:style style:name="T301" style:parent-style-name="DefaultParagraphFont" style:family="text">
      <style:text-properties style:font-name="Calibri"/>
    </style:style>
    <style:style style:name="P30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0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04" style:parent-style-name="Normal" style:family="paragraph">
      <style:paragraph-properties fo:text-align="center"/>
    </style:style>
    <style:style style:name="T305" style:parent-style-name="DefaultParagraphFont" style:family="text">
      <style:text-properties fo:language="en" fo:country="US"/>
    </style:style>
    <style:style style:name="P306" style:parent-style-name="Normal" style:family="paragraph">
      <style:paragraph-properties fo:text-align="start" fo:margin-top="0in" fo:text-indent="0in"/>
      <style:text-properties fo:language="de" fo:country="DE"/>
    </style:style>
    <style:style style:name="P307" style:parent-style-name="Normal" style:family="paragraph">
      <style:paragraph-properties fo:text-align="start" fo:margin-top="0in" fo:text-indent="0in"/>
      <style:text-properties fo:language="de" fo:country="DE"/>
    </style:style>
    <style:style style:name="P30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P317" style:parent-style-name="Normal" style:family="paragraph">
      <style:paragraph-properties fo:text-align="center"/>
    </style:style>
    <style:style style:name="T318" style:parent-style-name="DefaultParagraphFont" style:family="text">
      <style:text-properties style:font-name="Calibri"/>
    </style:style>
    <style:style style:name="P319" style:parent-style-name="Normal" style:family="paragraph">
      <style:paragraph-properties fo:text-align="center" fo:margin-bottom="0.1666in"/>
    </style:style>
    <style:style style:name="T320" style:parent-style-name="DefaultParagraphFont" style:family="text">
      <style:text-properties fo:font-weight="bold" style:font-weight-asian="bold" style:font-weight-complex="bold" fo:font-size="11pt" style:font-size-asian="11pt" style:font-size-complex="9pt"/>
    </style:style>
    <style:style style:name="T321" style:parent-style-name="DefaultParagraphFont" style:family="text">
      <style:text-properties style:font-name="Calibri" fo:font-weight="bold" style:font-weight-asian="bold" style:font-weight-complex="bold" fo:font-size="11pt" style:font-size-asian="11pt" style:font-size-complex="9pt"/>
    </style:style>
    <style:style style:name="P322" style:parent-style-name="Normal" style:family="paragraph">
      <style:paragraph-properties fo:text-align="center"/>
    </style:style>
    <style:style style:name="T323" style:parent-style-name="DefaultParagraphFont" style:family="text">
      <style:text-properties fo:language="en" fo:country="US"/>
    </style:style>
    <style:style style:name="P324" style:parent-style-name="Normal" style:family="paragraph">
      <style:paragraph-properties fo:text-align="start" fo:margin-top="0in" fo:text-indent="0in"/>
      <style:text-properties fo:language="en" fo:country="US"/>
    </style:style>
    <style:style style:name="P325" style:parent-style-name="Normal" style:family="paragraph">
      <style:paragraph-properties fo:text-align="start" fo:margin-top="0in" fo:text-indent="0in"/>
      <style:text-properties fo:language="en" fo:country="US"/>
    </style:style>
    <style:style style:name="P326" style:parent-style-name="Normal" style:family="paragraph">
      <style:paragraph-properties fo:text-align="start" fo:margin-top="0in" fo:text-indent="0in"/>
      <style:text-properties fo:language="en" fo:country="US"/>
    </style:style>
    <style:style style:name="P327" style:parent-style-name="Normal" style:family="paragraph">
      <style:paragraph-properties fo:text-align="start" fo:margin-top="0in" fo:text-indent="0.4923in"/>
      <style:text-properties fo:language="en" fo:country="US"/>
    </style:style>
    <style:style style:name="P328" style:parent-style-name="Normal" style:family="paragraph">
      <style:paragraph-properties fo:text-align="start" fo:margin-top="0in" fo:text-indent="0.4923in"/>
      <style:text-properties fo:language="en" fo:country="US"/>
    </style:style>
    <style:style style:name="P329" style:parent-style-name="Normal" style:family="paragraph">
      <style:paragraph-properties fo:text-align="start" fo:margin-top="0in" fo:text-indent="0in"/>
      <style:text-properties fo:language="en" fo:country="US"/>
    </style:style>
    <style:style style:name="P33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31" style:parent-style-name="DefaultParagraphFont" style:family="text">
      <style:text-properties fo:font-weight="bold" style:font-weight-asian="bold" style:font-weight-complex="bold"/>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font-weight-complex="bold"/>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P337" style:parent-style-name="Normal" style:family="paragraph">
      <style:paragraph-properties fo:text-align="center"/>
    </style:style>
    <style:style style:name="P338" style:parent-style-name="Normal" style:family="paragraph">
      <style:paragraph-properties fo:text-align="center" fo:margin-bottom="0.1666in"/>
    </style:style>
    <style:style style:name="T339" style:parent-style-name="DefaultParagraphFont" style:family="text">
      <style:text-properties fo:font-weight="bold" style:font-weight-asian="bold" style:font-weight-complex="bold" fo:font-size="11pt" style:font-size-asian="11pt" style:font-size-complex="9pt"/>
    </style:style>
    <style:style style:name="P340" style:parent-style-name="Normal" style:family="paragraph">
      <style:paragraph-properties fo:text-align="center"/>
    </style:style>
    <style:style style:name="T341" style:parent-style-name="DefaultParagraphFont" style:family="text">
      <style:text-properties fo:language="en" fo:country="US"/>
    </style:style>
    <style:style style:name="P342" style:parent-style-name="Normal" style:family="paragraph">
      <style:paragraph-properties fo:text-align="start" fo:margin-top="0in" fo:text-indent="0in"/>
      <style:text-properties fo:language="de" fo:country="DE"/>
    </style:style>
    <style:style style:name="P343" style:parent-style-name="Normal" style:family="paragraph">
      <style:paragraph-properties fo:text-align="start" fo:margin-top="0in" fo:text-indent="0in"/>
    </style:style>
    <style:style style:name="T344" style:parent-style-name="DefaultParagraphFont" style:family="text">
      <style:text-properties fo:language="de" fo:country="DE"/>
    </style:style>
    <style:style style:name="T345" style:parent-style-name="DefaultParagraphFont" style:family="text">
      <style:text-properties style:font-name="Calibri" fo:language="de" fo:country="DE"/>
    </style:style>
    <style:style style:name="T346" style:parent-style-name="DefaultParagraphFont" style:family="text">
      <style:text-properties fo:language="de" fo:country="DE"/>
    </style:style>
    <style:style style:name="P347" style:parent-style-name="Normal" style:family="paragraph">
      <style:paragraph-properties fo:text-align="center" fo:margin-bottom="0.1666in"/>
    </style:style>
    <style:style style:name="T348" style:parent-style-name="DefaultParagraphFont" style:family="text">
      <style:text-properties fo:font-weight="bold" style:font-weight-asian="bold" style:font-weight-complex="bold" fo:font-size="11pt" style:font-size-asian="11pt" style:font-size-complex="9pt"/>
    </style:style>
    <style:style style:name="T349" style:parent-style-name="DefaultParagraphFont" style:family="text">
      <style:text-properties style:font-name="Calibri" fo:font-weight="bold" style:font-weight-asian="bold" style:font-weight-complex="bold" fo:font-size="11pt" style:font-size-asian="11pt" style:font-size-complex="9pt"/>
    </style:style>
    <style:style style:name="T350" style:parent-style-name="DefaultParagraphFont" style:family="text">
      <style:text-properties fo:font-weight="bold" style:font-weight-asian="bold" style:font-weight-complex="bold" fo:font-size="11pt" style:font-size-asian="11pt" style:font-size-complex="9pt"/>
    </style:style>
    <style:style style:name="T351" style:parent-style-name="DefaultParagraphFont" style:family="text">
      <style:text-properties style:font-name="Times New Roman"/>
    </style:style>
    <style:style style:name="T352" style:parent-style-name="DefaultParagraphFont" style:family="text">
      <style:text-properties style:font-name="Times New Roman" fo:font-weight="bold" style:font-weight-asian="bold" style:font-weight-complex="bold"/>
    </style:style>
    <style:style style:name="T353" style:parent-style-name="DefaultParagraphFont" style:family="text">
      <style:text-properties style:font-name="Times New Roman"/>
    </style:style>
    <style:style style:name="P354" style:parent-style-name="Normal" style:family="paragraph">
      <style:text-properties style:font-name="Times New Roman"/>
    </style:style>
    <style:style style:name="P355" style:parent-style-name="Normal" style:family="paragraph">
      <style:paragraph-properties fo:text-align="center"/>
    </style:style>
    <style:style style:name="T356" style:parent-style-name="DefaultParagraphFont" style:family="text">
      <style:text-properties style:font-name="Times New Roman"/>
    </style:style>
    <style:style style:name="P35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58" style:parent-style-name="Normal" style:family="paragraph">
      <style:paragraph-properties fo:text-align="center"/>
    </style:style>
    <style:style style:name="T359" style:parent-style-name="DefaultParagraphFont" style:family="text">
      <style:text-properties fo:language="en" fo:country="US"/>
    </style:style>
    <style:style style:name="P360" style:parent-style-name="Normal" style:family="paragraph">
      <style:paragraph-properties fo:text-align="start" fo:margin-top="0in" fo:text-indent="0in"/>
      <style:text-properties fo:language="en" fo:country="US"/>
    </style:style>
    <style:style style:name="P361" style:parent-style-name="Normal" style:family="paragraph">
      <style:paragraph-properties fo:text-align="start" fo:margin-top="0in" fo:text-indent="0in"/>
      <style:text-properties fo:language="en" fo:country="US"/>
    </style:style>
    <style:style style:name="P36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P367" style:parent-style-name="Normal" style:family="paragraph">
      <style:paragraph-properties fo:text-align="center"/>
    </style:style>
    <style:style style:name="T368" style:parent-style-name="DefaultParagraphFont" style:family="text">
      <style:text-properties style:font-name="Times New Roman"/>
    </style:style>
    <style:style style:name="P36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70" style:parent-style-name="ListParagraph" style:list-style-name="LFO8" style:family="paragraph">
      <style:text-properties style:font-name="Times New Roman" fo:font-weight="bold" style:font-weight-asian="bold" style:font-weight-complex="bold"/>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style:font-name="Calibri"/>
    </style:style>
    <style:style style:name="T374" style:parent-style-name="DefaultParagraphFont" style:family="text">
      <style:text-properties style:font-name="Calibri"/>
    </style:style>
    <style:style style:name="T375" style:parent-style-name="DefaultParagraphFont" style:family="text">
      <style:text-properties style:font-name="Calibri" fo:font-weight="bold" style:font-weight-asian="bold" style:font-weight-complex="bold"/>
    </style:style>
    <style:style style:name="T376" style:parent-style-name="DefaultParagraphFont" style:family="text">
      <style:text-properties style:font-name="Calibri"/>
    </style:style>
    <style:style style:name="P377" style:parent-style-name="Normal" style:family="paragraph">
      <style:paragraph-properties fo:text-align="center"/>
    </style:style>
    <style:style style:name="T378" style:parent-style-name="DefaultParagraphFont" style:family="text">
      <style:text-properties fo:language="en" fo:country="US"/>
    </style:style>
    <style:style style:name="P379" style:parent-style-name="SBCparagraph" style:family="paragraph">
      <style:paragraph-properties fo:text-indent="0in"/>
      <style:text-properties style:font-name="Times New Roman" fo:font-weight="bold" style:font-weight-asian="bold" style:font-weight-complex="bold"/>
    </style:style>
    <style:style style:name="P38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81" style:parent-style-name="Normal" style:family="paragraph">
      <style:paragraph-properties fo:text-align="center"/>
    </style:style>
    <style:style style:name="P38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83" style:parent-style-name="Normal" style:master-page-name="MP2" style:family="paragraph">
      <style:paragraph-properties fo:break-before="page"/>
    </style:style>
    <style:style style:name="T384" style:parent-style-name="DefaultParagraphFont" style:family="text">
      <style:text-properties style:font-name="Calibri"/>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style:font-name="Calibri" fo:font-weight="bold" style:font-weight-asian="bold" style:font-weight-complex="bold"/>
    </style:style>
    <style:style style:name="T387" style:parent-style-name="DefaultParagraphFont" style:family="text">
      <style:text-properties style:font-name="Calibri"/>
    </style:style>
    <style:style style:name="P388" style:parent-style-name="Normal" style:family="paragraph">
      <style:paragraph-properties fo:text-align="center"/>
    </style:style>
    <style:style style:name="P38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0" style:parent-style-name="Normal" style:family="paragraph">
      <style:paragraph-properties fo:text-align="center"/>
    </style:style>
    <style:style style:name="P39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2" style:parent-style-name="Normal" style:family="paragraph">
      <style:paragraph-properties fo:text-align="center"/>
    </style:style>
    <style:style style:name="P39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4" style:parent-style-name="Normal" style:family="paragraph">
      <style:paragraph-properties fo:text-align="center"/>
    </style:style>
    <style:style style:name="P39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6" style:parent-style-name="Normal" style:family="paragraph">
      <style:paragraph-properties fo:text-align="center"/>
    </style:style>
    <style:style style:name="P39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8" style:parent-style-name="Normal" style:family="paragraph">
      <style:paragraph-properties fo:text-align="center"/>
    </style:style>
    <style:style style:name="P39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00" style:parent-style-name="Normal" style:family="paragraph">
      <style:paragraph-properties fo:text-align="center"/>
    </style:style>
    <style:style style:name="P40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02" style:parent-style-name="SBCtitle1" style:list-style-name="LFO8" style:family="paragraph"/>
    <style:style style:name="T403" style:parent-style-name="DefaultParagraphFont" style:family="text">
      <style:text-properties fo:font-size="12pt" style:font-size-asian="12pt" style:font-size-complex="9pt"/>
    </style:style>
    <style:style style:name="T404" style:parent-style-name="CommentReference" style:family="text">
      <style:text-properties fo:font-weight="normal" style:font-weight-asian="normal" fo:color="#000000"/>
    </style:style>
    <style:style style:name="T405" style:parent-style-name="DefaultParagraphFont" style:family="text">
      <style:text-properties fo:font-size="12pt" style:font-size-asian="12pt" style:font-size-complex="9pt"/>
    </style:style>
    <style:style style:name="P406" style:parent-style-name="ListParagraph" style:list-style-name="LFO8" style:family="paragraph">
      <style:text-properties style:font-name="Times New Roman" fo:font-weight="bold" style:font-weight-asian="bold" style:font-weight-complex="bold"/>
    </style:style>
    <style:style style:name="P407" style:parent-style-name="Normal" style:family="paragraph">
      <style:paragraph-properties fo:text-align="center"/>
    </style:style>
    <style:style style:name="P408" style:parent-style-name="Normal" style:family="paragraph">
      <style:paragraph-properties fo:text-align="center" fo:margin-bottom="0.1666in"/>
    </style:style>
    <style:style style:name="T409" style:parent-style-name="DefaultParagraphFont" style:family="text">
      <style:text-properties fo:font-weight="bold" style:font-weight-asian="bold" style:font-weight-complex="bold" fo:font-size="11pt" style:font-size-asian="11pt" style:font-size-complex="9pt"/>
    </style:style>
    <style:style style:name="T410" style:parent-style-name="DefaultParagraphFont" style:family="text">
      <style:text-properties style:font-name="Calibri"/>
    </style:style>
    <style:style style:name="T411" style:parent-style-name="DefaultParagraphFont" style:family="text">
      <style:text-properties style:font-name="Calibri"/>
    </style:style>
    <style:style style:name="T412" style:parent-style-name="DefaultParagraphFont" style:family="text">
      <style:text-properties style:font-name="Calibri"/>
    </style:style>
    <style:style style:name="T413" style:parent-style-name="DefaultParagraphFont" style:family="text">
      <style:text-properties style:font-name="Calibri"/>
    </style:style>
    <style:style style:name="T414" style:parent-style-name="DefaultParagraphFont" style:family="text">
      <style:text-properties style:font-name="Calibri"/>
    </style:style>
    <style:style style:name="P415" style:parent-style-name="Normal" style:family="paragraph">
      <style:paragraph-properties fo:text-align="center"/>
    </style:style>
    <style:style style:name="T416" style:parent-style-name="DefaultParagraphFont" style:family="text">
      <style:text-properties fo:font-weight="bold" style:font-weight-asian="bold" style:font-weight-complex="bold"/>
    </style:style>
    <style:style style:name="P41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18" style:parent-style-name="DefaultParagraphFont" style:family="text">
      <style:text-properties fo:font-weight="bold" style:font-weight-asian="bold" style:font-weight-complex="bold"/>
    </style:style>
    <style:style style:name="P419" style:parent-style-name="Normal" style:family="paragraph">
      <style:paragraph-properties fo:text-align="center"/>
    </style:style>
    <style:style style:name="T420" style:parent-style-name="DefaultParagraphFont" style:family="text">
      <style:text-properties fo:language="en" fo:country="US"/>
    </style:style>
    <style:style style:name="P421" style:parent-style-name="SBCparagraph" style:family="paragraph">
      <style:paragraph-properties fo:margin-top="0in" fo:text-indent="0in"/>
      <style:text-properties fo:language="en" fo:country="US"/>
    </style:style>
    <style:style style:name="P422" style:parent-style-name="SBCparagraph" style:family="paragraph">
      <style:paragraph-properties fo:margin-top="0in" fo:text-indent="0in"/>
      <style:text-properties fo:language="en" fo:country="US"/>
    </style:style>
    <style:style style:name="P423" style:parent-style-name="SBCparagraph" style:family="paragraph">
      <style:paragraph-properties fo:margin-top="0in" fo:text-indent="0in"/>
      <style:text-properties fo:language="en" fo:country="US"/>
    </style:style>
    <style:style style:name="P424" style:parent-style-name="SBCparagraph" style:family="paragraph">
      <style:paragraph-properties fo:margin-top="0in" fo:text-indent="0in"/>
      <style:text-properties fo:language="en" fo:country="US"/>
    </style:style>
    <style:style style:name="P425" style:parent-style-name="SBCparagraph" style:family="paragraph">
      <style:paragraph-properties fo:margin-top="0in" fo:text-indent="0in"/>
      <style:text-properties fo:language="en" fo:country="US"/>
    </style:style>
    <style:style style:name="P426" style:parent-style-name="SBCparagraph" style:family="paragraph">
      <style:paragraph-properties fo:margin-top="0in" fo:text-indent="0in"/>
      <style:text-properties fo:language="en" fo:country="US"/>
    </style:style>
    <style:style style:name="P427" style:parent-style-name="SBCparagraph" style:family="paragraph">
      <style:paragraph-properties fo:margin-top="0in" fo:text-indent="0in"/>
      <style:text-properties fo:language="en" fo:country="US"/>
    </style:style>
    <style:style style:name="P428" style:parent-style-name="SBCparagraph" style:family="paragraph">
      <style:paragraph-properties fo:margin-top="0in" fo:text-indent="0in"/>
      <style:text-properties fo:language="en" fo:country="US"/>
    </style:style>
    <style:style style:name="P429" style:parent-style-name="SBCparagraph" style:family="paragraph">
      <style:paragraph-properties fo:margin-top="0in" fo:text-indent="0in"/>
      <style:text-properties fo:language="en" fo:country="US"/>
    </style:style>
    <style:style style:name="P430" style:parent-style-name="SBCparagraph" style:family="paragraph">
      <style:paragraph-properties fo:margin-top="0in" fo:text-indent="0in"/>
      <style:text-properties fo:language="en" fo:country="US"/>
    </style:style>
    <style:style style:name="P431" style:parent-style-name="SBCparagraph" style:family="paragraph">
      <style:paragraph-properties fo:margin-top="0in" fo:text-indent="0in"/>
      <style:text-properties fo:language="en" fo:country="US"/>
    </style:style>
    <style:style style:name="P432" style:parent-style-name="SBCparagraph" style:family="paragraph">
      <style:paragraph-properties fo:margin-top="0in" fo:text-indent="0in"/>
      <style:text-properties fo:language="en" fo:country="US"/>
    </style:style>
    <style:style style:name="P433" style:parent-style-name="SBCparagraph" style:family="paragraph">
      <style:paragraph-properties fo:margin-top="0in" fo:text-indent="0in"/>
      <style:text-properties fo:language="en" fo:country="US"/>
    </style:style>
    <style:style style:name="P434" style:parent-style-name="SBCparagraph" style:family="paragraph">
      <style:paragraph-properties fo:margin-top="0in" fo:text-indent="0in"/>
      <style:text-properties fo:language="en" fo:country="US"/>
    </style:style>
    <style:style style:name="P435" style:parent-style-name="SBCparagraph" style:family="paragraph">
      <style:paragraph-properties fo:margin-top="0in" fo:text-indent="0in"/>
      <style:text-properties fo:language="en" fo:country="US"/>
    </style:style>
    <style:style style:name="P436" style:parent-style-name="SBCparagraph" style:family="paragraph">
      <style:paragraph-properties fo:margin-top="0in" fo:text-indent="0in"/>
      <style:text-properties fo:language="en" fo:country="US"/>
    </style:style>
    <style:style style:name="P437" style:parent-style-name="SBCparagraph" style:family="paragraph">
      <style:paragraph-properties fo:margin-top="0in" fo:text-indent="0in"/>
      <style:text-properties fo:language="en" fo:country="US"/>
    </style:style>
    <style:style style:name="P438" style:parent-style-name="SBCparagraph" style:family="paragraph">
      <style:paragraph-properties fo:margin-top="0in" fo:text-indent="0in"/>
    </style:style>
    <style:style style:name="T439" style:parent-style-name="DefaultParagraphFont" style:family="text">
      <style:text-properties fo:language="en" fo:country="US"/>
    </style:style>
    <style:style style:name="P44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41" style:parent-style-name="DefaultParagraphFont" style:family="text">
      <style:text-properties fo:font-weight="bold" style:font-weight-asian="bold" style:font-weight-complex="bold"/>
    </style:style>
    <style:style style:name="T442" style:parent-style-name="DefaultParagraphFont" style:family="text">
      <style:text-properties style:font-name="Calibri"/>
    </style:style>
    <style:style style:name="P443" style:parent-style-name="Normal" style:family="paragraph">
      <style:paragraph-properties fo:text-align="center"/>
    </style:style>
    <style:style style:name="T444" style:parent-style-name="DefaultParagraphFont" style:family="text">
      <style:text-properties fo:language="en" fo:country="US"/>
    </style:style>
    <style:style style:name="P445" style:parent-style-name="SBCparagraph" style:family="paragraph">
      <style:paragraph-properties fo:margin-top="0in" fo:text-indent="0in"/>
      <style:text-properties fo:language="en" fo:country="US"/>
    </style:style>
    <style:style style:name="P446" style:parent-style-name="SBCparagraph" style:family="paragraph">
      <style:paragraph-properties fo:margin-top="0in" fo:text-indent="0in"/>
      <style:text-properties fo:language="en" fo:country="US"/>
    </style:style>
    <style:style style:name="P447" style:parent-style-name="SBCparagraph" style:family="paragraph">
      <style:paragraph-properties fo:margin-top="0in" fo:text-indent="0in"/>
      <style:text-properties fo:language="en" fo:country="US"/>
    </style:style>
    <style:style style:name="P448" style:parent-style-name="SBCparagraph" style:family="paragraph">
      <style:paragraph-properties fo:margin-top="0in" fo:text-indent="0in"/>
      <style:text-properties fo:language="en" fo:country="US"/>
    </style:style>
    <style:style style:name="P449" style:parent-style-name="SBCparagraph" style:family="paragraph">
      <style:paragraph-properties fo:margin-top="0in" fo:text-indent="0in"/>
      <style:text-properties fo:language="en" fo:country="US"/>
    </style:style>
    <style:style style:name="P450" style:parent-style-name="SBCparagraph" style:family="paragraph">
      <style:paragraph-properties fo:margin-top="0in"/>
      <style:text-properties fo:language="en" fo:country="US"/>
    </style:style>
    <style:style style:name="P451" style:parent-style-name="SBCparagraph" style:family="paragraph">
      <style:paragraph-properties fo:margin-top="0in"/>
      <style:text-properties fo:language="en" fo:country="US"/>
    </style:style>
    <style:style style:name="P452" style:parent-style-name="SBCparagraph" style:family="paragraph">
      <style:paragraph-properties fo:margin-top="0in"/>
      <style:text-properties fo:language="en" fo:country="US"/>
    </style:style>
    <style:style style:name="P453" style:parent-style-name="SBCparagraph" style:family="paragraph">
      <style:paragraph-properties fo:margin-top="0in" fo:text-indent="0in"/>
      <style:text-properties fo:language="en" fo:country="US"/>
    </style:style>
    <style:style style:name="P454" style:parent-style-name="SBCparagraph" style:family="paragraph">
      <style:paragraph-properties fo:margin-top="0in" fo:text-indent="0in"/>
    </style:style>
    <style:style style:name="T455" style:parent-style-name="DefaultParagraphFont" style:family="text">
      <style:text-properties fo:language="en" fo:country="US"/>
    </style:style>
    <style:style style:name="P45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57" style:parent-style-name="DefaultParagraphFont" style:family="text">
      <style:text-properties fo:font-weight="bold" style:font-weight-asian="bold" style:font-weight-complex="bold"/>
    </style:style>
    <style:style style:name="T458" style:parent-style-name="DefaultParagraphFont" style:family="text">
      <style:text-properties fo:font-weight="bold" style:font-weight-asian="bold" style:font-weight-complex="bold"/>
    </style:style>
    <style:style style:name="T459" style:parent-style-name="DefaultParagraphFont" style:family="text">
      <style:text-properties fo:font-weight="bold" style:font-weight-asian="bold" style:font-weight-complex="bold"/>
    </style:style>
    <style:style style:name="P460" style:parent-style-name="Normal" style:family="paragraph">
      <style:paragraph-properties fo:text-indent="0in"/>
    </style:style>
    <style:style style:name="T461" style:parent-style-name="DefaultParagraphFont" style:family="text">
      <style:text-properties fo:language="en" fo:country="US"/>
    </style:style>
    <style:style style:name="P462" style:parent-style-name="SBCparagraph" style:family="paragraph">
      <style:paragraph-properties fo:margin-top="0in" fo:text-indent="0in"/>
      <style:text-properties fo:language="en" fo:country="US"/>
    </style:style>
    <style:style style:name="P463" style:parent-style-name="SBCparagraph" style:family="paragraph">
      <style:paragraph-properties fo:margin-top="0in" fo:text-indent="0in"/>
      <style:text-properties fo:language="en" fo:country="US"/>
    </style:style>
    <style:style style:name="P464" style:parent-style-name="SBCparagraph" style:family="paragraph">
      <style:paragraph-properties fo:margin-top="0in" fo:text-indent="0in"/>
      <style:text-properties fo:language="en" fo:country="US"/>
    </style:style>
    <style:style style:name="P465" style:parent-style-name="SBCparagraph" style:family="paragraph">
      <style:paragraph-properties fo:margin-top="0in" fo:text-indent="0in"/>
      <style:text-properties fo:language="en" fo:country="US"/>
    </style:style>
    <style:style style:name="P466" style:parent-style-name="SBCparagraph" style:family="paragraph">
      <style:paragraph-properties fo:margin-top="0in" fo:text-indent="0in"/>
      <style:text-properties fo:language="en" fo:country="US"/>
    </style:style>
    <style:style style:name="P467" style:parent-style-name="SBCparagraph" style:family="paragraph">
      <style:paragraph-properties fo:margin-top="0in" fo:margin-left="0.4923in" fo:text-indent="0in">
        <style:tab-stops/>
      </style:paragraph-properties>
      <style:text-properties fo:language="en" fo:country="US"/>
    </style:style>
    <style:style style:name="P468" style:parent-style-name="SBCparagraph" style:family="paragraph">
      <style:paragraph-properties fo:margin-top="0in" fo:margin-left="0.4923in" fo:text-indent="0in">
        <style:tab-stops/>
      </style:paragraph-properties>
    </style:style>
    <style:style style:name="P469" style:parent-style-name="SBCparagraph" style:family="paragraph">
      <style:paragraph-properties fo:margin-top="0in" fo:margin-left="1.9694in" fo:text-indent="0in">
        <style:tab-stops/>
      </style:paragraph-properties>
    </style:style>
    <style:style style:name="P470" style:parent-style-name="SBCparagraph" style:family="paragraph">
      <style:paragraph-properties fo:margin-top="0in" fo:margin-left="1.477in">
        <style:tab-stops/>
      </style:paragraph-properties>
    </style:style>
    <style:style style:name="P471" style:parent-style-name="SBCparagraph" style:family="paragraph">
      <style:paragraph-properties fo:margin-top="0in" fo:margin-left="0.4923in" fo:text-indent="0in">
        <style:tab-stops/>
      </style:paragraph-properties>
    </style:style>
    <style:style style:name="P472" style:parent-style-name="SBCparagraph" style:family="paragraph">
      <style:paragraph-properties fo:margin-top="0in" fo:text-indent="0in"/>
    </style:style>
    <style:style style:name="P473" style:parent-style-name="SBCparagraph" style:family="paragraph">
      <style:paragraph-properties fo:margin-top="0in" fo:text-indent="0in"/>
    </style:style>
    <style:style style:name="P474" style:parent-style-name="SBCparagraph" style:family="paragraph">
      <style:paragraph-properties fo:margin-top="0in" fo:text-indent="0in"/>
    </style:style>
    <style:style style:name="P475" style:parent-style-name="SBCparagraph" style:family="paragraph">
      <style:paragraph-properties fo:margin-top="0in" fo:margin-left="0.4923in" fo:text-indent="0in">
        <style:tab-stops/>
      </style:paragraph-properties>
    </style:style>
    <style:style style:name="P476" style:parent-style-name="SBCparagraph" style:family="paragraph">
      <style:paragraph-properties fo:margin-top="0in" fo:margin-left="1.9694in" fo:text-indent="0in">
        <style:tab-stops/>
      </style:paragraph-properties>
    </style:style>
    <style:style style:name="P477" style:parent-style-name="SBCparagraph" style:family="paragraph">
      <style:paragraph-properties fo:margin-top="0in" fo:margin-left="1.9694in" fo:text-indent="0in">
        <style:tab-stops/>
      </style:paragraph-properties>
    </style:style>
    <style:style style:name="P478" style:parent-style-name="SBCparagraph" style:family="paragraph">
      <style:paragraph-properties fo:margin-top="0in" fo:text-indent="0in"/>
      <style:text-properties fo:language="en" fo:country="US"/>
    </style:style>
    <style:style style:name="P479" style:parent-style-name="SBCparagraph" style:family="paragraph">
      <style:paragraph-properties fo:margin-top="0in" fo:text-indent="0in"/>
      <style:text-properties fo:language="en" fo:country="US"/>
    </style:style>
    <style:style style:name="P480" style:parent-style-name="SBCparagraph" style:family="paragraph">
      <style:paragraph-properties fo:margin-top="0in" fo:text-indent="0in"/>
    </style:style>
    <style:style style:name="T481" style:parent-style-name="DefaultParagraphFont" style:family="text">
      <style:text-properties fo:language="en" fo:country="US"/>
    </style:style>
    <style:style style:name="P48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83" style:parent-style-name="DefaultParagraphFont" style:family="text">
      <style:text-properties fo:font-weight="bold" style:font-weight-asian="bold" style:font-weight-complex="bold"/>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fo:font-weight="bold" style:font-weight-asian="bold" style:font-weight-complex="bold"/>
    </style:style>
    <style:style style:name="T486" style:parent-style-name="DefaultParagraphFont" style:family="text">
      <style:text-properties fo:font-weight="bold" style:font-weight-asian="bold" style:font-weight-complex="bold"/>
    </style:style>
    <style:style style:name="T487" style:parent-style-name="DefaultParagraphFont" style:family="text">
      <style:text-properties fo:color="#4472C4"/>
    </style:style>
    <style:style style:name="T488" style:parent-style-name="DefaultParagraphFont" style:family="text">
      <style:text-properties fo:color="#4472C4"/>
    </style:style>
    <style:style style:name="T489" style:parent-style-name="DefaultParagraphFont" style:family="text">
      <style:text-properties fo:color="#4472C4"/>
    </style:style>
    <style:style style:name="T490" style:parent-style-name="DefaultParagraphFont" style:family="text">
      <style:text-properties fo:font-weight="bold" style:font-weight-asian="bold" style:font-weight-complex="bold"/>
    </style:style>
    <style:style style:name="T491" style:parent-style-name="DefaultParagraphFont" style:family="text">
      <style:text-properties style:font-name="Calibri"/>
    </style:style>
    <style:style style:name="P492" style:parent-style-name="Normal" style:family="paragraph">
      <style:paragraph-properties fo:text-align="center" fo:margin-bottom="0.1666in"/>
    </style:style>
    <style:style style:name="T493" style:parent-style-name="DefaultParagraphFont" style:family="text">
      <style:text-properties fo:font-weight="bold" style:font-weight-asian="bold" style:font-weight-complex="bold" fo:font-size="11pt" style:font-size-asian="11pt" style:font-size-complex="9pt"/>
    </style:style>
    <style:style style:name="T494" style:parent-style-name="DefaultParagraphFont" style:family="text">
      <style:text-properties fo:font-weight="bold" style:font-weight-asian="bold" style:font-weight-complex="bold" fo:color="#4472C4" fo:font-size="11pt" style:font-size-asian="11pt" style:font-size-complex="9pt"/>
    </style:style>
    <style:style style:name="T495" style:parent-style-name="DefaultParagraphFont" style:family="text">
      <style:text-properties fo:font-weight="bold" style:font-weight-asian="bold" style:font-weight-complex="bold" fo:font-size="11pt" style:font-size-asian="11pt" style:font-size-complex="9pt"/>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style:font-name="Calibri"/>
    </style:style>
    <style:style style:name="P498" style:parent-style-name="Normal" style:family="paragraph">
      <style:paragraph-properties fo:text-indent="0in"/>
    </style:style>
    <style:style style:name="T499" style:parent-style-name="DefaultParagraphFont" style:family="text">
      <style:text-properties fo:language="en" fo:country="US"/>
    </style:style>
    <style:style style:name="P500" style:parent-style-name="SBCparagraph" style:family="paragraph">
      <style:paragraph-properties fo:margin-top="0in" fo:text-indent="0in"/>
      <style:text-properties fo:font-size="11pt" style:font-size-asian="11pt" style:font-size-complex="9pt" fo:language="en" fo:country="US"/>
    </style:style>
    <style:style style:name="P501" style:parent-style-name="SBCparagraph" style:family="paragraph">
      <style:paragraph-properties fo:margin-top="0in" fo:text-indent="0in"/>
      <style:text-properties fo:font-size="11pt" style:font-size-asian="11pt" style:font-size-complex="9pt" fo:language="en" fo:country="US"/>
    </style:style>
    <style:style style:name="P502" style:parent-style-name="SBCparagraph" style:family="paragraph">
      <style:paragraph-properties fo:margin-top="0in" fo:text-indent="0in"/>
      <style:text-properties fo:font-size="11pt" style:font-size-asian="11pt" style:font-size-complex="9pt" fo:language="en" fo:country="US"/>
    </style:style>
    <style:style style:name="P503" style:parent-style-name="SBCparagraph" style:family="paragraph">
      <style:paragraph-properties fo:margin-top="0in" fo:text-indent="0in"/>
      <style:text-properties fo:font-size="11pt" style:font-size-asian="11pt" style:font-size-complex="9pt" fo:language="en" fo:country="US"/>
    </style:style>
    <style:style style:name="P504" style:parent-style-name="SBCparagraph" style:family="paragraph">
      <style:paragraph-properties fo:margin-top="0in" fo:text-indent="0in"/>
      <style:text-properties fo:font-size="11pt" style:font-size-asian="11pt" style:font-size-complex="9pt"/>
    </style:style>
    <style:style style:name="P505" style:parent-style-name="SBCparagraph" style:family="paragraph">
      <style:paragraph-properties fo:margin-top="0in" fo:text-indent="0in"/>
      <style:text-properties fo:font-size="11pt" style:font-size-asian="11pt" style:font-size-complex="9pt"/>
    </style:style>
    <style:style style:name="P506" style:parent-style-name="SBCparagraph" style:family="paragraph">
      <style:paragraph-properties fo:margin-top="0in" fo:text-indent="0in"/>
      <style:text-properties fo:font-size="11pt" style:font-size-asian="11pt" style:font-size-complex="9pt"/>
    </style:style>
    <style:style style:name="P507" style:parent-style-name="SBCparagraph" style:family="paragraph">
      <style:paragraph-properties fo:margin-top="0in" fo:text-indent="0in"/>
      <style:text-properties fo:font-size="11pt" style:font-size-asian="11pt" style:font-size-complex="9pt"/>
    </style:style>
    <style:style style:name="P508" style:parent-style-name="SBCparagraph" style:family="paragraph">
      <style:paragraph-properties fo:margin-top="0in" fo:text-indent="0in"/>
      <style:text-properties fo:font-size="11pt" style:font-size-asian="11pt" style:font-size-complex="9pt"/>
    </style:style>
    <style:style style:name="P509" style:parent-style-name="SBCparagraph" style:family="paragraph">
      <style:paragraph-properties fo:margin-top="0in" fo:text-indent="0in"/>
      <style:text-properties fo:font-size="11pt" style:font-size-asian="11pt" style:font-size-complex="9pt" fo:language="en" fo:country="US"/>
    </style:style>
    <style:style style:name="P510"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11"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12"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13" style:parent-style-name="SBCparagraph" style:family="paragraph">
      <style:paragraph-properties fo:margin-top="0in" fo:margin-left="0.9847in" fo:text-indent="0in">
        <style:tab-stops/>
      </style:paragraph-properties>
      <style:text-properties fo:font-size="11pt" style:font-size-asian="11pt" style:font-size-complex="9pt"/>
    </style:style>
    <style:style style:name="P514" style:parent-style-name="SBCparagraph" style:family="paragraph">
      <style:paragraph-properties fo:margin-top="0in" fo:margin-left="0.9847in" fo:text-indent="0in">
        <style:tab-stops/>
      </style:paragraph-properties>
      <style:text-properties fo:font-size="11pt" style:font-size-asian="11pt" style:font-size-complex="9pt"/>
    </style:style>
    <style:style style:name="P515" style:parent-style-name="SBCparagraph" style:family="paragraph">
      <style:paragraph-properties fo:margin-top="0in"/>
      <style:text-properties fo:font-size="11pt" style:font-size-asian="11pt" style:font-size-complex="9pt"/>
    </style:style>
    <style:style style:name="P516" style:parent-style-name="SBCparagraph" style:family="paragraph">
      <style:paragraph-properties fo:margin-top="0in" fo:text-indent="0in"/>
      <style:text-properties fo:font-size="11pt" style:font-size-asian="11pt" style:font-size-complex="9pt"/>
    </style:style>
    <style:style style:name="P517" style:parent-style-name="SBCparagraph" style:family="paragraph">
      <style:paragraph-properties fo:margin-top="0in" fo:text-indent="0in"/>
      <style:text-properties fo:font-size="11pt" style:font-size-asian="11pt" style:font-size-complex="9pt"/>
    </style:style>
    <style:style style:name="P518" style:parent-style-name="SBCparagraph" style:family="paragraph">
      <style:paragraph-properties fo:margin-top="0in" fo:text-indent="0in"/>
      <style:text-properties fo:font-size="11pt" style:font-size-asian="11pt" style:font-size-complex="9pt"/>
    </style:style>
    <style:style style:name="P519" style:parent-style-name="SBCparagraph" style:family="paragraph">
      <style:paragraph-properties fo:margin-top="0in" fo:text-indent="0in"/>
      <style:text-properties fo:font-size="11pt" style:font-size-asian="11pt" style:font-size-complex="9pt"/>
    </style:style>
    <style:style style:name="P520" style:parent-style-name="SBCparagraph" style:family="paragraph">
      <style:paragraph-properties fo:margin-top="0in" fo:margin-left="0.4923in" fo:text-indent="0in">
        <style:tab-stops/>
      </style:paragraph-properties>
      <style:text-properties fo:font-size="11pt" style:font-size-asian="11pt" style:font-size-complex="9pt"/>
    </style:style>
    <style:style style:name="P521" style:parent-style-name="SBCparagraph" style:family="paragraph">
      <style:paragraph-properties fo:margin-top="0in" fo:margin-left="0.4923in" fo:text-indent="0in">
        <style:tab-stops/>
      </style:paragraph-properties>
      <style:text-properties fo:font-size="11pt" style:font-size-asian="11pt" style:font-size-complex="9pt"/>
    </style:style>
    <style:style style:name="P522"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23"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24"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525" style:parent-style-name="SBCparagraph" style:family="paragraph">
      <style:paragraph-properties fo:margin-top="0in" fo:margin-left="0.4923in" fo:text-indent="0in">
        <style:tab-stops/>
      </style:paragraph-properties>
      <style:text-properties fo:font-size="11pt" style:font-size-asian="11pt" style:font-size-complex="9pt"/>
    </style:style>
    <style:style style:name="P526" style:parent-style-name="SBCparagraph" style:family="paragraph">
      <style:paragraph-properties fo:margin-top="0in" fo:text-indent="0in"/>
      <style:text-properties fo:font-size="11pt" style:font-size-asian="11pt" style:font-size-complex="9pt"/>
    </style:style>
    <style:style style:name="P527" style:parent-style-name="SBCparagraph" style:family="paragraph">
      <style:paragraph-properties fo:margin-top="0in" fo:text-indent="0in"/>
      <style:text-properties fo:font-size="11pt" style:font-size-asian="11pt" style:font-size-complex="9pt"/>
    </style:style>
    <style:style style:name="P528" style:parent-style-name="SBCparagraph" style:family="paragraph">
      <style:paragraph-properties fo:margin-top="0in" fo:text-indent="0in"/>
      <style:text-properties fo:font-size="11pt" style:font-size-asian="11pt" style:font-size-complex="9pt"/>
    </style:style>
    <style:style style:name="P529" style:parent-style-name="SBCparagraph" style:family="paragraph">
      <style:paragraph-properties fo:margin-top="0in" fo:text-indent="0in"/>
      <style:text-properties fo:font-size="11pt" style:font-size-asian="11pt" style:font-size-complex="9pt" fo:language="en" fo:country="US"/>
    </style:style>
    <style:style style:name="P530" style:parent-style-name="SBCparagraph" style:family="paragraph">
      <style:paragraph-properties fo:margin-top="0in"/>
      <style:text-properties fo:font-size="11pt" style:font-size-asian="11pt" style:font-size-complex="9pt" fo:language="en" fo:country="US"/>
    </style:style>
    <style:style style:name="P531" style:parent-style-name="SBCparagraph" style:family="paragraph">
      <style:paragraph-properties fo:margin-top="0in"/>
      <style:text-properties fo:font-size="11pt" style:font-size-asian="11pt" style:font-size-complex="9pt"/>
    </style:style>
    <style:style style:name="P532" style:parent-style-name="SBCparagraph" style:family="paragraph">
      <style:paragraph-properties fo:margin-top="0in"/>
      <style:text-properties fo:font-size="11pt" style:font-size-asian="11pt" style:font-size-complex="9pt"/>
    </style:style>
    <style:style style:name="P533" style:parent-style-name="SBCparagraph" style:family="paragraph">
      <style:paragraph-properties fo:margin-top="0in"/>
      <style:text-properties fo:font-size="11pt" style:font-size-asian="11pt" style:font-size-complex="9pt"/>
    </style:style>
    <style:style style:name="P534" style:parent-style-name="SBCparagraph" style:family="paragraph">
      <style:paragraph-properties fo:margin-top="0in" fo:text-indent="0in"/>
      <style:text-properties fo:font-size="11pt" style:font-size-asian="11pt" style:font-size-complex="9pt"/>
    </style:style>
    <style:style style:name="P535" style:parent-style-name="SBCparagraph" style:family="paragraph">
      <style:paragraph-properties fo:margin-top="0in" fo:text-indent="0in"/>
      <style:text-properties fo:font-size="11pt" style:font-size-asian="11pt" style:font-size-complex="9pt"/>
    </style:style>
    <style:style style:name="P536" style:parent-style-name="SBCparagraph" style:family="paragraph">
      <style:paragraph-properties fo:margin-top="0in" fo:text-indent="0in"/>
      <style:text-properties fo:font-size="11pt" style:font-size-asian="11pt" style:font-size-complex="9pt"/>
    </style:style>
    <style:style style:name="P537" style:parent-style-name="SBCparagraph" style:family="paragraph">
      <style:paragraph-properties fo:margin-top="0in" fo:text-indent="0in"/>
      <style:text-properties fo:font-size="11pt" style:font-size-asian="11pt" style:font-size-complex="9pt" fo:language="en" fo:country="US"/>
    </style:style>
    <style:style style:name="P538" style:parent-style-name="SBCparagraph" style:family="paragraph">
      <style:paragraph-properties fo:margin-top="0in"/>
      <style:text-properties fo:font-size="11pt" style:font-size-asian="11pt" style:font-size-complex="9pt" fo:language="en" fo:country="US"/>
    </style:style>
    <style:style style:name="P539" style:parent-style-name="SBCparagraph" style:family="paragraph">
      <style:paragraph-properties fo:margin-top="0in"/>
      <style:text-properties fo:font-size="11pt" style:font-size-asian="11pt" style:font-size-complex="9pt"/>
    </style:style>
    <style:style style:name="P540" style:parent-style-name="SBCparagraph" style:family="paragraph">
      <style:paragraph-properties fo:margin-top="0in"/>
      <style:text-properties fo:font-size="11pt" style:font-size-asian="11pt" style:font-size-complex="9pt"/>
    </style:style>
    <style:style style:name="P541" style:parent-style-name="SBCparagraph" style:family="paragraph">
      <style:paragraph-properties fo:margin-top="0in"/>
      <style:text-properties fo:font-size="11pt" style:font-size-asian="11pt" style:font-size-complex="9pt"/>
    </style:style>
    <style:style style:name="P542" style:parent-style-name="SBCparagraph" style:family="paragraph">
      <style:paragraph-properties fo:margin-top="0in" fo:margin-left="0.4923in" fo:text-indent="0in">
        <style:tab-stops/>
      </style:paragraph-properties>
    </style:style>
    <style:style style:name="T543" style:parent-style-name="DefaultParagraphFont" style:family="text">
      <style:text-properties fo:font-size="11pt" style:font-size-asian="11pt" style:font-size-complex="9pt"/>
    </style:style>
    <style:style style:name="T544" style:parent-style-name="DefaultParagraphFont" style:family="text">
      <style:text-properties fo:font-size="11pt" style:font-size-asian="11pt" style:font-size-complex="9pt"/>
    </style:style>
    <style:style style:name="P545" style:parent-style-name="SBCparagraph" style:family="paragraph">
      <style:paragraph-properties fo:margin-top="0in" fo:text-indent="0in"/>
      <style:text-properties fo:font-size="11pt" style:font-size-asian="11pt" style:font-size-complex="9pt"/>
    </style:style>
    <style:style style:name="P546" style:parent-style-name="SBCparagraph" style:family="paragraph">
      <style:paragraph-properties fo:margin-top="0in" fo:text-indent="0in"/>
      <style:text-properties fo:font-size="11pt" style:font-size-asian="11pt" style:font-size-complex="9pt"/>
    </style:style>
    <style:style style:name="P547" style:parent-style-name="SBCparagraph" style:family="paragraph">
      <style:paragraph-properties fo:margin-top="0in"/>
      <style:text-properties fo:font-size="11pt" style:font-size-asian="11pt" style:font-size-complex="9pt"/>
    </style:style>
    <style:style style:name="P548" style:parent-style-name="SBCparagraph" style:family="paragraph">
      <style:paragraph-properties fo:margin-top="0in"/>
      <style:text-properties fo:font-size="11pt" style:font-size-asian="11pt" style:font-size-complex="9pt" fo:language="en" fo:country="US"/>
    </style:style>
    <style:style style:name="P549" style:parent-style-name="SBCparagraph" style:family="paragraph">
      <style:paragraph-properties fo:margin-top="0in" fo:margin-left="0.4923in">
        <style:tab-stops/>
      </style:paragraph-properties>
      <style:text-properties fo:font-size="11pt" style:font-size-asian="11pt" style:font-size-complex="9pt" fo:language="en" fo:country="US"/>
    </style:style>
    <style:style style:name="P550" style:parent-style-name="SBCparagraph" style:family="paragraph">
      <style:paragraph-properties fo:margin-top="0in" fo:margin-left="0.4923in">
        <style:tab-stops/>
      </style:paragraph-properties>
      <style:text-properties fo:font-size="11pt" style:font-size-asian="11pt" style:font-size-complex="9pt" fo:language="en" fo:country="US"/>
    </style:style>
    <style:style style:name="P551" style:parent-style-name="SBCparagraph" style:family="paragraph">
      <style:paragraph-properties fo:margin-top="0in"/>
      <style:text-properties fo:font-size="11pt" style:font-size-asian="11pt" style:font-size-complex="9pt"/>
    </style:style>
    <style:style style:name="P552" style:parent-style-name="SBCparagraph" style:family="paragraph">
      <style:paragraph-properties fo:margin-top="0in" fo:margin-left="0.4923in">
        <style:tab-stops/>
      </style:paragraph-properties>
      <style:text-properties fo:font-size="11pt" style:font-size-asian="11pt" style:font-size-complex="9pt"/>
    </style:style>
    <style:style style:name="P553" style:parent-style-name="SBCparagraph" style:family="paragraph">
      <style:paragraph-properties fo:margin-top="0in"/>
      <style:text-properties fo:font-size="11pt" style:font-size-asian="11pt" style:font-size-complex="9pt"/>
    </style:style>
    <style:style style:name="P554" style:parent-style-name="SBCparagraph" style:family="paragraph">
      <style:paragraph-properties fo:margin-top="0in"/>
      <style:text-properties fo:font-size="11pt" style:font-size-asian="11pt" style:font-size-complex="9pt"/>
    </style:style>
    <style:style style:name="P555" style:parent-style-name="SBCparagraph" style:family="paragraph">
      <style:paragraph-properties fo:margin-top="0in" fo:text-indent="0in"/>
    </style:style>
    <style:style style:name="T556" style:parent-style-name="DefaultParagraphFont" style:family="text">
      <style:text-properties fo:font-size="11pt" style:font-size-asian="11pt" style:font-size-complex="9pt" fo:language="en" fo:country="US"/>
    </style:style>
    <style:style style:name="P557" style:parent-style-name="Normal" style:family="paragraph">
      <style:paragraph-properties fo:text-align="center" fo:text-indent="0in"/>
    </style:style>
    <style:style style:name="T558" style:parent-style-name="DefaultParagraphFont" style:family="text">
      <style:text-properties fo:language="en" fo:country="US"/>
    </style:style>
    <style:style style:name="P559" style:parent-style-name="SBCparagraph" style:family="paragraph">
      <style:paragraph-properties fo:margin-top="0in" fo:text-indent="0in"/>
    </style:style>
    <style:style style:name="P560" style:parent-style-name="SBCparagraph" style:family="paragraph">
      <style:paragraph-properties fo:margin-top="0in" fo:text-indent="0in"/>
      <style:text-properties fo:language="en" fo:country="US"/>
    </style:style>
    <style:style style:name="P561" style:parent-style-name="SBCparagraph" style:family="paragraph">
      <style:paragraph-properties fo:margin-top="0in"/>
      <style:text-properties fo:language="en" fo:country="US"/>
    </style:style>
    <style:style style:name="P562" style:parent-style-name="SBCparagraph" style:family="paragraph">
      <style:paragraph-properties fo:margin-top="0in" fo:margin-left="0.4923in" fo:text-indent="0in">
        <style:tab-stops/>
      </style:paragraph-properties>
    </style:style>
    <style:style style:name="T563" style:parent-style-name="DefaultParagraphFont" style:family="text">
      <style:text-properties fo:language="en" fo:country="US"/>
    </style:style>
    <style:style style:name="P564" style:parent-style-name="SBCparagraph" style:family="paragraph">
      <style:paragraph-properties fo:margin-top="0in" fo:margin-left="0.4923in" fo:text-indent="0in">
        <style:tab-stops/>
      </style:paragraph-properties>
    </style:style>
    <style:style style:name="P565" style:parent-style-name="SBCparagraph" style:family="paragraph">
      <style:paragraph-properties fo:margin-top="0in" fo:text-indent="0in"/>
    </style:style>
    <style:style style:name="P566" style:parent-style-name="SBCparagraph" style:family="paragraph">
      <style:paragraph-properties fo:margin-top="0in" fo:text-indent="0in"/>
    </style:style>
    <style:style style:name="P567" style:parent-style-name="SBCparagraph" style:family="paragraph">
      <style:paragraph-properties fo:margin-top="0in" fo:text-indent="0in"/>
    </style:style>
    <style:style style:name="P568" style:parent-style-name="SBCparagraph" style:family="paragraph">
      <style:paragraph-properties fo:margin-top="0in" fo:text-indent="0in"/>
      <style:text-properties fo:language="en" fo:country="US"/>
    </style:style>
    <style:style style:name="P569" style:parent-style-name="SBCparagraph" style:family="paragraph">
      <style:paragraph-properties fo:margin-top="0in" fo:text-indent="0in"/>
      <style:text-properties fo:language="en" fo:country="US"/>
    </style:style>
    <style:style style:name="P570" style:parent-style-name="SBCparagraph" style:family="paragraph">
      <style:paragraph-properties fo:margin-top="0in" fo:text-indent="0in"/>
      <style:text-properties fo:language="en" fo:country="US"/>
    </style:style>
    <style:style style:name="P571" style:parent-style-name="SBCparagraph" style:family="paragraph">
      <style:paragraph-properties fo:margin-top="0in" fo:text-indent="0in"/>
      <style:text-properties fo:language="en" fo:country="US"/>
    </style:style>
    <style:style style:name="P572" style:parent-style-name="SBCparagraph" style:family="paragraph">
      <style:paragraph-properties fo:margin-top="0in" fo:text-indent="0in"/>
    </style:style>
    <style:style style:name="T573" style:parent-style-name="DefaultParagraphFont" style:family="text">
      <style:text-properties fo:language="en" fo:country="US"/>
    </style:style>
    <style:style style:name="P574" style:parent-style-name="SBCparagraph" style:family="paragraph">
      <style:paragraph-properties fo:margin-top="0in" fo:text-indent="0in"/>
    </style:style>
    <style:style style:name="P575" style:parent-style-name="SBCparagraph" style:family="paragraph">
      <style:paragraph-properties fo:margin-top="0in" fo:text-indent="0in"/>
    </style:style>
    <style:style style:name="P576" style:parent-style-name="SBCparagraph" style:family="paragraph">
      <style:paragraph-properties fo:margin-top="0in" fo:text-indent="0in"/>
    </style:style>
    <style:style style:name="P577" style:parent-style-name="SBCparagraph" style:family="paragraph">
      <style:paragraph-properties fo:margin-top="0in" fo:text-indent="0in"/>
    </style:style>
    <style:style style:name="P578" style:parent-style-name="SBCparagraph" style:family="paragraph">
      <style:paragraph-properties fo:margin-top="0in" fo:text-indent="0in"/>
    </style:style>
    <style:style style:name="P579" style:parent-style-name="SBCparagraph" style:family="paragraph">
      <style:paragraph-properties fo:margin-top="0in" fo:text-indent="0in"/>
    </style:style>
    <style:style style:name="P580" style:parent-style-name="SBCparagraph" style:family="paragraph">
      <style:paragraph-properties fo:margin-top="0in" fo:text-indent="0in"/>
    </style:style>
    <style:style style:name="P581" style:parent-style-name="SBCparagraph" style:family="paragraph">
      <style:paragraph-properties fo:margin-top="0in" fo:text-indent="0in"/>
    </style:style>
    <style:style style:name="P582" style:parent-style-name="SBCparagraph" style:family="paragraph">
      <style:paragraph-properties fo:margin-top="0in" fo:text-indent="0in"/>
    </style:style>
    <style:style style:name="P583" style:parent-style-name="SBCparagraph" style:family="paragraph">
      <style:paragraph-properties fo:margin-top="0in" fo:text-indent="0in"/>
    </style:style>
    <style:style style:name="P584" style:parent-style-name="SBCparagraph" style:family="paragraph">
      <style:paragraph-properties fo:margin-top="0in" fo:text-indent="0in"/>
    </style:style>
    <style:style style:name="P585" style:parent-style-name="SBCparagraph" style:family="paragraph">
      <style:paragraph-properties fo:margin-top="0in" fo:text-indent="0in"/>
    </style:style>
    <style:style style:name="P586" style:parent-style-name="SBCparagraph" style:family="paragraph">
      <style:paragraph-properties fo:margin-top="0in" fo:text-indent="0in"/>
    </style:style>
    <style:style style:name="P587" style:parent-style-name="SBCparagraph" style:family="paragraph">
      <style:paragraph-properties fo:margin-top="0in" fo:text-indent="0in"/>
    </style:style>
    <style:style style:name="P588" style:parent-style-name="SBCparagraph" style:family="paragraph">
      <style:paragraph-properties fo:margin-top="0in" fo:text-indent="0in"/>
    </style:style>
    <style:style style:name="P589" style:parent-style-name="SBCparagraph" style:family="paragraph">
      <style:paragraph-properties fo:margin-top="0in" fo:text-indent="0in"/>
    </style:style>
    <style:style style:name="P590" style:parent-style-name="SBCparagraph" style:family="paragraph">
      <style:paragraph-properties fo:margin-top="0in" fo:text-indent="0in"/>
    </style:style>
    <style:style style:name="P591" style:parent-style-name="SBCparagraph" style:family="paragraph">
      <style:paragraph-properties fo:margin-top="0in" fo:text-indent="0in"/>
    </style:style>
    <style:style style:name="P592" style:parent-style-name="SBCparagraph" style:family="paragraph">
      <style:paragraph-properties fo:margin-top="0in" fo:text-indent="0in"/>
    </style:style>
    <style:style style:name="P593" style:parent-style-name="SBCparagraph" style:family="paragraph">
      <style:paragraph-properties fo:margin-top="0in" fo:text-indent="0in"/>
    </style:style>
    <style:style style:name="P594" style:parent-style-name="SBCparagraph" style:family="paragraph">
      <style:paragraph-properties fo:margin-top="0in" fo:text-indent="0in"/>
    </style:style>
    <style:style style:name="P595" style:parent-style-name="SBCparagraph" style:family="paragraph">
      <style:paragraph-properties fo:margin-top="0in" fo:text-indent="0in"/>
    </style:style>
    <style:style style:name="P596" style:parent-style-name="SBCparagraph" style:family="paragraph">
      <style:paragraph-properties fo:margin-top="0in" fo:text-indent="0in"/>
    </style:style>
    <style:style style:name="P597" style:parent-style-name="SBCparagraph" style:family="paragraph">
      <style:paragraph-properties fo:margin-top="0in" fo:text-indent="0in"/>
    </style:style>
    <style:style style:name="P598" style:parent-style-name="SBCparagraph" style:family="paragraph">
      <style:paragraph-properties fo:margin-top="0in" fo:text-indent="0in"/>
    </style:style>
    <style:style style:name="P599" style:parent-style-name="SBCparagraph" style:family="paragraph">
      <style:paragraph-properties fo:margin-top="0in" fo:text-indent="0in"/>
    </style:style>
    <style:style style:name="P600" style:parent-style-name="SBCparagraph" style:family="paragraph">
      <style:paragraph-properties fo:margin-top="0in" fo:text-indent="0in"/>
    </style:style>
    <style:style style:name="P601" style:parent-style-name="SBCparagraph" style:family="paragraph">
      <style:paragraph-properties fo:margin-top="0in" fo:text-indent="0in"/>
      <style:text-properties fo:language="en" fo:country="US"/>
    </style:style>
    <style:style style:name="P602" style:parent-style-name="SBCparagraph" style:family="paragraph">
      <style:paragraph-properties fo:margin-top="0in"/>
      <style:text-properties fo:language="en" fo:country="US"/>
    </style:style>
    <style:style style:name="P603" style:parent-style-name="SBCparagraph" style:family="paragraph">
      <style:paragraph-properties fo:margin-top="0in"/>
      <style:text-properties fo:language="en" fo:country="US"/>
    </style:style>
    <style:style style:name="P604" style:parent-style-name="SBCparagraph" style:family="paragraph">
      <style:paragraph-properties fo:margin-top="0in" fo:text-indent="0in"/>
    </style:style>
    <style:style style:name="T605" style:parent-style-name="DefaultParagraphFont" style:family="text">
      <style:text-properties fo:language="en" fo:country="US"/>
    </style:style>
    <style:style style:name="T606" style:parent-style-name="DefaultParagraphFont" style:family="text">
      <style:text-properties fo:language="en" fo:country="US"/>
    </style:style>
    <style:style style:name="T607" style:parent-style-name="DefaultParagraphFont" style:family="text">
      <style:text-properties fo:language="en" fo:country="US"/>
    </style:style>
    <style:style style:name="P608" style:parent-style-name="SBCparagraph" style:family="paragraph">
      <style:paragraph-properties fo:margin-top="0in"/>
      <style:text-properties fo:language="en" fo:country="US"/>
    </style:style>
    <style:style style:name="P609" style:parent-style-name="SBCparagraph" style:family="paragraph">
      <style:paragraph-properties fo:margin-top="0in" fo:text-indent="0in"/>
    </style:style>
    <style:style style:name="T610" style:parent-style-name="DefaultParagraphFont" style:family="text">
      <style:text-properties style:font-name="Calibri"/>
    </style:style>
    <style:style style:name="T611" style:parent-style-name="DefaultParagraphFont" style:family="text">
      <style:text-properties fo:language="en" fo:country="US"/>
    </style:style>
    <style:style style:name="P61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613" style:parent-style-name="DefaultParagraphFont" style:family="text">
      <style:text-properties style:font-name="Calibri"/>
    </style:style>
    <style:style style:name="T614" style:parent-style-name="DefaultParagraphFont" style:family="text">
      <style:text-properties fo:font-weight="bold" style:font-weight-asian="bold" style:font-weight-complex="bold"/>
    </style:style>
    <style:style style:name="T615" style:parent-style-name="DefaultParagraphFont" style:family="text">
      <style:text-properties fo:font-weight="bold" style:font-weight-asian="bold" style:font-weight-complex="bold"/>
    </style:style>
    <style:style style:name="T616" style:parent-style-name="DefaultParagraphFont" style:family="text">
      <style:text-properties fo:font-weight="bold" style:font-weight-asian="bold" style:font-weight-complex="bold"/>
    </style:style>
    <style:style style:name="T617" style:parent-style-name="DefaultParagraphFont" style:family="text">
      <style:text-properties fo:font-weight="bold" style:font-weight-asian="bold" style:font-weight-complex="bold"/>
    </style:style>
    <style:style style:name="T618" style:parent-style-name="DefaultParagraphFont" style:family="text">
      <style:text-properties fo:font-weight="bold" style:font-weight-asian="bold" style:font-weight-complex="bold"/>
    </style:style>
    <style:style style:name="T619" style:parent-style-name="DefaultParagraphFont" style:family="text">
      <style:text-properties fo:font-weight="bold" style:font-weight-asian="bold" style:font-weight-complex="bold"/>
    </style:style>
    <style:style style:name="T620" style:parent-style-name="DefaultParagraphFont" style:family="text">
      <style:text-properties fo:font-weight="bold" style:font-weight-asian="bold" style:font-weight-complex="bold"/>
    </style:style>
    <style:style style:name="T621" style:parent-style-name="DefaultParagraphFont" style:family="text">
      <style:text-properties fo:font-weight="bold" style:font-weight-asian="bold" style:font-weight-complex="bold"/>
    </style:style>
    <style:style style:name="T622" style:parent-style-name="DefaultParagraphFont" style:family="text">
      <style:text-properties fo:font-weight="bold" style:font-weight-asian="bold" style:font-weight-complex="bold"/>
    </style:style>
    <style:style style:name="T623" style:parent-style-name="DefaultParagraphFont" style:family="text">
      <style:text-properties fo:font-weight="bold" style:font-weight-asian="bold" style:font-weight-complex="bold"/>
    </style:style>
    <style:style style:name="P624" style:parent-style-name="Normal" style:family="paragraph">
      <style:paragraph-properties fo:text-align="center"/>
    </style:style>
    <style:style style:name="P62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626" style:parent-style-name="ListParagraph" style:list-style-name="LFO8" style:family="paragraph">
      <style:text-properties style:font-name="Times New Roman" fo:font-weight="bold" style:font-weight-asian="bold" style:font-weight-complex="bold"/>
    </style:style>
    <style:style style:name="P627" style:parent-style-name="Normal" style:family="paragraph">
      <style:text-properties style:font-name="Calibri"/>
    </style:style>
    <style:style style:name="T628" style:parent-style-name="DefaultParagraphFont" style:family="text">
      <style:text-properties fo:font-weight="bold" style:font-weight-asian="bold" style:font-weight-complex="bold"/>
    </style:style>
    <style:style style:name="T629" style:parent-style-name="DefaultParagraphFont" style:family="text">
      <style:text-properties style:font-name="Calibri" fo:font-weight="bold" style:font-weight-asian="bold" style:font-weight-complex="bold"/>
    </style:style>
    <style:style style:name="T630" style:parent-style-name="DefaultParagraphFont" style:family="text">
      <style:text-properties style:font-name="Calibri"/>
    </style:style>
    <style:style style:name="T631" style:parent-style-name="DefaultParagraphFont" style:family="text">
      <style:text-properties style:font-name="Calibri" fo:font-weight="bold" style:font-weight-asian="bold" style:font-weight-complex="bold"/>
    </style:style>
    <style:style style:name="T632" style:parent-style-name="DefaultParagraphFont" style:family="text">
      <style:text-properties style:font-name="Calibri"/>
    </style:style>
    <style:style style:name="P633" style:parent-style-name="Normal" style:family="paragraph">
      <style:paragraph-properties fo:text-align="center"/>
    </style:style>
    <style:style style:name="T634" style:parent-style-name="DefaultParagraphFont" style:family="text">
      <style:text-properties style:font-name="Calibri"/>
    </style:style>
    <style:style style:name="P63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636" style:parent-style-name="Normal" style:family="paragraph">
      <style:paragraph-properties fo:text-align="center"/>
      <style:text-properties style:font-name="Calibri"/>
    </style:style>
    <style:style style:name="P637" style:parent-style-name="Normal" style:family="paragraph">
      <style:paragraph-properties fo:text-align="center" fo:text-indent="0in"/>
    </style:style>
    <style:style style:name="T638" style:parent-style-name="DefaultParagraphFont" style:family="text">
      <style:text-properties fo:language="en" fo:country="US"/>
    </style:style>
    <style:style style:name="P639" style:parent-style-name="SBCparagraph" style:family="paragraph">
      <style:paragraph-properties fo:margin-top="0in" fo:text-indent="0in"/>
    </style:style>
    <style:style style:name="P640" style:parent-style-name="SBCparagraph" style:family="paragraph">
      <style:paragraph-properties fo:margin-top="0in" fo:text-indent="0in"/>
    </style:style>
    <style:style style:name="P641" style:parent-style-name="SBCparagraph" style:family="paragraph">
      <style:paragraph-properties fo:margin-top="0in" fo:text-indent="0in"/>
    </style:style>
    <style:style style:name="P642" style:parent-style-name="SBCparagraph" style:family="paragraph">
      <style:paragraph-properties fo:margin-top="0in" fo:text-indent="0in"/>
    </style:style>
    <style:style style:name="P643" style:parent-style-name="SBCparagraph" style:family="paragraph">
      <style:paragraph-properties fo:margin-top="0in" fo:text-indent="0in"/>
    </style:style>
    <style:style style:name="P644" style:parent-style-name="SBCparagraph" style:family="paragraph">
      <style:paragraph-properties fo:margin-top="0in" fo:text-indent="0in"/>
    </style:style>
    <style:style style:name="P645" style:parent-style-name="SBCparagraph" style:family="paragraph">
      <style:paragraph-properties fo:margin-top="0in" fo:text-indent="0in"/>
    </style:style>
    <style:style style:name="P646" style:parent-style-name="SBCparagraph" style:family="paragraph">
      <style:paragraph-properties fo:margin-top="0in" fo:text-indent="0in"/>
    </style:style>
    <style:style style:name="T647" style:parent-style-name="DefaultParagraphFont" style:family="text">
      <style:text-properties fo:language="en" fo:country="US"/>
    </style:style>
    <style:style style:name="P648" style:parent-style-name="SBCparagraph" style:family="paragraph">
      <style:paragraph-properties fo:margin-top="0in" fo:text-indent="0in"/>
      <style:text-properties fo:language="en" fo:country="US"/>
    </style:style>
    <style:style style:name="P649" style:parent-style-name="SBCparagraph" style:family="paragraph">
      <style:paragraph-properties fo:margin-top="0in" fo:text-indent="0in"/>
      <style:text-properties fo:language="en" fo:country="US"/>
    </style:style>
    <style:style style:name="P650" style:parent-style-name="SBCparagraph" style:family="paragraph">
      <style:paragraph-properties fo:margin-top="0in" fo:text-indent="0in"/>
    </style:style>
    <style:style style:name="T651" style:parent-style-name="DefaultParagraphFont" style:family="text">
      <style:text-properties fo:language="en" fo:country="US"/>
    </style:style>
    <style:style style:name="P65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653" style:parent-style-name="Normal" style:family="paragraph">
      <style:paragraph-properties fo:text-align="center"/>
    </style:style>
    <style:style style:name="P65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655" style:parent-style-name="DefaultParagraphFont" style:family="text">
      <style:text-properties style:font-name="Calibri"/>
    </style:style>
    <style:style style:name="T656" style:parent-style-name="DefaultParagraphFont" style:family="text">
      <style:text-properties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T658" style:parent-style-name="DefaultParagraphFont" style:family="text">
      <style:text-properties fo:font-weight="bold" style:font-weight-asian="bold" style:font-weight-complex="bold"/>
    </style:style>
    <style:style style:name="T659" style:parent-style-name="DefaultParagraphFont" style:family="text">
      <style:text-properties fo:font-weight="bold" style:font-weight-asian="bold" style:font-weight-complex="bold"/>
    </style:style>
    <style:style style:name="T660" style:parent-style-name="DefaultParagraphFont" style:family="text">
      <style:text-properties style:font-name="Calibri"/>
    </style:style>
    <style:style style:name="T661" style:parent-style-name="DefaultParagraphFont" style:family="text">
      <style:text-properties style:font-name="Calibri" fo:font-weight="bold" style:font-weight-asian="bold" style:font-weight-complex="bold"/>
    </style:style>
    <style:style style:name="T662" style:parent-style-name="DefaultParagraphFont" style:family="text">
      <style:text-properties style:font-name="Calibri"/>
    </style:style>
    <style:style style:name="T663" style:parent-style-name="DefaultParagraphFont" style:family="text">
      <style:text-properties style:font-name="Calibri"/>
    </style:style>
    <style:style style:name="T664" style:parent-style-name="DefaultParagraphFont" style:family="text">
      <style:text-properties style:font-name="Calibri"/>
    </style:style>
    <style:style style:name="P665" style:parent-style-name="Normal" style:master-page-name="MP3" style:family="paragraph">
      <style:paragraph-properties fo:break-before="page" fo:text-indent="0in"/>
    </style:style>
    <style:style style:name="T666" style:parent-style-name="DefaultParagraphFont" style:family="text">
      <style:text-properties fo:language="en" fo:country="US"/>
    </style:style>
    <style:style style:name="P667" style:parent-style-name="SBCparagraph" style:family="paragraph">
      <style:paragraph-properties fo:margin-top="0in" fo:text-indent="0in"/>
    </style:style>
    <style:style style:name="T668" style:parent-style-name="DefaultParagraphFont" style:family="text">
      <style:text-properties fo:font-size="11pt" style:font-size-asian="11pt" style:font-size-complex="9pt" fo:language="en" fo:country="US"/>
    </style:style>
    <style:style style:name="T669" style:parent-style-name="DefaultParagraphFont" style:family="text">
      <style:text-properties style:font-name="Calibri" fo:font-size="11pt" style:font-size-asian="11pt" style:font-size-complex="9pt" fo:language="en" fo:country="US"/>
    </style:style>
    <style:style style:name="P670" style:parent-style-name="SBCparagraph" style:family="paragraph">
      <style:paragraph-properties fo:margin-top="0in" fo:text-indent="0in"/>
      <style:text-properties style:font-name="Calibri" fo:font-size="11pt" style:font-size-asian="11pt" style:font-size-complex="9pt" fo:language="en" fo:country="US"/>
    </style:style>
    <style:style style:name="P671" style:parent-style-name="SBCparagraph" style:family="paragraph">
      <style:paragraph-properties fo:margin-top="0in" fo:text-indent="0in"/>
      <style:text-properties fo:font-size="11pt" style:font-size-asian="11pt" style:font-size-complex="9pt"/>
    </style:style>
    <style:style style:name="P672" style:parent-style-name="SBCparagraph" style:family="paragraph">
      <style:paragraph-properties fo:margin-top="0in" fo:text-indent="0in"/>
      <style:text-properties fo:font-size="11pt" style:font-size-asian="11pt" style:font-size-complex="9pt"/>
    </style:style>
    <style:style style:name="P673" style:parent-style-name="SBCparagraph" style:family="paragraph">
      <style:paragraph-properties fo:margin-top="0in" fo:text-indent="0in"/>
      <style:text-properties fo:font-size="11pt" style:font-size-asian="11pt" style:font-size-complex="9pt"/>
    </style:style>
    <style:style style:name="P674" style:parent-style-name="SBCparagraph" style:family="paragraph">
      <style:paragraph-properties fo:margin-top="0in" fo:text-indent="0in"/>
      <style:text-properties fo:font-size="11pt" style:font-size-asian="11pt" style:font-size-complex="9pt"/>
    </style:style>
    <style:style style:name="P675" style:parent-style-name="SBCparagraph" style:family="paragraph">
      <style:paragraph-properties fo:margin-top="0in" fo:text-indent="0in"/>
      <style:text-properties fo:font-size="11pt" style:font-size-asian="11pt" style:font-size-complex="9pt" fo:language="en" fo:country="US"/>
    </style:style>
    <style:style style:name="P676" style:parent-style-name="SBCparagraph" style:family="paragraph">
      <style:paragraph-properties fo:margin-top="0in"/>
      <style:text-properties fo:font-size="11pt" style:font-size-asian="11pt" style:font-size-complex="9pt" fo:language="en" fo:country="US"/>
    </style:style>
    <style:style style:name="P677" style:parent-style-name="SBCparagraph" style:family="paragraph">
      <style:paragraph-properties fo:margin-top="0in"/>
      <style:text-properties fo:font-size="11pt" style:font-size-asian="11pt" style:font-size-complex="9pt"/>
    </style:style>
    <style:style style:name="P678" style:parent-style-name="SBCparagraph" style:family="paragraph">
      <style:paragraph-properties fo:margin-top="0in"/>
      <style:text-properties fo:font-size="11pt" style:font-size-asian="11pt" style:font-size-complex="9pt"/>
    </style:style>
    <style:style style:name="P679" style:parent-style-name="SBCparagraph" style:family="paragraph">
      <style:paragraph-properties fo:margin-top="0in"/>
      <style:text-properties fo:font-size="11pt" style:font-size-asian="11pt" style:font-size-complex="9pt"/>
    </style:style>
    <style:style style:name="P680" style:parent-style-name="SBCparagraph" style:family="paragraph">
      <style:paragraph-properties fo:margin-top="0in" fo:margin-left="0.4923in" fo:text-indent="0in">
        <style:tab-stops/>
      </style:paragraph-properties>
    </style:style>
    <style:style style:name="T681" style:parent-style-name="DefaultParagraphFont" style:family="text">
      <style:text-properties fo:font-size="11pt" style:font-size-asian="11pt" style:font-size-complex="9pt"/>
    </style:style>
    <style:style style:name="T682" style:parent-style-name="DefaultParagraphFont" style:family="text">
      <style:text-properties fo:font-size="11pt" style:font-size-asian="11pt" style:font-size-complex="9pt"/>
    </style:style>
    <style:style style:name="P683" style:parent-style-name="SBCparagraph" style:family="paragraph">
      <style:paragraph-properties fo:margin-top="0in" fo:text-indent="0in"/>
      <style:text-properties fo:font-size="11pt" style:font-size-asian="11pt" style:font-size-complex="9pt"/>
    </style:style>
    <style:style style:name="P684" style:parent-style-name="SBCparagraph" style:family="paragraph">
      <style:paragraph-properties fo:margin-top="0in" fo:text-indent="0in"/>
      <style:text-properties fo:font-size="11pt" style:font-size-asian="11pt" style:font-size-complex="9pt"/>
    </style:style>
    <style:style style:name="P685" style:parent-style-name="SBCparagraph" style:family="paragraph">
      <style:paragraph-properties fo:margin-top="0in"/>
      <style:text-properties fo:font-size="11pt" style:font-size-asian="11pt" style:font-size-complex="9pt"/>
    </style:style>
    <style:style style:name="P686" style:parent-style-name="SBCparagraph" style:family="paragraph">
      <style:paragraph-properties fo:margin-top="0in"/>
      <style:text-properties fo:font-size="11pt" style:font-size-asian="11pt" style:font-size-complex="9pt" fo:language="en" fo:country="US"/>
    </style:style>
    <style:style style:name="P687" style:parent-style-name="SBCparagraph" style:family="paragraph">
      <style:paragraph-properties fo:margin-top="0in" fo:margin-left="0.4923in">
        <style:tab-stops/>
      </style:paragraph-properties>
      <style:text-properties fo:font-size="11pt" style:font-size-asian="11pt" style:font-size-complex="9pt" fo:language="en" fo:country="US"/>
    </style:style>
    <style:style style:name="P688" style:parent-style-name="SBCparagraph" style:family="paragraph">
      <style:paragraph-properties fo:margin-top="0in" fo:margin-left="0.4923in">
        <style:tab-stops/>
      </style:paragraph-properties>
      <style:text-properties fo:font-size="11pt" style:font-size-asian="11pt" style:font-size-complex="9pt" fo:language="en" fo:country="US"/>
    </style:style>
    <style:style style:name="P689" style:parent-style-name="SBCparagraph" style:family="paragraph">
      <style:paragraph-properties fo:margin-top="0in"/>
      <style:text-properties fo:font-size="11pt" style:font-size-asian="11pt" style:font-size-complex="9pt"/>
    </style:style>
    <style:style style:name="P690" style:parent-style-name="SBCparagraph" style:family="paragraph">
      <style:paragraph-properties fo:margin-top="0in" fo:margin-left="0.4923in">
        <style:tab-stops/>
      </style:paragraph-properties>
      <style:text-properties fo:font-size="11pt" style:font-size-asian="11pt" style:font-size-complex="9pt"/>
    </style:style>
    <style:style style:name="P691" style:parent-style-name="SBCparagraph" style:family="paragraph">
      <style:paragraph-properties fo:margin-top="0in"/>
      <style:text-properties fo:font-size="11pt" style:font-size-asian="11pt" style:font-size-complex="9pt"/>
    </style:style>
    <style:style style:name="P692" style:parent-style-name="SBCparagraph" style:family="paragraph">
      <style:paragraph-properties fo:margin-top="0in"/>
      <style:text-properties fo:font-size="11pt" style:font-size-asian="11pt" style:font-size-complex="9pt"/>
    </style:style>
    <style:style style:name="P693" style:parent-style-name="SBCparagraph" style:family="paragraph">
      <style:paragraph-properties fo:margin-top="0in" fo:text-indent="0in"/>
    </style:style>
    <style:style style:name="T694" style:parent-style-name="DefaultParagraphFont" style:family="text">
      <style:text-properties fo:font-size="11pt" style:font-size-asian="11pt" style:font-size-complex="9pt"/>
    </style:style>
    <style:style style:name="P695" style:parent-style-name="SBCparagraph" style:family="paragraph">
      <style:paragraph-properties fo:margin-top="0in" fo:text-indent="0in"/>
      <style:text-properties fo:font-size="11pt" style:font-size-asian="11pt" style:font-size-complex="9pt"/>
    </style:style>
    <style:style style:name="P696" style:parent-style-name="SBCparagraph" style:family="paragraph">
      <style:paragraph-properties fo:margin-top="0in" fo:text-indent="0in"/>
      <style:text-properties fo:font-size="11pt" style:font-size-asian="11pt" style:font-size-complex="9pt"/>
    </style:style>
    <style:style style:name="P697" style:parent-style-name="SBCparagraph" style:family="paragraph">
      <style:paragraph-properties fo:margin-top="0in" fo:text-indent="0in"/>
      <style:text-properties fo:font-size="11pt" style:font-size-asian="11pt" style:font-size-complex="9pt" fo:language="en" fo:country="US"/>
    </style:style>
    <style:style style:name="P698"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699"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700"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701" style:parent-style-name="SBCparagraph" style:family="paragraph">
      <style:paragraph-properties fo:margin-top="0in" fo:margin-left="0.9847in" fo:text-indent="0in">
        <style:tab-stops/>
      </style:paragraph-properties>
      <style:text-properties fo:font-size="11pt" style:font-size-asian="11pt" style:font-size-complex="9pt"/>
    </style:style>
    <style:style style:name="P702" style:parent-style-name="SBCparagraph" style:family="paragraph">
      <style:paragraph-properties fo:margin-top="0in" fo:margin-left="0.9847in" fo:text-indent="0in">
        <style:tab-stops/>
      </style:paragraph-properties>
      <style:text-properties fo:font-size="11pt" style:font-size-asian="11pt" style:font-size-complex="9pt"/>
    </style:style>
    <style:style style:name="P703" style:parent-style-name="SBCparagraph" style:family="paragraph">
      <style:paragraph-properties fo:margin-top="0in"/>
      <style:text-properties fo:font-size="11pt" style:font-size-asian="11pt" style:font-size-complex="9pt"/>
    </style:style>
    <style:style style:name="P704" style:parent-style-name="SBCparagraph" style:family="paragraph">
      <style:paragraph-properties fo:margin-top="0in" fo:text-indent="0in"/>
      <style:text-properties fo:font-size="11pt" style:font-size-asian="11pt" style:font-size-complex="9pt"/>
    </style:style>
    <style:style style:name="P705" style:parent-style-name="SBCparagraph" style:family="paragraph">
      <style:paragraph-properties fo:margin-top="0in" fo:text-indent="0in"/>
      <style:text-properties fo:font-size="11pt" style:font-size-asian="11pt" style:font-size-complex="9pt"/>
    </style:style>
    <style:style style:name="P706" style:parent-style-name="SBCparagraph" style:family="paragraph">
      <style:paragraph-properties fo:margin-top="0in" fo:text-indent="0in"/>
      <style:text-properties fo:font-size="11pt" style:font-size-asian="11pt" style:font-size-complex="9pt"/>
    </style:style>
    <style:style style:name="P707" style:parent-style-name="SBCparagraph" style:family="paragraph">
      <style:paragraph-properties fo:margin-top="0in" fo:text-indent="0in"/>
      <style:text-properties fo:font-size="11pt" style:font-size-asian="11pt" style:font-size-complex="9pt"/>
    </style:style>
    <style:style style:name="P708" style:parent-style-name="SBCparagraph" style:family="paragraph">
      <style:paragraph-properties fo:margin-top="0in" fo:margin-left="0.4923in" fo:text-indent="0in">
        <style:tab-stops/>
      </style:paragraph-properties>
      <style:text-properties fo:font-size="11pt" style:font-size-asian="11pt" style:font-size-complex="9pt"/>
    </style:style>
    <style:style style:name="P709" style:parent-style-name="SBCparagraph" style:family="paragraph">
      <style:paragraph-properties fo:margin-top="0in" fo:margin-left="0.4923in" fo:text-indent="0in">
        <style:tab-stops/>
      </style:paragraph-properties>
      <style:text-properties fo:font-size="11pt" style:font-size-asian="11pt" style:font-size-complex="9pt"/>
    </style:style>
    <style:style style:name="P710"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711"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712" style:parent-style-name="SBCparagraph" style:family="paragraph">
      <style:paragraph-properties fo:margin-top="0in" fo:margin-left="0.4923in" fo:text-indent="0in">
        <style:tab-stops/>
      </style:paragraph-properties>
      <style:text-properties fo:font-size="11pt" style:font-size-asian="11pt" style:font-size-complex="9pt" fo:language="en" fo:country="US"/>
    </style:style>
    <style:style style:name="P713" style:parent-style-name="SBCparagraph" style:family="paragraph">
      <style:paragraph-properties fo:margin-top="0in" fo:margin-left="0.4923in" fo:text-indent="0in">
        <style:tab-stops/>
      </style:paragraph-properties>
      <style:text-properties fo:font-size="11pt" style:font-size-asian="11pt" style:font-size-complex="9pt"/>
    </style:style>
    <style:style style:name="P714" style:parent-style-name="SBCparagraph" style:family="paragraph">
      <style:paragraph-properties fo:margin-top="0in" fo:text-indent="0in"/>
      <style:text-properties fo:font-size="11pt" style:font-size-asian="11pt" style:font-size-complex="9pt"/>
    </style:style>
    <style:style style:name="P715" style:parent-style-name="SBCparagraph" style:family="paragraph">
      <style:paragraph-properties fo:margin-top="0in" fo:text-indent="0in"/>
      <style:text-properties fo:font-size="11pt" style:font-size-asian="11pt" style:font-size-complex="9pt"/>
    </style:style>
    <style:style style:name="P716" style:parent-style-name="SBCparagraph" style:family="paragraph">
      <style:paragraph-properties fo:margin-top="0in" fo:text-indent="0in"/>
      <style:text-properties fo:font-size="11pt" style:font-size-asian="11pt" style:font-size-complex="9pt"/>
    </style:style>
    <style:style style:name="P717" style:parent-style-name="SBCparagraph" style:family="paragraph">
      <style:paragraph-properties fo:margin-top="0in" fo:text-indent="0in"/>
      <style:text-properties fo:font-size="11pt" style:font-size-asian="11pt" style:font-size-complex="9pt" fo:language="en" fo:country="US"/>
    </style:style>
    <style:style style:name="P718" style:parent-style-name="SBCparagraph" style:family="paragraph">
      <style:paragraph-properties fo:margin-top="0in"/>
      <style:text-properties fo:font-size="11pt" style:font-size-asian="11pt" style:font-size-complex="9pt" fo:language="en" fo:country="US"/>
    </style:style>
    <style:style style:name="P719" style:parent-style-name="SBCparagraph" style:family="paragraph">
      <style:paragraph-properties fo:margin-top="0in"/>
      <style:text-properties fo:font-size="11pt" style:font-size-asian="11pt" style:font-size-complex="9pt"/>
    </style:style>
    <style:style style:name="P720" style:parent-style-name="SBCparagraph" style:family="paragraph">
      <style:paragraph-properties fo:margin-top="0in"/>
      <style:text-properties fo:font-size="11pt" style:font-size-asian="11pt" style:font-size-complex="9pt"/>
    </style:style>
    <style:style style:name="P721" style:parent-style-name="SBCparagraph" style:family="paragraph">
      <style:paragraph-properties fo:margin-top="0in"/>
      <style:text-properties fo:font-size="11pt" style:font-size-asian="11pt" style:font-size-complex="9pt"/>
    </style:style>
    <style:style style:name="P722" style:parent-style-name="SBCparagraph" style:family="paragraph">
      <style:paragraph-properties fo:margin-top="0in" fo:text-indent="0in"/>
      <style:text-properties fo:font-size="11pt" style:font-size-asian="11pt" style:font-size-complex="9pt"/>
    </style:style>
    <style:style style:name="P723" style:parent-style-name="SBCparagraph" style:family="paragraph">
      <style:paragraph-properties fo:margin-top="0in" fo:text-indent="0in"/>
      <style:text-properties fo:font-size="11pt" style:font-size-asian="11pt" style:font-size-complex="9pt"/>
    </style:style>
    <style:style style:name="P724" style:parent-style-name="Normal" style:master-page-name="MP4" style:family="paragraph">
      <style:paragraph-properties fo:break-before="page" fo:text-indent="0in"/>
    </style:style>
    <style:style style:name="T725" style:parent-style-name="DefaultParagraphFont" style:family="text">
      <style:text-properties fo:language="en" fo:country="US"/>
    </style:style>
    <style:style style:name="P726" style:parent-style-name="SBCparagraph" style:family="paragraph">
      <style:paragraph-properties fo:margin-top="0in" fo:text-indent="0in"/>
      <style:text-properties fo:font-size="11pt" style:font-size-asian="11pt" style:font-size-complex="9pt"/>
    </style:style>
    <style:style style:name="P727" style:parent-style-name="SBCparagraph" style:family="paragraph">
      <style:paragraph-properties fo:margin-top="0in" fo:text-indent="0in"/>
      <style:text-properties fo:font-size="11pt" style:font-size-asian="11pt" style:font-size-complex="9pt" fo:language="en" fo:country="US"/>
    </style:style>
    <style:style style:name="P728" style:parent-style-name="SBCparagraph" style:family="paragraph">
      <style:paragraph-properties fo:margin-top="0in"/>
      <style:text-properties fo:font-size="11pt" style:font-size-asian="11pt" style:font-size-complex="9pt" fo:language="en" fo:country="US"/>
    </style:style>
    <style:style style:name="P729" style:parent-style-name="SBCparagraph" style:family="paragraph">
      <style:paragraph-properties fo:margin-top="0in"/>
      <style:text-properties fo:font-size="11pt" style:font-size-asian="11pt" style:font-size-complex="9pt"/>
    </style:style>
    <style:style style:name="P730" style:parent-style-name="SBCparagraph" style:family="paragraph">
      <style:paragraph-properties fo:margin-top="0in"/>
      <style:text-properties fo:font-size="11pt" style:font-size-asian="11pt" style:font-size-complex="9pt"/>
    </style:style>
    <style:style style:name="P731" style:parent-style-name="SBCparagraph" style:family="paragraph">
      <style:paragraph-properties fo:margin-top="0in"/>
      <style:text-properties fo:font-size="11pt" style:font-size-asian="11pt" style:font-size-complex="9pt"/>
    </style:style>
    <style:style style:name="P732" style:parent-style-name="SBCparagraph" style:family="paragraph">
      <style:paragraph-properties fo:margin-top="0in" fo:margin-left="0.4923in" fo:text-indent="0in">
        <style:tab-stops/>
      </style:paragraph-properties>
    </style:style>
    <style:style style:name="T733" style:parent-style-name="DefaultParagraphFont" style:family="text">
      <style:text-properties fo:font-size="11pt" style:font-size-asian="11pt" style:font-size-complex="9pt"/>
    </style:style>
    <style:style style:name="T734" style:parent-style-name="DefaultParagraphFont" style:family="text">
      <style:text-properties fo:font-size="11pt" style:font-size-asian="11pt" style:font-size-complex="9pt"/>
    </style:style>
    <style:style style:name="P735" style:parent-style-name="SBCparagraph" style:family="paragraph">
      <style:paragraph-properties fo:margin-top="0in" fo:text-indent="0in"/>
      <style:text-properties fo:font-size="11pt" style:font-size-asian="11pt" style:font-size-complex="9pt"/>
    </style:style>
    <style:style style:name="P736" style:parent-style-name="SBCparagraph" style:family="paragraph">
      <style:paragraph-properties fo:margin-top="0in" fo:text-indent="0in"/>
      <style:text-properties fo:font-size="11pt" style:font-size-asian="11pt" style:font-size-complex="9pt"/>
    </style:style>
    <style:style style:name="P737" style:parent-style-name="SBCparagraph" style:family="paragraph">
      <style:paragraph-properties fo:margin-top="0in"/>
      <style:text-properties fo:font-size="11pt" style:font-size-asian="11pt" style:font-size-complex="9pt"/>
    </style:style>
    <style:style style:name="P738" style:parent-style-name="SBCparagraph" style:family="paragraph">
      <style:paragraph-properties fo:margin-top="0in"/>
      <style:text-properties fo:font-size="11pt" style:font-size-asian="11pt" style:font-size-complex="9pt" fo:language="en" fo:country="US"/>
    </style:style>
    <style:style style:name="P739" style:parent-style-name="SBCparagraph" style:family="paragraph">
      <style:paragraph-properties fo:margin-top="0in" fo:margin-left="0.4923in">
        <style:tab-stops/>
      </style:paragraph-properties>
      <style:text-properties fo:font-size="11pt" style:font-size-asian="11pt" style:font-size-complex="9pt" fo:language="en" fo:country="US"/>
    </style:style>
    <style:style style:name="P740" style:parent-style-name="SBCparagraph" style:family="paragraph">
      <style:paragraph-properties fo:margin-top="0in" fo:margin-left="0.4923in">
        <style:tab-stops/>
      </style:paragraph-properties>
      <style:text-properties fo:font-size="11pt" style:font-size-asian="11pt" style:font-size-complex="9pt" fo:language="en" fo:country="US"/>
    </style:style>
    <style:style style:name="P741" style:parent-style-name="SBCparagraph" style:family="paragraph">
      <style:paragraph-properties fo:margin-top="0in"/>
      <style:text-properties fo:font-size="11pt" style:font-size-asian="11pt" style:font-size-complex="9pt"/>
    </style:style>
    <style:style style:name="P742" style:parent-style-name="SBCparagraph" style:family="paragraph">
      <style:paragraph-properties fo:margin-top="0in" fo:margin-left="0.4923in">
        <style:tab-stops/>
      </style:paragraph-properties>
      <style:text-properties fo:font-size="11pt" style:font-size-asian="11pt" style:font-size-complex="9pt"/>
    </style:style>
    <style:style style:name="P743" style:parent-style-name="SBCparagraph" style:family="paragraph">
      <style:paragraph-properties fo:margin-top="0in"/>
      <style:text-properties fo:font-size="11pt" style:font-size-asian="11pt" style:font-size-complex="9pt"/>
    </style:style>
    <style:style style:name="P744" style:parent-style-name="SBCparagraph" style:family="paragraph">
      <style:paragraph-properties fo:margin-top="0in"/>
      <style:text-properties fo:font-size="11pt" style:font-size-asian="11pt" style:font-size-complex="9pt"/>
    </style:style>
    <style:style style:name="P745" style:parent-style-name="SBCparagraph" style:family="paragraph">
      <style:paragraph-properties fo:margin-top="0in" fo:text-indent="0in"/>
      <style:text-properties fo:font-size="11pt" style:font-size-asian="11pt" style:font-size-complex="9pt"/>
    </style:style>
    <style:style style:name="P746" style:parent-style-name="SBCparagraph" style:family="paragraph">
      <style:paragraph-properties fo:margin-top="0in" fo:text-indent="0in"/>
      <style:text-properties fo:font-size="11pt" style:font-size-asian="11pt" style:font-size-complex="9pt"/>
    </style:style>
    <style:style style:name="P747" style:parent-style-name="SBCparagraph" style:family="paragraph">
      <style:paragraph-properties fo:margin-top="0in" fo:text-indent="0in"/>
    </style:style>
    <style:style style:name="P748" style:parent-style-name="SBCparagraph" style:family="paragraph">
      <style:paragraph-properties fo:margin-top="0in" fo:text-indent="0in"/>
      <style:text-properties fo:language="en" fo:country="US"/>
    </style:style>
    <style:style style:name="P749" style:parent-style-name="SBCparagraph" style:family="paragraph">
      <style:paragraph-properties fo:margin-top="0in"/>
      <style:text-properties fo:language="en" fo:country="US"/>
    </style:style>
    <style:style style:name="P750" style:parent-style-name="SBCparagraph" style:family="paragraph">
      <style:paragraph-properties fo:margin-top="0in" fo:margin-left="0.4923in" fo:text-indent="0in">
        <style:tab-stops/>
      </style:paragraph-properties>
    </style:style>
    <style:style style:name="T751" style:parent-style-name="DefaultParagraphFont" style:family="text">
      <style:text-properties fo:language="en" fo:country="US"/>
    </style:style>
    <style:style style:name="P752" style:parent-style-name="SBCparagraph" style:family="paragraph">
      <style:paragraph-properties fo:margin-top="0in" fo:margin-left="0.4923in" fo:text-indent="0in">
        <style:tab-stops/>
      </style:paragraph-properties>
    </style:style>
    <style:style style:name="P753" style:parent-style-name="SBCparagraph" style:family="paragraph">
      <style:paragraph-properties fo:margin-top="0in" fo:text-indent="0in"/>
    </style:style>
    <style:style style:name="P754" style:parent-style-name="SBCparagraph" style:family="paragraph">
      <style:paragraph-properties fo:margin-top="0in" fo:text-indent="0in"/>
    </style:style>
    <style:style style:name="P755" style:parent-style-name="SBCparagraph" style:family="paragraph">
      <style:paragraph-properties fo:margin-top="0in" fo:text-indent="0in"/>
    </style:style>
    <style:style style:name="P756" style:parent-style-name="SBCparagraph" style:family="paragraph">
      <style:paragraph-properties fo:margin-top="0in" fo:text-indent="0in"/>
      <style:text-properties fo:language="en" fo:country="US"/>
    </style:style>
    <style:style style:name="P757" style:parent-style-name="SBCparagraph" style:family="paragraph">
      <style:paragraph-properties fo:margin-top="0in" fo:text-indent="0in"/>
      <style:text-properties fo:language="en" fo:country="US"/>
    </style:style>
    <style:style style:name="P758" style:parent-style-name="SBCparagraph" style:family="paragraph">
      <style:paragraph-properties fo:margin-top="0in" fo:text-indent="0in"/>
      <style:text-properties fo:language="en" fo:country="US"/>
    </style:style>
    <style:style style:name="P759" style:parent-style-name="SBCparagraph" style:family="paragraph">
      <style:paragraph-properties fo:margin-top="0in" fo:text-indent="0in"/>
      <style:text-properties fo:language="en" fo:country="US"/>
    </style:style>
    <style:style style:name="P760" style:parent-style-name="SBCparagraph" style:family="paragraph">
      <style:paragraph-properties fo:margin-top="0in" fo:text-indent="0in"/>
    </style:style>
    <style:style style:name="T761" style:parent-style-name="DefaultParagraphFont" style:family="text">
      <style:text-properties fo:language="en" fo:country="US"/>
    </style:style>
    <style:style style:name="P762" style:parent-style-name="SBCparagraph" style:family="paragraph">
      <style:paragraph-properties fo:margin-top="0in" fo:text-indent="0in"/>
    </style:style>
    <style:style style:name="P763" style:parent-style-name="SBCparagraph" style:family="paragraph">
      <style:paragraph-properties fo:margin-top="0in" fo:text-indent="0in"/>
    </style:style>
    <style:style style:name="P764" style:parent-style-name="SBCparagraph" style:family="paragraph">
      <style:paragraph-properties fo:margin-top="0in" fo:text-indent="0in"/>
    </style:style>
    <style:style style:name="P765" style:parent-style-name="SBCparagraph" style:family="paragraph">
      <style:paragraph-properties fo:margin-top="0in" fo:text-indent="0in"/>
    </style:style>
    <style:style style:name="P766" style:parent-style-name="SBCparagraph" style:family="paragraph">
      <style:paragraph-properties fo:margin-top="0in" fo:text-indent="0in"/>
    </style:style>
    <style:style style:name="P767" style:parent-style-name="SBCparagraph" style:family="paragraph">
      <style:paragraph-properties fo:margin-top="0in" fo:text-indent="0in"/>
    </style:style>
    <style:style style:name="P768" style:parent-style-name="SBCparagraph" style:family="paragraph">
      <style:paragraph-properties fo:margin-top="0in" fo:text-indent="0in"/>
    </style:style>
    <style:style style:name="P769" style:parent-style-name="SBCparagraph" style:family="paragraph">
      <style:paragraph-properties fo:margin-top="0in" fo:text-indent="0in"/>
    </style:style>
    <style:style style:name="P770" style:parent-style-name="SBCparagraph" style:family="paragraph">
      <style:paragraph-properties fo:margin-top="0in" fo:text-indent="0in"/>
    </style:style>
    <style:style style:name="P771" style:parent-style-name="SBCparagraph" style:family="paragraph">
      <style:paragraph-properties fo:margin-top="0in" fo:text-indent="0in"/>
    </style:style>
    <style:style style:name="P772" style:parent-style-name="SBCparagraph" style:family="paragraph">
      <style:paragraph-properties fo:margin-top="0in" fo:text-indent="0in"/>
    </style:style>
    <style:style style:name="P773" style:parent-style-name="SBCparagraph" style:family="paragraph">
      <style:paragraph-properties fo:margin-top="0in" fo:text-indent="0in"/>
    </style:style>
    <style:style style:name="P774" style:parent-style-name="SBCparagraph" style:family="paragraph">
      <style:paragraph-properties fo:margin-top="0in" fo:text-indent="0in"/>
    </style:style>
    <style:style style:name="P775" style:parent-style-name="SBCparagraph" style:family="paragraph">
      <style:paragraph-properties fo:margin-top="0in" fo:text-indent="0in"/>
    </style:style>
    <style:style style:name="P776" style:parent-style-name="SBCparagraph" style:family="paragraph">
      <style:paragraph-properties fo:margin-top="0in" fo:text-indent="0in"/>
    </style:style>
    <style:style style:name="P777" style:parent-style-name="SBCparagraph" style:family="paragraph">
      <style:paragraph-properties fo:margin-top="0in" fo:text-indent="0in"/>
    </style:style>
    <style:style style:name="P778" style:parent-style-name="SBCparagraph" style:family="paragraph">
      <style:paragraph-properties fo:margin-top="0in" fo:text-indent="0in"/>
    </style:style>
    <style:style style:name="P779" style:parent-style-name="SBCparagraph" style:family="paragraph">
      <style:paragraph-properties fo:margin-top="0in" fo:text-indent="0in"/>
    </style:style>
    <style:style style:name="P780" style:parent-style-name="SBCparagraph" style:family="paragraph">
      <style:paragraph-properties fo:margin-top="0in" fo:text-indent="0in"/>
    </style:style>
    <style:style style:name="P781" style:parent-style-name="SBCparagraph" style:family="paragraph">
      <style:paragraph-properties fo:margin-top="0in" fo:text-indent="0in"/>
    </style:style>
    <style:style style:name="P782" style:parent-style-name="Normal" style:family="paragraph">
      <style:paragraph-properties fo:text-indent="0in"/>
    </style:style>
    <style:style style:name="T783" style:parent-style-name="DefaultParagraphFont" style:family="text">
      <style:text-properties fo:language="en" fo:country="US"/>
    </style:style>
    <style:style style:name="P784" style:parent-style-name="SBCparagraph" style:family="paragraph">
      <style:paragraph-properties fo:margin-top="0in" fo:text-indent="0in"/>
    </style:style>
    <style:style style:name="P785" style:parent-style-name="SBCparagraph" style:family="paragraph">
      <style:paragraph-properties fo:margin-top="0in" fo:text-indent="0in"/>
    </style:style>
    <style:style style:name="P786" style:parent-style-name="SBCparagraph" style:family="paragraph">
      <style:paragraph-properties fo:margin-top="0in" fo:text-indent="0in"/>
    </style:style>
    <style:style style:name="P787" style:parent-style-name="SBCparagraph" style:family="paragraph">
      <style:paragraph-properties fo:margin-top="0in" fo:text-indent="0in"/>
    </style:style>
    <style:style style:name="P788" style:parent-style-name="SBCparagraph" style:family="paragraph">
      <style:paragraph-properties fo:margin-top="0in" fo:text-indent="0in"/>
      <style:text-properties fo:language="en" fo:country="US"/>
    </style:style>
    <style:style style:name="P789" style:parent-style-name="SBCparagraph" style:family="paragraph">
      <style:paragraph-properties fo:margin-top="0in"/>
      <style:text-properties fo:language="en" fo:country="US"/>
    </style:style>
    <style:style style:name="P790" style:parent-style-name="SBCparagraph" style:family="paragraph">
      <style:paragraph-properties fo:margin-top="0in"/>
      <style:text-properties fo:language="en" fo:country="US"/>
    </style:style>
    <style:style style:name="P791" style:parent-style-name="SBCparagraph" style:family="paragraph">
      <style:paragraph-properties fo:margin-top="0in" fo:text-indent="0in"/>
    </style:style>
    <style:style style:name="T792" style:parent-style-name="DefaultParagraphFont" style:family="text">
      <style:text-properties fo:language="en" fo:country="US"/>
    </style:style>
    <style:style style:name="T793" style:parent-style-name="DefaultParagraphFont" style:family="text">
      <style:text-properties fo:language="en" fo:country="US"/>
    </style:style>
    <style:style style:name="T794" style:parent-style-name="DefaultParagraphFont" style:family="text">
      <style:text-properties fo:language="en" fo:country="US"/>
    </style:style>
    <style:style style:name="P795" style:parent-style-name="SBCparagraph" style:family="paragraph">
      <style:paragraph-properties fo:margin-top="0in"/>
      <style:text-properties fo:language="en" fo:country="US"/>
    </style:style>
    <style:style style:name="P796" style:parent-style-name="SBCparagraph" style:family="paragraph">
      <style:paragraph-properties fo:margin-top="0in" fo:text-indent="0in"/>
    </style:style>
    <style:style style:name="T797" style:parent-style-name="DefaultParagraphFont" style:family="text">
      <style:text-properties style:font-name="Calibri"/>
    </style:style>
    <style:style style:name="P798" style:parent-style-name="Normal" style:family="paragraph">
      <style:paragraph-properties fo:text-align="center"/>
      <style:text-properties fo:font-weight="bold" style:font-weight-asian="bold" style:font-weight-complex="bold" fo:font-size="11pt" style:font-size-asian="11pt" style:font-size-complex="9pt"/>
    </style:style>
    <style:style style:name="T799" style:parent-style-name="DefaultParagraphFont" style:family="text">
      <style:text-properties style:font-name="Calibri"/>
    </style:style>
    <style:style style:name="T800" style:parent-style-name="DefaultParagraphFont" style:family="text">
      <style:text-properties style:font-name="Calibri" fo:font-weight="bold" style:font-weight-asian="bold" style:font-weight-complex="bold"/>
    </style:style>
    <style:style style:name="T801" style:parent-style-name="DefaultParagraphFont" style:family="text">
      <style:text-properties style:font-name="Calibri"/>
    </style:style>
    <style:style style:name="P802" style:parent-style-name="Normal" style:family="paragraph">
      <style:paragraph-properties fo:text-align="center" fo:text-indent="0in"/>
    </style:style>
    <style:style style:name="T803" style:parent-style-name="DefaultParagraphFont" style:family="text">
      <style:text-properties fo:language="en" fo:country="US"/>
    </style:style>
    <style:style style:name="P804" style:parent-style-name="SBCparagraph" style:family="paragraph">
      <style:paragraph-properties fo:margin-top="0in" fo:text-indent="0in"/>
      <style:text-properties fo:language="en" fo:country="US"/>
    </style:style>
    <style:style style:name="P805" style:parent-style-name="SBCparagraph" style:family="paragraph">
      <style:paragraph-properties fo:margin-top="0in" fo:text-indent="0in"/>
      <style:text-properties fo:language="en" fo:country="US"/>
    </style:style>
    <style:style style:name="P806" style:parent-style-name="SBCparagraph" style:family="paragraph">
      <style:paragraph-properties fo:margin-top="0in" fo:text-indent="0in"/>
      <style:text-properties fo:language="en" fo:country="US"/>
    </style:style>
    <style:style style:name="P807" style:parent-style-name="SBCparagraph" style:family="paragraph">
      <style:paragraph-properties fo:margin-top="0in" fo:text-indent="0in"/>
      <style:text-properties fo:language="en" fo:country="US"/>
    </style:style>
    <style:style style:name="P808" style:parent-style-name="SBCparagraph" style:family="paragraph">
      <style:paragraph-properties fo:margin-top="0in" fo:text-indent="0in"/>
      <style:text-properties fo:language="en" fo:country="US"/>
    </style:style>
    <style:style style:name="P809" style:parent-style-name="SBCparagraph" style:family="paragraph">
      <style:paragraph-properties fo:margin-top="0in" fo:text-indent="0in"/>
      <style:text-properties fo:language="en" fo:country="US"/>
    </style:style>
    <style:style style:name="P810" style:parent-style-name="SBCparagraph" style:family="paragraph">
      <style:paragraph-properties fo:margin-top="0in" fo:text-indent="0in"/>
    </style:style>
    <style:style style:name="T811" style:parent-style-name="DefaultParagraphFont" style:family="text">
      <style:text-properties fo:language="en" fo:country="US"/>
    </style:style>
    <style:style style:name="P81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813" style:parent-style-name="DefaultParagraphFont" style:family="text">
      <style:text-properties style:font-name="Calibri"/>
    </style:style>
    <style:style style:name="T814" style:parent-style-name="DefaultParagraphFont" style:family="text">
      <style:text-properties style:font-name="Calibri" fo:font-weight="bold" style:font-weight-asian="bold" style:font-weight-complex="bold"/>
    </style:style>
    <style:style style:name="T815" style:parent-style-name="DefaultParagraphFont" style:family="text">
      <style:text-properties style:font-name="Calibri"/>
    </style:style>
    <style:style style:name="P816" style:parent-style-name="Normal" style:family="paragraph">
      <style:paragraph-properties fo:text-align="center" fo:text-indent="0in"/>
    </style:style>
    <style:style style:name="T817" style:parent-style-name="DefaultParagraphFont" style:family="text">
      <style:text-properties fo:language="en" fo:country="US"/>
    </style:style>
    <style:style style:name="P818" style:parent-style-name="SBCparagraph" style:family="paragraph">
      <style:paragraph-properties fo:margin-top="0in" fo:text-indent="0in"/>
      <style:text-properties fo:language="en" fo:country="US"/>
    </style:style>
    <style:style style:name="P819" style:parent-style-name="SBCparagraph" style:family="paragraph">
      <style:paragraph-properties fo:margin-top="0in" fo:text-indent="0in"/>
      <style:text-properties fo:language="en" fo:country="US"/>
    </style:style>
    <style:style style:name="P820" style:parent-style-name="SBCparagraph" style:family="paragraph">
      <style:paragraph-properties fo:margin-top="0in" fo:text-indent="0in"/>
      <style:text-properties fo:language="en" fo:country="US"/>
    </style:style>
    <style:style style:name="P821" style:parent-style-name="SBCparagraph" style:family="paragraph">
      <style:paragraph-properties fo:margin-top="0in" fo:text-indent="0in"/>
      <style:text-properties fo:language="en" fo:country="US"/>
    </style:style>
    <style:style style:name="P822" style:parent-style-name="SBCparagraph" style:family="paragraph">
      <style:paragraph-properties fo:margin-top="0in" fo:text-indent="0in"/>
      <style:text-properties fo:language="en" fo:country="US"/>
    </style:style>
    <style:style style:name="P823" style:parent-style-name="SBCparagraph" style:family="paragraph">
      <style:paragraph-properties fo:margin-top="0in" fo:text-indent="0in"/>
      <style:text-properties fo:language="en" fo:country="US"/>
    </style:style>
    <style:style style:name="P824" style:parent-style-name="SBCparagraph" style:family="paragraph">
      <style:paragraph-properties fo:margin-top="0in" fo:text-indent="0in"/>
      <style:text-properties fo:language="en" fo:country="US"/>
    </style:style>
    <style:style style:name="P825" style:parent-style-name="SBCparagraph" style:family="paragraph">
      <style:paragraph-properties fo:margin-top="0in" fo:text-indent="0in"/>
    </style:style>
    <style:style style:name="T826" style:parent-style-name="DefaultParagraphFont" style:family="text">
      <style:text-properties fo:language="en" fo:country="US"/>
    </style:style>
    <style:style style:name="P82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828" style:parent-style-name="DefaultParagraphFont" style:family="text">
      <style:text-properties style:font-name="Calibri"/>
    </style:style>
    <style:style style:name="T829" style:parent-style-name="DefaultParagraphFont" style:family="text">
      <style:text-properties style:font-name="Calibri" fo:font-weight="bold" style:font-weight-asian="bold" style:font-weight-complex="bold"/>
    </style:style>
    <style:style style:name="T830" style:parent-style-name="DefaultParagraphFont" style:family="text">
      <style:text-properties style:font-name="Calibri"/>
    </style:style>
    <style:style style:name="P831" style:parent-style-name="Normal" style:family="paragraph">
      <style:paragraph-properties fo:text-align="center" fo:text-indent="0in"/>
    </style:style>
    <style:style style:name="T832" style:parent-style-name="DefaultParagraphFont" style:family="text">
      <style:text-properties fo:language="en" fo:country="US"/>
    </style:style>
    <style:style style:name="P833" style:parent-style-name="SBCparagraph" style:family="paragraph">
      <style:paragraph-properties fo:margin-top="0in" fo:text-indent="0in"/>
      <style:text-properties fo:language="en" fo:country="US"/>
    </style:style>
    <style:style style:name="P834" style:parent-style-name="SBCparagraph" style:family="paragraph">
      <style:paragraph-properties fo:margin-top="0in" fo:text-indent="0in"/>
      <style:text-properties fo:language="en" fo:country="US"/>
    </style:style>
    <style:style style:name="P835" style:parent-style-name="SBCparagraph" style:family="paragraph">
      <style:paragraph-properties fo:margin-top="0in" fo:text-indent="0in"/>
      <style:text-properties fo:language="en" fo:country="US"/>
    </style:style>
    <style:style style:name="P836" style:parent-style-name="SBCparagraph" style:family="paragraph">
      <style:paragraph-properties fo:margin-top="0in" fo:text-indent="0in"/>
      <style:text-properties fo:language="en" fo:country="US"/>
    </style:style>
    <style:style style:name="P837" style:parent-style-name="SBCparagraph" style:family="paragraph">
      <style:paragraph-properties fo:margin-top="0in" fo:text-indent="0in"/>
      <style:text-properties fo:language="en" fo:country="US"/>
    </style:style>
    <style:style style:name="P838" style:parent-style-name="SBCparagraph" style:family="paragraph">
      <style:paragraph-properties fo:margin-top="0in" fo:text-indent="0in"/>
      <style:text-properties fo:language="en" fo:country="US"/>
    </style:style>
    <style:style style:name="P839" style:parent-style-name="SBCparagraph" style:family="paragraph">
      <style:paragraph-properties fo:margin-top="0in" fo:text-indent="0in"/>
      <style:text-properties fo:language="en" fo:country="US"/>
    </style:style>
    <style:style style:name="P840" style:parent-style-name="SBCparagraph" style:family="paragraph">
      <style:paragraph-properties fo:margin-top="0in" fo:text-indent="0in"/>
      <style:text-properties fo:language="en" fo:country="US"/>
    </style:style>
    <style:style style:name="P841" style:parent-style-name="SBCparagraph" style:family="paragraph">
      <style:paragraph-properties fo:margin-top="0in" fo:text-indent="0in"/>
      <style:text-properties fo:language="en" fo:country="US"/>
    </style:style>
    <style:style style:name="P842" style:parent-style-name="SBCparagraph" style:family="paragraph">
      <style:paragraph-properties fo:margin-top="0in" fo:text-indent="0in"/>
      <style:text-properties fo:language="en" fo:country="US"/>
    </style:style>
    <style:style style:name="P843" style:parent-style-name="SBCparagraph" style:family="paragraph">
      <style:paragraph-properties fo:margin-top="0in" fo:text-indent="0in"/>
      <style:text-properties fo:language="en" fo:country="US"/>
    </style:style>
    <style:style style:name="P844" style:parent-style-name="SBCparagraph" style:family="paragraph">
      <style:paragraph-properties fo:margin-top="0in" fo:text-indent="0in"/>
      <style:text-properties fo:language="en" fo:country="US"/>
    </style:style>
    <style:style style:name="P845" style:parent-style-name="SBCparagraph" style:family="paragraph">
      <style:paragraph-properties fo:margin-top="0in" fo:text-indent="0in"/>
      <style:text-properties fo:language="en" fo:country="US"/>
    </style:style>
    <style:style style:name="P846" style:parent-style-name="SBCparagraph" style:family="paragraph">
      <style:paragraph-properties fo:margin-top="0in" fo:text-indent="0in"/>
      <style:text-properties fo:language="en" fo:country="US"/>
    </style:style>
    <style:style style:name="P847" style:parent-style-name="SBCparagraph" style:family="paragraph">
      <style:paragraph-properties fo:margin-top="0in" fo:text-indent="0in"/>
      <style:text-properties fo:language="en" fo:country="US"/>
    </style:style>
    <style:style style:name="P848" style:parent-style-name="SBCparagraph" style:family="paragraph">
      <style:paragraph-properties fo:margin-top="0in" fo:text-indent="0in"/>
      <style:text-properties fo:language="en" fo:country="US"/>
    </style:style>
    <style:style style:name="P849" style:parent-style-name="SBCparagraph" style:family="paragraph">
      <style:paragraph-properties fo:margin-top="0in" fo:text-indent="0in"/>
      <style:text-properties fo:language="en" fo:country="US"/>
    </style:style>
    <style:style style:name="P850" style:parent-style-name="SBCparagraph" style:family="paragraph">
      <style:paragraph-properties fo:margin-top="0in" fo:text-indent="0in"/>
    </style:style>
    <style:style style:name="T851" style:parent-style-name="DefaultParagraphFont" style:family="text">
      <style:text-properties fo:language="en" fo:country="US"/>
    </style:style>
    <style:style style:name="P85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853" style:parent-style-name="DefaultParagraphFont" style:family="text">
      <style:text-properties style:font-name="Calibri"/>
    </style:style>
    <style:style style:name="T854" style:parent-style-name="DefaultParagraphFont" style:family="text">
      <style:text-properties style:font-name="Calibri" fo:font-weight="bold" style:font-weight-asian="bold" style:font-weight-complex="bold"/>
    </style:style>
    <style:style style:name="T855" style:parent-style-name="DefaultParagraphFont" style:family="text">
      <style:text-properties style:font-name="Calibri"/>
    </style:style>
    <style:style style:name="P856" style:parent-style-name="Normal" style:family="paragraph">
      <style:paragraph-properties fo:text-align="center" fo:text-indent="0in"/>
    </style:style>
    <style:style style:name="T857" style:parent-style-name="DefaultParagraphFont" style:family="text">
      <style:text-properties fo:language="en" fo:country="US"/>
    </style:style>
    <style:style style:name="P858" style:parent-style-name="SBCparagraph" style:family="paragraph">
      <style:paragraph-properties fo:margin-top="0in" fo:text-indent="0in"/>
      <style:text-properties fo:language="en" fo:country="US"/>
    </style:style>
    <style:style style:name="P859" style:parent-style-name="SBCparagraph" style:family="paragraph">
      <style:paragraph-properties fo:margin-top="0in" fo:text-indent="0in"/>
      <style:text-properties fo:language="en" fo:country="US"/>
    </style:style>
    <style:style style:name="P860" style:parent-style-name="SBCparagraph" style:family="paragraph">
      <style:paragraph-properties fo:margin-top="0in" fo:text-indent="0in"/>
      <style:text-properties fo:language="en" fo:country="US"/>
    </style:style>
    <style:style style:name="P861" style:parent-style-name="SBCparagraph" style:family="paragraph">
      <style:paragraph-properties fo:margin-top="0in" fo:text-indent="0in"/>
      <style:text-properties fo:language="en" fo:country="US"/>
    </style:style>
    <style:style style:name="P862" style:parent-style-name="SBCparagraph" style:family="paragraph">
      <style:paragraph-properties fo:margin-top="0in" fo:text-indent="0in"/>
      <style:text-properties fo:language="en" fo:country="US"/>
    </style:style>
    <style:style style:name="P863" style:parent-style-name="SBCparagraph" style:family="paragraph">
      <style:paragraph-properties fo:margin-top="0in" fo:text-indent="0in"/>
      <style:text-properties fo:language="en" fo:country="US"/>
    </style:style>
    <style:style style:name="P864" style:parent-style-name="SBCparagraph" style:family="paragraph">
      <style:paragraph-properties fo:margin-top="0in" fo:text-indent="0in"/>
      <style:text-properties fo:language="en" fo:country="US"/>
    </style:style>
    <style:style style:name="P865" style:parent-style-name="SBCparagraph" style:family="paragraph">
      <style:paragraph-properties fo:margin-top="0in" fo:text-indent="0in"/>
      <style:text-properties fo:language="en" fo:country="US"/>
    </style:style>
    <style:style style:name="P866" style:parent-style-name="SBCparagraph" style:family="paragraph">
      <style:paragraph-properties fo:margin-top="0in" fo:text-indent="0in"/>
    </style:style>
    <style:style style:name="P867" style:parent-style-name="SBCparagraph" style:family="paragraph">
      <style:paragraph-properties fo:margin-top="0in" fo:text-indent="0in"/>
    </style:style>
    <style:style style:name="P868" style:parent-style-name="SBCparagraph" style:family="paragraph">
      <style:paragraph-properties fo:margin-top="0in" fo:text-indent="0in"/>
    </style:style>
    <style:style style:name="P86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870" style:parent-style-name="Normal" style:family="paragraph">
      <style:text-properties style:font-name="Calibri"/>
    </style:style>
    <style:style style:name="P871" style:parent-style-name="Normal" style:family="paragraph">
      <style:paragraph-properties fo:text-align="center" fo:text-indent="0in"/>
    </style:style>
    <style:style style:name="T872" style:parent-style-name="DefaultParagraphFont" style:family="text">
      <style:text-properties fo:language="en" fo:country="US"/>
    </style:style>
    <style:style style:name="P873" style:parent-style-name="SBCparagraph" style:family="paragraph">
      <style:paragraph-properties fo:margin-top="0in" fo:text-indent="0in"/>
      <style:text-properties fo:language="en" fo:country="US"/>
    </style:style>
    <style:style style:name="P874" style:parent-style-name="SBCparagraph" style:family="paragraph">
      <style:paragraph-properties fo:margin-top="0in" fo:text-indent="0in"/>
      <style:text-properties fo:language="en" fo:country="US"/>
    </style:style>
    <style:style style:name="P875" style:parent-style-name="SBCparagraph" style:family="paragraph">
      <style:paragraph-properties fo:margin-top="0in" fo:text-indent="0in"/>
    </style:style>
    <style:style style:name="P876" style:parent-style-name="SBCparagraph" style:family="paragraph">
      <style:paragraph-properties fo:margin-top="0in" fo:text-indent="0in"/>
    </style:style>
    <style:style style:name="P877" style:parent-style-name="SBCparagraph" style:family="paragraph">
      <style:paragraph-properties fo:margin-top="0in" fo:text-indent="0in"/>
    </style:style>
    <style:style style:name="T878" style:parent-style-name="DefaultParagraphFont" style:family="text">
      <style:text-properties fo:language="en" fo:country="US"/>
    </style:style>
    <style:style style:name="P879" style:parent-style-name="SBCparagraph" style:family="paragraph">
      <style:paragraph-properties fo:margin-top="0in" fo:text-indent="0in"/>
      <style:text-properties fo:language="en" fo:country="US"/>
    </style:style>
    <style:style style:name="P880" style:parent-style-name="SBCparagraph" style:family="paragraph">
      <style:paragraph-properties fo:margin-top="0in" fo:text-indent="0in"/>
      <style:text-properties fo:language="en" fo:country="US"/>
    </style:style>
    <style:style style:name="P881" style:parent-style-name="SBCparagraph" style:family="paragraph">
      <style:paragraph-properties fo:margin-top="0in" fo:text-indent="0in"/>
      <style:text-properties fo:language="en" fo:country="US"/>
    </style:style>
    <style:style style:name="P88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883" style:parent-style-name="Normal" style:family="paragraph">
      <style:text-properties style:font-name="Calibri"/>
    </style:style>
    <style:style style:name="P884" style:parent-style-name="Normal" style:family="paragraph">
      <style:text-properties style:font-name="Calibri"/>
    </style:style>
    <style:style style:name="P885" style:parent-style-name="Normal" style:family="paragraph">
      <style:paragraph-properties fo:text-align="center" fo:text-indent="0in"/>
    </style:style>
    <style:style style:name="T886" style:parent-style-name="DefaultParagraphFont" style:family="text">
      <style:text-properties fo:language="en" fo:country="US"/>
    </style:style>
    <style:style style:name="P887" style:parent-style-name="SBCparagraph" style:family="paragraph">
      <style:paragraph-properties fo:margin-top="0in" fo:text-indent="0in"/>
      <style:text-properties fo:language="en" fo:country="US"/>
    </style:style>
    <style:style style:name="P888" style:parent-style-name="SBCparagraph" style:family="paragraph">
      <style:paragraph-properties fo:margin-top="0in" fo:text-indent="0in"/>
      <style:text-properties fo:language="en" fo:country="US"/>
    </style:style>
    <style:style style:name="P889" style:parent-style-name="SBCparagraph" style:family="paragraph">
      <style:paragraph-properties fo:margin-top="0in" fo:text-indent="0in"/>
      <style:text-properties fo:language="en" fo:country="US"/>
    </style:style>
    <style:style style:name="P890" style:parent-style-name="SBCparagraph" style:family="paragraph">
      <style:paragraph-properties fo:margin-top="0in" fo:text-indent="0in"/>
      <style:text-properties fo:language="en" fo:country="US"/>
    </style:style>
    <style:style style:name="P891" style:parent-style-name="SBCparagraph" style:family="paragraph">
      <style:paragraph-properties fo:margin-top="0in" fo:text-indent="0in"/>
      <style:text-properties fo:language="en" fo:country="US"/>
    </style:style>
    <style:style style:name="P892" style:parent-style-name="Normal" style:family="paragraph">
      <style:paragraph-properties fo:text-align="center" fo:margin-bottom="0.1666in"/>
    </style:style>
    <style:style style:name="T893" style:parent-style-name="DefaultParagraphFont" style:family="text">
      <style:text-properties fo:font-weight="bold" style:font-weight-asian="bold" style:font-weight-complex="bold" fo:font-size="11pt" style:font-size-asian="11pt" style:font-size-complex="9pt"/>
    </style:style>
    <style:style style:name="T894" style:parent-style-name="DefaultParagraphFont" style:family="text">
      <style:text-properties fo:font-weight="bold" style:font-weight-asian="bold" style:font-weight-complex="bold" fo:font-size="11pt" style:font-size-asian="11pt" style:font-size-complex="9pt"/>
    </style:style>
    <style:style style:name="P895" style:parent-style-name="Normal" style:family="paragraph">
      <style:text-properties style:font-name="Calibri"/>
    </style:style>
    <style:style style:name="P896" style:parent-style-name="Normal" style:family="paragraph">
      <style:paragraph-properties fo:text-align="center"/>
    </style:style>
    <style:style style:name="T897" style:parent-style-name="DefaultParagraphFont" style:family="text">
      <style:text-properties style:font-name="Calibri"/>
    </style:style>
    <style:style style:name="P89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899" style:parent-style-name="Normal" style:family="paragraph">
      <style:text-properties style:font-name="Calibri"/>
    </style:style>
    <style:style style:name="P900" style:parent-style-name="Normal" style:family="paragraph">
      <style:paragraph-properties fo:text-align="center"/>
    </style:style>
    <style:style style:name="T901" style:parent-style-name="DefaultParagraphFont" style:family="text">
      <style:text-properties style:font-name="Calibri"/>
    </style:style>
    <style:style style:name="P90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03" style:parent-style-name="Normal" style:family="paragraph">
      <style:text-properties style:font-name="Calibri"/>
    </style:style>
    <style:style style:name="P904" style:parent-style-name="Normal" style:family="paragraph">
      <style:paragraph-properties fo:text-align="center"/>
    </style:style>
    <style:style style:name="T905" style:parent-style-name="DefaultParagraphFont" style:family="text">
      <style:text-properties style:font-name="Calibri"/>
    </style:style>
    <style:style style:name="P90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907" style:parent-style-name="DefaultParagraphFont" style:family="text">
      <style:text-properties style:font-name="Calibri"/>
    </style:style>
    <style:style style:name="P908" style:parent-style-name="Normal" style:family="paragraph">
      <style:paragraph-properties fo:text-align="center"/>
    </style:style>
    <style:style style:name="T909" style:parent-style-name="DefaultParagraphFont" style:family="text">
      <style:text-properties style:font-name="Calibri"/>
    </style:style>
    <style:style style:name="P91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11" style:parent-style-name="Normal" style:family="paragraph">
      <style:text-properties style:font-name="Calibri"/>
    </style:style>
    <style:style style:name="P912" style:parent-style-name="Normal" style:family="paragraph">
      <style:paragraph-properties fo:text-align="center"/>
    </style:style>
    <style:style style:name="T913" style:parent-style-name="DefaultParagraphFont" style:family="text">
      <style:text-properties style:font-name="Calibri"/>
    </style:style>
    <style:style style:name="P91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915" style:parent-style-name="DefaultParagraphFont" style:family="text">
      <style:text-properties style:font-name="Calibri"/>
    </style:style>
    <style:style style:name="P916" style:parent-style-name="Normal" style:family="paragraph">
      <style:paragraph-properties fo:text-align="center"/>
    </style:style>
    <style:style style:name="T917" style:parent-style-name="DefaultParagraphFont" style:family="text">
      <style:text-properties style:font-name="Calibri"/>
    </style:style>
    <style:style style:name="P91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1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20" style:parent-style-name="Normal" style:family="paragraph">
      <style:paragraph-properties fo:text-align="center" fo:margin-bottom="0.1666in"/>
    </style:style>
    <style:style style:name="T921" style:parent-style-name="DefaultParagraphFont" style:family="text">
      <style:text-properties fo:font-weight="bold" style:font-weight-asian="bold" style:font-weight-complex="bold" fo:font-size="11pt" style:font-size-asian="11pt" style:font-size-complex="9pt"/>
    </style:style>
    <style:style style:name="P92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23" style:parent-style-name="Normal" style:family="paragraph">
      <style:paragraph-properties fo:text-align="center" fo:margin-bottom="0.1666in"/>
    </style:style>
    <style:style style:name="T924" style:parent-style-name="DefaultParagraphFont" style:family="text">
      <style:text-properties fo:font-weight="bold" style:font-weight-asian="bold" style:font-weight-complex="bold" fo:font-size="11pt" style:font-size-asian="11pt" style:font-size-complex="9pt"/>
    </style:style>
    <style:style style:name="P92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26" style:parent-style-name="Normal" style:family="paragraph">
      <style:paragraph-properties fo:text-align="center" fo:margin-bottom="0.1666in"/>
    </style:style>
    <style:style style:name="T927" style:parent-style-name="DefaultParagraphFont" style:family="text">
      <style:text-properties fo:font-weight="bold" style:font-weight-asian="bold" style:font-weight-complex="bold" fo:font-size="11pt" style:font-size-asian="11pt" style:font-size-complex="9pt"/>
    </style:style>
    <style:style style:name="P92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29" style:parent-style-name="Normal" style:master-page-name="MP5" style:family="paragraph">
      <style:paragraph-properties fo:break-before="page"/>
    </style:style>
    <style:style style:name="T930" style:parent-style-name="DefaultParagraphFont" style:family="text">
      <style:text-properties style:font-name="Calibri"/>
    </style:style>
    <style:style style:name="P931" style:parent-style-name="Normal" style:family="paragraph">
      <style:paragraph-properties fo:text-align="center" fo:margin-bottom="0.1666in"/>
    </style:style>
    <style:style style:name="T932" style:parent-style-name="DefaultParagraphFont" style:family="text">
      <style:text-properties fo:font-weight="bold" style:font-weight-asian="bold" style:font-weight-complex="bold" fo:font-size="11pt" style:font-size-asian="11pt" style:font-size-complex="9pt"/>
    </style:style>
    <style:style style:name="P93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34" style:parent-style-name="SBCtitle1" style:list-style-name="LFO8" style:family="paragraph">
      <style:text-properties fo:font-size="12pt" style:font-size-asian="12pt" style:font-size-complex="9pt"/>
    </style:style>
    <style:style style:name="P935" style:parent-style-name="ListParagraph" style:master-page-name="MP6" style:list-style-name="LFO8" style:family="paragraph">
      <style:paragraph-properties fo:break-before="page"/>
      <style:text-properties fo:font-weight="bold" style:font-weight-asian="bold" style:font-weight-complex="bold"/>
    </style:style>
    <style:style style:name="P936" style:parent-style-name="SBCparagraph" style:list-style-name="LFO14" style:family="paragraph">
      <style:paragraph-properties fo:margin-left="0.3937in" fo:text-indent="-0.3937in">
        <style:tab-stops/>
      </style:paragraph-properties>
    </style:style>
    <style:style style:name="T937" style:parent-style-name="DefaultParagraphFont" style:family="text">
      <style:text-properties style:font-name="Times New Roman"/>
    </style:style>
    <style:style style:name="T938" style:parent-style-name="Hyperlink" style:family="text">
      <style:text-properties style:font-name="Times New Roman"/>
    </style:style>
    <style:style style:name="T939" style:parent-style-name="DefaultParagraphFont" style:family="text">
      <style:text-properties style:font-name="Times New Roman"/>
    </style:style>
    <style:style style:name="P940" style:parent-style-name="SBCparagraph" style:list-style-name="LFO14" style:family="paragraph">
      <style:paragraph-properties fo:margin-left="0.3937in" fo:text-indent="-0.3937in">
        <style:tab-stops/>
      </style:paragraph-properties>
    </style:style>
    <style:style style:name="T941" style:parent-style-name="DefaultParagraphFont" style:family="text">
      <style:text-properties style:font-name="Times New Roman" fo:language="en" fo:country="US"/>
    </style:style>
    <style:style style:name="T942" style:parent-style-name="Hyperlink" style:family="text">
      <style:text-properties style:font-name="Times New Roman" fo:language="en" fo:country="US"/>
    </style:style>
    <style:style style:name="T943" style:parent-style-name="DefaultParagraphFont" style:family="text">
      <style:text-properties style:font-name="Times New Roman" fo:language="en" fo:country="US"/>
    </style:style>
    <style:style style:name="P944" style:parent-style-name="SBCparagraph" style:list-style-name="LFO14" style:family="paragraph">
      <style:paragraph-properties fo:margin-left="0.3937in" fo:text-indent="-0.3937in">
        <style:tab-stops/>
      </style:paragraph-properties>
    </style:style>
    <style:style style:name="T945" style:parent-style-name="DefaultParagraphFont" style:family="text">
      <style:text-properties style:font-name="Times New Roman"/>
    </style:style>
    <style:style style:name="P946" style:parent-style-name="SBCparagraph" style:list-style-name="LFO14" style:family="paragraph">
      <style:paragraph-properties fo:margin-left="0.3937in" fo:text-indent="-0.3937in">
        <style:tab-stops/>
      </style:paragraph-properties>
    </style:style>
    <style:style style:name="T947" style:parent-style-name="DefaultParagraphFont" style:family="text">
      <style:text-properties style:font-name="Times New Roman"/>
    </style:style>
    <style:style style:name="T948" style:parent-style-name="Hyperlink" style:family="text">
      <style:text-properties style:font-name="Times New Roman"/>
    </style:style>
    <style:style style:name="T949" style:parent-style-name="DefaultParagraphFont" style:family="text">
      <style:text-properties style:font-name="Times New Roman"/>
    </style:style>
    <style:style style:name="P950" style:parent-style-name="SBCparagraph" style:list-style-name="LFO14" style:family="paragraph">
      <style:paragraph-properties fo:margin-left="0.3937in" fo:text-indent="-0.3937in">
        <style:tab-stops/>
      </style:paragraph-properties>
    </style:style>
    <style:style style:name="T951" style:parent-style-name="DefaultParagraphFont" style:family="text">
      <style:text-properties style:font-name="Times New Roman" fo:language="en" fo:country="US"/>
    </style:style>
    <style:style style:name="T952" style:parent-style-name="Hyperlink" style:family="text">
      <style:text-properties style:font-name="Times New Roman" fo:language="en" fo:country="US"/>
    </style:style>
    <style:style style:name="T953" style:parent-style-name="DefaultParagraphFont" style:family="text">
      <style:text-properties style:font-name="Times New Roman" fo:language="en" fo:country="US"/>
    </style:style>
    <style:style style:name="P954" style:parent-style-name="SBCparagraph" style:list-style-name="LFO14" style:family="paragraph">
      <style:paragraph-properties fo:margin-left="0.3937in" fo:text-indent="-0.3937in">
        <style:tab-stops/>
      </style:paragraph-properties>
    </style:style>
    <style:style style:name="T955" style:parent-style-name="DefaultParagraphFont" style:family="text">
      <style:text-properties style:font-name="Times New Roman" fo:language="en" fo:country="US"/>
    </style:style>
    <style:style style:name="T956" style:parent-style-name="Hyperlink" style:family="text">
      <style:text-properties style:font-name="Times New Roman" fo:language="en" fo:country="US"/>
    </style:style>
    <style:style style:name="T957" style:parent-style-name="DefaultParagraphFont" style:family="text">
      <style:text-properties style:font-name="Times New Roman" fo:language="en" fo:country="US"/>
    </style:style>
    <style:style style:family="graphic" style:name="a50" style:parent-style-name="Graphics">
      <style:graphic-properties fo:border="0.01042in none" fo:background-color="transparent"/>
    </style:style>
    <style:style style:family="graphic" style:name="a5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2" style:parent-style-name="Graphics">
      <style:graphic-properties fo:border="0.01042in none" fo:background-color="transparent"/>
    </style:style>
    <style:style style:family="graphic" style:name="a5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style>
    <style:style style:family="graphic" style:name="a59"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1.89309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9" style:parent-style-name="Graphics">
      <style:graphic-properties fo:border="0.01042in none" fo:background-color="transparent"/>
    </style:style>
    <style:style style:family="graphic" style:name="a6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fo:clip="rect(0in, 0in, 0.08973in, 0in)"/>
    </style:style>
    <style:style style:family="graphic" style:name="a42" style:parent-style-name="Graphics">
      <style:graphic-properties fo:border="0.01042in none" fo:background-color="transparent" fo:clip="rect(0.04696in, -0.00009in, 0.02236in, 0.05459in)"/>
    </style:style>
    <style:style style:family="graphic" style:name="a4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2.20767in, 0in)"/>
    </style:style>
    <style:style style:family="graphic" style:name="a4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PROJETO 2: PRIMEIROS PASSOS PARA O PROJETO DE UM SO</text:p>
      <text:p text:style-name="SBCauthors"><text:span text:style-name="T2">Gustavo Borges Peres da Silva</text:span><text:span text:style-name="T3">1</text:span></text:p>
      <text:p text:style-name="SBCinstitution"><text:span text:style-name="T4">1</text:span><text:span text:style-name="T5">Departamento de Ciência da Computação – Universidade Federal de Catalão (UFCAT)</text:span></text:p>
      <text:p text:style-name="P6">gustavo.silva@discente.ufcat.edu.br</text:p>
      <text:p text:style-name="P7"/>
      <text:p text:style-name="SBCtitle1">Objetivos</text:p>
      <text:list text:style-name="LFO7" text:continue-numbering="true">
        <text:list-item>
          <text:p text:style-name="P8">Primeiros passos para o desenvolvimento de um SO e testes em um ambiente de máquina virtual<text:span text:style-name="T9">;</text:span></text:p>
        </text:list-item>
        <text:list-item>
          <text:p text:style-name="P10">Geração de kernels executáveis em formatos “.bin” e como ISO;</text:p>
        </text:list-item>
        <text:list-item>
          <text:p text:style-name="P11">Compreensão básica da estrutura de boot;</text:p>
        </text:list-item>
        <text:list-item>
          <text:p text:style-name="P12">Operações de I/O em tela em baixo nível.</text:p>
        </text:list-item>
      </text:list>
      <text:p text:style-name="P13"/>
      <text:list text:style-name="LFO8" text:continue-numbering="true">
        <text:list-item>
          <text:p text:style-name="P14">Tarefa 1: preparação do sistema e criação do seu primeiro kernel</text:p>
          <text:list text:continue-numbering="true">
            <text:list-item>
              <text:p text:style-name="P15">Máquina utilizada</text:p>
            </text:list-item>
          </text:list>
        </text:list-item>
      </text:list>
      <text:p text:style-name="Normal">Para este projeto, será utilizado a mesma máquina hospedeira Windows 10 apresentada no tópico “1.1 Descrição” do projeto 1, cujo a mesma possuí também um guest/convidado com a distro Debian Linux devido sua disponibilidade e licenciamento deste sistema que será utilizada para o andamento da tarefa 1, responsável por preparar o sistema e criar o primeiro kernel. Vale relembrar também, que nessa máquina possuí dois usuários (ggust e vboxuser), portanto, o usuário que iremos utilizar é o vboxuser pois possuí previlegios administrativos necessários para darmos continuidade.</text:p>
      <text:list text:style-name="LFO8" text:continue-numbering="true">
        <text:list-item>
          <text:list>
            <text:list-item>
              <text:p text:style-name="P16">Instalação de pacotes</text:p>
            </text:list-item>
          </text:list>
        </text:list-item>
      </text:list>
      <text:p text:style-name="Normal">O primeiro passo que iremos realizar nessa prática de desenvolvimento de SO é a a preparação do nosso SO Linux. Sendo assim, iremos criar um<text:s/><text:span text:style-name="T17">shell script</text:span><text:s/>para o ajuste/instalação de alguns pacotes necessários. Na tarefa não foi especificado o local de criação das pastas raizes, sendo assim, optamos por criar uma pasta chamada Projeto_2 no diretório: <text:s/>home/vboxuser/, pois isso irá nos auxiliar na navegação e deixar a estrutura do nosso projeto mais organizada. Abaixo, temos a Figura 1, para que possamos nos orientar sobre a arquitetura de organização do linux possibilitando navegar sobre os diretorios do sistema usando o comando<text:s/><text:span text:style-name="T18">cd</text:span><text:s/>e<text:s/><text:span text:style-name="T19">ls</text:span><text:s/>sem quaisquer problemas e também mostrando como foi criado a pasta utilizando-se o comando<text:s/><text:span text:style-name="T20">mkdir</text:span>.</text:p>
      <text:soft-page-break/>
      <text:p text:style-name="P21"><draw:frame draw:style-name="a0" draw:name="Picture 1" text:anchor-type="as-char" svg:x="0in" svg:y="0in" svg:width="5.43425in" svg:height="2.92864in" style:rel-width="scale" style:rel-height="scale"><draw:image xlink:href="media/image1.png" xlink:type="simple" xlink:show="embed" xlink:actuate="onLoad"/><svg:title/><svg:desc>A screenshot of a computer

Description automatically generated</svg:desc></draw:frame></text:p>
      <text:p text:style-name="P22">Figura 1: definição e criação da pasta raiz do projeto 2.</text:p>
      <text:p text:style-name="Normal">Agora iremos criar um arquivo<text:s/><text:span text:style-name="T23">setup.sh</text:span><text:s/>porém para isso, iremos utilizar o editor de texto chamado<text:s/><text:span text:style-name="T24">nano</text:span><text:s/>disponivel no linux. Portanto, para isso, entre no diretório e escreva nano para entrar no editor de texto.</text:p>
      <text:p text:style-name="P25"><draw:frame draw:style-name="a1" draw:name="Picture 1" text:anchor-type="as-char" svg:x="0in" svg:y="0in" svg:width="5.52909in" svg:height="0.81337in" style:rel-width="scale" style:rel-height="scale"><draw:image xlink:href="media/image2.png" xlink:type="simple" xlink:show="embed" xlink:actuate="onLoad"/><svg:title/><svg:desc>A close-up of a computer screen

Description automatically generated</svg:desc></draw:frame></text:p>
      <text:p text:style-name="P26">Figura 2: nano editor.</text:p>
      <text:p text:style-name="Normal">Agora iremos colar o código fornecido pelo professor (Codigo 1), que se trata de várias linhas de comandos que irão realizar o ajuste ou instalação de alguns pacotes necessários para esta prática de laboratório.</text:p>
      <text:p text:style-name="P27"><text:span text:style-name="T28"><draw:frame draw:id="id0" draw:style-name="a2" draw:name="Text Box 2" text:anchor-type="as-char" svg:x="0in" svg:y="0in" svg:width="2.54375in" svg:height="1.53542in" style:rel-width="scale" style:rel-height="scale"><draw:text-box><text:p text:style-name="P29">#!/bin/sh</text:p><text:p text:style-name="P30">sudo apt-get update</text:p><text:p text:style-name="P31">sudo apt-get install xorriso</text:p><text:p text:style-name="P32">sudo apt-get install grub-common</text:p><text:p text:style-name="P33">sudo apt-get install grub2-common</text:p><text:p text:style-name="P34">sudo apt-get install grub-pc</text:p><text:p text:style-name="P35">sudo apt-get install gcc</text:p><text:p text:style-name="P36">sudo apt-get install nasm</text:p><text:p text:style-name="P37">sudo apt-get install virtualbox</text:p><text:p text:style-name="P38">sudo apt-get install qemu</text:p><text:p text:style-name="P39">sudo apt-get install gedit #opcional</text:p></draw:text-box><svg:title/><svg:desc/></draw:frame></text:span></text:p>
      <text:p text:style-name="P40">Código 1 – Conteúdo do arquivo script setup.sh.</text:p>
      <text:soft-page-break/>
      <text:p text:style-name="P41"><draw:frame draw:style-name="a3" draw:name="Picture 1" text:anchor-type="as-char" svg:x="0in" svg:y="0in" svg:width="4.18202in" svg:height="2.08806in" style:rel-width="scale" style:rel-height="scale"><draw:image xlink:href="media/image3.png" xlink:type="simple" xlink:show="embed" xlink:actuate="onLoad"/><svg:title/><svg:desc>A screenshot of a computer

Description automatically generated</svg:desc></draw:frame></text:p>
      <text:p text:style-name="P42">Figura 3 – Criação do arquivo setup.sh via nano.</text:p>
      <text:p text:style-name="Normal">Para salvar iremos utilizar o comando<text:s/><text:span text:style-name="T43">ctrl+x</text:span><text:s/>(Figura 4) dentro do editor nano, isso irá fazer o nano fechar, porém ele te avisa que o arquivo não foi salvo pois estamos criando um buffer novo, sendo assim, digite<text:s/><text:span text:style-name="T44">Y</text:span><text:s/>(Figura – 5) para salvar as modificações do buffer.</text:p>
      <text:p text:style-name="P45"><draw:frame draw:style-name="a4" draw:name="Picture 1" text:anchor-type="as-char" svg:x="0in" svg:y="0in" svg:width="4.74229in" svg:height="0.39092in" style:rel-width="scale" style:rel-height="scale"><draw:image xlink:href="media/image4.png" xlink:type="simple" xlink:show="embed" xlink:actuate="onLoad"/><svg:title/><svg:desc/></draw:frame></text:p>
      <text:p text:style-name="P46">Figura 4 – Salvando o arquivo setup.sh via nano parte 1.</text:p>
      <text:p text:style-name="P47"><draw:frame draw:style-name="a5" draw:name="Picture 1" text:anchor-type="as-char" svg:x="0in" svg:y="0in" svg:width="2.98959in" svg:height="1.96652in" style:rel-width="scale" style:rel-height="scale"><draw:image xlink:href="media/image5.png" xlink:type="simple" xlink:show="embed" xlink:actuate="onLoad"/><svg:title/><svg:desc>A screenshot of a computer

Description automatically generated</svg:desc></draw:frame></text:p>
      <text:p text:style-name="P48">Figura 5 – Salvando o arquivo setup.sh via nano parte 2.</text:p>
      <text:p text:style-name="Normal">Agora será solicitado para que seja escrito o nome do arquivo, e conforme combinamos, iremos escrever<text:s/><text:span text:style-name="T49">setup.sh</text:span>, após isso basta pressionar<text:s/><text:span text:style-name="T50">enter</text:span><text:s/>para concluir.</text:p>
      <text:p text:style-name="P51"><draw:frame draw:style-name="a6" draw:name="Picture 1" text:anchor-type="as-char" svg:x="0in" svg:y="0in" svg:width="4.17404in" svg:height="1.96647in" style:rel-width="scale" style:rel-height="scale"><draw:image xlink:href="media/image6.png" xlink:type="simple" xlink:show="embed" xlink:actuate="onLoad"/><svg:title/><svg:desc>A screenshot of a computer

Description automatically generated</svg:desc></draw:frame></text:p>
      <text:p text:style-name="P52">Figura 6 – Salvando o arquivo setup.sh via nano parte 3.</text:p>
      <text:soft-page-break/>
      <text:p text:style-name="Normal">E por ultimo verifique se o script foi criado corretamente usando o comando<text:s/><text:span text:style-name="T53">ls</text:span><text:s/>visto anteriormente.</text:p>
      <text:p text:style-name="P54"><draw:frame draw:style-name="a7" draw:name="Picture 1" text:anchor-type="as-char" svg:x="0in" svg:y="0in" svg:width="4.35705in" svg:height="0.96288in" style:rel-width="scale" style:rel-height="scale"><draw:image xlink:href="media/image7.png" xlink:type="simple" xlink:show="embed" xlink:actuate="onLoad"/><svg:title/><svg:desc>A screenshot of a computer

Description automatically generated</svg:desc></draw:frame></text:p>
      <text:p text:style-name="P55">Figura 7 – setup.sh criado.</text:p>
      <text:p text:style-name="Normal">Agora iremos verificar as propriedades de<text:s/><text:span text:style-name="T56">leitura</text:span><text:span text:style-name="T57">/escrita/execução</text:span><text:span text:style-name="T58"><text:s/>do nosso arquivo script para que o shell script possa ser executado, sendo assim, utilizaremos o comando ls -l setup.sh para exibir as informações detalhadas sobre o nosso arquivo.</text:span></text:p>
      <text:p text:style-name="P59"><draw:frame draw:style-name="a8" draw:name="Picture 1" text:anchor-type="as-char" svg:x="0in" svg:y="0in" svg:width="4.67725in" svg:height="0.74966in" style:rel-width="scale" style:rel-height="scale"><draw:image xlink:href="media/image8.png" xlink:type="simple" xlink:show="embed" xlink:actuate="onLoad"/><svg:title/><svg:desc>A screenshot of a computer

Description automatically generated</svg:desc></draw:frame></text:p>
      <text:p text:style-name="P60">Figura 8 – Verificando permissões do setup.sh.</text:p>
      <text:p text:style-name="Normal"><text:span text:style-name="T61"><text:s/>Neste caso,<text:s/></text:span><text:span text:style-name="T62">-rw-r--r--</text:span><text:span text:style-name="T63"><text:s/>é uma sequência de caracteres que representa as permissões do arquivo para o proprietário, grupo e outros, respectivamente.</text:span></text:p>
      <text:list text:style-name="LFO9" text:continue-numbering="true">
        <text:list-item>
          <text:p text:style-name="P64">O primeiro caractere (-) indica que é um arquivo regular.</text:p>
        </text:list-item>
        <text:list-item>
          <text:p text:style-name="P65">Os três caracteres seguintes (rw-) indicam que o proprietário (vboxuser) tem permissão de leitura e escrita, mas não de execução.</text:p>
        </text:list-item>
        <text:list-item>
          <text:p text:style-name="P66">Os três caracteres seguintes (r--) indicam que o grupo (também vboxuser) tem permissão apenas de leitura.</text:p>
        </text:list-item>
        <text:list-item>
          <text:p text:style-name="P67">Os últimos três caracteres (r--) indicam que outros usuários também têm permissão apenas de leitura.</text:p>
        </text:list-item>
      </text:list>
      <text:p text:style-name="Normal"><text:span text:style-name="T68">Sendo assim, para atribuirmos permissão de<text:s/></text:span><text:span text:style-name="T69">execução</text:span><text:span text:style-name="T70"><text:s/>será utilizado o comando<text:s/></text:span><text:span text:style-name="T71">chmod +rwx setup.sh</text:span><text:span text:style-name="T72"><text:s/>para o ajuste de maneira apropriada para que possamos executar o shell script sem problemas.</text:span></text:p>
      <text:p text:style-name="P73"><draw:frame draw:style-name="a9" draw:name="Picture 1" text:anchor-type="as-char" svg:x="0in" svg:y="0in" svg:width="3.58527in" svg:height="1.15758in" style:rel-width="scale" style:rel-height="scale"><draw:image xlink:href="media/image9.png" xlink:type="simple" xlink:show="embed" xlink:actuate="onLoad"/><svg:title/><svg:desc>A screenshot of a computer program

Description automatically generated</svg:desc></draw:frame></text:p>
      <text:p text:style-name="P74">Figura 9 – Atribuição de permissões para o setup.sh.</text:p>
      <text:p text:style-name="Normal">Agora o arquivo setup.sh tem permissões de leitura, escrita e execução para o usuário vboxuser. Isso é representado pela sequência de caracteres -rwxr-xr-x.</text:p>
      <text:list text:style-name="LFO10" text:continue-numbering="true">
        <text:list-item>
          <text:p text:style-name="P75">O primeiro conjunto de caracteres (rwx) indica as permissões para o proprietário (vboxuser): leitura, escrita e execução.</text:p>
        </text:list-item>
        <text:list-item>
          <text:p text:style-name="P76">O segundo conjunto de caracteres (r-x) indica as permissões para o grupo (também vboxuser): leitura e execução.</text:p>
        </text:list-item>
        <text:list-item>
          <text:p text:style-name="P77">O terceiro conjunto de caracteres (r-x) indica as permissões para outros usuários: leitura e execução.</text:p>
        </text:list-item>
      </text:list>
      <text:p text:style-name="Normal">Agora com as permissões atribuidas, vamos executar o script (Figura 10).</text:p>
      <text:p text:style-name="P78"><draw:frame draw:style-name="a10" draw:name="Picture 1" text:anchor-type="as-char" svg:x="0in" svg:y="0in" svg:width="3.77659in" svg:height="1.10957in" style:rel-width="scale" style:rel-height="scale"><draw:image xlink:href="media/image10.png" xlink:type="simple" xlink:show="embed" xlink:actuate="onLoad"/><svg:title/><svg:desc>A screenshot of a computer

Description automatically generated</svg:desc></draw:frame></text:p>
      <text:p text:style-name="P79">Figura 10 – Executando o setup.sh.</text:p>
      <text:p text:style-name="Normal">Ap<text:span text:style-name="T80">ós instalar tudo, em nosso caso, tivemos<text:s/></text:span><text:span text:style-name="T81">dois erros</text:span><text:span text:style-name="T82">. O primeiro foi para instalar o qemu pois devido a distro utilizada o comando para instalar não seria o mesmo fornecido pelo professor, sendo assim, tivemos de modificar 1 linha do script para conseguir instalar o qemu, a modificação foi:<text:s/></text:span><text:span text:style-name="T83">sudo apt-get install qemu-system</text:span><text:span text:style-name="T84">. O segundo erro foi para instalar o virtualbox, pois no debian possuí algumas limitações, sendo assim, tivemos que instalar usando o repositório oficial do virtualbox através da inclusão do repositorio manualmente e chave GPG do Oracle para garantir a autenticidade dos pacotes.<text:s/></text:span></text:p>
      <text:p text:style-name="P85">Além disso, no script também será necessário realizar a modificação da linha de instalação do virtualbox, pois ao executar o script normalmente, o sistema irá informar que existem algumas versões disponiveis, em nosso caso optamos por utilizar virtualbox-7.0. Após realizar tudo isso, basta executar o script novamente com as alterações realizadas (Codigo 2).<text:s/></text:p>
      <text:p text:style-name="P86">Segue abaixo os codigós utilizados para adicionar repositorio e chave de autenticação do virtualbox:</text:p>
      <text:p text:style-name="P87"><text:span text:style-name="T88"><draw:frame draw:id="id1" draw:style-name="a11" draw:name="Text Box 2" text:anchor-type="as-char" svg:x="0in" svg:y="0in" svg:width="6.41528in" svg:height="1.53542in" style:rel-width="scale" style:rel-height="scale"><draw:text-box><text:p text:style-name="P89">#!/bin/sh</text:p><text:p text:style-name="P90">sudo sh -c 'echo "deb [arch=amd64] http://download.virtualbox.org/virtualbox/debian bookworm contrib" &gt; /etc/apt/sources.list.d/virtualbox.list'</text:p><text:p text:style-name="P91">wget -q https://www.virtualbox.org/download/oracle_vbox_2016.asc -O- | sudo apt-key add -</text:p><text:p text:style-name="P92">sudo apt-get update</text:p><text:p text:style-name="P93">sudo apt-get install xorriso</text:p><text:p text:style-name="P94">sudo apt-get install grub-common</text:p><text:p text:style-name="P95">sudo apt-get install grub2-common</text:p><text:p text:style-name="P96">sudo apt-get install grub-pc</text:p><text:p text:style-name="P97">sudo apt-get install gcc</text:p><text:p text:style-name="P98">sudo apt-get install nasm</text:p><text:p text:style-name="P99">sudo apt-get install virtualbox-7.0</text:p><text:p text:style-name="P100">sudo apt-get install qemu-system</text:p><text:p text:style-name="P101">sudo apt-get install gedit #opcional</text:p></draw:text-box><svg:title/><svg:desc/></draw:frame></text:span></text:p>
      <text:p text:style-name="P102">Código 2 – Atualização do script setup.sh.</text:p>
      <text:soft-page-break/>
      <text:list text:style-name="LFO8" text:continue-numbering="true">
        <text:list-item>
          <text:list>
            <text:list-item>
              <text:p text:style-name="P103">Preparação do projeto<text:s/></text:p>
            </text:list-item>
          </text:list>
        </text:list-item>
      </text:list>
      <text:p text:style-name="Normal">A seguir iremos criar uma pasta chamada “so” e iremos prepara-la para o projeto.<text:s/></text:p>
      <text:p text:style-name="P104"><draw:frame draw:style-name="a12" draw:name="Picture 1" text:anchor-type="as-char" svg:x="0in" svg:y="0in" svg:width="3.55914in" svg:height="0.65876in" style:rel-width="scale" style:rel-height="scale"><draw:image xlink:href="media/image11.png" xlink:type="simple" xlink:show="embed" xlink:actuate="onLoad"/><svg:title/><svg:desc>A close-up of a computer code

Description automatically generated</svg:desc></draw:frame></text:p>
      <text:p text:style-name="P105">Figura 11 – Criar pasta “so”.</text:p>
      <text:p text:style-name="P106">Nesta pasta será criado vários arquivos utilizando-se os mesmos passos das figuras [2-7]. Vale ressaltar que, ao decorrer do nosso relatório, iremos apresentar cada parte da criação dos arquivos, portanto, dentre os arquivos mencionados, temos:</text:p>
      <text:list text:style-name="LFO11" text:continue-numbering="true">
        <text:list-item>
          <text:p text:style-name="P107"><text:span text:style-name="T108">Criação do arquivo<text:s/></text:span><text:span text:style-name="T109">kernel.asm</text:span><text:span text:style-name="T110">. Que será o ponto de entrada nosso (entry point) do kernel do SO que está sendo criado.</text:span></text:p>
        </text:list-item>
        <text:list-item>
          <text:p text:style-name="P111"><text:span text:style-name="T112">Criação do arquivo<text:s/></text:span><text:span text:style-name="T113">kernel.c</text:span><text:span text:style-name="T114"><text:s/>e<text:s/></text:span><text:span text:style-name="T115">link.ld</text:span><text:span text:style-name="T116">. Cujo o arquivo kernel é destinada a ser executada no inicio do kernel do sistema operacional e o “link.ld” que servirá para realizar a união dos arquivos binários gerados pela compilação do do “kernel.c”.</text:span></text:p>
        </text:list-item>
        <text:list-item>
          <text:p text:style-name="P117"><text:span text:style-name="T118">Criação de um shell script chamado<text:s/></text:span><text:span text:style-name="T119">build.sh</text:span><text:span text:style-name="T120"><text:s/>utilizando-se os mesmos procedimentos das Figuras [8 e 9]. Que será um script facilitador para as operações de compilações e combinações que iremos realizar.</text:span></text:p>
        </text:list-item>
        <text:list-item>
          <text:p text:style-name="P121"><text:span text:style-name="T122"><text:s/>Criação de um arquivo<text:s/></text:span><text:span text:style-name="T123">grub.cfg</text:span><text:span text:style-name="T124">. Que será o nosso gerenciador de inicialização do nosso sistema operacional.</text:span></text:p>
        </text:list-item>
        <text:list-item>
          <text:p text:style-name="P125"><text:span text:style-name="T126">Criação de um arquivo<text:s/></text:span><text:span text:style-name="T127">simple.iso</text:span><text:span text:style-name="T128">. Que será a nossa imagem gerada do nosso sistema operacional para testarmos posteriormente na maquina virtual.</text:span></text:p>
        </text:list-item>
      </text:list>
      <text:p text:style-name="P129">Antes de continuarmos, no presente momento é interessante entendermos algumas contextualizações, sendo assim, o bootloader é um pequeno pedaço de código que fica no início do disco e tem a função de iniciar o sistema operacional. Ele aponta para um local específico onde o código do sistema operacional (SO) começa. Esse local específico é conhecido como o ponto de entrada do kernel.</text:p>
      <text:p text:style-name="P130">O kernel é a parte principal do sistema operacional e é dividido em duas partes: a primeira parte é o ponto de entrada, que precisa estar em um local específico na memória. Esse ponto de entrada indica onde o código real do kernel começa. Então, simplificadamente, temos uma sequência como esta: bootloader → kernel.asm → kernel.c.</text:p>
      <text:p text:style-name="P131">Os arquivos mencionados, como kernel.asm e kernel.c, são simplesmente arquivos de texto contendo o código-fonte do kernel. Para transformá-los em algo que o computador pode executar, precisamos inserir código nesses arquivos e depois compilá-los usando as ferramentas apropriadas. A compilação é o processo de transformar o código-fonte em código executável que o computador pode entender e executar.</text:p>
      <text:p text:style-name="Normal"><text:span text:style-name="T132">Agora que resumimos, contextualizamos, vamos apresentar os arquivos que iremos criar e explica-los o que cada um faz, de inicio,<text:s/></text:span><text:span text:style-name="T133">iremos iniciar primeiro</text:span><text:span text:style-name="T134"><text:s/>com a criação do arquivo<text:s/></text:span><text:span text:style-name="T135">kernel.asm</text:span><text:span text:style-name="T136"><text:s/>conforme o Codigo 3.</text:span></text:p>
      <text:soft-page-break/>
      <text:p text:style-name="P137"><text:span text:style-name="T138"><draw:frame draw:id="id2" draw:style-name="a13" draw:name="Text Box 2" text:anchor-type="as-char" svg:x="0in" svg:y="0in" svg:width="2.775in" svg:height="2.57014in" style:rel-width="scale" style:rel-height="scale"><draw:text-box><text:p text:style-name="P139">bits 32</text:p><text:p text:style-name="P140">section <text:s text:c="8"/>.text</text:p><text:p text:style-name="P141"><text:s text:c="16"/>align 4</text:p><text:p text:style-name="P142"><text:s text:c="16"/>dd 0x1BADB002</text:p><text:p text:style-name="P143"><text:s text:c="16"/>dd 0x00</text:p><text:p text:style-name="P144"><text:s text:c="16"/>dd - (0x1BADB002+0x00)</text:p><text:p text:style-name="P145"/><text:p text:style-name="P146">global <text:s text:c="9"/>start</text:p><text:p text:style-name="P147">extern <text:s text:c="9"/>kmain</text:p><text:p text:style-name="P148">start:</text:p><text:p text:style-name="P149"><text:s text:c="8"/>cli</text:p><text:p text:style-name="P150"><text:s text:c="8"/>call kmain</text:p><text:p text:style-name="P151"><text:s text:c="8"/>hlt</text:p></draw:text-box><svg:title/><svg:desc/></draw:frame></text:span></text:p>
      <text:p text:style-name="P152">Código 3 – Conteúdo do arquivo kernel.asm.</text:p>
      <text:p text:style-name="Normal">Além disso, iremos criar outros dois arquivos, o kernel.c e link.ld conforme os codigos abaixo (Codigo 4 e 5).</text:p>
      <text:p text:style-name="P153"><text:span text:style-name="T154"><draw:frame draw:id="id3" draw:style-name="a14" draw:name="Text Box 2" text:anchor-type="as-char" svg:x="0in" svg:y="0in" svg:width="4.69514in" svg:height="2.57014in" style:rel-width="scale" style:rel-height="scale"><draw:text-box><text:p text:style-name="P155">kmain()</text:p><text:p text:style-name="P156">{</text:p><text:p text:style-name="P157">char *vidmem = (char*) 0xb8000;</text:p><text:p text:style-name="P158">vidmem[0] = 'X';</text:p><text:p text:style-name="P159">vidmem[1] = 0x02; /* cor do caractere: verde */</text:p><text:p text:style-name="P160">}</text:p></draw:text-box><svg:title/><svg:desc/></draw:frame></text:span></text:p>
      <text:p text:style-name="P161">Código 4 – Conteúdo do arquivo kernel.c.</text:p>
      <text:p text:style-name="P162"><text:span text:style-name="T163"><draw:frame draw:id="id4" draw:style-name="a15" draw:name="Text Box 2" text:anchor-type="as-char" svg:x="0in" svg:y="0in" svg:width="4.69514in" svg:height="2.57014in" style:rel-width="scale" style:rel-height="scale"><draw:text-box><text:p text:style-name="P164">OUTPUT_FORMAT(elf32-i386)</text:p><text:p text:style-name="P165">ENTRY(start)</text:p><text:p text:style-name="P166">SECTIONS</text:p><text:p text:style-name="P167">{</text:p><text:p text:style-name="P168">. = 0x100000;</text:p><text:p text:style-name="P169">.text : { *(.text) }</text:p><text:p text:style-name="P170">.data : { *(.data) }</text:p><text:p text:style-name="P171">.bss : { *(.bss) }</text:p><text:p text:style-name="P172">}</text:p></draw:text-box><svg:title/><svg:desc/></draw:frame></text:span></text:p>
      <text:p text:style-name="P173">Código 5 – Conteúdo do arquivo link.ld.</text:p>
      <text:p text:style-name="P174"><text:span text:style-name="T175"><draw:frame draw:style-name="a16" draw:name="Picture 1" text:anchor-type="as-char" svg:x="0in" svg:y="0in" svg:width="3.08269in" svg:height="0.63009in" style:rel-width="scale" style:rel-height="scale"><draw:image xlink:href="media/image12.png" xlink:type="simple" xlink:show="embed" xlink:actuate="onLoad"/><svg:title/><svg:desc>A screenshot of a computer screen

Description automatically generated</svg:desc></draw:frame></text:span></text:p>
      <text:p text:style-name="P176">Figura 12 – Visão geral da criação dos arquivos mostrados.</text:p>
      <text:p text:style-name="Normal"><text:span text:style-name="T177">No código 3 (conteudo<text:s/></text:span><text:span text:style-name="T178">kernel.asm</text:span><text:span text:style-name="T179">)</text:span><text:span text:style-name="T180">, é importante saber que:</text:span></text:p>
      <text:list text:style-name="LFO12" text:continue-numbering="true">
        <text:list-item>
          <text:p text:style-name="P181">O bits 32 não é uma instrução em Assembly. É uma diretiva para o NASM assembler que especifica que este deve gerar código para ser executado em<text:s/><text:soft-page-break/>um processador em modo de 32 bits. Não é obrigatório no exemplo, mas é incluído como parte da boa prática de ser explícito;</text:p>
        </text:list-item>
        <text:list-item>
          <text:p text:style-name="P182"><text:span text:style-name="T183">A<text:s/></text:span><text:span text:style-name="T184">segunda linha</text:span><text:span text:style-name="T185"><text:s/>(section .text) inicia a seção de texto (a.k.a seção de código). Aqui é onde se coloca todo o código. Estes são definidos usando-se a diretiva dd;</text:span></text:p>
        </text:list-item>
        <text:list-item>
          <text:p text:style-name="P186"><text:span text:style-name="T187">A partir da<text:s/></text:span><text:span text:style-name="T188">terceira linha</text:span><text:span text:style-name="T189">, são inseridas especificações para que se possa utilizar o GRUB (GRand Unifield Bootloader), por isso o kernel é criado com suporte a multiboot. De acordo com a especificação, o kernel deve conter um cabeçalho nos primeiros 8 KB. Além disso, o cabeçalho deverá possuir três campos que estão alinhados em 4 bytes (align 4);</text:span></text:p>
        </text:list-item>
        <text:list-item>
          <text:p text:style-name="P190"><text:span text:style-name="T191">0x1BADB002 é o chamado “número mágico” (</text:span><text:span text:style-name="T192">magic number</text:span><text:span text:style-name="T193">). Este é o número que o bootloader deve encontrar para se assegurar que este é um SO que aceita multi boot.</text:span></text:p>
        </text:list-item>
        <text:list-item>
          <text:p text:style-name="P194"><text:span text:style-name="T195">O próximo campo é destinado a<text:s/></text:span><text:span text:style-name="T196">flags</text:span><text:span text:style-name="T197"><text:s/>e será ignorado (dd 0x00);</text:span></text:p>
        </text:list-item>
        <text:list-item>
          <text:p text:style-name="P198"><text:span text:style-name="T199">O último campo é o<text:s/></text:span><text:span text:style-name="T200">checksum</text:span><text:span text:style-name="T201">. Este, ao ser somado ao campo de magic number e flags, deve dar 0.</text:span></text:p>
        </text:list-item>
        <text:list-item>
          <text:p text:style-name="P202"><text:span text:style-name="T203">Será criada uma função chamada<text:s/></text:span><text:span text:style-name="T204">start</text:span><text:span text:style-name="T205">. Esta função é definida como global para que possa ser acessada usando-se o<text:s/></text:span><text:span text:style-name="T206">linker</text:span><text:span text:style-name="T207">. A execução desta função será iniciada com o linker.</text:span></text:p>
        </text:list-item>
        <text:list-item>
          <text:p text:style-name="P208"><text:span text:style-name="T209">Por último é criada uma nova função externa chamada<text:s/></text:span><text:span text:style-name="T210">kmain</text:span><text:span text:style-name="T211">, a qual estará em kernel.c.</text:span></text:p>
        </text:list-item>
        <text:list-item>
          <text:p text:style-name="P212"><text:span text:style-name="T213">Na função<text:s/></text:span><text:span text:style-name="T214">start</text:span><text:span text:style-name="T215">, a primeira linha<text:s/></text:span><text:span text:style-name="T216">cli</text:span><text:span text:style-name="T217">, limpa as interrupções. Neste contexto, as interrupções são alguns serviços oferecidos pela BIOS, os quais realizam algumas operações básicas, como mapeamentos para a tela, rastreamento de teclado etc. Ao passar para o modo de 32 bits, ou modo protegido, não é mais possível usar estes serviços. Assim, é necessário limpar as interrupções, já que estas não serão usadas novamente, e assim, liberar espaço para o código C que será carregado em seguida.</text:span></text:p>
        </text:list-item>
        <text:list-item>
          <text:p text:style-name="P218"><text:span text:style-name="T219">A linha<text:s/></text:span><text:span text:style-name="T220">call kmain</text:span><text:span text:style-name="T221"><text:s/>manda o processador continuar sua execução na função kmain, a qual será definida em kernel.c.</text:span></text:p>
        </text:list-item>
        <text:list-item>
          <text:p text:style-name="P222"><text:span text:style-name="T223">A última linha<text:s/></text:span><text:span text:style-name="T224">hlt</text:span><text:span text:style-name="T225">, “pausa” a execução da CPU considerando o endereço corrente.</text:span></text:p>
        </text:list-item>
      </text:list>
      <text:p text:style-name="Normal">Portanto, esse trecho de código em Assembly serve para<text:s/><text:span text:style-name="T226">chamar uma função externa</text:span><text:s/>escrita em C e, em seguida,<text:s/><text:span text:style-name="T227">interromper o fluxo</text:span><text:s/>do programa. Para garantir que isso funcione conforme o esperado, será utilizado um<text:s/><text:span text:style-name="T228">script de ligação</text:span><text:s/>posteriormente. Esse<text:s/><text:span text:style-name="T229">script vincula os arquivos</text:span><text:s/>objeto para criar o executável final do kernel. No script de ligação (codigo 5), especificaremos explicitamente que queremos que o arquivo binário seja carregado no endereço 0x100000, onde esperamos que o kernel seja armazenado. O bootloader será responsável por iniciar o ponto de entrada do kernel.</text:p>
      <text:p text:style-name="Normal">Agora, só precisamos implementar a função<text:s/><text:span text:style-name="T230">kmain</text:span><text:s/>no arquivo kernel.c (Código 4). Essa função irá<text:s/><text:span text:style-name="T231">imprimir um caractere</text:span><text:s/>na tela do computador ('X' na<text:s/><text:span text:style-name="T232">cor verde</text:span>) para demonstrar que nosso código está<text:s/><text:span text:style-name="T233">funcionando</text:span>. Além disso, estamos<text:span text:style-name="T234"><text:s/>focando na<text:s/></text:span><text:soft-page-break/><text:span text:style-name="T235">compilação e na geração dos arquivos necessários</text:span><text:s/>para um boot real do nosso futuro sistema operacional (<text:span text:style-name="T236">muito simples</text:span>). Neste momento, podemos considerar que temos um sistema operacional funcional.</text:p>
      <text:p text:style-name="Normal">E agora iremos criar um arquivo shell script chamado build.sh (codigo 6) e atribuir permissões de leitura, gravação e execução utilizando os mesmos passos realizados anteriormente (Figura 13).</text:p>
      <text:p text:style-name="P237"><text:span text:style-name="T238"><draw:frame draw:id="id5" draw:style-name="a17" draw:name="Text Box 2" text:anchor-type="as-char" svg:x="0in" svg:y="0in" svg:width="4.69514in" svg:height="2.57014in" style:rel-width="scale" style:rel-height="scale"><draw:text-box><text:p text:style-name="P239">#!/bin/sh</text:p><text:p text:style-name="P240">nasm -f elf32 kernel.asm -o kasm.o</text:p><text:p text:style-name="P241">gcc -m32 -c -w kernel.c -o kc.o</text:p><text:p text:style-name="P242">ld -m elf_i386 -T link.ld -o kernel.bin kasm.o kc.o</text:p></draw:text-box><svg:title/><svg:desc/></draw:frame></text:span></text:p>
      <text:p text:style-name="P243">Código 6 – Conteúdo do arquivo build.sh.</text:p>
      <text:p text:style-name="P244"><draw:frame draw:style-name="a18" draw:name="Picture 1" text:anchor-type="as-char" svg:x="0in" svg:y="0in" svg:width="4.09314in" svg:height="1.56in" style:rel-width="scale" style:rel-height="scale"><draw:image xlink:href="media/image13.png" xlink:type="simple" xlink:show="embed" xlink:actuate="onLoad"/><svg:title/><svg:desc>A screenshot of a computer program

Description automatically generated</svg:desc></draw:frame><text:span text:style-name="T245"><text:s/></text:span></text:p>
      <text:p text:style-name="P246">Figura 13 – Visão geral da configuração do script build.sh.</text:p>
      <text:p text:style-name="Normal">Por outro lado, para conseguirmos compilar este código, será necessário compilar inicialmente o código<text:s/><text:span text:style-name="T247">kernel.asm</text:span>, o qual representa o<text:s/><text:span text:style-name="T248">ponto de entrada</text:span><text:s/>de nosso kernel. Na<text:s/><text:span text:style-name="T249">sequência</text:span>, também precisamos<text:s/><text:span text:style-name="T250">compilar o arquivo kernel.c</text:span>, o qual será indicado para execução a partir do código kernel.asm.<text:s/><text:span text:style-name="T251">Após se compilar</text:span><text:s/>estes dois arquivos, iremos<text:s/><text:span text:style-name="T252">combiná-los</text:span>, com o intuito de se<text:s/><text:span text:style-name="T253">construir um binário final para execução</text:span>.<text:s/></text:p>
      <text:p text:style-name="Normal">Portanto, para iniciarmos a compilação destes códigos, iremos executar o script apresentado no código 6. Sendo assim, abra o terminal no diretório correspondente e execute o script conforme Figura 14.</text:p>
      <text:p text:style-name="P254"><draw:frame draw:style-name="a19" draw:name="Picture 1" text:anchor-type="as-char" svg:x="0in" svg:y="0in" svg:width="5.30238in" svg:height="0.72515in" style:rel-width="scale" style:rel-height="scale"><draw:image xlink:href="media/image14.png" xlink:type="simple" xlink:show="embed" xlink:actuate="onLoad"/><svg:title/><svg:desc>A close up of a text

Description automatically generated</svg:desc></draw:frame></text:p>
      <text:p text:style-name="P255">Figura 14 – build.sh executado com a presença de anotações e avisos.</text:p>
      <text:p text:style-name="P256">Como podemos observar, tivemos 2 avisos e uma nota, sendo assim explicaremos abaixo cada uma delas:</text:p>
      <text:list text:style-name="LFO13" text:continue-numbering="true">
        <text:list-item>
          <text:p text:style-name="P257"><text:span text:style-name="T258">“</text:span><text:span text:style-name="T259">ld:<text:s/></text:span><text:span text:style-name="T260">warning</text:span><text:span text:style-name="T261">: kasm.o: missing .note.GNU-stack section implies executable stack</text:span><text:span text:style-name="T262">”: este aviso indica que o objeto kasm.o do nosso código em assembly não possui uma seção chamada .note.GNU-stack. Essa seção geralmente é usada para indicar ao sistema operacional se a pilha de execução é executável ou não. Apesar de ser um aviso, isso geralmente não é um problema significativo porém de acordo com o blog da Red Hat, o Nick Clifton<text:s/></text:span><text:span text:style-name="T263"><text:bookmark-ref text:ref-name="_Ref152810935" text:reference-format="text">[2]</text:bookmark-ref></text:span><text:span text:style-name="T264"><text:s/></text:span><text:span text:style-name="T265">disse que se trata de avisos para alertar desenvolvedores quando as condições de<text:s/></text:span><text:soft-page-break/><text:span text:style-name="T266">segurança não estão em vigor, essas condições seriam no caso de certificar-se de que nem a pilha nem o segmento de dados possam conter o código e que o segmento de código não possa ser modificado.</text:span></text:p>
        </text:list-item>
        <text:list-item>
          <text:p text:style-name="P267"><text:span text:style-name="T268">“</text:span><text:span text:style-name="T269">ld:<text:s/></text:span><text:span text:style-name="T270">NOTE</text:span><text:span text:style-name="T271">: This behaviour is deprecated and will be removed in a future version of the linker</text:span><text:span text:style-name="T272">”: : Esta nota indica que o comportamento anterior (referente à pilha executável mencionada no aviso anterior) está obsoleto e será removido em versões futuras do linker (ld). Isso significa que futuras versões do linker podem não emitir mais esse aviso<text:s/></text:span><text:span text:style-name="T273"><text:bookmark-ref text:ref-name="_Ref152812278" text:reference-format="text">[4]</text:bookmark-ref></text:span><text:span text:style-name="T274">.</text:span></text:p>
        </text:list-item>
        <text:list-item>
          <text:p text:style-name="P275"><text:span text:style-name="T276">ld:<text:s/></text:span><text:span text:style-name="T277">warning</text:span><text:span text:style-name="T278">: kernel.bin has a LOAD segment with RWX permissions</text:span><text:span text:style-name="T279">: quando carregado na memória, um programa é normalmente dividido em diferentes segmentos. Um para código, um para dados e talvez alguns outros para vários usos especiais. Os segmentos têm atributos como leitura, gravação e executável e se eles têm todos os três, então eles são vulneráveis ao ataque. Então, nesses casos, o linker irá produzir esse aviso<text:s/></text:span><text:span text:style-name="T280"><text:bookmark-ref text:ref-name="_Ref152810935" text:reference-format="text">[2]</text:bookmark-ref></text:span><text:span text:style-name="T281">.</text:span></text:p>
        </text:list-item>
      </text:list>
      <text:p text:style-name="P282">Conquanto, após rodarmos o script, foi criado mais outros 3 arquivos resultantes dessa compilação (Figura 15). Além disso, sobre os avisos deu a entender que basicamente foi criado um arquivo kernel.bin cujo o mesmo possuí permissões rwx (leitura, gravação e execução) e de acordo com o aviso isso significa que são arquivos vulneraveis à ataques porém não precisamos nos preocupar com isto, iremos prosseguir normalmente com o procedimento.</text:p>
      <text:p text:style-name="P283"><text:span text:style-name="T284"><draw:frame draw:style-name="a20" draw:name="Picture 1" text:anchor-type="as-char" svg:x="0in" svg:y="0in" svg:width="4.90994in" svg:height="0.99942in" style:rel-width="scale" style:rel-height="scale"><draw:image xlink:href="media/image15.png" xlink:type="simple" xlink:show="embed" xlink:actuate="onLoad"/><svg:title/><svg:desc>A computer screen shot of a computer code

Description automatically generated</svg:desc></draw:frame></text:span></text:p>
      <text:p text:style-name="P285">Figura 15 – Verificando as permissões de kernel.bin.</text:p>
      <text:p text:style-name="Normal">Basicamente, o script (Codigo 6) fez com que o código Assembly no arquivo kernel.asm fosse compilado usando o Netwide Assembler (nasm) para gerar um arquivo no formato Executable and Linking Format (ELF) de 32 bits. O ELF é um formato flexível e multiplataforma que não está vinculado a uma arquitetura de CPU específica.</text:p>
      <text:p text:style-name="Normal">O arquivo C, kernel.c, é compilado com o GCC usando a opção -m32 para gerar código de 32 bits. Após a compilação, dois arquivos binários resultantes são produzidos: kasm.o e kc.o. Para unir esses arquivos, a ordem é crucial, e o ponto de entrada (entry point) deve ser inserido primeiro, ou seja, kasm.o.</text:p>
      <text:p text:style-name="Normal">E para unir os arquivos binários gerados, usamos o linker, especificando o arquivo link.ld (Codigo 5). O formato de saída é ELF de 32 bits, com a arquitetura explicitamente definida como i386. O ponto de entrada (ENTRY) é a função start de kernel.asm. O kernel inicia sua execução a partir dessa função, chama kmain em kernel.c, e em seguida, pausa sua execução usando a instrução hlt em kernel.asm. Após a união, o resultado é o arquivo executável<text:s/><text:span text:style-name="T286">kernel.bin</text:span>, que contém<text:s/><text:span text:style-name="T287">o código combinado de kernel.asm e kernel.c. Seções,</text:span><text:s/>como .text em kernel.asm, indicam onde o código será armazenado. Outras seções serão explicadas conforme necessário, sendo ignoradas por enquanto.</text:p>
      <text:p text:style-name="Normal">Agora, para testarmos o kernel gerado, iremos utilizar o software emulador qemu por recomenda<text:span text:style-name="T288">ção do docente<text:s/></text:span><text:span text:style-name="T289">Dalton Matsuo Tavares</text:span>.<text:s/></text:p>
      <text:soft-page-break/>
      <text:p text:style-name="Normal">Sendo assim, o comando que iremos executar é:<text:s/><text:span text:style-name="T290">qemu-system-i386 --kernel kernel.bin</text:span>.<text:s/></text:p>
      <text:p text:style-name="P291"><draw:frame draw:style-name="a21" draw:name="Picture 1" text:anchor-type="as-char" svg:x="0in" svg:y="0in" svg:width="4.78832in" svg:height="1.86422in" style:rel-width="scale" style:rel-height="scale"><draw:image xlink:href="media/image16.png" xlink:type="simple" xlink:show="embed" xlink:actuate="onLoad"/><svg:title/><svg:desc>A screenshot of a computer

Description automatically generated</svg:desc></draw:frame></text:p>
      <text:p text:style-name="P292">Figura 16 – Inicializando máquina virtual x86 (32 bits) usando o QEMU.</text:p>
      <text:p text:style-name="Normal">Feito isso, ir<text:span text:style-name="T293">á abrir a janela da nossa máquina, está funcionando normalmente devido o<text:s/></text:span><text:span text:style-name="T294">X</text:span><text:span text:style-name="T295"><text:s/>de<text:s/></text:span><text:span text:style-name="T296">cor verde</text:span><text:span text:style-name="T297"><text:s/>conforme configuramos no código 4. Além disso, infelizmente eu não consegui tirar o print no momento, mas aparece uma opção de allow ou deny relacionada ao release grab action no debian, porém eu nao havia selecionado, sendo assim, na janela aparece uma mensagem de atalho caso queria fechar a janela ou mover/redimensionar utilizando o<text:s/></text:span><text:span text:style-name="T298">Ctrl+Alt+G</text:span><text:span text:style-name="T299"><text:s/>para soltar o cursor do mouse pois ao clicar na janela estaremos com foco em outra máquina.</text:span></text:p>
      <text:p text:style-name="P300"><text:span text:style-name="T301"><draw:frame draw:style-name="a22" draw:name="Picture 1" text:anchor-type="as-char" svg:x="0in" svg:y="0in" svg:width="5.49639in" svg:height="0.76138in" style:rel-width="scale" style:rel-height="scale"><draw:image xlink:href="media/image17.png" xlink:type="simple" xlink:show="embed" xlink:actuate="onLoad"/><svg:title/><svg:desc>A screenshot of a computer

Description automatically generated</svg:desc></draw:frame></text:span></text:p>
      <text:p text:style-name="P302">Figura 17 – Atalho do release grab dentro do QEMU.</text:p>
      <text:p text:style-name="Normal">Além disso, optamos por criar um novo script run.sh (Codigo 7) para execução automática do kernel conforme a Figura 18. Colocamos permissões rwx (leitura, gravação e execução).</text:p>
      <text:p text:style-name="Normal"><draw:frame draw:style-name="a23" draw:name="Picture 1" text:anchor-type="as-char" svg:x="0in" svg:y="0in" svg:width="5.90556in" svg:height="1.37639in" style:rel-width="scale" style:rel-height="scale"><draw:image xlink:href="media/image18.png" xlink:type="simple" xlink:show="embed" xlink:actuate="onLoad"/><svg:title/><svg:desc>A screenshot of a computer

Description automatically generated</svg:desc></draw:frame></text:p>
      <text:p text:style-name="P303">Figura 18 – Criação script run.sh, permissões e execução.</text:p>
      <text:p text:style-name="P304"><text:span text:style-name="T305"><draw:frame draw:id="id6" draw:style-name="a24" draw:name="Text Box 2" text:anchor-type="as-char" svg:x="0in" svg:y="0in" svg:width="4.69514in" svg:height="2.57014in" style:rel-width="scale" style:rel-height="scale"><draw:text-box><text:p text:style-name="P306">#!/bin/sh</text:p><text:p text:style-name="P307">qemu-system-i386 --kernel kernel.bin</text:p></draw:text-box><svg:title/><svg:desc/></draw:frame></text:span></text:p>
      <text:p text:style-name="P308">Código 7 – Conteúdo do arquivo run.sh.</text:p>
      <text:p text:style-name="Normal">Por fim, para uma questão de completude, o próximo passo é a conversão do arquivo kernel.bin em um arquivo ISO, de modo a permitir a execução de nosso SO simples, por<text:s/><text:soft-page-break/>exemplo, no VirtualBox.</text:p>
      <text:p text:style-name="Normal">Para a geração do mesmo, criamos a estrutura de diretórios da seguinte forma: criamos um<text:s/><text:span text:style-name="T309">diretório</text:span><text:s/>chamado<text:s/><text:span text:style-name="T310">basic</text:span>. Internamente ao diretório criado, criamos um novo<text:s/><text:span text:style-name="T311">diretório</text:span><text:s/>chamado<text:s/><text:span text:style-name="T312">boot</text:span><text:s/>(basic/boot) e por último, criamos um<text:s/><text:span text:style-name="T313">diretório</text:span><text:s/>chamado<text:s/><text:span text:style-name="T314">grub</text:span><text:s/>(basic/boot/grub). Dentro do diretório grub, criamos um<text:s/><text:span text:style-name="T315">arquivo</text:span><text:s/>chamado<text:s/><text:span text:style-name="T316">grub.cfg</text:span><text:s/>(Codigo 8).</text:p>
      <text:p text:style-name="P317"><text:span text:style-name="T318"><draw:frame draw:style-name="a25" draw:name="Picture 1" text:anchor-type="as-char" svg:x="0in" svg:y="0in" svg:width="5.00601in" svg:height="2.02207in" style:rel-width="scale" style:rel-height="scale"><draw:image xlink:href="media/image19.png" xlink:type="simple" xlink:show="embed" xlink:actuate="onLoad"/><svg:title/><svg:desc>A screen shot of a computer

Description automatically generated</svg:desc></draw:frame></text:span></text:p>
      <text:p text:style-name="P319"><text:span text:style-name="T320">Figura 19 – Criação da estrutura de diret</text:span><text:span text:style-name="T321">órios.</text:span></text:p>
      <text:p text:style-name="P322"><text:span text:style-name="T323"><draw:frame draw:id="id7" draw:style-name="a26" draw:name="Text Box 2" text:anchor-type="as-char" svg:x="0in" svg:y="0in" svg:width="4.69514in" svg:height="2.57014in" style:rel-width="scale" style:rel-height="scale"><draw:text-box><text:p text:style-name="P324">set default = 0</text:p><text:p text:style-name="P325">set timeout = 0</text:p><text:p text:style-name="P326">menuentry "basicOS" {</text:p><text:p text:style-name="P327">set root='(hd96)'</text:p><text:p text:style-name="P328">multiboot /boot/kernel.bin</text:p><text:p text:style-name="P329">}</text:p></draw:text-box><svg:title/><svg:desc/></draw:frame></text:span></text:p>
      <text:p text:style-name="P330">Código 8 – Conteúdo do arquivo grub.cfg.</text:p>
      <text:p text:style-name="Normal">Vale ressaltar que, para que esse arquivo de configuração funcione corretamente, deverá ser<text:s/><text:span text:style-name="T331">inserido</text:span><text:s/>o nosso arquivo<text:s/><text:span text:style-name="T332">kernel.bin</text:span><text:s/>gerado anteriormente, no<text:s/><text:span text:style-name="T333">diretório boot</text:span><text:s/>criado. Entretanto, iremos<text:s/><text:span text:style-name="T334">move-lo</text:span><text:s/>(Figura 20) e não copia-lo, sendo assim, o nosso script run.sh não irá funcionar corretamente pois não conseguirá encontrar a localização do arquivo kernel.bin, sendo assim iremos<text:s/><text:span text:style-name="T335">modifica-lo</text:span><text:s/>também com o<text:s/><text:span text:style-name="T336">path correto</text:span><text:s/>(Codigo 9).</text:p>
      <text:p text:style-name="P337"><draw:frame draw:style-name="a27" draw:name="Picture 1" text:anchor-type="as-char" svg:x="0in" svg:y="0in" svg:width="5.01889in" svg:height="1.66431in" style:rel-width="scale" style:rel-height="scale"><draw:image xlink:href="media/image20.png" xlink:type="simple" xlink:show="embed" xlink:actuate="onLoad"/><svg:title/><svg:desc>A screenshot of a computer program

Description automatically generated</svg:desc></draw:frame></text:p>
      <text:p text:style-name="P338"><text:span text:style-name="T339">Figura 20 – Movendo o kernel.bin para ./basic/boot</text:span></text:p>
      <text:p text:style-name="P340"><text:span text:style-name="T341"><draw:frame draw:id="id8" draw:style-name="a28" draw:name="Text Box 2" text:anchor-type="as-char" svg:x="0in" svg:y="0in" svg:width="4.69514in" svg:height="2.57014in" style:rel-width="scale" style:rel-height="scale"><draw:text-box><text:p text:style-name="P342">#!/bin/sh</text:p><text:p text:style-name="P343"><text:span text:style-name="T344">qemu-system-i386 --kernel .</text:span><text:span text:style-name="T345">/basic/boot/</text:span><text:span text:style-name="T346">kernel.bin</text:span></text:p></draw:text-box><svg:title/><svg:desc/></draw:frame></text:span></text:p>
      <text:soft-page-break/>
      <text:p text:style-name="P347"><text:span text:style-name="T348">Código 9 – Atualiza</text:span><text:span text:style-name="T349">ção</text:span><text:span text:style-name="T350"><text:s/>do arquivo run.sh.</text:span></text:p>
      <text:p text:style-name="Normal"><text:span text:style-name="T351">No arquivo<text:s/></text:span><text:span text:style-name="T352">grub.cfg</text:span><text:span text:style-name="T353">, ajusta-se a execução deste SO como padrão (set default = 0), e o tempo aguardado para sua inicialização é ajustado em 0 segs (set timeout = 0). Além disso, é criada uma entrada de menu, para a escolha do SO, chamado de “basicOS”. Nessa entrada, define-se o dispositivo de boot como sendo o CD-ROM (set root='(hd96)'), carregado a partir do arquivo kernel.bin, o qual está localizado na pasta boot.</text:span></text:p>
      <text:p text:style-name="P354">Agora iremos fazer a geração do ISO, para isto, criamos mais um script chamado make.sh (Codigo 10) no diretorio mãe do projeto (Figura 21) que ira preparar o nosso arquivo ISO.</text:p>
      <text:p text:style-name="P355"><text:span text:style-name="T356"><draw:frame draw:style-name="a29" draw:name="Picture 1" text:anchor-type="as-char" svg:x="0in" svg:y="0in" svg:width="4.84719in" svg:height="1.74246in" style:rel-width="scale" style:rel-height="scale"><draw:image xlink:href="media/image21.png" xlink:type="simple" xlink:show="embed" xlink:actuate="onLoad"/><svg:title/><svg:desc>A screenshot of a computer

Description automatically generated</svg:desc></draw:frame></text:span></text:p>
      <text:p text:style-name="P357">Figura 21 – Criando script make.sh</text:p>
      <text:p text:style-name="P358"><text:span text:style-name="T359"><draw:frame draw:id="id9" draw:style-name="a30" draw:name="Text Box 2" text:anchor-type="as-char" svg:x="0in" svg:y="0in" svg:width="4.69514in" svg:height="2.57014in" style:rel-width="scale" style:rel-height="scale"><draw:text-box><text:p text:style-name="P360">#!/bin/sh</text:p><text:p text:style-name="P361">grub-mkrescue -o basic.iso basic</text:p></draw:text-box><svg:title/><svg:desc/></draw:frame></text:span></text:p>
      <text:p text:style-name="P362">Código 10 – Conteúdo do arquivo make.sh.</text:p>
      <text:p text:style-name="Normal">Agora que está tudo certo com o nosso script, iremos executa-lo, e nisso observaremos que haverá criado um arquivo<text:s/><text:span text:style-name="T363">basic.iso</text:span><text:s/>com sucesso no nosso diretório raiz (Figura 22). Portanto, o codigo está dizendo ao<text:s/><text:span text:style-name="T364">grub</text:span><text:s/>para criar uma imagem ISO chamada<text:s/><text:span text:style-name="T365">basic.iso</text:span><text:s/>usando os arquivos presentes no<text:s/><text:span text:style-name="T366">diretório basic</text:span>.</text:p>
      <text:p text:style-name="P367"><text:span text:style-name="T368"><draw:frame draw:style-name="a31" draw:name="Picture 1" text:anchor-type="as-char" svg:x="0in" svg:y="0in" svg:width="4.49651in" svg:height="3.09479in" style:rel-width="scale" style:rel-height="scale"><draw:image xlink:href="media/image22.png" xlink:type="simple" xlink:show="embed" xlink:actuate="onLoad"/><svg:title/><svg:desc>A screenshot of a computer

Description automatically generated</svg:desc></draw:frame></text:span></text:p>
      <text:soft-page-break/>
      <text:p text:style-name="P369">Figura 22 – ISO gerada com sucesso</text:p>
      <text:list text:style-name="LFO8" text:continue-numbering="true">
        <text:list-item>
          <text:list>
            <text:list-item>
              <text:p text:style-name="P370">Testando o projeto</text:p>
            </text:list-item>
          </text:list>
        </text:list-item>
      </text:list>
      <text:p text:style-name="Normal">Neste projeto como eu havia dito no inicio, nosso hospedeiro é windows e estamos virtualizando um debian no virtualbox cujo todo esses procedimentos foram realizados nessa maquina virtual, sendo assim, como iremos testar outra máquina virtual, optamos por transferir a pasta raiz (Projeto_2) do guest para o hospedeiro utilizando<text:s/><text:span text:style-name="T371">SCP</text:span><text:s/>(Secure Copy Protocol) visto anteriormente no projeto 1, para obtermos o<text:s/><text:span text:style-name="T372">arquivo ISO</text:span><text:s/>que geramos no final do topico 1.3 – Prepara<text:span text:style-name="T373">ção do projeto.<text:s/></text:span></text:p>
      <text:p text:style-name="Normal"><text:span text:style-name="T374">Sendo assim, não será necessário instalar o openssh server pois ja temos tudo configurado e também os host já são considerados confiaveis (chaves autorizadas). Por outro lado, temos os seguintes IP: hospedeiro (192.168.0.103) e guest (192.168.0.107). A partir do hospedeiro, utilizaremos o prompt de comando no windows conforme o Codigo 11 para<text:s/></text:span><text:span text:style-name="T375">transferirmos os nossos arquivos</text:span><text:span text:style-name="T376">.</text:span></text:p>
      <text:p text:style-name="P377"><text:span text:style-name="T378"><draw:frame draw:id="id10" draw:style-name="a32" draw:name="Text Box 2" text:anchor-type="as-char" svg:x="0in" svg:y="0in" svg:width="4.68681in" svg:height="0.43264in" style:rel-width="scale" style:rel-height="scale"><draw:text-box><text:p text:style-name="P379">scp -r vboxuser@192.168.0.107:/home/vboxuser/Projeto_2 <text:s/>C:/</text:p></draw:text-box><svg:title/><svg:desc/></draw:frame></text:span></text:p>
      <text:p text:style-name="P380">Código 11 – Transferir o diretorio do Projeto_2.</text:p>
      <text:p text:style-name="P381"><draw:frame draw:style-name="a33" draw:name="Picture 1" text:anchor-type="as-char" svg:x="0in" svg:y="0in" svg:width="5.60213in" svg:height="5.224in" style:rel-width="scale" style:rel-height="scale"><draw:image xlink:href="media/image23.png" xlink:type="simple" xlink:show="embed" xlink:actuate="onLoad"/><svg:title/><svg:desc>A computer screen shot of a black screen

Description automatically generated</svg:desc></draw:frame></text:p>
      <text:soft-page-break/>
      <text:p text:style-name="P382">Figura 23 – Procedimento de transferencia de arquivo SCP.</text:p>
      <text:soft-page-break/>
      <text:p text:style-name="P383">Ap<text:span text:style-name="T384">ós a transfência da pasta, par</text:span>a testar a nossa imagem ISO localizada em<text:s/><text:span text:style-name="T385">C:\Projeto_2\so</text:span><text:span text:style-name="T386">\basic.iso</text:span>, iremos criar uma máquina virtual no VirtualBox, com 64 MB de memória RAM, 1 CPU<text:span text:style-name="T387">,</text:span><text:s/>com descrições de “Other” para o tipo do SO e “Other/Unknown” para a versão (32 bits desconhecido) conforme a Figura 24.</text:p>
      <text:p text:style-name="P388"><draw:frame draw:style-name="a34" draw:name="Picture 1" text:anchor-type="as-char" svg:x="0in" svg:y="0in" svg:width="4.51771in" svg:height="2.36723in" style:rel-width="scale" style:rel-height="scale"><draw:image xlink:href="media/image24.png" xlink:type="simple" xlink:show="embed" xlink:actuate="onLoad"/><svg:title/><svg:desc>A screenshot of a computer

Description automatically generated</svg:desc></draw:frame></text:p>
      <text:p text:style-name="P389">Figura 24 – Criar máquina virtual.</text:p>
      <text:p text:style-name="P390"><draw:frame draw:style-name="a35" draw:name="Picture 1" text:anchor-type="as-char" svg:x="0in" svg:y="0in" svg:width="4.43811in" svg:height="2.3083in" style:rel-width="scale" style:rel-height="scale"><draw:image xlink:href="media/image25.png" xlink:type="simple" xlink:show="embed" xlink:actuate="onLoad"/><svg:title/><svg:desc>A screenshot of a software

Description automatically generated</svg:desc></draw:frame></text:p>
      <text:p text:style-name="P391">Figura 25 – Hardware Guest.</text:p>
      <text:p text:style-name="P392"><draw:frame draw:style-name="a36" draw:name="Picture 1" text:anchor-type="as-char" svg:x="0in" svg:y="0in" svg:width="4.37484in" svg:height="2.30214in" style:rel-width="scale" style:rel-height="scale"><draw:image xlink:href="media/image26.png" xlink:type="simple" xlink:show="embed" xlink:actuate="onLoad"/><svg:title/><svg:desc>A screenshot of a computer

Description automatically generated</svg:desc></draw:frame></text:p>
      <text:p text:style-name="P393">Figura 26 – Armazenamento Guest.</text:p>
      <text:soft-page-break/>
      <text:p text:style-name="P394"><draw:frame draw:style-name="a37" draw:name="Picture 1" text:anchor-type="as-char" svg:x="0in" svg:y="0in" svg:width="4.49929in" svg:height="2.32213in" style:rel-width="scale" style:rel-height="scale"><draw:image xlink:href="media/image27.png" xlink:type="simple" xlink:show="embed" xlink:actuate="onLoad"/><svg:title/><svg:desc>A screenshot of a computer program

Description automatically generated</svg:desc></draw:frame></text:p>
      <text:p text:style-name="P395">Figura 27 – Resumo.</text:p>
      <text:p text:style-name="Normal">Para finalizar, configuramos esta máquina virtual para ser inicializada com um CD de boot, apontando para a imagem ISO criada (simple.iso) conforme as proximas Figuras.</text:p>
      <text:p text:style-name="P396"><draw:frame draw:style-name="a38" draw:name="Picture 1" text:anchor-type="as-char" svg:x="0in" svg:y="0in" svg:width="3.98283in" svg:height="2.58575in" style:rel-width="scale" style:rel-height="scale"><draw:image xlink:href="media/image28.png" xlink:type="simple" xlink:show="embed" xlink:actuate="onLoad"/><svg:title/><svg:desc>A screenshot of a computer

Description automatically generated</svg:desc></draw:frame></text:p>
      <text:p text:style-name="P397">Figura 28 – Acessando a configuração da máquina virtual.</text:p>
      <text:p text:style-name="P398"><draw:frame draw:style-name="a39" draw:name="Picture 1" text:anchor-type="as-char" svg:x="0in" svg:y="0in" svg:width="3.72068in" svg:height="2.26549in" style:rel-width="scale" style:rel-height="scale"><draw:image xlink:href="media/image29.png" xlink:type="simple" xlink:show="embed" xlink:actuate="onLoad"/><svg:title/><svg:desc>A screenshot of a computer

Description automatically generated</svg:desc></draw:frame></text:p>
      <text:p text:style-name="P399">Figura 29 – Alterando a ordem de boot para inicializar com disco optico (CD).</text:p>
      <text:p text:style-name="Normal">Após isto, basta clicar em ok e inicializar a máquina normalmente, cujo a mesma irá apresentar a tela inicial do grub que configuramos, basta pressionar Enter e irá inicializar<text:s/><text:soft-page-break/>o nosso <text:s/>primeiro sistema conforme a Figura 30.</text:p>
      <text:p text:style-name="P400"><draw:frame draw:style-name="a40" draw:name="Picture 1" text:anchor-type="as-char" svg:x="0in" svg:y="0in" svg:width="5.36571in" svg:height="3.51573in" style:rel-width="scale" style:rel-height="scale"><draw:image xlink:href="media/image30.png" xlink:type="simple" xlink:show="embed" xlink:actuate="onLoad"/><svg:title/><svg:desc>A screenshot of a computer

Description automatically generated</svg:desc></draw:frame></text:p>
      <text:p text:style-name="P401">Figura 30 – Hospedeiro virtualizando um SO básico na VirtualBox, cujo a ISO desse SO foi criada/gerada/montada em uma outra máquina guest linux.</text:p>
      <text:list text:style-name="LFO8" text:continue-numbering="true">
        <text:list-item>
          <text:p text:style-name="P402"><text:span text:style-name="T403"><office:annotation office:name="0" xml:id="771174336"><dc:creator>Dalton Tavares</dc:creator><dc:date>2023-12-15T07:57:00</dc:date><text:p text:style-name="CommentText">Obs. Se entendi direito, vc colocou os arquivos<text:s/>“.h”<text:s/>em basic/include e a implementação das funções vc jogou tudo dentro de screen.h. À medida que o<text:s/>projeto<text:s/>for avançando, essa organização vai só piorar. Mantenha as implementações separadas em seus arquivos correspondentes. Ex. Em string.c, system.c e screen.c.<text:s/></text:p></office:annotation>Tarefa 2: <text:s/></text:span><text:span text:style-name="T404"><office:annotation-end office:name="0"/></text:span><text:span text:style-name="T405">adicionando funcionalidades básicas ao kernel</text:span></text:p>
          <text:list text:continue-numbering="true">
            <text:list-item>
              <text:p text:style-name="P406">Implementação do projeto</text:p>
            </text:list-item>
          </text:list>
        </text:list-item>
      </text:list>
      <text:p text:style-name="Normal">Com base na estrutura da prática de laboratório realizada na tarefa 1, baixamos uma ferramenta chamada tree (Figura 31) para visualizar melhor como ficou a organização.</text:p>
      <text:p text:style-name="P407"><draw:frame draw:style-name="a41" draw:name="Picture 1" text:anchor-type="as-char" svg:x="0in" svg:y="0in" svg:width="2.91905in" svg:height="2.7322in" style:rel-width="scale" style:rel-height="scale"><draw:image xlink:href="media/image31.png" xlink:type="simple" xlink:show="embed" xlink:actuate="onLoad"/><svg:title/><svg:desc/></draw:frame></text:p>
      <text:p text:style-name="P408"><text:span text:style-name="T409">Figura 31 – Utilização da ferramenta Tree</text:span></text:p>
      <text:p text:style-name="Normal">Agora iremos criar um subdiretório chamado “include” dentro da pasta<text:span text:style-name="T410"><text:s/>“basic” do Projeto_2</text:span>. Vale ressaltar que, estamos criando esse subdiret<text:span text:style-name="T411">ório nesse local pois estamos seguindo uma convenção comum utilizadas em projetos de programação, onde os<text:s/></text:span><text:soft-page-break/><text:span text:style-name="T412">cabeçalhos e as bibliotecas frequentemente são colocados em subdiretorios chamados include.<text:s/></text:span></text:p>
      <text:p text:style-name="Normal"><text:span text:style-name="T413">Por seguinte, d</text:span>entro desta pasta, ser<text:span text:style-name="T414">ão criados quatro arquivos: types.h, string.h, system.h e screen.h, cujo o objetivo destes arquivos será de permitir a incorporação de novas funções ao kernel do SO. Para criação do arquivo utilizamos a ferramenta touch que já tem instalado no linux para criarmos arquivos vazios (Figura 32) que serão explicados posteriormente para um melhor compreensão.</text:span></text:p>
      <text:p text:style-name="P415"><text:span text:style-name="T416"><draw:frame draw:style-name="a42" draw:name="Picture 1" text:anchor-type="as-char" svg:x="0in" svg:y="0in" svg:width="5.47695in" svg:height="0.84263in" style:rel-width="scale" style:rel-height="scale"><draw:image xlink:href="media/image32.png" xlink:type="simple" xlink:show="embed" xlink:actuate="onLoad"/><svg:title/><svg:desc>A screen shot of a computer

Description automatically generated</svg:desc></draw:frame></text:span></text:p>
      <text:p text:style-name="P417">Figura 32 – Criação do include e arquivos vazios</text:p>
      <text:p text:style-name="Normal">A partir de agora, as funções serão “habilitadas”, como por exemplo uma função print, a partir do meio da inclusão de bibliotecas mediante o uso da diretiva #include.<text:s/></text:p>
      <text:p text:style-name="Normal">Sendo assim, primeiramente criaremos o arquivo<text:s/><text:span text:style-name="T418">types.h</text:span><text:s/>(Código 12) que servirá para definir os tipos de dados que serão usados nos demais arquivos de biblioteca.</text:p>
      <text:p text:style-name="P419"><text:span text:style-name="T420"><draw:frame draw:id="id11" draw:style-name="a43" draw:name="Text Box 2" text:anchor-type="as-char" svg:x="0in" svg:y="0in" svg:width="3.49306in" svg:height="3.525in" style:rel-width="scale" style:rel-height="scale"><draw:text-box><text:p text:style-name="P421">#ifndef TYPES_H</text:p><text:p text:style-name="P422">#define TYPES_H</text:p><text:p text:style-name="P423"/><text:p text:style-name="P424">typedef signed char int8;</text:p><text:p text:style-name="P425">typedef unsigned char uint8;</text:p><text:p text:style-name="P426"/><text:p text:style-name="P427">typedef signed short int16;</text:p><text:p text:style-name="P428">typedef unsigned short uint16;</text:p><text:p text:style-name="P429"/><text:p text:style-name="P430">typedef signed int int32;</text:p><text:p text:style-name="P431">typedef unsigned int uint32;</text:p><text:p text:style-name="P432"/><text:p text:style-name="P433">typedef signed long int64;</text:p><text:p text:style-name="P434">typedef unsigned long uint64;</text:p><text:p text:style-name="P435"/><text:p text:style-name="P436">typedef char* string;</text:p><text:p text:style-name="P437"/><text:p text:style-name="P438"><text:span text:style-name="T439">#endif</text:span></text:p></draw:text-box><svg:title/><svg:desc/></draw:frame></text:span></text:p>
      <text:p text:style-name="P440">Código 12 – Conteúdo do arquivo types.h.</text:p>
      <text:p text:style-name="Normal"><text:s/>As duas primeiras linhas especificam a definição do arquivo de biblioteca. A inserção destas linhas (incluindo o #endif ao final) não é uma obrigatoriedade, mas faz parte das boas práticas de codificação de bibliotecas como por exemplo ao usar a ferramenta CodeBlocks, isso é padronizado ao se criar um arquivo de biblioteca. Na sequência, são definidos alguns tipos inteiros (de 8, 16, 32 e 64 bits) a partir de tipos primitivos de dados. Também foi criado um novo tipo chamado string, o qual representa uma cadeia de caracteres sem tamanho definido, a partir de um ponteiro para um tipo de dado primitivo caractere.</text:p>
      <text:soft-page-break/>
      <text:p text:style-name="Normal">Seguindo a sequência de definição para a biblioteca do sistema operacional, é lógico especificar as funções para manipulação de strings. Portanto, a próxima etapa é a criação do arquivo<text:s/><text:span text:style-name="T441">string.h</text:span><text:s/>(C<text:span text:style-name="T442">ó</text:span>digo 13).<text:s/></text:p>
      <text:p text:style-name="P443"><text:span text:style-name="T444"><draw:frame draw:id="id12" draw:style-name="a44" draw:name="Text Box 2" text:anchor-type="as-char" svg:x="0in" svg:y="0in" svg:width="3.49306in" svg:height="2.02778in" style:rel-width="scale" style:rel-height="scale"><draw:text-box><text:p text:style-name="P445">#ifndef STRING_H</text:p><text:p text:style-name="P446">#define STRING_H</text:p><text:p text:style-name="P447">#include "types.h"</text:p><text:p text:style-name="P448"/><text:p text:style-name="P449">uint16 strlength(string ch) {</text:p><text:p text:style-name="P450">uint16 i = 1;</text:p><text:p text:style-name="P451">while(ch[i++]);</text:p><text:p text:style-name="P452">return --i;</text:p><text:p text:style-name="P453">}</text:p><text:p text:style-name="P454"><text:span text:style-name="T455">#endif</text:span></text:p></draw:text-box><svg:title/><svg:desc/></draw:frame></text:span></text:p>
      <text:p text:style-name="P456">Código 13 – Conteúdo do arquivo string.h.</text:p>
      <text:p text:style-name="Normal">Por enquanto, este arquivo inclui apenas a função<text:s/><text:span text:style-name="T457">uint16 strlength(string)</text:span><text:s/>que dependerá dos tipos uint16 e string, os quais foram definidos em types.h. Além disso, essa função retorna um uint16 (inteiro sem sinal de 16 bits) e recebe como parâmetro uma string ch, logo,<text:span text:style-name="T458"><text:s/>essa função uint16 strlength (string ch) é projetada para calcular o comprimento de uma string em termos de número de caracteres</text:span>, no qual é realizado um loop while para iterar através dos caracteres da string ch até encontrar o caractere nulo ('\0'), que marca o final da string em C. O contador i é incrementado durante cada iteração do loop. No final, a função retorna o valor decrementado de i, representando o comprimento total da string (excluindo o caractere nulo).</text:p>
      <text:p text:style-name="Normal">Agora, o próximo arquivo criado é o<text:s/><text:span text:style-name="T459">system.h</text:span><text:s/>(Código 14).<text:s/></text:p>
      <text:p text:style-name="P460"><text:span text:style-name="T461"><draw:frame draw:id="id13" draw:style-name="a45" draw:name="Text Box 2" text:anchor-type="as-char" svg:x="0in" svg:y="0in" svg:width="5.87153in" svg:height="3.775in" style:rel-width="scale" style:rel-height="scale"><draw:text-box><text:p text:style-name="P462">#ifndef SYSTEM_H</text:p><text:p text:style-name="P463">#define SYSTEM_H</text:p><text:p text:style-name="P464">#include "types.h"</text:p><text:p text:style-name="P465"/><text:p text:style-name="P466">uint8 inportb (uint16 _port) {</text:p><text:p text:style-name="P467">uint8 rv;</text:p><text:p text:style-name="P468">__asm__ __volatile__ ("inb %1, %0"</text:p><text:p text:style-name="P469"><text:s text:c="4"/>: "=a" (rv)<text:s/><text:tab/><text:tab/>/* operando de saída */</text:p><text:p text:style-name="P470"><text:s text:c="4"/>: "dN" (_port));<text:tab/>/* operando de entrada */</text:p><text:p text:style-name="P471">return rv;</text:p><text:p text:style-name="P472">}</text:p><text:p text:style-name="P473"/><text:p text:style-name="P474">void outportb (uint16 _port, uint8 _data) {</text:p><text:p text:style-name="P475">__asm__ __volatile__ ("outb %1, %0"</text:p><text:p text:style-name="P476"><text:s text:c="4"/>:<text:s/><text:tab/><text:tab/><text:tab/><text:tab/><text:s/>/* operando de saída */</text:p><text:p text:style-name="P477"><text:s text:c="4"/>: "dN" (_port), "a" (_data));/* operando de entrada */</text:p><text:p text:style-name="P478">}</text:p><text:p text:style-name="P479"/><text:p text:style-name="P480"><text:span text:style-name="T481">#endif</text:span></text:p></draw:text-box><svg:title/><svg:desc/></draw:frame></text:span></text:p>
      <text:p text:style-name="P482">Código 14 – Conteúdo do arquivo system.h.</text:p>
      <text:soft-page-break/>
      <text:p text:style-name="Normal">O Código 14 apresenta duas funções, no qual, uma retorna um valor char (uint8) e a outra não retorna valor (void). Para que possamos usar os tipos de dados que definimos anteriormente em types.h, incluímos este arquivo. A primeira função,<text:s/><text:span text:style-name="T483">uint8 inportb (uint16)</text:span><text:s/>recebe como parâmetro um inteiro de 16 bits e devolve um inteiro de 8 bits. O parâmetro de entrada é um endereço de porta (_port) de 16 bits. Internamente a função, a grosso modo, a variável rv será conectada a porta _port e o valor contido na porta será inserido nesta variável.</text:p>
      <text:p text:style-name="Normal">Vale ressaltar que, essas duas funções inportb e outportb são de origens do assembly, portanto, sua utilidade está relacionada com o controle da posição do cursor que irá aparecer em nossa tela por exemplo, ou seja, é necessário “falar” diretamente com as portas. Como existem dispositivos com os quais se deseja conectar, como ler/escrever dados a partir deles, é necessário se usar portas. Na prática, o Código 14 é muito importante porque não é possível se falar com portas diretamente usando linguagem C e é por essa razão que foi criada uma função na linguagem Assembly.</text:p>
      <text:p text:style-name="Normal">Além disso, em alguns dispositivos, como a tela (screen), é possível efetuar a comunicação bastando-se escrever dados para uma área específica da memória (RAM). Esta continuará atualizando seus dados dependendo do que está guardado naquela área particular de memória. No caso do cursor, mouse e teclado, é necessário de fato se falar diretamente com as portas. Assim a<text:s/><text:span text:style-name="T484">função uint8 inportb(uint16)</text:span><text:s/>irá ler a partir da porta e a função void<text:s/><text:span text:style-name="T485">outportb(uint16, uint8)</text:span><text:s/>irá escrever dados na porta. No caso da função<text:s/><text:span text:style-name="T486">outportb(uint16, uint8)</text:span><text:s/>o primeiro argumento é a porta desejada e o segundo argumento são os dados que serão escritos para aquela porta particular.</text:p>
      <text:p text:style-name="Normal">Agora, trataremos dos aspectos mais técnicos do Código 14. Os prefixos e sufixos “__” (dois sublinhados) não chegam a ser necessários, entretanto, podem prevenir conflitos de nomes em programas. A notação apresentada é o que se chama de extended asm ou Assembly estendido. Esse é um código Assembly que pode ser usado diretamente dentro de código C para fins de acesso a registradores ou acesso a instruções de baixo nível.</text:p>
      <text:p text:style-name="Normal">O código assembly estendido permite a especificação de registradores de entrada, de saída e clobbered (que podem ser sobrescritos durante a execução). No Código 14, este foi identado de modo a demonstrar cada uma das linhas de entrada/saída/clobbered (não usado). A primeira linha que começa com um ‘:’ especifica os operandos de saída, a segunda linha indica os operandos de entrada e , caso existisse, a terceira linha especificaria os operandos clobbered. ‘a’ é um exemplo de constante<text:s/><text:span text:style-name="T487"><text:bookmark-ref text:ref-name="_Ref153128877" text:reference-format="text">[5]</text:bookmark-ref></text:span><text:span text:style-name="T488">.<text:s/></text:span>Constantes de saída devem possuir como prefixo um ‘=’, como é o caso do “=a” (= é um modificador indicando write only). Constantes de entrada e saída devem possuir seu argumento em C correspondente entre parêntesis (não vale para a linha de parâmetro clobbered). Note que o uso de “0” e “1” são usados para assegurar que quando uma mesma variável é indicada em mais de um lugar no asm estendido, esta variável é mapeada apenas para um registrador. Em caso de mais de uma referência a mesma variável, o compilador pode ou não colocá-la no mesmo registrador já atribuído.</text:p>
      <text:p text:style-name="Normal">As funções inb e outb são funções __asm__ para a realização de acesso a entrada e saída (I/O)<text:s/><text:span text:style-name="T489"><text:bookmark-ref text:ref-name="_Ref153130538" text:reference-format="text">[6]</text:bookmark-ref></text:span>. No Código 14, na linha de código __asm__ estendido especificando inportb, é possível verificar a leitura do valor partir de _port e a atribuição deste a rv. A diretiva __asm__ __volatile__ foi usada devido aos mecanismos de otimização do compilador. Graças a essasotimizações, o código pode ou não aparecer na localidade<text:s/><text:soft-page-break/>especificada pelo programador. Para evitar isso, usa-se essa diretiva, ao invés de simplesmente __asm__.</text:p>
      <text:p text:style-name="Normal">Agora, prosseguindo com a criação dos arquivos, temos o<text:s/><text:span text:style-name="T490">screen.h</text:span><text:s/>(C<text:span text:style-name="T491">ódigo 15)<text:s/></text:span>que introduz as principais funções para manipulação de caracteres na tela do computador. Essas funções são previstas para monitores VGA, que é o padrão usado durante o boot de qualquer sistema operacional (Figura 33).</text:p>
      <text:p text:style-name="Normal"><draw:frame draw:style-name="a46" draw:name="Picture 1" text:anchor-type="as-char" svg:x="0in" svg:y="0in" svg:width="5.90556in" svg:height="2.32361in" style:rel-width="scale" style:rel-height="scale"><draw:image xlink:href="media/image33.emf" xlink:type="simple" xlink:show="embed" xlink:actuate="onLoad"/><svg:title/><svg:desc/></draw:frame></text:p>
      <text:p text:style-name="P492"><text:span text:style-name="T493">Figura 32 – Definições para um monitor VGA<text:s/></text:span><text:span text:style-name="T494"><text:bookmark-ref text:ref-name="_Ref153130300" text:reference-format="text">[3]</text:bookmark-ref></text:span><text:span text:style-name="T495">.</text:span></text:p>
      <text:p text:style-name="Normal"><text:s/>Na Figura 32 é possível ver o endereço da primeira posição na tela (0xb8000). Além disso, é possível verificar que cada posição na tela é definida por dois bytes: o primeiro define o caractere a ser impresso e o segundo define a sua cor. São definidas ao todo 25 linhas por 80 colunas. Os códigos da biblioteca screen.h apresentados no Código 15, levam em consideração as definições da Figura 32.</text:p>
      <text:p text:style-name="Normal">A biblioteca screen.h (Código 15) é a consagração de todo o trabalho realizado até o momento. Esta biblioteca utiliza as demais bibliotecas implementadas até então (types.h, system.h e string.h). As principais variáveis são cursorX e cursorY, as quais representam a posição do cursor na tela (nos eixos x e y). Além disso, as constantes sw, sh e sd representam a largura, altura e profundidade da tela. Conquanto, se compararmos a Figura 32 que a largura é equivalente a quantidade de colunas na tela, a altura é equivalente a quantidade de linhas e a profundidade representa a definição de cada caractere na tela (valor e cor).</text:p>
      <text:p text:style-name="Normal">Para a biblioteca<text:s/><text:span text:style-name="T496">screen.h</text:span><text:s/>foram definidas as funções void clearLine(uint8, uint8), void updateCursor(void), void clearScreen(void), void scrollUp(uint8), void newLineCheck(void), void printch(char) e void print(string).<text:s/>Além disso, no código abaixo, de acordo com a tarefa, foi solicitado a inserção de comentários detalhados para as funções do c<text:span text:style-name="T497">ódigo 15,<text:s/></text:span>portanto, o código já está com os comentários inclusos.</text:p>
      <text:soft-page-break/>
      <text:p text:style-name="P498"><text:span text:style-name="T499"><draw:frame draw:id="id14" draw:style-name="a47" draw:name="Text Box 2" text:anchor-type="as-char" svg:x="0in" svg:y="0in" svg:width="5.87153in" svg:height="9.61528in" style:rel-width="scale" style:rel-height="scale"><draw:text-box><text:p text:style-name="P500">#ifndef SCREEN_H</text:p><text:p text:style-name="P501">#define SCREEN_H</text:p><text:p text:style-name="P502">#include "types.h"</text:p><text:p text:style-name="P503">#include "system.h"</text:p><text:p text:style-name="P504">#include "string.h"</text:p><text:p text:style-name="P505">int32 cursorX = 0, cursorY = 0; // Posição do cursor na tela</text:p><text:p text:style-name="P506">const uint8 sw = 80, sh = 25, sd = 2; // Dimensões da tela (largura, altura, profundidade)</text:p><text:p text:style-name="P507"/><text:p text:style-name="P508">// Limpa a tela de uma linha específica até outra</text:p><text:p text:style-name="P509">void clearLine(uint8 from, uint8 to) {</text:p><text:p text:style-name="P510">uint16 i = sw * from * sd;</text:p><text:p text:style-name="P511">string vidmem = (string)0xb8000;</text:p><text:p text:style-name="P512">for (i; i &lt; (sw * (to + 1) * sd); i++) {</text:p><text:p text:style-name="P513">vidmem[i] = 0x0;<text:s/><text:tab/>// Valor (caractere) 0</text:p><text:p text:style-name="P514">vidmem[i+1] = 0x0F; <text:s text:c="2"/>// Cor branca sobre fundo preto</text:p><text:p text:style-name="P515">}</text:p><text:p text:style-name="P516">}</text:p><text:p text:style-name="P517"/><text:p text:style-name="P518">// Atualiza a posição do cursor na tela</text:p><text:p text:style-name="P519">void updateCursor() {</text:p><text:p text:style-name="P520">unsigned temp;</text:p><text:p text:style-name="P521">temp = cursorY * sw + cursorX;</text:p><text:p text:style-name="P522">outportb(0x3D4, 14);</text:p><text:p text:style-name="P523">outportb(0x3D5, temp &gt;&gt; 8);</text:p><text:p text:style-name="P524">outportb(0x3D4, 15);</text:p><text:p text:style-name="P525">outportb(0x3D5, temp);</text:p><text:p text:style-name="P526">}</text:p><text:p text:style-name="P527"/><text:p text:style-name="P528">// Limpa toda a tela</text:p><text:p text:style-name="P529">void clearScreen() {</text:p><text:p text:style-name="P530">clearLine(0, sh-1); <text:s text:c="5"/>// Chama clearLine p/ limpar da linha 0 até n (sh-1)</text:p><text:p text:style-name="P531">cursorX = 0;<text:tab/><text:tab/>// Reseta a posição do cursor na largura</text:p><text:p text:style-name="P532">cursorY = 0;<text:tab/><text:tab/>// Reseta a posição do cursor na altura</text:p><text:p text:style-name="P533">updateCursor();<text:tab/>// Atualiza a posição do cursor</text:p><text:p text:style-name="P534">}</text:p><text:p text:style-name="P535"/><text:p text:style-name="P536">// Desloca conteúdo da tela para cima, remove 'lineNumber' linhas na parte superior</text:p><text:p text:style-name="P537">void scrollUp(uint8 lineNumber) {</text:p><text:p text:style-name="P538">string vidmem = (string)0xb8000;</text:p><text:p text:style-name="P539">uint16 i = 0;</text:p><text:p text:style-name="P540"/><text:p text:style-name="P541">for (i; i &lt; sw * (sh - 1) * sd; i++) {</text:p><text:p text:style-name="P542"><text:span text:style-name="T543"><text:s text:c="2"/></text:span><text:span text:style-name="T544">vidmem[i] = vidmem[i + sw * sd * lineNumber]; <text:s/>// Move o conteúdo da tela p/ cima</text:span></text:p><text:p text:style-name="P545"><text:s text:c="4"/><text:tab/>}</text:p><text:p text:style-name="P546"/><text:p text:style-name="P547">clearLine(sh - 1 - lineNumber, sh - 1); <text:s/>// Limpa linhas recém-criadas na parte inferior</text:p><text:p text:style-name="P548">if ((cursorY - lineNumber) &lt; 0) {</text:p><text:p text:style-name="P549">cursorY = 0;</text:p><text:p text:style-name="P550">cursorX = 0;</text:p><text:p text:style-name="P551">} else {</text:p><text:p text:style-name="P552">cursorY -= lineNumber; <text:s/>// Atualiza a posição do cursor na altura</text:p><text:p text:style-name="P553">}</text:p><text:p text:style-name="P554">updateCursor(); <text:s/>// Atualiza a posição do cursor</text:p><text:p text:style-name="P555"><text:span text:style-name="T556">}</text:span></text:p></draw:text-box><svg:title/><svg:desc/></draw:frame></text:span></text:p>
      <text:soft-page-break/>
      <text:p text:style-name="P557"><text:span text:style-name="T558"><draw:frame draw:id="id15" draw:style-name="a48" draw:name="Text Box 2" text:anchor-type="as-char" svg:x="0in" svg:y="0in" svg:width="5.87153in" svg:height="8.94792in" style:rel-width="scale" style:rel-height="scale"><draw:text-box><text:p text:style-name="P559">// Verifica se o cursor atingiu a última linha da tela, e se sim, rola a tela para cima</text:p><text:p text:style-name="P560">void newLineCheck() {</text:p><text:p text:style-name="P561">if (cursorY &gt;= sh-1) {</text:p><text:p text:style-name="P562"><text:span text:style-name="T563"><text:s text:c="5"/></text:span>scrollUp(1); <text:s/>// Chama scrollUp p/ rolar a tela p/ cima removendo uma linha</text:p><text:p text:style-name="P564">}</text:p><text:p text:style-name="P565">}</text:p><text:p text:style-name="P566"/><text:p text:style-name="P567">// Imprime um caractere na posição atual do cursor</text:p><text:p text:style-name="P568">void printch(char c) {</text:p><text:p text:style-name="P569"><text:s text:c="2"/>string vidmem = (string)0xb8000;</text:p><text:p text:style-name="P570"><text:s text:c="2"/>switch(c) {</text:p><text:p text:style-name="P571"><text:s text:c="4"/>case (0x08): // Retrocesso (BACKSPACE)</text:p><text:p text:style-name="P572"><text:span text:style-name="T573"><text:s text:c="8"/></text:span>if(cursorX &gt; 0) {</text:p><text:p text:style-name="P574"><text:s text:c="11"/>cursorX--; // Move cursor p/ posição anterior na largura</text:p><text:p text:style-name="P575"><text:s text:c="11"/>vidmem[(cursorY * sw + cursorX)*sd] = 0x00; // Define o caractere como nulo</text:p><text:p text:style-name="P576"><text:s text:c="8"/>} break;</text:p><text:p text:style-name="P577"><text:s text:c="5"/>case (0x09): // Representa a tecla TAB</text:p><text:p text:style-name="P578"><text:s text:c="9"/>cursorX = (cursorX + 8) &amp; ~(8 - 1); // Move cursor p/ a próxima posição TAB</text:p><text:p text:style-name="P579"><text:s text:c="9"/>break;</text:p><text:p text:style-name="P580"><text:s text:c="5"/>case ('\r'): // Retorno de Carro</text:p><text:p text:style-name="P581"><text:s text:c="9"/>cursorX = 0; // Move o cursor para a primeira posição na largura</text:p><text:p text:style-name="P582"><text:s text:c="9"/>break;</text:p><text:p text:style-name="P583"><text:s text:c="5"/>case ('\n'): // Nova Linha</text:p><text:p text:style-name="P584"><text:s text:c="9"/>cursorX = 0; // Move o cursor para a primeira posição na largura</text:p><text:p text:style-name="P585"><text:s text:c="9"/>cursorY++; <text:s/>// Move o cursor para a próxima linha na altura</text:p><text:p text:style-name="P586"><text:s text:c="9"/>break;</text:p><text:p text:style-name="P587"><text:s text:c="5"/>default:</text:p><text:p text:style-name="P588"><text:s text:c="9"/>vidmem[((cursorY * sw + cursorX)) * sd] = c; // Define o caractere na tela</text:p><text:p text:style-name="P589"><text:s text:c="9"/>vidmem[((cursorY * sw + cursorX)) * sd + 1] = 0x0F; //Define a cor do caractere</text:p><text:p text:style-name="P590"><text:s text:c="9"/>cursorX++; // Move o cursor para a próxima posição na largura</text:p><text:p text:style-name="P591"><text:s text:c="9"/>break;</text:p><text:p text:style-name="P592"><text:s text:c="2"/>}</text:p><text:p text:style-name="P593"><text:s text:c="2"/>if (cursorX &gt;= sw) {</text:p><text:p text:style-name="P594"><text:s text:c="8"/>cursorX = 0; // Se ultrapassar a largura, move o cursor para a próxima linha</text:p><text:p text:style-name="P595"><text:s text:c="8"/>cursorY++; <text:s/>// na altura</text:p><text:p text:style-name="P596"><text:s text:c="2"/>}</text:p><text:p text:style-name="P597"><text:s text:c="2"/>newLineCheck(); // Verifica se o cursor atingiu a última linha da tela</text:p><text:p text:style-name="P598"><text:s text:c="2"/>updateCursor(); <text:s text:c="2"/>// Atualiza a posição do cursor</text:p><text:p text:style-name="P599">}</text:p><text:p text:style-name="P600">// Imprime uma string chamando repetidamente printch para cada caractere na string</text:p><text:p text:style-name="P601">void print(string ch) {</text:p><text:p text:style-name="P602">uint16 i = 0;</text:p><text:p text:style-name="P603">for(i; i &lt; strlength(ch); i++) {</text:p><text:p text:style-name="P604"><text:span text:style-name="T605"><text:s text:c="8"/></text:span><text:span text:style-name="T606"><text:tab/></text:span><text:span text:style-name="T607"><text:tab/></text:span>printch(ch[i]); <text:s/>// Chama printch para cada caractere na string</text:p><text:p text:style-name="P608">}</text:p><text:p text:style-name="P609"><text:span text:style-name="T610">}<text:s/></text:span><text:span text:style-name="T611">#endif</text:span></text:p></draw:text-box><svg:title/><svg:desc/></draw:frame></text:span></text:p>
      <text:p text:style-name="P612">Código 15 – Conteúdo do arquivo screen.h.</text:p>
      <text:soft-page-break/>
      <text:p text:style-name="Normal">Agora iremos explicar brevemente cada fun<text:span text:style-name="T613">ções do codigo 15 para partimos para os testes.</text:span></text:p>
      <text:p text:style-name="Normal">A função<text:s/><text:span text:style-name="T614">void</text:span><text:s/><text:span text:style-name="T615">clearLine(uint8, uint8)</text:span>, limpa a tela partir de uma linha específica até outra linha específica. Esta função utiliza uma variável auxiliar i, que define o ponto de partida em função de largura (i.e. colunas) e profundidade, para a posição pretendida (from). A variável vidmem é uma string a qual é inicializada com o valor 0xb8000 (endereço da primeira posição válida na tela). Como se trata de um endereço numérico, faz-se um casting por segurança. Na sequência, todas as posições de 0 até n (to+1) em valor e cor (valor 0 e cor preta, também 0).</text:p>
      <text:p text:style-name="Normal">A função<text:s/><text:span text:style-name="T616">void</text:span><text:s/><text:span text:style-name="T617">updateCursor(void)</text:span>, envia a localização do cursor para uma porta específica (0x3D4 e 0x3D5). Estas portas são padronizadas para a arquitetura x86 e controlam aposição do cursor na tela em modo VGA (modo usando 80 colunas x 25 linhas x 16 cores). Assim, para mudar a posição do cursor, basta atualizar os valores de x e y e então chamar a função void updateCursor(void). Explicando esta função um pouco melhor, a variável temp recebe a posição em função dos eixos x e y. A função outportb() já foi explicada, e em outportb(0x3D4, 14), seleciona a localização do cursor no registrador de controle (Control Register ou CRT). Em outportb(0x3D5, temp &gt;&gt; 8), ela envia o byte de alta no barramento. Em outportb(0x3D4, 15), seleciona o envio do byte de baixa no CRT e em outportb(0x3D5, temp) envia o byte de baixa da localização do cursor no barramento.</text:p>
      <text:p text:style-name="Normal">A função<text:s/><text:span text:style-name="T618">void</text:span><text:s/><text:span text:style-name="T619">clearScreen(void)</text:span><text:s/>faz a limpeza da tela da primeira a última linha e atualiza a posição do cursor nos eixos x e y para 0. A função void scrollUp(uint8) desloca o texto que aparece na tela lineNumber linhas. A função void printch(char) imprime um caractere na tela e a função void print(string) imprime uma string na tela. A função void newLineCheck(void) é uma função de verificação para confirmar se alcançamos a última linha na tela, tomando as medidas cabíveis.</text:p>
      <text:p text:style-name="Normal">A função<text:s/><text:span text:style-name="T620">void scrollUp(uint8 lineNumber)</text:span><text:s/>desloca o conteúdo da tela para cima, removendo a quantidade especificada de linhas na parte superior, e limpa as linhas recém-criadas na parte inferior. E por ultimo, atualiza as posições do cursor conforme necessário.</text:p>
      <text:p text:style-name="Normal">A função<text:s/><text:span text:style-name="T621">void newLineCheck()</text:span><text:s/>verifica se o cursor atingiu a última linha da tela (sh-1). Se verdadeiro, chama scrollUp(1) para rolar a tela para cima.</text:p>
      <text:p text:style-name="Normal">A função<text:s/><text:span text:style-name="T622">void printch(char c)</text:span><text:s/>realiza a impressão de um caractere na posição atual do cursor e faz o tratamento dos caracteres especiais como retrocesso (0x08), TAB (0x09), retorno de carro ('\r'), e nova linha ('\n'). E por ultimo também atualiza as posições do cursor após a impressão.</text:p>
      <text:p text:style-name="Normal">A<text:s/><text:span text:style-name="T623">função void print(string ch)</text:span><text:s/>imprime uma string chamando repetidamente printch para cada caractere na string.</text:p>
      <text:p text:style-name="Normal">Agora iremos colar os códigos nos respectivos arquivos para prosseguirmos conforme a Figura 33.</text:p>
      <text:soft-page-break/>
      <text:p text:style-name="P624"><draw:frame draw:style-name="a49" draw:name="Picture 1" text:anchor-type="as-char" svg:x="0in" svg:y="0in" svg:width="5.16294in" svg:height="5.25733in" style:rel-width="scale" style:rel-height="scale"><draw:image xlink:href="media/image34.png" xlink:type="simple" xlink:show="embed" xlink:actuate="onLoad"/><svg:title/><svg:desc>A screenshot of a computer program

Description automatically generated</svg:desc></draw:frame></text:p>
      <text:p text:style-name="P625">Figura 33 – Colando os codigos e verificando a estrutura final</text:p>
      <text:list text:style-name="LFO8" text:continue-numbering="true">
        <text:list-item>
          <text:list>
            <text:list-item>
              <text:p text:style-name="P626">Teste da função updateCursor() no arquivo kernel.c</text:p>
            </text:list-item>
          </text:list>
        </text:list-item>
      </text:list>
      <text:p text:style-name="P627">Com base no que foi dito no Tópico 2.1. Implementação do projeto, iremos agora realizar a tarefa <text:s/>proposta pelo professor, de realizarmos um teste utilizando a função updateCursor() no arquivo kernel.c, no qual terá de ser realizado novamente a compilação e execução do trabalho utilizando-se o<text:s/><text:tab/>QEMU e verificar o resultado. Vale ressaltar que deverá ser utilizado os valores de cursorX = 20 e cursorY = 15 para testes.</text:p>
      <text:p text:style-name="Normal">Sendo assim, de inicio, iremos alterar o nosso arquivo kernel.c localizado em<text:s/><text:span text:style-name="T628">Projeto_2</text:span><text:span text:style-name="T629">/so</text:span><text:span text:style-name="T630"><text:s/>de modo que seja utilizado a função<text:s/></text:span><text:span text:style-name="T631">UpdateCursor()</text:span><text:span text:style-name="T632"><text:s/>conforme o código 16 abaixo atualizado.</text:span></text:p>
      <text:p text:style-name="P633"><text:span text:style-name="T634"><draw:frame draw:style-name="a50" draw:name="Picture 1" text:anchor-type="as-char" svg:x="0in" svg:y="0in" svg:width="3.92938in" svg:height="0.95665in" style:rel-width="scale" style:rel-height="scale"><draw:image xlink:href="media/image35.png" xlink:type="simple" xlink:show="embed" xlink:actuate="onLoad"/><svg:title/><svg:desc>A close-up of a computer code

Description automatically generated</svg:desc></draw:frame></text:span></text:p>
      <text:p text:style-name="P635">Figura 34 – Editando o arquivo kernel.c</text:p>
      <text:p text:style-name="P636"/>
      <text:soft-page-break/>
      <text:p text:style-name="P637"><text:span text:style-name="T638"><draw:frame draw:id="id16" draw:style-name="a51" draw:name="Text Box 2" text:anchor-type="as-char" svg:x="0in" svg:y="0in" svg:width="5.87153in" svg:height="2.21667in" style:rel-width="scale" style:rel-height="scale"><draw:text-box><text:p text:style-name="P639">kmain()</text:p><text:p text:style-name="P640">{</text:p><text:p text:style-name="P641"><text:s text:c="4"/>char *vidmem = (char*) 0xb8000;</text:p><text:p text:style-name="P642"><text:s text:c="4"/>vidmem[0] = 'X';</text:p><text:p text:style-name="P643"><text:s text:c="4"/>vidmem[1] = 0x02; /* cor do caractere: verde */</text:p><text:p text:style-name="P644"/><text:p text:style-name="P645"><text:s text:c="4"/>// Chama a função updateCursor() com valores específicos</text:p><text:p text:style-name="P646"><text:s text:c="4"/><text:span text:style-name="T647">cursorX = 20;</text:span></text:p><text:p text:style-name="P648"><text:s text:c="4"/>cursorY = 15;</text:p><text:p text:style-name="P649"><text:s text:c="4"/>updateCursor();</text:p><text:p text:style-name="P650"><text:span text:style-name="T651">}</text:span></text:p></draw:text-box><svg:title/><svg:desc/></draw:frame></text:span></text:p>
      <text:p text:style-name="P652">Código 16 – Atualização do conteúdo do arquivo kernel.c.</text:p>
      <text:p text:style-name="Normal">Agora iremos realizar a compilação do nosso projeto seguindo os mesmos passos que realizamos no tópico 1.3 - Preparação do projeto - Figura 14.</text:p>
      <text:p text:style-name="P653"><draw:frame draw:style-name="a52" draw:name="Picture 1" text:anchor-type="as-char" svg:x="0in" svg:y="0in" svg:width="5.30714in" svg:height="2.20299in" style:rel-width="scale" style:rel-height="scale"><draw:image xlink:href="media/image36.png" xlink:type="simple" xlink:show="embed" xlink:actuate="onLoad"/><svg:title/><svg:desc>A screenshot of a computer program

Description automatically generated</svg:desc></draw:frame></text:p>
      <text:p text:style-name="P654">Figura 35 – Compilação erro.</text:p>
      <text:p text:style-name="Normal">Infelizmente tivemos esse erro, mas é obvio que iria dar errado, pois não declaramos corretamente as funções, sendo assim, partindo como ponto a observação final do professor, vale destacar que todas as fun<text:span text:style-name="T655">ções declaradas são consideradas “estáticas”. N</text:span>esse contexto, "estático" significa que as funções são definidas diretamente no arquivo de cabeçalho (<text:span text:style-name="T656">screen.h</text:span>). A recomendação é que essas funções sejam<text:s/><text:span text:style-name="T657">declaradas com "extern"</text:span><text:s/>no arquivo de<text:s/><text:span text:style-name="T658">cabeçalho</text:span><text:s/>e<text:s/><text:span text:style-name="T659">implementadas em um arquivo separado</text:span><text:s/>(por exemplo, screen.c). Essa abordagem evita a duplicação de código quando a função é chamada várias vezes no kernel, melhorando a organização e o tamanho do executável final. Para implementar isso, você precisa criar um arquivo .c correspondente (por exemplo, screen.c) e adicionar a compilação desse arquivo no script build.sh.</text:p>
      <text:p text:style-name="Normal"><text:span text:style-name="T660">Certo, então a primeira coisa que iremos fazer é criar um arquivo novo separado chamado de<text:s/></text:span><text:span text:style-name="T661">screen.c</text:span><text:span text:style-name="T662"><text:s/>no mesmo diretório onde está o kernel.c (./Projeto_2/so) e iremos implementar as funções de screen.h,</text:span><text:s/><text:span text:style-name="T663">system.h, types.h e string.h que haviamos, logo, formaremos<text:s/></text:span>novos abaixo<text:span text:style-name="T664">.</text:span></text:p>
      <text:soft-page-break/>
      <text:p text:style-name="P665"><text:span text:style-name="T666"><draw:frame draw:id="id17" draw:style-name="a53" draw:name="Text Box 2" text:anchor-type="as-char" svg:x="0in" svg:y="0in" svg:width="5.87153in" svg:height="9.15625in" style:rel-width="scale" style:rel-height="scale"><draw:text-box><text:p text:style-name="P667"><text:span text:style-name="T668">#include<text:s/></text:span><text:span text:style-name="T669">"basic/include/screen.h"</text:span></text:p><text:p text:style-name="P670"/><text:p text:style-name="P671">int32 cursorX = 0, cursorY = 0; // Posição do cursor na tela</text:p><text:p text:style-name="P672">const uint8 sw = 80, sh = 25, sd = 2; // Dimensões da tela (largura, altura, profundidade)</text:p><text:p text:style-name="P673"/><text:p text:style-name="P674">// Desloca conteúdo da tela para cima, remove 'lineNumber' linhas na parte superior</text:p><text:p text:style-name="P675">void scrollUp(uint8 lineNumber) {</text:p><text:p text:style-name="P676">string vidmem = (string)0xb8000;</text:p><text:p text:style-name="P677">uint16 i = 0;</text:p><text:p text:style-name="P678"/><text:p text:style-name="P679">for (i; i &lt; sw * (sh - 1) * sd; i++) {</text:p><text:p text:style-name="P680"><text:span text:style-name="T681"><text:s text:c="2"/></text:span><text:span text:style-name="T682">vidmem[i] = vidmem[i + sw * sd * lineNumber]; <text:s/>// Move o conteúdo da tela p/ cima</text:span></text:p><text:p text:style-name="P683"><text:s text:c="4"/><text:tab/>}</text:p><text:p text:style-name="P684"/><text:p text:style-name="P685">clearLine(sh - 1 - lineNumber, sh - 1); <text:s/>// Limpa linhas recém-criadas na parte inferior</text:p><text:p text:style-name="P686">if ((cursorY - lineNumber) &lt; 0) {</text:p><text:p text:style-name="P687">cursorY = 0;</text:p><text:p text:style-name="P688">cursorX = 0;</text:p><text:p text:style-name="P689">} else {</text:p><text:p text:style-name="P690">cursorY -= lineNumber; <text:s/>// Atualiza a posição do cursor na altura</text:p><text:p text:style-name="P691">}</text:p><text:p text:style-name="P692">updateCursor(); <text:s/>// Atualiza a posição do cursor</text:p><text:p text:style-name="P693"><text:span text:style-name="T694">}</text:span></text:p><text:p text:style-name="P695"/><text:p text:style-name="P696">// Limpa a tela de uma linha específica até outra</text:p><text:p text:style-name="P697">void clearLine(uint8 from, uint8 to) {</text:p><text:p text:style-name="P698">uint16 i = sw * from * sd;</text:p><text:p text:style-name="P699">string vidmem = (string)0xb8000;</text:p><text:p text:style-name="P700">for (i; i &lt; (sw * (to + 1) * sd); i++) {</text:p><text:p text:style-name="P701">vidmem[i] = 0x0;<text:s/><text:tab/>// Valor (caractere) 0</text:p><text:p text:style-name="P702">vidmem[i+1] = 0x0F; <text:s text:c="2"/>// Cor branca sobre fundo preto</text:p><text:p text:style-name="P703">}</text:p><text:p text:style-name="P704">}</text:p><text:p text:style-name="P705"/><text:p text:style-name="P706">// Atualiza a posição do cursor na tela</text:p><text:p text:style-name="P707">void updateCursor() {</text:p><text:p text:style-name="P708">unsigned temp;</text:p><text:p text:style-name="P709">temp = cursorY * sw + cursorX;</text:p><text:p text:style-name="P710">outportb(0x3D4, 14);</text:p><text:p text:style-name="P711">outportb(0x3D5, temp &gt;&gt; 8);</text:p><text:p text:style-name="P712">outportb(0x3D4, 15);</text:p><text:p text:style-name="P713">outportb(0x3D5, temp);</text:p><text:p text:style-name="P714">}</text:p><text:p text:style-name="P715"/><text:p text:style-name="P716">// Limpa toda a tela</text:p><text:p text:style-name="P717">void clearScreen() {</text:p><text:p text:style-name="P718">clearLine(0, sh-1); <text:s text:c="5"/>// Chama clearLine p/ limpar da linha 0 até n (sh-1)</text:p><text:p text:style-name="P719">cursorX = 0;<text:tab/><text:tab/>// Reseta a posição do cursor na largura</text:p><text:p text:style-name="P720">cursorY = 0;<text:tab/><text:tab/>// Reseta a posição do cursor na altura</text:p><text:p text:style-name="P721">updateCursor();<text:tab/>// Atualiza a posição do cursor</text:p><text:p text:style-name="P722">}</text:p><text:p text:style-name="P723"/></draw:text-box><svg:title/><svg:desc/></draw:frame></text:span></text:p>
      <text:soft-page-break/>
      <text:p text:style-name="P724"><text:span text:style-name="T725"><draw:frame draw:id="id18" draw:style-name="a54" draw:name="Text Box 2" text:anchor-type="as-char" svg:x="0in" svg:y="0in" svg:width="5.87153in" svg:height="9.58056in" style:rel-width="scale" style:rel-height="scale"><draw:text-box><text:p text:style-name="P726">// Desloca conteúdo da tela para cima, remove 'lineNumber' linhas na parte superior</text:p><text:p text:style-name="P727">void scrollUp(uint8 lineNumber) {</text:p><text:p text:style-name="P728">string vidmem = (string)0xb8000;</text:p><text:p text:style-name="P729">uint16 i = 0;</text:p><text:p text:style-name="P730"/><text:p text:style-name="P731">for (i; i &lt; sw * (sh - 1) * sd; i++) {</text:p><text:p text:style-name="P732"><text:span text:style-name="T733"><text:s text:c="2"/></text:span><text:span text:style-name="T734">vidmem[i] = vidmem[i + sw * sd * lineNumber]; <text:s/>// Move o conteúdo da tela p/ cima</text:span></text:p><text:p text:style-name="P735"><text:s text:c="4"/><text:tab/>}</text:p><text:p text:style-name="P736"/><text:p text:style-name="P737">clearLine(sh - 1 - lineNumber, sh - 1); <text:s/>// Limpa linhas recém-criadas na parte inferior</text:p><text:p text:style-name="P738">if ((cursorY - lineNumber) &lt; 0) {</text:p><text:p text:style-name="P739">cursorY = 0;</text:p><text:p text:style-name="P740">cursorX = 0;</text:p><text:p text:style-name="P741">} else {</text:p><text:p text:style-name="P742">cursorY -= lineNumber; <text:s/>// Atualiza a posição do cursor na altura</text:p><text:p text:style-name="P743">}</text:p><text:p text:style-name="P744">updateCursor(); <text:s/>// Atualiza a posição do cursor</text:p><text:p text:style-name="P745">}</text:p><text:p text:style-name="P746"/><text:p text:style-name="P747">// Verifica se o cursor atingiu a última linha da tela, e se sim, rola a tela para cima</text:p><text:p text:style-name="P748">void newLineCheck() {</text:p><text:p text:style-name="P749">if (cursorY &gt;= sh-1) {</text:p><text:p text:style-name="P750"><text:span text:style-name="T751"><text:s text:c="5"/></text:span>scrollUp(1); <text:s/>// Chama scrollUp p/ rolar a tela p/ cima removendo uma linha</text:p><text:p text:style-name="P752">}</text:p><text:p text:style-name="P753">}</text:p><text:p text:style-name="P754"/><text:p text:style-name="P755">// Imprime um caractere na posição atual do cursor</text:p><text:p text:style-name="P756">void printch(char c) {</text:p><text:p text:style-name="P757"><text:s text:c="2"/>string vidmem = (string)0xb8000;</text:p><text:p text:style-name="P758"><text:s text:c="2"/>switch(c) {</text:p><text:p text:style-name="P759"><text:s text:c="4"/>case (0x08): // Retrocesso (BACKSPACE)</text:p><text:p text:style-name="P760"><text:span text:style-name="T761"><text:s text:c="8"/></text:span>if(cursorX &gt; 0) {</text:p><text:p text:style-name="P762"><text:s text:c="11"/>cursorX--; // Move cursor p/ posição anterior na largura</text:p><text:p text:style-name="P763"><text:s text:c="11"/>vidmem[(cursorY * sw + cursorX)*sd] = 0x00; // Define o caractere como nulo</text:p><text:p text:style-name="P764"><text:s text:c="8"/>} break;</text:p><text:p text:style-name="P765"><text:s text:c="5"/>case (0x09): // Representa a tecla TAB</text:p><text:p text:style-name="P766"><text:s text:c="9"/>cursorX = (cursorX + 8) &amp; ~(8 - 1); // Move cursor p/ a próxima posição TAB</text:p><text:p text:style-name="P767"><text:s text:c="9"/>break;</text:p><text:p text:style-name="P768"><text:s text:c="5"/>case ('\r'): // Retorno de Carro</text:p><text:p text:style-name="P769"><text:s text:c="9"/>cursorX = 0; // Move o cursor para a primeira posição na largura</text:p><text:p text:style-name="P770"><text:s text:c="9"/>break;</text:p><text:p text:style-name="P771"><text:s text:c="5"/>case ('\n'): // Nova Linha</text:p><text:p text:style-name="P772"><text:s text:c="9"/>cursorX = 0; // Move o cursor para a primeira posição na largura</text:p><text:p text:style-name="P773"><text:s text:c="9"/>cursorY++; <text:s/>// Move o cursor para a próxima linha na altura</text:p><text:p text:style-name="P774"><text:s text:c="9"/>break;</text:p><text:p text:style-name="P775"><text:s text:c="5"/>default:</text:p><text:p text:style-name="P776"><text:s text:c="9"/>vidmem[((cursorY * sw + cursorX)) * sd] = c; // Define o caractere na tela</text:p><text:p text:style-name="P777"><text:s text:c="9"/>vidmem[((cursorY * sw + cursorX)) * sd + 1] = 0x0F; //Define a cor do caractere</text:p><text:p text:style-name="P778"><text:s text:c="9"/>cursorX++; // Move o cursor para a próxima posição na largura</text:p><text:p text:style-name="P779"><text:s text:c="9"/>break;</text:p><text:p text:style-name="P780"><text:s text:c="2"/>}<text:s/></text:p><text:p text:style-name="P781"/></draw:text-box><svg:title/><svg:desc/></draw:frame></text:span></text:p>
      <text:soft-page-break/>
      <text:p text:style-name="P782"><text:span text:style-name="T783"><draw:frame draw:id="id19" draw:style-name="a55" draw:name="Text Box 2" text:anchor-type="as-char" svg:x="0in" svg:y="0in" svg:width="5.87153in" svg:height="2.11181in" style:rel-width="scale" style:rel-height="scale"><draw:text-box><text:p text:style-name="P784">(); <text:s text:c="2"/>// Atualiza a posição do cursor</text:p><text:p text:style-name="P785">}</text:p><text:p text:style-name="P786"/><text:p text:style-name="P787">// Imprime uma string chamando repetidamente printch para cada caractere na string</text:p><text:p text:style-name="P788">void print(string ch) {</text:p><text:p text:style-name="P789">uint16 i = 0;</text:p><text:p text:style-name="P790">for(i; i &lt; strlength(ch); i++) {</text:p><text:p text:style-name="P791"><text:span text:style-name="T792"><text:s text:c="8"/></text:span><text:span text:style-name="T793"><text:tab/></text:span><text:span text:style-name="T794"><text:tab/></text:span>printch(ch[i]); <text:s/>// Chama printch para cada caractere na string</text:p><text:p text:style-name="P795">}</text:p><text:p text:style-name="P796"><text:span text:style-name="T797">}<text:s/></text:span></text:p></draw:text-box><svg:title/><svg:desc/></draw:frame></text:span></text:p>
      <text:p text:style-name="P798">Código 17 – Conteúdo do arquivo screen.c.</text:p>
      <text:p text:style-name="Normal"><text:span text:style-name="T799">Agora, em nosso arquivo<text:s/></text:span><text:span text:style-name="T800">string.h</text:span><text:span text:style-name="T801"><text:s/>localizado na pasta ./Projeto_2/so/basic/include, declare as variáveis como externas conforme o código 18 abaixo.</text:span></text:p>
      <text:p text:style-name="P802"><text:span text:style-name="T803"><draw:frame draw:id="id20" draw:style-name="a56" draw:name="Text Box 2" text:anchor-type="as-char" svg:x="0in" svg:y="0in" svg:width="5.87153in" svg:height="1.52153in" style:rel-width="scale" style:rel-height="scale"><draw:text-box><text:p text:style-name="P804">#ifndef STRING_H</text:p><text:p text:style-name="P805">#define STRING_H</text:p><text:p text:style-name="P806">#include "types.h"</text:p><text:p text:style-name="P807"/><text:p text:style-name="P808">uint16 strlength(string ch);</text:p><text:p text:style-name="P809"/><text:p text:style-name="P810"><text:span text:style-name="T811">#endif</text:span></text:p></draw:text-box><svg:title/><svg:desc/></draw:frame></text:span></text:p>
      <text:p text:style-name="P812">Código 18 – Atualização do conteúdo do arquivo string.h.</text:p>
      <text:p text:style-name="Normal"><text:span text:style-name="T813">Agora, em nosso arquivo<text:s/></text:span><text:span text:style-name="T814">system.h</text:span><text:span text:style-name="T815"><text:s/>localizado na pasta ./Projeto_2/so/basic/include, declare as variáveis como externas conforme o código 19 abaixo.</text:span></text:p>
      <text:p text:style-name="P816"><text:span text:style-name="T817"><draw:frame draw:id="id21" draw:style-name="a57" draw:name="Text Box 2" text:anchor-type="as-char" svg:x="0in" svg:y="0in" svg:width="5.87153in" svg:height="1.69514in" style:rel-width="scale" style:rel-height="scale"><draw:text-box><text:p text:style-name="P818">#ifndef SYSTEM_H</text:p><text:p text:style-name="P819">#define SYSTEM_H</text:p><text:p text:style-name="P820">#include "types.h"</text:p><text:p text:style-name="P821"/><text:p text:style-name="P822">uint8 inportb (uint16 _port);</text:p><text:p text:style-name="P823">void outportb (uint16 _port, uint8 _data);</text:p><text:p text:style-name="P824"/><text:p text:style-name="P825"><text:span text:style-name="T826">#endif</text:span></text:p></draw:text-box><svg:title/><svg:desc/></draw:frame></text:span></text:p>
      <text:p text:style-name="P827">Código 19 – Atualização do conteúdo do arquivo system.h.</text:p>
      <text:p text:style-name="Normal"><text:span text:style-name="T828">Agora, em nosso arquivo<text:s/></text:span><text:span text:style-name="T829">types.h</text:span><text:span text:style-name="T830"><text:s/>localizado na pasta ./Projeto_2/so/basic/include, declare as variáveis como externas conforme o código 20 abaixo.</text:span></text:p>
      <text:soft-page-break/>
      <text:p text:style-name="P831"><text:span text:style-name="T832"><draw:frame draw:id="id22" draw:style-name="a58" draw:name="Text Box 2" text:anchor-type="as-char" svg:x="0in" svg:y="0in" svg:width="5.87153in" svg:height="3.59028in" style:rel-width="scale" style:rel-height="scale"><draw:text-box><text:p text:style-name="P833">#ifndef TYPES_H</text:p><text:p text:style-name="P834">#define TYPES_H</text:p><text:p text:style-name="P835"/><text:p text:style-name="P836">typedef signed char int8;</text:p><text:p text:style-name="P837">typedef unsigned char uint8;</text:p><text:p text:style-name="P838"/><text:p text:style-name="P839">typedef signed short int16;</text:p><text:p text:style-name="P840">typedef unsigned short uint16;</text:p><text:p text:style-name="P841"/><text:p text:style-name="P842">typedef signed int int32;</text:p><text:p text:style-name="P843">typedef unsigned int uint32;</text:p><text:p text:style-name="P844"/><text:p text:style-name="P845">typedef signed long int64;</text:p><text:p text:style-name="P846">typedef unsigned long uint64;</text:p><text:p text:style-name="P847"/><text:p text:style-name="P848">typedef char* string;</text:p><text:p text:style-name="P849"/><text:p text:style-name="P850"><text:span text:style-name="T851">#endif</text:span></text:p></draw:text-box><svg:title/><svg:desc/></draw:frame></text:span></text:p>
      <text:p text:style-name="P852">Código 20 – Atualização do conteúdo do arquivo types.h.</text:p>
      <text:p text:style-name="Normal"><text:span text:style-name="T853">Agora, em nosso arquivo<text:s/></text:span><text:span text:style-name="T854">screen.h</text:span><text:span text:style-name="T855"><text:s/>localizado na pasta ./Projeto_2/so/basic/include, declare as variáveis como externas conforme o código 21 abaixo.</text:span></text:p>
      <text:p text:style-name="P856"><text:span text:style-name="T857"><draw:frame draw:id="id23" draw:style-name="a59" draw:name="Text Box 2" text:anchor-type="as-char" svg:x="0in" svg:y="0in" svg:width="5.87153in" svg:height="2.21667in" style:rel-width="scale" style:rel-height="scale"><draw:text-box><text:p text:style-name="P858">#ifndef SCREEN_H</text:p><text:p text:style-name="P859">#define SCREEN_H</text:p><text:p text:style-name="P860"/><text:p text:style-name="P861">#include "types.h"</text:p><text:p text:style-name="P862">#include "system.h"</text:p><text:p text:style-name="P863">#include "string.h"</text:p><text:p text:style-name="P864"/><text:p text:style-name="P865">extern int32 cursorX;</text:p><text:p text:style-name="P866">extern int32 cursorY;</text:p><text:p text:style-name="P867"/><text:p text:style-name="P868">#endif</text:p></draw:text-box><svg:title/><svg:desc/></draw:frame></text:span></text:p>
      <text:p text:style-name="P869">Código 21 – Atualização do conteúdo do arquivo screen.h.</text:p>
      <text:p text:style-name="P870">Isso indica que as variáveis cursorX e cursorY são definidas em outro lugar (no arquivo screen.c, neste caso). Agora, em nosso arquivo kernel.c, vamos apenas precisar de incluir o cabeçalho e chamar as funções conforme necessário como podemos ver no código 22. Além disso, utilizaremos os valores de cursorX = 20 e cursorY = 15 para testes.</text:p>
      <text:soft-page-break/>
      <text:p text:style-name="P871"><text:span text:style-name="T872"><draw:frame draw:id="id24" draw:style-name="a60" draw:name="Text Box 2" text:anchor-type="as-char" svg:x="0in" svg:y="0in" svg:width="5.87153in" svg:height="1.7125in" style:rel-width="scale" style:rel-height="scale"><draw:text-box><text:p text:style-name="P873">#include "basic/include/screen.h"</text:p><text:p text:style-name="P874"/><text:p text:style-name="P875">void kmain() {</text:p><text:p text:style-name="P876"><text:s text:c="4"/>// Chama a função updateCursor() com valores específicos</text:p><text:p text:style-name="P877"><text:s text:c="4"/><text:span text:style-name="T878">cursorX = 20;</text:span></text:p><text:p text:style-name="P879"><text:s text:c="4"/>cursorY = 15;</text:p><text:p text:style-name="P880"><text:s text:c="4"/>updateCursor();</text:p><text:p text:style-name="P881">}</text:p></draw:text-box><svg:title/><svg:desc/></draw:frame></text:span></text:p>
      <text:p text:style-name="P882">Código 22 – Atualização do conteúdo do arquivo kernel.c.</text:p>
      <text:p text:style-name="P883">Vale ressaltar que, anteriormente na tarefa 1, haviamos feito com que o kernel.c escreve-se um caractere “X” diretamente no endereço de memória de vídeo (‘0xb8000’), porém não será mais necessário e optamos por remove-la já que iremos utilizar o updateCursor() para manipular o cursor na tela.</text:p>
      <text:p text:style-name="P884">E agora também editaremos o nosso script build.sh para conseguirmos compilar tudo sem problemas.</text:p>
      <text:p text:style-name="P885"><text:span text:style-name="T886"><draw:frame draw:id="id25" draw:style-name="a61" draw:name="Text Box 2" text:anchor-type="as-char" svg:x="0in" svg:y="0in" svg:width="5.87153in" svg:height="1.1125in" style:rel-width="scale" style:rel-height="scale"><draw:text-box><text:p text:style-name="P887">#!/bin/sh</text:p><text:p text:style-name="P888">nasm -f elf32 kernel.asm -o kasm.o</text:p><text:p text:style-name="P889">gcc -m32 -c -w kernel.c -o kc.o</text:p><text:p text:style-name="P890">gcc -m32 -c -w screen.c -o screen.o</text:p><text:p text:style-name="P891">ld -m elf_i386 -T link.ld -o kernel.bin kasm.o screen.o kc.o</text:p></draw:text-box><svg:title/><svg:desc/></draw:frame></text:span></text:p>
      <text:p text:style-name="P892"><text:span text:style-name="T893">Código 23 –<text:s/></text:span><text:span text:style-name="T894"><office:annotation office:name="1" xml:id="713230193"><dc:creator>Dalton Tavares</dc:creator><dc:date>2023-12-15T08:13:00</dc:date><text:p text:style-name="CommentText">Concentrar todo o código fonte em screen.c vai te gerar problema no próximo projeto. Quando vc for fazer o Makefile, vc vai ter que separar tudo nos fontes correspondentes (i.e. screen.c, string.c, system.c).<text:s/></text:p></office:annotation>Atualização do conteúdo do arquivo build.sh.</text:span><text:span text:style-name="CommentReference"><office:annotation-end office:name="1"/></text:span></text:p>
      <text:p text:style-name="P895">E por ultimo temos a visão geral de como ficou para prosseguirmos para compilação e testes.</text:p>
      <text:soft-page-break/>
      <text:p text:style-name="P896"><text:span text:style-name="T897"><draw:frame draw:style-name="a62" draw:name="Picture 1" text:anchor-type="as-char" svg:x="0in" svg:y="0in" svg:width="3.65173in" svg:height="4.46233in" style:rel-width="scale" style:rel-height="scale"><draw:image xlink:href="media/image37.png" xlink:type="simple" xlink:show="embed" xlink:actuate="onLoad"/><svg:title/><svg:desc>A screenshot of a computer program

Description automatically generated</svg:desc></draw:frame></text:span></text:p>
      <text:p text:style-name="P898">Figura 36 – Editando, criando arquivos e a visão geral da estrutura.</text:p>
      <text:p text:style-name="P899">Agora que estamos com tudo preparado, vamos realizar novamente a compilação dos códigos feitos anteriormente utilizando o script build.sh.</text:p>
      <text:p text:style-name="P900"><text:span text:style-name="T901"><draw:frame draw:style-name="a63" draw:name="Picture 1" text:anchor-type="as-char" svg:x="0in" svg:y="0in" svg:width="5.90556in" svg:height="0.9375in" style:rel-width="scale" style:rel-height="scale"><draw:image xlink:href="media/image38.png" xlink:type="simple" xlink:show="embed" xlink:actuate="onLoad"/><svg:title/><svg:desc>A close up of a text

Description automatically generated</svg:desc></draw:frame></text:span></text:p>
      <text:p text:style-name="P902">Figura 37 – Compilado com sucesso.</text:p>
      <text:p text:style-name="P903">Agora vamos mover o arquivo gerado (kernel.bin) para a pasta ./basic/boot e depois vamos testar utilizando nosso script run.sh.</text:p>
      <text:p text:style-name="P904"><text:span text:style-name="T905"><draw:frame draw:style-name="a64" draw:name="Picture 1" text:anchor-type="as-char" svg:x="0in" svg:y="0in" svg:width="5.52363in" svg:height="1.65306in" style:rel-width="scale" style:rel-height="scale"><draw:image xlink:href="media/image39.png" xlink:type="simple" xlink:show="embed" xlink:actuate="onLoad"/><svg:title/><svg:desc>A screenshot of a computer

Description automatically generated</svg:desc></draw:frame></text:span></text:p>
      <text:p text:style-name="P906">Figura 38 – Testado com sucesso.</text:p>
      <text:soft-page-break/>
      <text:p text:style-name="Normal">Agora vamos gerar a nossa ISO para disponibilizar para testes em outras m<text:span text:style-name="T907">áquinas utilizando nosso script make.sh.</text:span></text:p>
      <text:p text:style-name="P908"><text:span text:style-name="T909"><draw:frame draw:style-name="a65" draw:name="Picture 1" text:anchor-type="as-char" svg:x="0in" svg:y="0in" svg:width="5.25459in" svg:height="2.51113in" style:rel-width="scale" style:rel-height="scale"><draw:image xlink:href="media/image40.png" xlink:type="simple" xlink:show="embed" xlink:actuate="onLoad"/><svg:title/><svg:desc>A screenshot of a computer program

Description automatically generated</svg:desc></draw:frame></text:span></text:p>
      <text:p text:style-name="P910">Figura 39 – ISO gerada com sucesso.</text:p>
      <text:p text:style-name="P911">Agora a nossa estrutura de arquivos ficou mais completa conforme a Figura 40 abaixo.</text:p>
      <text:p text:style-name="P912"><text:span text:style-name="T913"><draw:frame draw:style-name="a66" draw:name="Picture 1" text:anchor-type="as-char" svg:x="0in" svg:y="0in" svg:width="1.93545in" svg:height="3.66004in" style:rel-width="scale" style:rel-height="scale"><draw:image xlink:href="media/image41.png" xlink:type="simple" xlink:show="embed" xlink:actuate="onLoad"/><svg:title/><svg:desc>A screen shot of a computer

Description automatically generated</svg:desc></draw:frame></text:span></text:p>
      <text:p text:style-name="P914">Figura 40 – Estrutura de arquivos atualizada.</text:p>
      <text:p text:style-name="Normal">Enviamos para a nossa maquina os arquivos da m<text:span text:style-name="T915">áquina guest para a hospedeira utilizando os mesmos meios da tarafa 1.</text:span></text:p>
      <text:soft-page-break/>
      <text:p text:style-name="P916"><text:span text:style-name="T917"><draw:frame draw:style-name="a67" draw:name="Picture 1" text:anchor-type="as-char" svg:x="0in" svg:y="0in" svg:width="5.38695in" svg:height="3.84954in" style:rel-width="scale" style:rel-height="scale"><draw:image xlink:href="media/image42.png" xlink:type="simple" xlink:show="embed" xlink:actuate="onLoad"/><svg:title/><svg:desc>A screenshot of a computer

Description automatically generated</svg:desc></draw:frame></text:span></text:p>
      <text:p text:style-name="P918">Figura 41 – Procedimento de transferencia de arquivo SCP.</text:p>
      <text:p text:style-name="Normal">Agora iremos criar nossa maquina virtual com a nossa ISO. Como ja haviamos uma antes, bastou excluir a ISO antiga em armazenamento e adicionar um disco optico novo no lugar.</text:p>
      <text:p text:style-name="Normal"><draw:frame draw:style-name="a68" draw:name="Picture 1" text:anchor-type="as-char" svg:x="0in" svg:y="0in" svg:width="5.90556in" svg:height="3.50486in" style:rel-width="scale" style:rel-height="scale"><draw:image xlink:href="media/image43.png" xlink:type="simple" xlink:show="embed" xlink:actuate="onLoad"/><svg:title/><svg:desc>A screenshot of a computer

Description automatically generated</svg:desc></draw:frame></text:p>
      <text:p text:style-name="P919">Figura 42 – Excluindo ISO antiga.</text:p>
      <text:soft-page-break/>
      <text:p text:style-name="P920"><text:span text:style-name="T921"><draw:frame draw:style-name="a69" draw:name="Picture 1" text:anchor-type="as-char" svg:x="0in" svg:y="0in" svg:width="4.36114in" svg:height="3.39137in" style:rel-width="scale" style:rel-height="scale"><draw:image xlink:href="media/image44.png" xlink:type="simple" xlink:show="embed" xlink:actuate="onLoad"/><svg:title/><svg:desc>A screenshot of a computer

Description automatically generated</svg:desc></draw:frame></text:span></text:p>
      <text:p text:style-name="P922">Figura 43 – Adicionando ISO nova.</text:p>
      <text:p text:style-name="Normal">Clique em acrescentar e selecione a ISO no local que salvamos.</text:p>
      <text:p text:style-name="P923"><text:span text:style-name="T924"><draw:frame draw:style-name="a70" draw:name="Picture 1" text:anchor-type="as-char" svg:x="0in" svg:y="0in" svg:width="2.48993in" svg:height="1.42728in" style:rel-width="scale" style:rel-height="scale"><draw:image xlink:href="media/image45.png" xlink:type="simple" xlink:show="embed" xlink:actuate="onLoad"/><svg:title/><svg:desc>A screenshot of a computer

Description automatically generated</svg:desc></draw:frame></text:span></text:p>
      <text:p text:style-name="P925">Figura 44 – Acrescentar ISO nova.</text:p>
      <text:p text:style-name="Normal">Apos selecionar, clique em escolher para aplicar.</text:p>
      <text:p text:style-name="P926"><text:span text:style-name="T927"><draw:frame draw:style-name="a71" draw:name="Picture 1" text:anchor-type="as-char" svg:x="0in" svg:y="0in" svg:width="3.2192in" svg:height="0.94805in" style:rel-width="scale" style:rel-height="scale"><draw:image xlink:href="media/image46.png" xlink:type="simple" xlink:show="embed" xlink:actuate="onLoad"/><svg:title/><svg:desc>A screenshot of a computer

Description automatically generated</svg:desc></draw:frame></text:span></text:p>
      <text:p text:style-name="P928">Figura 45 – Aplique a ISO nova.</text:p>
      <text:soft-page-break/>
      <text:p text:style-name="P929">Pronto, agora concluimos a tarefa 2, onde temos um cursor ponteiro na tela piscando na posi<text:span text:style-name="T930">ção exata que foi solicitada</text:span>.</text:p>
      <text:p text:style-name="P931"><text:span text:style-name="T932"><draw:frame draw:style-name="a72" draw:name="Picture 1" text:anchor-type="as-char" svg:x="0in" svg:y="0in" svg:width="4.46433in" svg:height="3.47687in" style:rel-width="scale" style:rel-height="scale"><draw:image xlink:href="media/image47.png" xlink:type="simple" xlink:show="embed" xlink:actuate="onLoad"/><svg:title/><svg:desc>A screenshot of a computer

Description automatically generated</svg:desc></draw:frame></text:span></text:p>
      <text:p text:style-name="P933">Figura 46 – Resultado final.</text:p>
      <text:list text:style-name="LFO8" text:continue-numbering="true">
        <text:list-item>
          <text:p text:style-name="P934">Considerações finais</text:p>
        </text:list-item>
      </text:list>
      <text:p text:style-name="Normal">Ao trilharmos os primeiros passos no desenvolvimento de um Sistema Operacional (SO), alcançamos conquistas notáveis. A geração bem-sucedida de kernels executáveis em formatos ".bin" e ISO destaca-se como um marco crucial. Essa realização não apenas ampliou nosso entendimento prático, permitindo testes em ambientes virtuais, mas também estabeleceu a base para futuros avanços.</text:p>
      <text:p text:style-name="Normal">Nossa jornada incluiu uma compreensão profunda da estrutura de boot, desde a fase inicial do carregamento do kernel até a criação de um ambiente operacional funcional. Essa familiaridade essencial nos posicionou para lidar com operações mais avançadas nos estágios subsequentes do desenvolvimento.</text:p>
      <text:p text:style-name="Normal">Exploramos operações de Input/Output (I/O) em tela em níveis mais baixos, manipulando diretamente o framebuffer de texto na memória de vídeo VGA. Funções como limpar tela, rolar para cima e imprimir caracteres proporcionaram uma interação direta com o ambiente de tela, vital em sistemas operacionais.</text:p>
      <text:p text:style-name="Normal">Em suma, cumprimos metas fundamentais, construímos uma base sólida de conhecimento e avançamos com êxito nos primeiros estágios do desenvolvimento de um SO. Estas realizações representam um progresso significativo em direção a uma compreensão mais profunda e aquisição de habilidades práticas no universo desafiador do desenvolvimento de sistemas operacionais.</text:p>
      <text:soft-page-break/>
      <text:list text:style-name="LFO8" text:continue-numbering="true">
        <text:list-item>
          <text:p text:style-name="P935">Referências</text:p>
        </text:list-item>
      </text:list>
      <text:list text:style-name="LFO14" text:continue-numbering="true">
        <text:list-item>
          <text:p text:style-name="P936"><text:bookmark-start text:name="_Ref151322939"/><text:span text:style-name="T937">Debian, (2023) “Instalando o Debian via Internet”,<text:s/></text:span><text:a xlink:href="https://www.debian.org/distrib/netinst" office:target-frame-name="_top" xlink:show="replace"><text:span text:style-name="T938">https://www.debian.org/distrib/netinst</text:span></text:a><text:span text:style-name="T939">, Junho.</text:span><text:bookmark-end text:name="_Ref151322939"/></text:p>
        </text:list-item>
        <text:list-item>
          <text:p text:style-name="P940"><text:bookmark-start text:name="_Ref152810935"/><text:span text:style-name="T941">Nick Clifton, (2022) “The linker’s warnings about executable stacks and segments”,<text:s/></text:span><text:a xlink:href="https://www.redhat.com/en/blog/linkers-warnings-about-executable-stacks-and-segments" office:target-frame-name="_top" xlink:show="replace"><text:span text:style-name="T942">https://www.redhat.com/en/blog/linkers-warnings-about-executable-stacks-and-segments</text:span></text:a><text:span text:style-name="T943">, Setembro.</text:span><text:bookmark-end text:name="_Ref152810935"/></text:p>
        </text:list-item>
        <text:list-item>
          <text:p text:style-name="P944"><text:bookmark-start text:name="_Ref153130300"/><text:span text:style-name="T945">Dalton Matsuo Tavares, (2023) “Projeto 2 – Primeiros passos para o projeto de um SO”, material disponibilizado no google classroom e SIGAA, Dezembro.</text:span><text:bookmark-end text:name="_Ref153130300"/></text:p>
        </text:list-item>
        <text:list-item>
          <text:p text:style-name="P946"><text:bookmark-start text:name="_Ref152812278"/><text:span text:style-name="T947">Sourceware, (2023) “LD”,<text:s/></text:span><text:a xlink:href="https://sourceware.org/binutils/docs/ld/" office:target-frame-name="_top" xlink:show="replace"><text:span text:style-name="T948">https://sourceware.org/binutils/docs/ld/</text:span></text:a><text:span text:style-name="T949">, Dezembro.</text:span><text:bookmark-end text:name="_Ref152812278"/></text:p>
        </text:list-item>
        <text:list-item>
          <text:p text:style-name="P950"><text:bookmark-start text:name="_Ref153128877"/><text:span text:style-name="T951">Robin Miyagi, (2013) “Introduction to GCC Inline Asm”,<text:s/></text:span><text:a xlink:href="https://asm.sourceforge.net/articles/rmiyagi-inline-asm.txt" office:target-frame-name="_top" xlink:show="replace"><text:span text:style-name="T952">https://asm.sourceforge.net/articles/rmiyagi-inline-asm.txt</text:span></text:a><text:span text:style-name="T953">, Setembro.</text:span><text:bookmark-end text:name="_Ref153128877"/></text:p>
        </text:list-item>
        <text:list-item>
          <text:p text:style-name="P954"><text:bookmark-start text:name="_Ref153130538"/><text:span text:style-name="T955">Amine Hajyoussef and Kevin Panko, (2014) “Low level I/O access using outb and inb”,<text:s/></text:span><text:a xlink:href="https://stackoverflow.com/questions/8960620/low-level-i-o-access-using-outb-and-inb" office:target-frame-name="_top" xlink:show="replace"><text:span text:style-name="T956">https://stackoverflow.com/questions/8960620/low-level-i-o-access-using-outb-and-inb</text:span></text:a><text:span text:style-name="T957">, Junho.</text:span><text:bookmark-end text:name="_Ref153130538"/></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paragraph-properties fo:text-align="justify" fo:margin-top="0.0826in" fo:text-indent="0.2958in"/>
      <style:text-properties style:font-name="Times" style:font-name-asian="Times New Roman" style:font-name-complex="Times New Roman" fo:color="#000000" style:font-size-complex="10pt" fo:hyphenate="false"/>
    </style:style>
    <style:style style:name="DefaultParagraphFont" style:display-name="Default Paragraph Font" style:family="text"/>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2.259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11.02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Endnoteanchor" style:display-name="Endnote anchor" style:family="tex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true"/>
    </style:style>
    <style:style style:name="PlaceholderText" style:display-name="Placeholder Text" style:family="text" style:parent-style-name="DefaultParagraphFont">
      <style:text-properties fo:color="#666666"/>
    </style:style>
    <style:style style:name="NoSpacing" style:display-name="No Spacing" style:family="paragraph">
      <style:paragraph-properties fo:text-align="justify" fo:text-indent="0.2958in"/>
      <style:text-properties style:font-name="Times" style:font-name-asian="Times New Roman" style:font-name-complex="Times New Roman" fo:color="#000000" style:font-size-complex="10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TextChar" style:display-name="Comment Text Char" style:family="text" style:parent-style-name="DefaultParagraphFont">
      <style:text-properties style:font-name="Times" style:font-name-asian="Times New Roman" style:font-name-complex="Times New Roman" fo:color="#000000"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style:font-name-asian="Times New Roman" style:font-name-complex="Times New Roman" fo:font-weight="bold" style:font-weight-asian="bold" style:font-weight-complex="bold" fo:color="#000000" fo:font-size="10pt" style:font-size-asian="10pt" style:font-size-complex="10pt"/>
    </style:style>
    <text:list-style style:name="WW_OutlineListStyle_2" style:display-name="WW_OutlineListStyle_2">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2.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SBCnumberlist" style:display-name="SBC:number:list">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861in" text:min-label-width="0.25in" text:list-level-position-and-space-mode="label-alignment">
          <style:list-level-label-alignment text:label-followed-by="listtab" fo:margin-left="0.8361in" fo:text-indent="-0.25in"/>
        </style:list-level-properties>
        <style:text-properties style:font-name="Symbol"/>
      </text:list-level-style-bullet>
      <text:list-level-style-bullet text:level="2" text:style-name="WW_CharLFO11LVL2" text:bullet-char="o">
        <style:list-level-properties text:space-before="1.0861in" text:min-label-width="0.25in" text:list-level-position-and-space-mode="label-alignment">
          <style:list-level-label-alignment text:label-followed-by="listtab" fo:margin-left="1.3361in" fo:text-indent="-0.25in"/>
        </style:list-level-properties>
        <style:text-properties style:font-name="Courier New"/>
      </text:list-level-style-bullet>
      <text:list-level-style-bullet text:level="3" text:style-name="WW_CharLFO11LVL3" text:bullet-char="">
        <style:list-level-properties text:space-before="1.5861in" text:min-label-width="0.25in" text:list-level-position-and-space-mode="label-alignment">
          <style:list-level-label-alignment text:label-followed-by="listtab" fo:margin-left="1.8361in" fo:text-indent="-0.25in"/>
        </style:list-level-properties>
        <style:text-properties style:font-name="Wingdings"/>
      </text:list-level-style-bullet>
      <text:list-level-style-bullet text:level="4" text:style-name="WW_CharLFO11LVL4" text:bullet-char="">
        <style:list-level-properties text:space-before="2.0861in" text:min-label-width="0.25in" text:list-level-position-and-space-mode="label-alignment">
          <style:list-level-label-alignment text:label-followed-by="listtab" fo:margin-left="2.3361in" fo:text-indent="-0.25in"/>
        </style:list-level-properties>
        <style:text-properties style:font-name="Symbol"/>
      </text:list-level-style-bullet>
      <text:list-level-style-bullet text:level="5" text:style-name="WW_CharLFO11LVL5" text:bullet-char="o">
        <style:list-level-properties text:space-before="2.5861in" text:min-label-width="0.25in" text:list-level-position-and-space-mode="label-alignment">
          <style:list-level-label-alignment text:label-followed-by="listtab" fo:margin-left="2.8361in" fo:text-indent="-0.25in"/>
        </style:list-level-properties>
        <style:text-properties style:font-name="Courier New"/>
      </text:list-level-style-bullet>
      <text:list-level-style-bullet text:level="6" text:style-name="WW_CharLFO11LVL6" text:bullet-char="">
        <style:list-level-properties text:space-before="3.0861in" text:min-label-width="0.25in" text:list-level-position-and-space-mode="label-alignment">
          <style:list-level-label-alignment text:label-followed-by="listtab" fo:margin-left="3.3361in" fo:text-indent="-0.25in"/>
        </style:list-level-properties>
        <style:text-properties style:font-name="Wingdings"/>
      </text:list-level-style-bullet>
      <text:list-level-style-bullet text:level="7" text:style-name="WW_CharLFO11LVL7" text:bullet-char="">
        <style:list-level-properties text:space-before="3.5861in" text:min-label-width="0.25in" text:list-level-position-and-space-mode="label-alignment">
          <style:list-level-label-alignment text:label-followed-by="listtab" fo:margin-left="3.8361in" fo:text-indent="-0.25in"/>
        </style:list-level-properties>
        <style:text-properties style:font-name="Symbol"/>
      </text:list-level-style-bullet>
      <text:list-level-style-bullet text:level="8" text:style-name="WW_CharLFO11LVL8" text:bullet-char="o">
        <style:list-level-properties text:space-before="4.0861in" text:min-label-width="0.25in" text:list-level-position-and-space-mode="label-alignment">
          <style:list-level-label-alignment text:label-followed-by="listtab" fo:margin-left="4.3361in" fo:text-indent="-0.25in"/>
        </style:list-level-properties>
        <style:text-properties style:font-name="Courier New"/>
      </text:list-level-style-bullet>
      <text:list-level-style-bullet text:level="9" text:style-name="WW_CharLFO11LVL9" text:bullet-char="">
        <style:list-level-properties text:space-before="4.5861in" text:min-label-width="0.25in" text:list-level-position-and-space-mode="label-alignment">
          <style:list-level-label-alignment text:label-followed-by="listtab" fo:margin-left="4.836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2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2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2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2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2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2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2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2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3">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4">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5">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6">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office:automatic-styles>
  <office:master-styles>
    <style:master-page style:name="MP0" style:page-layout-name="PL0">
      <style:header>
        <text:p text:style-name="Header"/>
        <text:p text:style-name="Header"/>
      </style:header>
    </style:master-page>
    <style:master-page style:name="MP1" style:page-layout-name="PL1">
      <style:header>
        <text:p text:style-name="Header"/>
        <text:p text:style-name="Header"/>
      </style:header>
    </style:master-page>
    <style:master-page style:name="MP2" style:page-layout-name="PL2">
      <style:header>
        <text:p text:style-name="Header"/>
        <text:p text:style-name="Header"/>
      </style:header>
    </style:master-page>
    <style:master-page style:name="MP3" style:page-layout-name="PL3">
      <style:header>
        <text:p text:style-name="Header"/>
        <text:p text:style-name="Header"/>
      </style:header>
    </style:master-page>
    <style:master-page style:name="MP4" style:page-layout-name="PL4">
      <style:header>
        <text:p text:style-name="Header"/>
        <text:p text:style-name="Header"/>
      </style:header>
    </style:master-page>
    <style:master-page style:name="MP5" style:page-layout-name="PL5">
      <style:header>
        <text:p text:style-name="Header"/>
        <text:p text:style-name="Header"/>
      </style:header>
    </style:master-page>
    <style:master-page style:name="MP6" style:page-layout-name="PL6">
      <style:header>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alton Tavares</dc:creator>
    <meta:creation-date>2010-08-03T10:11:00Z</meta:creation-date>
    <dc:date>2023-12-15T11:14:00Z</dc:date>
    <meta:template xlink:href="Normal.dotm" xlink:type="simple"/>
    <meta:editing-cycles>232</meta:editing-cycles>
    <meta:editing-duration>PT79380S</meta:editing-duration>
    <meta:user-defined meta:name="Info 1"/>
    <meta:user-defined meta:name="Info 2"/>
    <meta:user-defined meta:name="Info 3"/>
    <meta:user-defined meta:name="Info 4"/>
    <meta:document-statistic meta:page-count="38" meta:paragraph-count="82" meta:word-count="6489" meta:character-count="41453" meta:row-count="292" meta:non-whitespace-character-count="35046"/>
  </office:meta>
</office:document-meta>
</file>