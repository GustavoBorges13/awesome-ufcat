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paragraph-properties fo:margin-top="0in" fo:margin-left="0in">
        <style:tab-stops/>
      </style:paragraph-properties>
    </style:style>
    <style:style style:name="T8" style:parent-style-name="DefaultParagraphFont" style:family="text">
      <style:text-properties style:font-name="Times New Roman"/>
    </style:style>
    <style:style style:name="P9" style:parent-style-name="Normal" style:family="paragraph">
      <style:paragraph-properties fo:margin-top="0in" fo:text-indent="0in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P12" style:parent-style-name="ListParagraph" style:list-style-name="LFO7" style:family="paragraph">
      <style:paragraph-properties fo:margin-bottom="0.1666in"/>
    </style:style>
    <style:style style:name="T13" style:parent-style-name="DefaultParagraphFont" style:family="text">
      <style:text-properties style:font-name="Calibri"/>
    </style:style>
    <style:style style:name="P14" style:parent-style-name="Normal" style:family="paragraph">
      <style:paragraph-properties fo:text-indent="0in"/>
      <style:text-properties fo:font-weight="bold" style:font-weight-asian="bold" style:font-weight-complex="bold" fo:font-style="italic" style:font-style-asian="italic" style:font-style-complex="italic"/>
    </style:style>
    <style:style style:name="P15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16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17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18" style:parent-style-name="ListParagraph" style:list-style-name="LFO12" style:family="paragraph">
      <style:paragraph-properties fo:margin-left="0.4923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list-style-name="LFO12" style:family="paragraph">
      <style:paragraph-properties fo:margin-left="0.4923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list-style-name="LFO12" style:family="paragraph">
      <style:paragraph-properties fo:margin-left="0.4923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list-style-name="LFO12" style:family="paragraph">
      <style:paragraph-properties fo:margin-left="0.4923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29" style:parent-style-name="ListParagraph" style:list-style-name="LFO9" style:family="paragraph">
      <style:paragraph-properties fo:margin-left="0.5909in">
        <style:tab-stops/>
      </style:paragraph-properties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9" style:family="paragraph">
      <style:paragraph-properties fo:margin-left="0.5909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ListParagraph" style:list-style-name="LFO9" style:family="paragraph">
      <style:paragraph-properties fo:margin-left="0.5909in">
        <style:tab-stops/>
      </style:paragraph-properties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36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37" style:parent-style-name="Normal" style:family="paragraph">
      <style:paragraph-properties fo:text-indent="0.3208in"/>
    </style:style>
    <style:style style:name="P38" style:parent-style-name="Normal" style:family="paragraph">
      <style:paragraph-properties fo:text-indent="0in"/>
    </style:style>
    <style:style style:name="P39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0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1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2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3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4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49" style:parent-style-name="ListParagraph" style:family="paragraph">
      <style:paragraph-properties fo:margin-left="0.2958in" fo:text-indent="0in">
        <style:tab-stops/>
      </style:paragraph-properties>
    </style:style>
    <style:style style:name="P50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51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52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53" style:parent-style-name="Normal" style:family="paragraph">
      <style:paragraph-properties fo:text-indent="0in"/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55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56" style:parent-style-name="ListParagraph" style:family="paragraph">
      <style:paragraph-properties fo:margin-left="0.2958in" fo:text-indent="0in">
        <style:tab-stops/>
      </style:paragraph-properties>
    </style:style>
    <style:style style:name="P57" style:parent-style-name="ListParagraph" style:family="paragraph">
      <style:paragraph-properties fo:margin-left="0.2958in" fo:text-indent="0in">
        <style:tab-stops/>
      </style:paragraph-properties>
    </style:style>
    <style:style style:name="P58" style:parent-style-name="ListParagraph" style:family="paragraph">
      <style:paragraph-properties fo:margin-left="0.2958in" fo:text-indent="0in">
        <style:tab-stops/>
      </style:paragraph-properties>
    </style:style>
    <style:style style:name="P59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60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61" style:parent-style-name="Normal" style:family="paragraph">
      <style:paragraph-properties fo:margin-left="0.2916in" fo:text-indent="0.2236in">
        <style:tab-stops/>
      </style:paragraph-properties>
    </style:style>
    <style:style style:name="P62" style:parent-style-name="ListParagraph" style:list-style-name="LFO8" style:family="paragraph">
      <style:paragraph-properties fo:margin-left="0.2958in" fo:text-indent="-0.2958in">
        <style:tab-stops/>
      </style:paragraph-properties>
    </style:style>
    <style:style style:name="P63" style:parent-style-name="Normal" style:family="paragraph">
      <style:paragraph-properties fo:margin-left="0.3111in" fo:text-indent="0.1965in">
        <style:tab-stops/>
      </style:paragraph-properties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2f2f2" draw:textarea-vertical-align="middle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PROJETO 4 – Tarefa 1 – Lista de Exercícios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><text:span text:style-name="T8"><draw:frame draw:id="id0" draw:style-name="a0" draw:name="Text Box 2" text:anchor-type="as-char" svg:x="0in" svg:y="0in" svg:width="5.94792in" svg:height="1.04167in" style:rel-width="scale" style:rel-height="scale"><draw:text-box><text:p text:style-name="P9"><text:span text:style-name="T10">Informação Administrativa</text:span>: para a<text:s/>resolução desta lista, considera-se que o aluno possua uma distribuição MINIX funcional e que esteja realizando a prática de laboratório.</text:p><text:p text:style-name="P11">A LISTA DEVE SER ENTREGUE VIA SIGAA ATÉ 01/02/2023.</text:p></draw:text-box><svg:title/><svg:desc/></draw:frame></text:span></text:p>
      <text:p text:style-name="SBCtitle1">Objetivos</text:p>
      <text:list text:style-name="LFO7" text:continue-numbering="true">
        <text:list-item>
          <text:p text:style-name="P12">Familiarizar o aluno com o SO MINIX<text:span text:style-name="T13">.</text:span></text:p>
        </text:list-item>
      </text:list>
      <text:p text:style-name="P14">Perguntas específicas envolvendo o conteúdo do slide estudado sobre MINIX:</text:p>
      <text:list text:style-name="LFO8" text:continue-numbering="true">
        <text:list-item>
          <text:p text:style-name="P15">Considerando o MINIX, como as funções do sistema são distribuídas em espaço de kernel e espaço de usuário?</text:p>
        </text:list-item>
      </text:list>
      <text:p text:style-name="Normal">No MINIX, as funções do sistema são distribuídas entre o espaço de kernel e o espaço de usuário. O espaço de usuário atua como um sandbox, impedindo que programas causem danos<text:s/>à<text:s/>memória e a outros recursos do sistema. O kernel, que tem acesso total<text:s/>à<text:s/>memória e ao hardware, executa em espaço de kernel. Processos de usuário executam em espaço de usuário e, para interagir com o kernel, precisam usar chamadas de sistema como open, read, write, etc.</text:p>
      <text:p text:style-name="Normal"/>
      <text:list text:style-name="LFO8" text:continue-numbering="true">
        <text:list-item>
          <text:p text:style-name="P16">Qual é o papel da TAREFA de sistema e de clock?</text:p>
        </text:list-item>
      </text:list>
      <text:p text:style-name="Normal">No modo kernel do MINIX, existem duas tarefas principais: a TAREFA de sistema, responsável por atender chamadas de sistema, e a tarefa de clock, um dispositivo de I/O que interage com o hardware gerador de sinais de temporização. A tarefa de clock não<text:s/>é<text:s/>acessível diretamente pelos usuários, ao contrário de outros dispositivos que são acessados por meio da TAREFA de sistema.</text:p>
      <text:p text:style-name="Normal"/>
      <text:list text:style-name="LFO8" text:continue-numbering="true">
        <text:list-item>
          <text:p text:style-name="P17">Qual é a relação de privilégios entre as camadas 1 (kernel), 2 (device drivers), 3 (servidores) e 4 (processos de usuário) no MINIX?</text:p>
        </text:list-item>
      </text:list>
      <text:p text:style-name="Normal">As camadas no MINIX são organizadas hierarquicamente em termos de privilégios, sendo que o privilégio diminui<text:s/>à<text:s/>medida que a camada aumenta:</text:p>
      <text:list text:style-name="LFO12" text:continue-numbering="true">
        <text:list-item>
          <text:p text:style-name="P18"><text:span text:style-name="T19">Camada 1 (Kernel):</text:span><text:s/>A camada mais privilegiada, com acesso total<text:s/>à<text:s/>memória e hardware do sistema. Realiza operações críticas e essenciais para o funcionamento do sistema.</text:p>
        </text:list-item>
        <text:list-item>
          <text:p text:style-name="P20"><text:span text:style-name="T21">Camada 2 (Device Drivers):</text:span><text:s/>Situada abaixo do kernel, essa camada contém os drivers de dispositivos. Os drivers realizam operações específicas para interagir com hardware, mas com um nível de privilégio inferior ao do kernel.</text:p>
        </text:list-item>
        <text:list-item>
          <text:p text:style-name="P22"><text:span text:style-name="T23">Camada 3 (Servidores):</text:span><text:s/>Responsável por fornecer serviços específicos, como gerenciamento de arquivos e sistema de janelas. Possui menos privilégios do que as camadas anteriores, mas mais do que os processos de usuário.</text:p>
        </text:list-item>
        <text:list-item>
          <text:p text:style-name="P24"><text:span text:style-name="T25">Camada 4 (Processos de Usu</text:span><text:span text:style-name="T26">á</text:span><text:span text:style-name="T27">rio):</text:span><text:s/>A camada menos privilegiada, composta pelos processos de usuário normais. Eles têm acesso limitado e controlado<text:s/>às funcionalidades do sistema operacional, garantindo segurança e estabilidade.</text:p>
        </text:list-item>
      </text:list>
      <text:p text:style-name="Normal">Essa estrutura hierárquica visa garantir a segurança e a estabilidade do sistema, limitando o acesso aos recursos conforme necessário.</text:p>
      <text:p text:style-name="Normal"/>
      <text:list text:style-name="LFO8" text:continue-numbering="true">
        <text:list-item>
          <text:p text:style-name="P28">Forneça 3 exemplos de chamadas de sistema no MINIX, incluindo a descrição funcional e a especificação dos parâmetros de entrada e saída.</text:p>
        </text:list-item>
      </text:list>
      <text:list text:style-name="LFO9" text:continue-numbering="true">
        <text:list-item>
          <text:p text:style-name="P29"><text:span text:style-name="T30">fork():</text:span><text:s/>Cria um novo processo duplicando o processo existente.</text:p>
        </text:list-item>
        <text:list-item>
          <text:p text:style-name="P31"><text:span text:style-name="T32">read(fd, buffer, nbytes):</text:span><text:s/>Lê dados de um arquivo ou dispositivo.</text:p>
        </text:list-item>
        <text:list-item>
          <text:p text:style-name="P33"><text:span text:style-name="T34">write(fd, buffer, nbytes):</text:span><text:s/>Escreve dados em um arquivo ou dispositivo.</text:p>
        </text:list-item>
      </text:list>
      <text:p text:style-name="Normal"/>
      <text:list text:style-name="LFO8" text:continue-numbering="true">
        <text:list-item>
          <text:p text:style-name="P35">Diferencie chamada de sistema (system call) de chamada de kernel (kernel call) no MINIX.</text:p>
        </text:list-item>
      </text:list>
      <text:p text:style-name="Normal">Chamadas de kernel são funções de baixo nível fornecidas pela TAREFA de sistema para drivers e servidores. Exemplo: leitura de porta de I/O. Chamadas de sistema (ex. read, fork, unlink) são de alto nível, definidas pelo padrão POSIX, disponíveis para programas de usuário no nível 4.</text:p>
      <text:p text:style-name="Normal"/>
      <text:list text:style-name="LFO8" text:continue-numbering="true">
        <text:list-item>
          <text:p text:style-name="P36">Considere o seguinte exemplo: um arquivo no MINIX possui um proprietário com o uid = 12 e gid = 1 e tem o modo de acesso rwxr-x---. Explique o significado deste modo de acesso. Se outro usuário com o uid = 6 e gid =1 tenta executar o arquivo, o que irá acontecer?</text:p>
        </text:list-item>
      </text:list>
      <text:p text:style-name="P37">No exemplo rwxr-x---, o proprietário (uid=12) tem permissão total, o grupo (gid=1) tem permissão de leitura e execução, e outros não têm permissão. O usuário com uid=6 e gid=1 terá<text:s/>permissão de leitura e execução, herdada do grupo. Portanto, ele poderá<text:s/>ler o arquivo.</text:p>
      <text:p text:style-name="P38"/>
      <text:list text:style-name="LFO8" text:continue-numbering="true">
        <text:list-item>
          <text:p text:style-name="P39">Em vista do fato de que a mera existência de um<text:s/>super-usuário possa levar a todos os tipos de problemas de segurança, por que tal conceito existe?</text:p>
        </text:list-item>
      </text:list>
      <text:p text:style-name="Normal">O superusuário existe para enfatizar a política de separação de privilégios.<text:s/>É<text:s/>usado principalmente para tarefas de administração e<text:s/>é<text:s/>permitido apenas a usuários autorizados. O processo init, executado como root, carrega outros processos e herda a prioridade para garantir a execução controlada.</text:p>
      <text:p text:style-name="Normal"/>
      <text:list text:style-name="LFO8" text:continue-numbering="true">
        <text:list-item>
          <text:p text:style-name="P40">No MINIX, se o usuário 2 cria um link para um arquivo de um usuário 1, e então o usuário 1 remove este arquivo, o que acontece quando o usuário 2 tenta ler o arquivo? Explique (Dica: simule este comportamento. Use para tal o comando ln).</text:p>
        </text:list-item>
      </text:list>
      <text:soft-page-break/>
      <text:p text:style-name="Normal">Se o usuário 2 cria um link para um arquivo do usuário 1 e o usuário 1 remove o arquivo, o link criado pelo usuário 2 se torna inválido, e ele não pode mais ler o arquivo.</text:p>
      <text:p text:style-name="Normal"/>
      <text:list text:style-name="LFO8" text:continue-numbering="true">
        <text:list-item>
          <text:p text:style-name="P41">Como o reincarnation server (RS) opera com relação à manutenção dos controladores de dispositivo no MINIX 3?</text:p>
        </text:list-item>
      </text:list>
      <text:p text:style-name="Normal">O RS periodicamente verifica os controladores de dispositivo. Se um driver não responde corretamente, o RS substitui automaticamente por uma nova cópia, garantindo a recuperação automática de falhas.</text:p>
      <text:p text:style-name="Normal"/>
      <text:list text:style-name="LFO8" text:continue-numbering="true">
        <text:list-item>
          <text:p text:style-name="P42">Considerando os Sistemas Operacionais (SOs) tradicionais (ex. Windows, OS X, Linux etc), quais deles possuem características semelhantes ao serviço fornecido pelo RS no MINIX?</text:p>
        </text:list-item>
      </text:list>
      <text:p text:style-name="Normal">Em sistemas tradicionais como Windows Server, OS X e Red Hat Enterprise Linux, existem mecanismos semelhantes para lidar com a recuperação de falhas e atualizações dinâmicas de drivers.</text:p>
      <text:p text:style-name="Normal"/>
      <text:list text:style-name="LFO8" text:continue-numbering="true">
        <text:list-item>
          <text:p text:style-name="P43">Por que o MINIX mantém o programa update em execução, em segundo plano, todo o tempo?</text:p>
        </text:list-item>
      </text:list>
      <text:p text:style-name="Normal">O programa "update"<text:s/>é<text:s/>mantido em execução em segundo plano para emitir chamadas de sistema SYNC a cada 30 segundos. Isso garante que as modificações no sistema sejam escritas no disco, contribuindo para a estabilidade do sistema e evitando problemas durante a parada ou execução de programas críticos.</text:p>
      <text:p text:style-name="Normal"/>
      <text:list text:style-name="LFO8" text:continue-numbering="true">
        <text:list-item>
          <text:p text:style-name="P44">Considere a seguinte estrutura de processos.</text:p>
        </text:list-item>
      </text:list>
      <text:p text:style-name="P45">PID TTY TIME CMD</text:p>
      <text:p text:style-name="P46">(-4) ? 0:29 idle</text:p>
      <text:p text:style-name="Normal"><text:span text:style-name="T47">(-3) ?<text:s/></text:span>0:00 clock</text:p>
      <text:p text:style-name="Normal">(-2) ? 0:00 system</text:p>
      <text:p text:style-name="Normal">(-1) ? 0:00 kernel</text:p>
      <text:p text:style-name="Normal">( 0) ? 0:00 pm</text:p>
      <text:p text:style-name="Normal">( 1) ? 0:00 init</text:p>
      <text:p text:style-name="Normal"/>
      <text:p text:style-name="Normal">Explique a relação entre os índices de PID do init e demais processos apresentados.</text:p>
      <text:p text:style-name="Normal">Os<text:s/>índices negativos representam tarefas do sistema no MINIX. A<text:s/>árvore de processos<text:s/>é<text:s/>formada por todos os processos de sistema e de usuário, e o init (PID 1)<text:s/>é<text:s/>o processo pai para muitos outros processos. A localização dos<text:s/>índices negativos não está<text:s/>na raiz da<text:s/>árvore, mas segue<text:s/>a<text:s/>hierarquia estabelecida durante a execução do projeto 3.</text:p>
      <text:p text:style-name="Normal"/>
      <text:soft-page-break/>
      <text:list text:style-name="LFO8" text:continue-numbering="true">
        <text:list-item>
          <text:p text:style-name="P48">Considere as chamadas fork() e pthread_create(). Qual é o nível de conhecimento do kernel do MINIX para cada uma destas chamadas? No caso de threads, como se classificariam as threads implementadas no MINIX 3?~</text:p>
        </text:list-item>
      </text:list>
      <text:p text:style-name="Normal">No MINIX, o kernel possui conhecimento total da chamada de sistema fork(), pois esta envolve a criação de um novo processo. Já<text:s/>a chamada pthread_create() não possui contra parte em espaço de kernel e<text:s/>é<text:s/>tratada inteiramente em espaço de usuário, classificando as threads como threads de espaço de usuário no MINIX 3.</text:p>
      <text:p text:style-name="P49"/>
      <text:list text:style-name="LFO8" text:continue-numbering="true">
        <text:list-item>
          <text:p text:style-name="P50">Explique como um processo realiza uma chamada a um device driver.</text:p>
        </text:list-item>
      </text:list>
      <text:p text:style-name="Normal">Um processo realiza uma chamada a um device driver enviando mensagens ao servidor apropriado, como o servidor de sistema de arquivos (FS). O servidor, por sua vez, envia uma mensagem ao device driver para executar operações de leitura ou escrita. Chamadas de kernel são usadas para coordenar o processo de I/O e copiar dados entre os processos.</text:p>
      <text:p text:style-name="Normal"/>
      <text:list text:style-name="LFO8" text:continue-numbering="true">
        <text:list-item>
          <text:p text:style-name="P51">Com o conhecimento adquirido e com base no material de apoio, faça um breve comparativo entre o SO MINIX e o SO UNIX.</text:p>
        </text:list-item>
      </text:list>
      <text:p text:style-name="Normal">O MINIX utiliza um kernel microkernel, enquanto o UNIX tradicionalmente possui um kernel monolítico. Ambos suportam chamadas de sistema e possuem características de sistemas de arquivos semelhantes. No entanto, o MINIX destaca-se por sua abordagem modular e<text:s/>ênfase na simplicidade e educação.</text:p>
      <text:p text:style-name="Normal"/>
      <text:list text:style-name="LFO8" text:continue-numbering="true">
        <text:list-item>
          <text:p text:style-name="P52">Qual é o papel do System Event Framework (SEF) em um device driver?</text:p>
        </text:list-item>
      </text:list>
      <text:p text:style-name="Normal">O SEF no MINIX permite que desenvolvedores registrem chamadas de tratamento (callbacks) para eventos como inicialização, atualização e reinicialização de serviços. Ele mascara os detalhes de implementação do RS e facilita a interação entre o kernel e os drivers.</text:p>
      <text:p text:style-name="Normal"/>
      <text:p text:style-name="P53">Perguntas específicas envolvendo o uso do sistema operacional MINIX instalado:</text:p>
      <text:list text:style-name="LFO8" text:continue-numbering="true">
        <text:list-item>
          <text:p text:style-name="P54">Por que uma instalação recente do MINIX viria com um usuário existente chamado “ast”?</text:p>
        </text:list-item>
      </text:list>
      <text:p text:style-name="Normal">O usuário "ast"<text:s/>é<text:s/>incluído como um exemplo de usuário no MINIX, talvez como uma homenagem ao autor do livro texto, Andrew Stuart Tanenbaum.</text:p>
      <text:p text:style-name="Normal"/>
      <text:list text:style-name="LFO8" text:continue-numbering="true">
        <text:list-item>
          <text:p text:style-name="P55">Qual é o nome da aplicação (utilitário) que você usou para<text:s/>instalar novos softwares no MINIX? Dê exemplos de uso.</text:p>
        </text:list-item>
      </text:list>
      <text:p text:style-name="P56">O utilitário usado para instalar novos softwares no MINIX<text:s/>é<text:s/>o pkgin. Exemplos de uso incluem comandos como pkgin list, pkgin avail e pkgin update.</text:p>
      <text:p text:style-name="P57"/>
      <text:p text:style-name="P58"/>
      <text:list text:style-name="LFO8" text:continue-numbering="true">
        <text:list-item>
          <text:p text:style-name="P59">Qual é o comando que você deve usar para refazer o kernel (build) e instalá-lo?</text:p>
        </text:list-item>
      </text:list>
      <text:soft-page-break/>
      <text:p text:style-name="Normal">O comando para refazer e instalar o kernel no MINIX pode ser make world e make install em /usr/src.<text:s/></text:p>
      <text:p text:style-name="Normal"/>
      <text:list text:style-name="LFO8" text:continue-numbering="true">
        <text:list-item>
          <text:p text:style-name="P60">Qual é o arquivo fonte que possui a string do banner do MINIX (i.e. “MINIX 3.1.X ... Copyright ...”) que é mostrado quando o MINIX inicializa?</text:p>
        </text:list-item>
      </text:list>
      <text:p text:style-name="P61">O arquivo fonte que possui a string do banner do MINIX<text:s/>é<text:s/>usr/src/kernel/main.c.</text:p>
      <text:p text:style-name="Normal"/>
      <text:list text:style-name="LFO8" text:continue-numbering="true">
        <text:list-item>
          <text:p text:style-name="P62">Qual é o nome da chamada de sistema do MINIX com o número 33 (decimal), e como você determinou esta informação?</text:p>
        </text:list-item>
      </text:list>
      <text:p text:style-name="P63">A chamada de sistema do MINIX com o número 33<text:s/>é<text:s/>a access, conforme encontrado no arquivo /usr/src/servers/pm/table.c. Essa informação foi determinada por meio de pesquisa online relacionada<text:s/>às chamadas de sistema no MINI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826in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4.4208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19.6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3-12-17T22:28:00Z</meta:creation-date>
    <dc:date>2024-01-31T23:16:00Z</dc:date>
    <meta:template xlink:href="Normal.dotm" xlink:type="simple"/>
    <meta:editing-cycles>615</meta:editing-cycles>
    <meta:editing-duration>PT70980S</meta:editing-duration>
    <meta:user-defined meta:name="Info 1"/>
    <meta:user-defined meta:name="Info 2"/>
    <meta:user-defined meta:name="Info 3"/>
    <meta:user-defined meta:name="Info 4"/>
    <meta:document-statistic meta:page-count="5" meta:paragraph-count="18" meta:word-count="1452" meta:character-count="9276" meta:row-count="65" meta:non-whitespace-character-count="7842"/>
  </office:meta>
</office:document-meta>
</file>