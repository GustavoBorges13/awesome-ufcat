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P1" style:parent-style-name="SBCtitle" style:master-page-name="MP0" style:family="paragraph">
      <style:paragraph-properties fo:break-before="page"/>
      <style:text-properties style:font-name="Times New Roman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Times New Roman" style:text-position="super 66.6%"/>
    </style:style>
    <style:style style:name="T4" style:parent-style-name="DefaultParagraphFont" style:family="text">
      <style:text-properties style:font-name="Times New Roman" style:text-position="super 66.6%"/>
    </style:style>
    <style:style style:name="T5" style:parent-style-name="DefaultParagraphFont" style:family="text">
      <style:text-properties style:font-name="Times New Roman"/>
    </style:style>
    <style:style style:name="P6" style:parent-style-name="SBCemail" style:family="paragraph">
      <style:text-properties style:font-name="Times New Roman" style:font-name-complex="Times New Roman"/>
    </style:style>
    <style:style style:name="P7" style:parent-style-name="SBCresumo" style:family="paragraph">
      <style:text-properties style:font-name="Times New Roman"/>
    </style:style>
    <style:style style:name="P8" style:parent-style-name="ListParagraph" style:list-style-name="LFO7" style:family="paragraph"/>
    <style:style style:name="P9" style:parent-style-name="ListParagraph" style:list-style-name="LFO7" style:family="paragraph"/>
    <style:style style:name="P10" style:parent-style-name="SBCtitle1" style:list-style-name="LFO8" style:family="paragraph"/>
    <style:style style:name="T11" style:parent-style-name="DefaultParagraphFont" style:family="text">
      <style:text-properties style:font-name="Calibri"/>
    </style:style>
    <style:style style:name="P12" style:parent-style-name="SBCparagraphfirst" style:family="paragraph">
      <style:paragraph-properties fo:text-indent="0.1972in"/>
    </style:style>
    <style:style style:name="P13" style:parent-style-name="SBCparagraph" style:family="paragraph">
      <style:paragraph-properties fo:text-indent="0.1972in"/>
    </style:style>
    <style:style style:name="T14" style:parent-style-name="DefaultParagraphFont" style:family="text">
      <style:text-properties style:font-name="Calibri"/>
    </style:style>
    <style:style style:name="P15" style:parent-style-name="SBCparagraph" style:family="paragraph">
      <style:paragraph-properties fo:text-indent="0.1972in"/>
      <style:text-properties style:font-name="Calibri" fo:font-style="italic" style:font-style-asian="italic" style:font-style-complex="italic"/>
    </style:style>
    <style:style style:name="P16" style:parent-style-name="SBCparagraph" style:family="paragraph">
      <style:paragraph-properties fo:text-indent="0.1972in"/>
    </style:style>
    <style:style style:name="T17" style:parent-style-name="DefaultParagraphFont" style:family="text">
      <style:text-properties style:font-name="Calibri"/>
    </style:style>
    <style:style style:name="P18" style:parent-style-name="SBCparagraph" style:family="paragraph">
      <style:paragraph-properties fo:text-indent="0.1972in"/>
    </style:style>
    <style:style style:name="T19" style:parent-style-name="DefaultParagraphFont" style:family="text">
      <style:text-properties style:font-name="Calibri"/>
    </style:style>
    <style:style style:name="T20" style:parent-style-name="DefaultParagraphFont" style:family="text">
      <style:text-properties style:font-name="Calibri"/>
    </style:style>
    <style:style style:name="P21" style:parent-style-name="SBCtitle1" style:list-style-name="LFO8" style:family="paragraph"/>
    <style:style style:name="T22" style:parent-style-name="DefaultParagraphFont" style:family="text">
      <style:text-properties style:font-name="Calibri"/>
    </style:style>
    <style:style style:name="P23" style:parent-style-name="SBCparagraph" style:family="paragraph">
      <style:paragraph-properties fo:text-indent="0.1972in"/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P24" style:parent-style-name="SBCparagraph" style:family="paragraph">
      <style:paragraph-properties fo:text-indent="0.1972in"/>
      <style:text-properties style:font-name="Calibri"/>
    </style:style>
    <style:style style:name="P25" style:parent-style-name="SBCparagraph" style:family="paragraph">
      <style:paragraph-properties fo:text-indent="0.1972in"/>
    </style:style>
    <style:style style:name="T26" style:parent-style-name="DefaultParagraphFont" style:family="text">
      <style:text-properties style:font-name="Calibri"/>
    </style:style>
    <style:style style:name="T27" style:parent-style-name="DefaultParagraphFont" style:family="text">
      <style:text-properties style:font-name="Calibri"/>
    </style:style>
    <style:style style:name="T28" style:parent-style-name="DefaultParagraphFont" style:family="text">
      <style:text-properties style:font-name="Calibri" fo:font-weight="bold" style:font-weight-asian="bold" style:font-weight-complex="bold"/>
    </style:style>
    <style:style style:name="T29" style:parent-style-name="DefaultParagraphFont" style:family="text">
      <style:text-properties style:font-name="Calibri"/>
    </style:style>
    <style:style style:name="P30" style:parent-style-name="SBCparagraph" style:family="paragraph">
      <style:paragraph-properties fo:text-indent="0.1972in"/>
    </style:style>
    <style:style style:name="T31" style:parent-style-name="DefaultParagraphFont" style:family="text">
      <style:text-properties style:font-name="Calibri"/>
    </style:style>
    <style:style style:name="T32" style:parent-style-name="DefaultParagraphFont" style:family="text">
      <style:text-properties style:font-name="Calibri" fo:font-weight="bold" style:font-weight-asian="bold" style:font-weight-complex="bold"/>
    </style:style>
    <style:style style:name="T33" style:parent-style-name="DefaultParagraphFont" style:family="text">
      <style:text-properties style:font-name="Calibri"/>
    </style:style>
    <style:style style:name="T34" style:parent-style-name="DefaultParagraphFont" style:family="text">
      <style:text-properties style:font-name="Calibri" fo:font-weight="bold" style:font-weight-asian="bold" style:font-weight-complex="bold"/>
    </style:style>
    <style:style style:name="T35" style:parent-style-name="DefaultParagraphFont" style:family="text">
      <style:text-properties style:font-name="Calibri"/>
    </style:style>
    <style:style style:name="T36" style:parent-style-name="DefaultParagraphFont" style:family="text">
      <style:text-properties style:font-name="Calibri" fo:font-weight="bold" style:font-weight-asian="bold" style:font-weight-complex="bold"/>
    </style:style>
    <style:style style:name="T37" style:parent-style-name="DefaultParagraphFont" style:family="text">
      <style:text-properties style:font-name="Calibri"/>
    </style:style>
    <style:style style:name="T38" style:parent-style-name="DefaultParagraphFont" style:family="text">
      <style:text-properties style:font-name="Calibri"/>
    </style:style>
    <style:style style:name="P39" style:parent-style-name="SBCparagraph" style:list-style-name="LFO9" style:family="paragraph">
      <style:paragraph-properties fo:margin-left="0.4923in" fo:text-indent="-0.2951in">
        <style:tab-stops/>
      </style:paragraph-properties>
    </style:style>
    <style:style style:name="T40" style:parent-style-name="DefaultParagraphFont" style:family="text">
      <style:text-properties style:font-name="Calibri"/>
    </style:style>
    <style:style style:name="T41" style:parent-style-name="DefaultParagraphFont" style:family="text">
      <style:text-properties style:font-name="Calibri" fo:font-weight="bold" style:font-weight-asian="bold" style:font-weight-complex="bold"/>
    </style:style>
    <style:style style:name="T42" style:parent-style-name="DefaultParagraphFont" style:family="text">
      <style:text-properties style:font-name="Calibri"/>
    </style:style>
    <style:style style:name="P43" style:parent-style-name="SBCparagraph" style:list-style-name="LFO9" style:family="paragraph">
      <style:paragraph-properties fo:margin-left="0.4923in" fo:text-indent="-0.2951in">
        <style:tab-stops/>
      </style:paragraph-properties>
    </style:style>
    <style:style style:name="T44" style:parent-style-name="DefaultParagraphFont" style:family="text">
      <style:text-properties style:font-name="Calibri"/>
    </style:style>
    <style:style style:name="T45" style:parent-style-name="DefaultParagraphFont" style:family="text">
      <style:text-properties style:font-name="Calibri" fo:font-weight="bold" style:font-weight-asian="bold" style:font-weight-complex="bold"/>
    </style:style>
    <style:style style:name="T46" style:parent-style-name="DefaultParagraphFont" style:family="text">
      <style:text-properties style:font-name="Calibri"/>
    </style:style>
    <style:style style:name="P47" style:parent-style-name="SBCparagraph" style:list-style-name="LFO9" style:family="paragraph">
      <style:paragraph-properties fo:margin-left="0.4923in" fo:text-indent="-0.2951in">
        <style:tab-stops/>
      </style:paragraph-properties>
    </style:style>
    <style:style style:name="T48" style:parent-style-name="DefaultParagraphFont" style:family="text">
      <style:text-properties style:font-name="Calibri"/>
    </style:style>
    <style:style style:name="T49" style:parent-style-name="DefaultParagraphFont" style:family="text">
      <style:text-properties style:font-name="Calibri" fo:font-weight="bold" style:font-weight-asian="bold" style:font-weight-complex="bold"/>
    </style:style>
    <style:style style:name="T50" style:parent-style-name="DefaultParagraphFont" style:family="text">
      <style:text-properties style:font-name="Calibri"/>
    </style:style>
    <style:style style:name="P51" style:parent-style-name="SBCparagraph" style:family="paragraph">
      <style:paragraph-properties fo:text-indent="0.1972in"/>
      <style:text-properties style:font-name="Calibri" fo:color="#FF0000"/>
    </style:style>
    <style:style style:name="P52" style:parent-style-name="SBCparagraph" style:family="paragraph">
      <style:paragraph-properties fo:text-indent="0in"/>
    </style:style>
    <style:style style:name="T53" style:parent-style-name="DefaultParagraphFont" style:family="text">
      <style:text-properties style:font-name="Calibri"/>
    </style:style>
    <style:style style:name="P54" style:parent-style-name="Normal" style:family="paragraph">
      <style:paragraph-properties fo:text-align="start"/>
      <style:text-properties fo:language="en" fo:country="US"/>
    </style:style>
    <style:style style:name="P55" style:parent-style-name="Normal" style:family="paragraph">
      <style:paragraph-properties fo:text-align="start"/>
      <style:text-properties fo:language="en" fo:country="US"/>
    </style:style>
    <style:style style:name="P56" style:parent-style-name="Normal" style:family="paragraph">
      <style:paragraph-properties fo:text-align="start"/>
    </style:style>
    <style:style style:name="P57" style:parent-style-name="Normal" style:family="paragraph">
      <style:paragraph-properties fo:text-align="start"/>
    </style:style>
    <style:style style:name="P58" style:parent-style-name="Normal" style:family="paragraph">
      <style:paragraph-properties fo:text-align="start"/>
      <style:text-properties fo:language="en" fo:country="US"/>
    </style:style>
    <style:style style:name="P59" style:parent-style-name="Normal" style:family="paragraph">
      <style:paragraph-properties fo:text-align="start"/>
      <style:text-properties fo:language="en" fo:country="US"/>
    </style:style>
    <style:style style:name="P60" style:parent-style-name="Normal" style:family="paragraph">
      <style:paragraph-properties fo:text-align="start"/>
      <style:text-properties fo:language="en" fo:country="US"/>
    </style:style>
    <style:style style:name="P61" style:parent-style-name="Normal" style:family="paragraph">
      <style:paragraph-properties fo:text-align="start"/>
      <style:text-properties fo:language="en" fo:country="US"/>
    </style:style>
    <style:style style:name="P62" style:parent-style-name="Normal" style:family="paragraph">
      <style:paragraph-properties fo:text-align="start"/>
      <style:text-properties fo:language="en" fo:country="US"/>
    </style:style>
    <style:style style:name="P63" style:parent-style-name="Normal" style:family="paragraph">
      <style:paragraph-properties fo:text-align="start"/>
      <style:text-properties fo:language="en" fo:country="US"/>
    </style:style>
    <style:style style:name="P64" style:parent-style-name="Normal" style:family="paragraph">
      <style:paragraph-properties fo:text-align="start"/>
      <style:text-properties fo:language="en" fo:country="US"/>
    </style:style>
    <style:style style:name="P65" style:parent-style-name="Normal" style:family="paragraph">
      <style:paragraph-properties fo:text-align="start"/>
      <style:text-properties fo:language="en" fo:country="US"/>
    </style:style>
    <style:style style:name="P66" style:parent-style-name="Normal" style:family="paragraph">
      <style:paragraph-properties fo:text-align="start"/>
    </style:style>
    <style:style style:name="T67" style:parent-style-name="DefaultParagraphFont" style:family="text">
      <style:text-properties fo:language="en" fo:country="US"/>
    </style:style>
    <style:style style:name="P68" style:parent-style-name="Normal" style:family="paragraph">
      <style:paragraph-properties fo:text-align="start"/>
    </style:style>
    <style:style style:name="P69" style:parent-style-name="Normal" style:family="paragraph">
      <style:paragraph-properties fo:text-align="start"/>
    </style:style>
    <style:style style:name="P70" style:parent-style-name="Normal" style:family="paragraph">
      <style:paragraph-properties fo:text-align="start"/>
    </style:style>
    <style:style style:name="T71" style:parent-style-name="DefaultParagraphFont" style:family="text">
      <style:text-properties fo:language="en" fo:country="US"/>
    </style:style>
    <style:style style:name="P72" style:parent-style-name="Normal" style:family="paragraph">
      <style:paragraph-properties fo:text-align="start"/>
    </style:style>
    <style:style style:name="T73" style:parent-style-name="DefaultParagraphFont" style:family="text">
      <style:text-properties fo:language="en" fo:country="US"/>
    </style:style>
    <style:style style:name="P74" style:parent-style-name="Normal" style:family="paragraph">
      <style:paragraph-properties fo:text-align="start"/>
    </style:style>
    <style:style style:name="P75" style:parent-style-name="Normal" style:family="paragraph">
      <style:paragraph-properties fo:text-align="start"/>
    </style:style>
    <style:style style:name="P76" style:parent-style-name="Normal" style:family="paragraph">
      <style:paragraph-properties fo:text-align="start"/>
    </style:style>
    <style:style style:name="P77" style:parent-style-name="Normal" style:family="paragraph">
      <style:paragraph-properties fo:text-align="start"/>
    </style:style>
    <style:style style:name="P78" style:parent-style-name="Normal" style:family="paragraph">
      <style:paragraph-properties fo:text-align="start"/>
    </style:style>
    <style:style style:name="P79" style:parent-style-name="Normal" style:family="paragraph">
      <style:paragraph-properties fo:text-align="start"/>
    </style:style>
    <style:style style:name="P80" style:parent-style-name="Normal" style:family="paragraph">
      <style:paragraph-properties fo:text-align="start"/>
    </style:style>
    <style:style style:name="P81" style:parent-style-name="Normal" style:family="paragraph">
      <style:paragraph-properties fo:text-align="start"/>
    </style:style>
    <style:style style:name="P82" style:parent-style-name="Normal" style:family="paragraph">
      <style:paragraph-properties fo:text-align="start"/>
    </style:style>
    <style:style style:name="P83" style:parent-style-name="Normal" style:family="paragraph">
      <style:paragraph-properties fo:text-align="start"/>
    </style:style>
    <style:style style:name="P84" style:parent-style-name="Normal" style:family="paragraph">
      <style:paragraph-properties fo:text-align="start"/>
    </style:style>
    <style:style style:name="P85" style:parent-style-name="Normal" style:family="paragraph">
      <style:paragraph-properties fo:text-align="start"/>
    </style:style>
    <style:style style:name="P86" style:parent-style-name="Normal" style:family="paragraph">
      <style:paragraph-properties fo:text-align="start"/>
    </style:style>
    <style:style style:name="P87" style:parent-style-name="Normal" style:family="paragraph">
      <style:paragraph-properties fo:text-align="start"/>
    </style:style>
    <style:style style:name="P88" style:parent-style-name="Normal" style:family="paragraph">
      <style:paragraph-properties fo:text-align="start"/>
    </style:style>
    <style:style style:name="P89" style:parent-style-name="Normal" style:family="paragraph">
      <style:paragraph-properties fo:text-align="start"/>
    </style:style>
    <style:style style:name="P90" style:parent-style-name="Normal" style:family="paragraph">
      <style:paragraph-properties fo:text-align="start"/>
    </style:style>
    <style:style style:name="P91" style:parent-style-name="Normal" style:family="paragraph">
      <style:paragraph-properties fo:text-align="start"/>
    </style:style>
    <style:style style:name="P92" style:parent-style-name="Normal" style:family="paragraph">
      <style:paragraph-properties fo:text-align="start"/>
    </style:style>
    <style:style style:name="P93" style:parent-style-name="Normal" style:family="paragraph">
      <style:paragraph-properties fo:text-align="start"/>
    </style:style>
    <style:style style:name="P94" style:parent-style-name="Normal" style:family="paragraph">
      <style:paragraph-properties fo:text-align="start"/>
    </style:style>
    <style:style style:name="P95" style:parent-style-name="Normal" style:family="paragraph">
      <style:paragraph-properties fo:text-align="start"/>
    </style:style>
    <style:style style:name="P96" style:parent-style-name="Normal" style:family="paragraph">
      <style:paragraph-properties fo:text-align="start"/>
    </style:style>
    <style:style style:name="P97" style:parent-style-name="Normal" style:family="paragraph">
      <style:paragraph-properties fo:text-align="start"/>
    </style:style>
    <style:style style:name="P98" style:parent-style-name="Normal" style:family="paragraph">
      <style:paragraph-properties fo:text-align="start"/>
    </style:style>
    <style:style style:name="P99" style:parent-style-name="Normal" style:family="paragraph">
      <style:paragraph-properties fo:text-align="start"/>
    </style:style>
    <style:style style:name="T100" style:parent-style-name="DefaultParagraphFont" style:family="text">
      <style:text-properties fo:language="en" fo:country="US"/>
    </style:style>
    <style:style style:name="P101" style:parent-style-name="Normal" style:family="paragraph">
      <style:paragraph-properties fo:text-align="start"/>
      <style:text-properties fo:language="en" fo:country="US"/>
    </style:style>
    <style:style style:name="P102" style:parent-style-name="SBCparagraph" style:family="paragraph">
      <style:paragraph-properties fo:text-indent="0in"/>
    </style:style>
    <style:style style:name="T103" style:parent-style-name="DefaultParagraphFont" style:family="text">
      <style:text-properties style:font-name="Calibri"/>
    </style:style>
    <style:style style:name="P104" style:parent-style-name="Normal" style:family="paragraph">
      <style:paragraph-properties fo:text-align="start"/>
    </style:style>
    <style:style style:name="P105" style:parent-style-name="Normal" style:family="paragraph">
      <style:paragraph-properties fo:text-align="start"/>
    </style:style>
    <style:style style:name="P106" style:parent-style-name="Normal" style:family="paragraph">
      <style:paragraph-properties fo:text-align="start"/>
    </style:style>
    <style:style style:name="P107" style:parent-style-name="Normal" style:family="paragraph">
      <style:paragraph-properties fo:text-align="start"/>
    </style:style>
    <style:style style:name="P108" style:parent-style-name="Normal" style:family="paragraph">
      <style:paragraph-properties fo:text-align="start"/>
    </style:style>
    <style:style style:name="P109" style:parent-style-name="Normal" style:family="paragraph">
      <style:paragraph-properties fo:text-align="start"/>
    </style:style>
    <style:style style:name="P110" style:parent-style-name="Normal" style:family="paragraph">
      <style:paragraph-properties fo:text-align="start"/>
    </style:style>
    <style:style style:name="P111" style:parent-style-name="Normal" style:family="paragraph">
      <style:paragraph-properties fo:text-align="start"/>
    </style:style>
    <style:style style:name="P112" style:parent-style-name="Normal" style:family="paragraph">
      <style:paragraph-properties fo:text-align="start"/>
    </style:style>
    <style:style style:name="P113" style:parent-style-name="Normal" style:family="paragraph">
      <style:paragraph-properties fo:text-align="start"/>
    </style:style>
    <style:style style:name="P114" style:parent-style-name="Normal" style:family="paragraph">
      <style:paragraph-properties fo:text-align="start"/>
    </style:style>
    <style:style style:name="P115" style:parent-style-name="Normal" style:family="paragraph">
      <style:paragraph-properties fo:text-align="start"/>
    </style:style>
    <style:style style:name="P116" style:parent-style-name="Normal" style:family="paragraph">
      <style:paragraph-properties fo:text-align="start"/>
    </style:style>
    <style:style style:name="P117" style:parent-style-name="Normal" style:family="paragraph">
      <style:paragraph-properties fo:text-align="start"/>
    </style:style>
    <style:style style:name="P118" style:parent-style-name="Normal" style:family="paragraph">
      <style:paragraph-properties fo:text-align="start"/>
    </style:style>
    <style:style style:name="P119" style:parent-style-name="Normal" style:family="paragraph">
      <style:paragraph-properties fo:text-align="start"/>
    </style:style>
    <style:style style:name="P120" style:parent-style-name="Normal" style:family="paragraph">
      <style:paragraph-properties fo:text-align="start"/>
    </style:style>
    <style:style style:name="P121" style:parent-style-name="Normal" style:family="paragraph">
      <style:paragraph-properties fo:text-align="start"/>
    </style:style>
    <style:style style:name="T122" style:parent-style-name="DefaultParagraphFont" style:family="text">
      <style:text-properties fo:language="en" fo:country="US"/>
    </style:style>
    <style:style style:name="P123" style:parent-style-name="Normal" style:family="paragraph">
      <style:paragraph-properties fo:text-align="start"/>
      <style:text-properties fo:language="en" fo:country="US"/>
    </style:style>
    <style:style style:name="P124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P125" style:parent-style-name="SBCparagraph" style:family="paragraph">
      <style:paragraph-properties fo:text-indent="0.1972in"/>
      <style:text-properties style:font-name="Calibri"/>
    </style:style>
    <style:style style:name="P126" style:parent-style-name="SBCparagraph" style:family="paragraph">
      <style:paragraph-properties fo:text-indent="0.1972in"/>
      <style:text-properties style:font-name="Calibri"/>
    </style:style>
    <style:style style:name="P127" style:parent-style-name="SBCparagraph" style:family="paragraph">
      <style:paragraph-properties fo:text-indent="0.1972in"/>
    </style:style>
    <style:style style:name="T128" style:parent-style-name="DefaultParagraphFont" style:family="text">
      <style:text-properties style:font-name="Calibri"/>
    </style:style>
    <style:style style:name="P129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P130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P131" style:parent-style-name="SBCparagraph" style:family="paragraph">
      <style:paragraph-properties fo:text-align="center" fo:text-indent="0.1972in"/>
    </style:style>
    <style:style style:name="T132" style:parent-style-name="DefaultParagraphFont" style:family="text">
      <style:text-properties style:font-name="Calibri"/>
    </style:style>
    <style:style style:name="P133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P134" style:parent-style-name="SBCparagraph" style:family="paragraph">
      <style:paragraph-properties fo:text-align="center" fo:text-indent="0.1972in"/>
    </style:style>
    <style:style style:name="T135" style:parent-style-name="DefaultParagraphFont" style:family="text">
      <style:text-properties style:font-name="Calibri"/>
    </style:style>
    <style:style style:name="P136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P137" style:parent-style-name="SBCparagraph" style:family="paragraph">
      <style:text-properties style:font-name="Calibri"/>
    </style:style>
    <style:style style:name="P138" style:parent-style-name="SBCparagraph" style:family="paragraph">
      <style:text-properties style:font-name="Calibri"/>
    </style:style>
    <style:style style:name="P139" style:parent-style-name="SBCparagraph" style:family="paragraph">
      <style:text-properties style:font-name="Calibri"/>
    </style:style>
    <style:style style:name="P140" style:parent-style-name="SBCparagraph" style:family="paragraph">
      <style:paragraph-properties fo:text-align="center" fo:text-indent="0.1972in"/>
    </style:style>
    <style:style style:name="T141" style:parent-style-name="DefaultParagraphFont" style:family="text">
      <style:text-properties style:font-name="Calibri"/>
    </style:style>
    <style:style style:name="P142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P143" style:parent-style-name="SBCparagraph" style:family="paragraph">
      <style:paragraph-properties fo:text-align="center" fo:text-indent="0.1972in"/>
    </style:style>
    <style:style style:name="T144" style:parent-style-name="DefaultParagraphFont" style:family="text">
      <style:text-properties style:font-name="Calibri"/>
    </style:style>
    <style:style style:name="P145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P146" style:parent-style-name="SBCparagraph" style:family="paragraph">
      <style:paragraph-properties fo:text-align="center" fo:text-indent="0.1972in"/>
      <style:text-properties style:font-name="Calibri"/>
    </style:style>
    <style:style style:name="P147" style:parent-style-name="SBCtitle1" style:list-style-name="LFO8" style:family="paragraph"/>
    <style:style style:name="T148" style:parent-style-name="DefaultParagraphFont" style:family="text">
      <style:text-properties style:font-name="Calibri"/>
    </style:style>
    <style:style style:name="P149" style:parent-style-name="SBCparagraph" style:family="paragraph">
      <style:paragraph-properties fo:text-indent="0.1972in"/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P150" style:parent-style-name="SBCparagraph" style:family="paragraph">
      <style:paragraph-properties fo:text-align="center" fo:text-indent="0in"/>
    </style:style>
    <style:style style:name="T151" style:parent-style-name="DefaultParagraphFont" style:family="text">
      <style:text-properties style:font-name="Calibri"/>
    </style:style>
    <style:style style:name="P152" style:parent-style-name="Normal" style:family="paragraph">
      <style:paragraph-properties fo:text-align="start"/>
      <style:text-properties fo:language="en" fo:country="US"/>
    </style:style>
    <style:style style:name="P153" style:parent-style-name="Normal" style:family="paragraph">
      <style:paragraph-properties fo:text-align="start"/>
      <style:text-properties fo:language="en" fo:country="US"/>
    </style:style>
    <style:style style:name="P154" style:parent-style-name="Normal" style:family="paragraph">
      <style:paragraph-properties fo:text-align="start"/>
      <style:text-properties fo:language="en" fo:country="US"/>
    </style:style>
    <style:style style:name="P155" style:parent-style-name="Normal" style:family="paragraph">
      <style:paragraph-properties fo:text-align="start"/>
      <style:text-properties fo:language="en" fo:country="US"/>
    </style:style>
    <style:style style:name="P156" style:parent-style-name="Normal" style:family="paragraph">
      <style:paragraph-properties fo:text-align="start"/>
      <style:text-properties fo:language="en" fo:country="US"/>
    </style:style>
    <style:style style:name="P157" style:parent-style-name="Normal" style:family="paragraph">
      <style:paragraph-properties fo:text-align="start"/>
      <style:text-properties fo:language="en" fo:country="US"/>
    </style:style>
    <style:style style:name="P158" style:parent-style-name="Normal" style:family="paragraph">
      <style:paragraph-properties fo:text-align="start"/>
      <style:text-properties fo:language="en" fo:country="US"/>
    </style:style>
    <style:style style:name="P159" style:parent-style-name="Normal" style:family="paragraph">
      <style:paragraph-properties fo:text-align="start"/>
      <style:text-properties fo:language="en" fo:country="US"/>
    </style:style>
    <style:style style:name="P160" style:parent-style-name="Normal" style:family="paragraph">
      <style:paragraph-properties fo:text-align="start"/>
    </style:style>
    <style:style style:name="T161" style:parent-style-name="DefaultParagraphFont" style:family="text">
      <style:text-properties fo:language="en" fo:country="US"/>
    </style:style>
    <style:style style:name="P162" style:parent-style-name="Normal" style:family="paragraph">
      <style:paragraph-properties fo:text-align="start"/>
    </style:style>
    <style:style style:name="P163" style:parent-style-name="Normal" style:family="paragraph">
      <style:paragraph-properties fo:text-align="start"/>
    </style:style>
    <style:style style:name="P164" style:parent-style-name="Normal" style:family="paragraph">
      <style:paragraph-properties fo:text-align="start"/>
    </style:style>
    <style:style style:name="P165" style:parent-style-name="Normal" style:family="paragraph">
      <style:paragraph-properties fo:text-align="start"/>
      <style:text-properties fo:language="en" fo:country="US"/>
    </style:style>
    <style:style style:name="P166" style:parent-style-name="Normal" style:family="paragraph">
      <style:paragraph-properties fo:text-align="start"/>
      <style:text-properties fo:language="en" fo:country="US"/>
    </style:style>
    <style:style style:name="P167" style:parent-style-name="Normal" style:family="paragraph">
      <style:paragraph-properties fo:text-align="start"/>
      <style:text-properties fo:language="en" fo:country="US"/>
    </style:style>
    <style:style style:name="P168" style:parent-style-name="Normal" style:family="paragraph">
      <style:paragraph-properties fo:text-align="start"/>
    </style:style>
    <style:style style:name="T169" style:parent-style-name="DefaultParagraphFont" style:family="text">
      <style:text-properties fo:language="en" fo:country="US"/>
    </style:style>
    <style:style style:name="P170" style:parent-style-name="Normal" style:family="paragraph">
      <style:paragraph-properties fo:text-align="start"/>
    </style:style>
    <style:style style:name="P171" style:parent-style-name="Normal" style:family="paragraph">
      <style:paragraph-properties fo:text-align="start"/>
    </style:style>
    <style:style style:name="P172" style:parent-style-name="Normal" style:family="paragraph">
      <style:paragraph-properties fo:text-align="start"/>
    </style:style>
    <style:style style:name="P173" style:parent-style-name="Normal" style:family="paragraph">
      <style:paragraph-properties fo:text-align="start"/>
    </style:style>
    <style:style style:name="T174" style:parent-style-name="DefaultParagraphFont" style:family="text">
      <style:text-properties fo:language="en" fo:country="US"/>
    </style:style>
    <style:style style:name="P175" style:parent-style-name="Normal" style:family="paragraph">
      <style:paragraph-properties fo:text-align="start"/>
    </style:style>
    <style:style style:name="T176" style:parent-style-name="DefaultParagraphFont" style:family="text">
      <style:text-properties fo:language="en" fo:country="US"/>
    </style:style>
    <style:style style:name="P177" style:parent-style-name="Normal" style:family="paragraph">
      <style:paragraph-properties fo:text-align="start"/>
    </style:style>
    <style:style style:name="P178" style:parent-style-name="Normal" style:family="paragraph">
      <style:paragraph-properties fo:text-align="start"/>
    </style:style>
    <style:style style:name="P179" style:parent-style-name="Normal" style:family="paragraph">
      <style:paragraph-properties fo:text-align="start"/>
    </style:style>
    <style:style style:name="P180" style:parent-style-name="Normal" style:family="paragraph">
      <style:paragraph-properties fo:text-align="start"/>
    </style:style>
    <style:style style:name="P181" style:parent-style-name="Normal" style:family="paragraph">
      <style:paragraph-properties fo:text-align="start"/>
    </style:style>
    <style:style style:name="P182" style:parent-style-name="Normal" style:family="paragraph">
      <style:paragraph-properties fo:text-align="start"/>
    </style:style>
    <style:style style:name="P183" style:parent-style-name="Normal" style:family="paragraph">
      <style:paragraph-properties fo:text-align="start"/>
    </style:style>
    <style:style style:name="P184" style:parent-style-name="Normal" style:family="paragraph">
      <style:paragraph-properties fo:text-align="start"/>
    </style:style>
    <style:style style:name="P185" style:parent-style-name="Normal" style:family="paragraph">
      <style:paragraph-properties fo:text-align="start"/>
    </style:style>
    <style:style style:name="P186" style:parent-style-name="Normal" style:family="paragraph">
      <style:paragraph-properties fo:text-align="start"/>
    </style:style>
    <style:style style:name="P187" style:parent-style-name="Normal" style:family="paragraph">
      <style:paragraph-properties fo:text-align="start"/>
    </style:style>
    <style:style style:name="P188" style:parent-style-name="Normal" style:family="paragraph">
      <style:paragraph-properties fo:text-align="start"/>
    </style:style>
    <style:style style:name="P189" style:parent-style-name="Normal" style:family="paragraph">
      <style:paragraph-properties fo:text-align="start"/>
    </style:style>
    <style:style style:name="P190" style:parent-style-name="Normal" style:family="paragraph">
      <style:paragraph-properties fo:text-align="start"/>
    </style:style>
    <style:style style:name="P191" style:parent-style-name="Normal" style:family="paragraph">
      <style:paragraph-properties fo:text-align="start"/>
    </style:style>
    <style:style style:name="P192" style:parent-style-name="Normal" style:family="paragraph">
      <style:paragraph-properties fo:text-align="start"/>
    </style:style>
    <style:style style:name="P193" style:parent-style-name="Normal" style:family="paragraph">
      <style:paragraph-properties fo:text-align="start"/>
    </style:style>
    <style:style style:name="T194" style:parent-style-name="DefaultParagraphFont" style:family="text">
      <style:text-properties fo:language="en" fo:country="US"/>
    </style:style>
    <style:style style:name="P195" style:parent-style-name="Normal" style:family="paragraph">
      <style:paragraph-properties fo:text-align="start"/>
    </style:style>
    <style:style style:name="T196" style:parent-style-name="DefaultParagraphFont" style:family="text">
      <style:text-properties fo:language="en" fo:country="US"/>
    </style:style>
    <style:style style:name="P197" style:parent-style-name="Normal" style:family="paragraph">
      <style:paragraph-properties fo:text-align="start"/>
    </style:style>
    <style:style style:name="P198" style:parent-style-name="Normal" style:family="paragraph">
      <style:paragraph-properties fo:text-align="start"/>
    </style:style>
    <style:style style:name="P199" style:parent-style-name="Normal" style:family="paragraph">
      <style:paragraph-properties fo:text-align="start"/>
    </style:style>
    <style:style style:name="P200" style:parent-style-name="Normal" style:family="paragraph">
      <style:paragraph-properties fo:text-align="start"/>
    </style:style>
    <style:style style:name="P201" style:parent-style-name="Normal" style:family="paragraph">
      <style:paragraph-properties fo:text-align="start"/>
    </style:style>
    <style:style style:name="T202" style:parent-style-name="DefaultParagraphFont" style:family="text">
      <style:text-properties fo:language="en" fo:country="US"/>
    </style:style>
    <style:style style:name="P203" style:parent-style-name="Normal" style:family="paragraph">
      <style:paragraph-properties fo:text-align="start"/>
      <style:text-properties fo:language="en" fo:country="US"/>
    </style:style>
    <style:style style:name="T204" style:parent-style-name="DefaultParagraphFont" style:family="text">
      <style:text-properties style:font-name="Calibri"/>
    </style:style>
    <style:style style:name="P205" style:parent-style-name="Normal" style:family="paragraph">
      <style:paragraph-properties fo:text-align="start"/>
    </style:style>
    <style:style style:name="P206" style:parent-style-name="Normal" style:family="paragraph">
      <style:paragraph-properties fo:text-align="start"/>
    </style:style>
    <style:style style:name="P207" style:parent-style-name="Normal" style:family="paragraph">
      <style:paragraph-properties fo:text-align="start"/>
    </style:style>
    <style:style style:name="P208" style:parent-style-name="Normal" style:family="paragraph">
      <style:paragraph-properties fo:text-align="start"/>
    </style:style>
    <style:style style:name="P209" style:parent-style-name="Normal" style:family="paragraph">
      <style:paragraph-properties fo:text-align="start"/>
    </style:style>
    <style:style style:name="P210" style:parent-style-name="Normal" style:family="paragraph">
      <style:paragraph-properties fo:text-align="start"/>
    </style:style>
    <style:style style:name="P211" style:parent-style-name="Normal" style:family="paragraph">
      <style:paragraph-properties fo:text-align="start"/>
    </style:style>
    <style:style style:name="P212" style:parent-style-name="Normal" style:family="paragraph">
      <style:paragraph-properties fo:text-align="start"/>
    </style:style>
    <style:style style:name="P213" style:parent-style-name="Normal" style:family="paragraph">
      <style:paragraph-properties fo:text-align="start"/>
    </style:style>
    <style:style style:name="P214" style:parent-style-name="Normal" style:family="paragraph">
      <style:paragraph-properties fo:text-align="start"/>
    </style:style>
    <style:style style:name="P215" style:parent-style-name="Normal" style:family="paragraph">
      <style:paragraph-properties fo:text-align="start"/>
    </style:style>
    <style:style style:name="P216" style:parent-style-name="Normal" style:family="paragraph">
      <style:paragraph-properties fo:text-align="start"/>
    </style:style>
    <style:style style:name="P217" style:parent-style-name="Normal" style:family="paragraph">
      <style:paragraph-properties fo:text-align="start"/>
    </style:style>
    <style:style style:name="P218" style:parent-style-name="Normal" style:family="paragraph">
      <style:paragraph-properties fo:text-align="start"/>
    </style:style>
    <style:style style:name="P219" style:parent-style-name="Normal" style:family="paragraph">
      <style:paragraph-properties fo:text-align="start"/>
    </style:style>
    <style:style style:name="T220" style:parent-style-name="DefaultParagraphFont" style:family="text">
      <style:text-properties fo:language="en" fo:country="US"/>
    </style:style>
    <style:style style:name="P221" style:parent-style-name="Normal" style:family="paragraph">
      <style:paragraph-properties fo:text-align="start"/>
    </style:style>
    <style:style style:name="T222" style:parent-style-name="DefaultParagraphFont" style:family="text">
      <style:text-properties fo:language="en" fo:country="US"/>
    </style:style>
    <style:style style:name="P223" style:parent-style-name="Normal" style:family="paragraph">
      <style:paragraph-properties fo:text-align="start"/>
    </style:style>
    <style:style style:name="P224" style:parent-style-name="Normal" style:family="paragraph">
      <style:paragraph-properties fo:text-align="start"/>
    </style:style>
    <style:style style:name="P225" style:parent-style-name="Normal" style:family="paragraph">
      <style:paragraph-properties fo:text-align="start"/>
    </style:style>
    <style:style style:name="P226" style:parent-style-name="Normal" style:family="paragraph">
      <style:paragraph-properties fo:text-align="start"/>
    </style:style>
    <style:style style:name="P227" style:parent-style-name="Normal" style:family="paragraph">
      <style:paragraph-properties fo:text-align="start"/>
    </style:style>
    <style:style style:name="T228" style:parent-style-name="DefaultParagraphFont" style:family="text">
      <style:text-properties fo:language="en" fo:country="US"/>
    </style:style>
    <style:style style:name="P229" style:parent-style-name="Normal" style:family="paragraph">
      <style:paragraph-properties fo:text-align="start"/>
      <style:text-properties fo:language="en" fo:country="US"/>
    </style:style>
    <style:style style:name="P230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T231" style:parent-style-name="DefaultParagraphFont" style:family="text">
      <style:text-properties style:font-name="Calibri"/>
    </style:style>
    <style:style style:name="T232" style:parent-style-name="DefaultParagraphFont" style:family="text">
      <style:text-properties style:font-name="Calibri" fo:font-weight="bold" style:font-weight-asian="bold" style:font-weight-complex="bold"/>
    </style:style>
    <style:style style:name="T233" style:parent-style-name="DefaultParagraphFont" style:family="text">
      <style:text-properties style:font-name="Calibri"/>
    </style:style>
    <style:style style:name="T234" style:parent-style-name="DefaultParagraphFont" style:family="text">
      <style:text-properties style:font-name="Calibri" fo:font-weight="bold" style:font-weight-asian="bold" style:font-weight-complex="bold"/>
    </style:style>
    <style:style style:name="T235" style:parent-style-name="DefaultParagraphFont" style:family="text">
      <style:text-properties style:font-name="Calibri"/>
    </style:style>
    <style:style style:name="T236" style:parent-style-name="DefaultParagraphFont" style:family="text">
      <style:text-properties style:font-name="Calibri" fo:font-weight="bold" style:font-weight-asian="bold" style:font-weight-complex="bold"/>
    </style:style>
    <style:style style:name="T237" style:parent-style-name="DefaultParagraphFont" style:family="text">
      <style:text-properties style:font-name="Calibri"/>
    </style:style>
    <style:style style:name="T238" style:parent-style-name="DefaultParagraphFont" style:family="text">
      <style:text-properties style:font-name="Calibri"/>
    </style:style>
    <style:style style:name="T239" style:parent-style-name="DefaultParagraphFont" style:family="text">
      <style:text-properties style:font-name="Calibri" fo:font-weight="bold" style:font-weight-asian="bold" style:font-weight-complex="bold"/>
    </style:style>
    <style:style style:name="T240" style:parent-style-name="DefaultParagraphFont" style:family="text">
      <style:text-properties style:font-name="Calibri"/>
    </style:style>
    <style:style style:name="T241" style:parent-style-name="DefaultParagraphFont" style:family="text">
      <style:text-properties style:font-name="Calibri" fo:font-weight="bold" style:font-weight-asian="bold" style:font-weight-complex="bold"/>
    </style:style>
    <style:style style:name="T242" style:parent-style-name="DefaultParagraphFont" style:family="text">
      <style:text-properties style:font-name="Calibri"/>
    </style:style>
    <style:style style:name="T243" style:parent-style-name="DefaultParagraphFont" style:family="text">
      <style:text-properties style:font-name="Calibri" fo:font-weight="bold" style:font-weight-asian="bold" style:font-weight-complex="bold"/>
    </style:style>
    <style:style style:name="T244" style:parent-style-name="DefaultParagraphFont" style:family="text">
      <style:text-properties style:font-name="Calibri"/>
    </style:style>
    <style:style style:name="T245" style:parent-style-name="DefaultParagraphFont" style:family="text">
      <style:text-properties style:font-name="Calibri" fo:font-weight="bold" style:font-weight-asian="bold" style:font-weight-complex="bold"/>
    </style:style>
    <style:style style:name="T246" style:parent-style-name="DefaultParagraphFont" style:family="text">
      <style:text-properties style:font-name="Calibri"/>
    </style:style>
    <style:style style:name="T247" style:parent-style-name="DefaultParagraphFont" style:family="text">
      <style:text-properties style:font-name="Calibri"/>
    </style:style>
    <style:style style:name="T248" style:parent-style-name="DefaultParagraphFont" style:family="text">
      <style:text-properties style:font-name="Calibri" fo:font-weight="bold" style:font-weight-asian="bold" style:font-weight-complex="bold"/>
    </style:style>
    <style:style style:name="T249" style:parent-style-name="DefaultParagraphFont" style:family="text">
      <style:text-properties style:font-name="Calibri"/>
    </style:style>
    <style:style style:name="T250" style:parent-style-name="DefaultParagraphFont" style:family="text">
      <style:text-properties style:font-name="Calibri" fo:font-weight="bold" style:font-weight-asian="bold" style:font-weight-complex="bold"/>
    </style:style>
    <style:style style:name="T251" style:parent-style-name="DefaultParagraphFont" style:family="text">
      <style:text-properties style:font-name="Calibri"/>
    </style:style>
    <style:style style:name="T252" style:parent-style-name="DefaultParagraphFont" style:family="text">
      <style:text-properties style:font-name="Calibri" fo:font-weight="bold" style:font-weight-asian="bold" style:font-weight-complex="bold"/>
    </style:style>
    <style:style style:name="T253" style:parent-style-name="DefaultParagraphFont" style:family="text">
      <style:text-properties style:font-name="Calibri"/>
    </style:style>
    <style:style style:name="P254" style:parent-style-name="SBCparagraph" style:family="paragraph">
      <style:paragraph-properties fo:text-indent="0.1972in"/>
      <style:text-properties style:font-name="Calibri"/>
    </style:style>
    <style:style style:name="P255" style:parent-style-name="SBCparagraph" style:family="paragraph">
      <style:paragraph-properties fo:text-indent="0.1972in"/>
    </style:style>
    <style:style style:name="T256" style:parent-style-name="DefaultParagraphFont" style:family="text">
      <style:text-properties style:font-name="Calibri"/>
    </style:style>
    <style:style style:name="P257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P258" style:parent-style-name="SBCtitle1" style:list-style-name="LFO8" style:family="paragraph"/>
    <style:style style:name="T259" style:parent-style-name="DefaultParagraphFont" style:family="text">
      <style:text-properties style:font-name="Calibri"/>
    </style:style>
    <style:style style:name="P260" style:parent-style-name="SBCparagraph" style:family="paragraph">
      <style:paragraph-properties fo:text-indent="0.1972in"/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P261" style:parent-style-name="SBCparagraph" style:family="paragraph">
      <style:paragraph-properties fo:text-align="center" fo:text-indent="0in"/>
    </style:style>
    <style:style style:name="T262" style:parent-style-name="DefaultParagraphFont" style:family="text">
      <style:text-properties style:font-name="Calibri"/>
    </style:style>
    <style:style style:name="P263" style:parent-style-name="Normal" style:family="paragraph">
      <style:paragraph-properties fo:text-align="start"/>
    </style:style>
    <style:style style:name="P264" style:parent-style-name="Normal" style:family="paragraph">
      <style:paragraph-properties fo:text-align="start"/>
    </style:style>
    <style:style style:name="P265" style:parent-style-name="Normal" style:family="paragraph">
      <style:paragraph-properties fo:text-align="start"/>
    </style:style>
    <style:style style:name="P266" style:parent-style-name="Normal" style:family="paragraph">
      <style:paragraph-properties fo:text-align="start"/>
    </style:style>
    <style:style style:name="P267" style:parent-style-name="Normal" style:family="paragraph">
      <style:paragraph-properties fo:text-align="start"/>
    </style:style>
    <style:style style:name="P268" style:parent-style-name="Normal" style:family="paragraph">
      <style:paragraph-properties fo:text-align="start"/>
    </style:style>
    <style:style style:name="P269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P270" style:parent-style-name="SBCparagraph" style:family="paragraph">
      <style:paragraph-properties fo:text-indent="0.1972in"/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P271" style:parent-style-name="SBCparagraph" style:family="paragraph">
      <style:paragraph-properties fo:text-indent="0.1972in"/>
      <style:text-properties style:font-name="Calibri"/>
    </style:style>
    <style:style style:name="T272" style:parent-style-name="DefaultParagraphFont" style:family="text">
      <style:text-properties style:font-name="Calibri"/>
    </style:style>
    <style:style style:name="T273" style:parent-style-name="DefaultParagraphFont" style:family="text">
      <style:text-properties style:font-name="Calibri" fo:font-weight="bold" style:font-weight-asian="bold" style:font-weight-complex="bold"/>
    </style:style>
    <style:style style:name="T274" style:parent-style-name="DefaultParagraphFont" style:family="text">
      <style:text-properties style:font-name="Calibri"/>
    </style:style>
    <style:style style:name="P275" style:parent-style-name="SBCparagraph" style:list-style-name="LFO10" style:family="paragraph"/>
    <style:style style:name="T276" style:parent-style-name="DefaultParagraphFont" style:family="text">
      <style:text-properties style:font-name="Calibri" fo:font-weight="bold" style:font-weight-asian="bold" style:font-weight-complex="bold"/>
    </style:style>
    <style:style style:name="T277" style:parent-style-name="DefaultParagraphFont" style:family="text">
      <style:text-properties style:font-name="Calibri"/>
    </style:style>
    <style:style style:name="P278" style:parent-style-name="SBCparagraph" style:list-style-name="LFO10" style:family="paragraph"/>
    <style:style style:name="T279" style:parent-style-name="DefaultParagraphFont" style:family="text">
      <style:text-properties style:font-name="Calibri" fo:font-weight="bold" style:font-weight-asian="bold" style:font-weight-complex="bold"/>
    </style:style>
    <style:style style:name="T280" style:parent-style-name="DefaultParagraphFont" style:family="text">
      <style:text-properties style:font-name="Calibri"/>
    </style:style>
    <style:style style:name="T281" style:parent-style-name="DefaultParagraphFont" style:family="text">
      <style:text-properties style:font-name="Calibri" fo:font-weight="bold" style:font-weight-asian="bold" style:font-weight-complex="bold"/>
    </style:style>
    <style:style style:name="T282" style:parent-style-name="DefaultParagraphFont" style:family="text">
      <style:text-properties style:font-name="Calibri"/>
    </style:style>
    <style:style style:name="T283" style:parent-style-name="DefaultParagraphFont" style:family="text">
      <style:text-properties style:font-name="Calibri" fo:font-weight="bold" style:font-weight-asian="bold" style:font-weight-complex="bold"/>
    </style:style>
    <style:style style:name="T284" style:parent-style-name="DefaultParagraphFont" style:family="text">
      <style:text-properties style:font-name="Calibri"/>
    </style:style>
    <style:style style:name="P285" style:parent-style-name="SBCparagraph" style:list-style-name="LFO10" style:family="paragraph"/>
    <style:style style:name="T286" style:parent-style-name="DefaultParagraphFont" style:family="text">
      <style:text-properties style:font-name="Calibri" fo:font-weight="bold" style:font-weight-asian="bold" style:font-weight-complex="bold"/>
    </style:style>
    <style:style style:name="T287" style:parent-style-name="DefaultParagraphFont" style:family="text">
      <style:text-properties style:font-name="Calibri"/>
    </style:style>
    <style:style style:name="P288" style:parent-style-name="SBCparagraph" style:list-style-name="LFO10" style:family="paragraph"/>
    <style:style style:name="T289" style:parent-style-name="DefaultParagraphFont" style:family="text">
      <style:text-properties style:font-name="Calibri" fo:font-weight="bold" style:font-weight-asian="bold" style:font-weight-complex="bold"/>
    </style:style>
    <style:style style:name="T290" style:parent-style-name="DefaultParagraphFont" style:family="text">
      <style:text-properties style:font-name="Calibri"/>
    </style:style>
    <style:style style:name="P291" style:parent-style-name="SBCparagraph" style:list-style-name="LFO10" style:family="paragraph"/>
    <style:style style:name="T292" style:parent-style-name="DefaultParagraphFont" style:family="text">
      <style:text-properties style:font-name="Calibri" fo:font-weight="bold" style:font-weight-asian="bold" style:font-weight-complex="bold"/>
    </style:style>
    <style:style style:name="T293" style:parent-style-name="DefaultParagraphFont" style:family="text">
      <style:text-properties style:font-name="Calibri"/>
    </style:style>
    <style:style style:name="P294" style:parent-style-name="SBCparagraph" style:list-style-name="LFO10" style:family="paragraph"/>
    <style:style style:name="T295" style:parent-style-name="DefaultParagraphFont" style:family="text">
      <style:text-properties style:font-name="Calibri" fo:font-weight="bold" style:font-weight-asian="bold" style:font-weight-complex="bold"/>
    </style:style>
    <style:style style:name="T296" style:parent-style-name="DefaultParagraphFont" style:family="text">
      <style:text-properties style:font-name="Calibri"/>
    </style:style>
    <style:style style:name="P297" style:parent-style-name="SBCparagraph" style:list-style-name="LFO10" style:family="paragraph">
      <style:text-properties style:font-name="Calibri"/>
    </style:style>
    <style:style style:name="P298" style:parent-style-name="SBCparagraph" style:family="paragraph">
      <style:paragraph-properties fo:text-indent="0.1972in"/>
      <style:text-properties style:font-name="Calibri"/>
    </style:style>
    <style:style style:name="P299" style:parent-style-name="SBCparagraph" style:family="paragraph">
      <style:paragraph-properties fo:text-indent="0.1972in"/>
    </style:style>
    <style:style style:name="T300" style:parent-style-name="DefaultParagraphFont" style:family="text">
      <style:text-properties style:font-name="Calibri"/>
    </style:style>
    <style:style style:name="P301" style:parent-style-name="SBCparagraph" style:family="paragraph">
      <style:paragraph-properties fo:text-align="center" fo:text-indent="0.1972in"/>
      <style:text-properties style:font-name="Calibri" fo:font-weight="bold" style:font-weight-asian="bold" style:font-weight-complex="bold"/>
    </style:style>
    <style:style style:name="P302" style:parent-style-name="SBCparagraph" style:family="paragraph">
      <style:paragraph-properties fo:text-align="center" fo:text-indent="0in"/>
    </style:style>
    <style:style style:name="T303" style:parent-style-name="DefaultParagraphFont" style:family="text">
      <style:text-properties style:font-name="Calibri"/>
    </style:style>
    <style:style style:name="P304" style:parent-style-name="Normal" style:family="paragraph">
      <style:paragraph-properties fo:text-align="start"/>
      <style:text-properties fo:language="en" fo:country="US"/>
    </style:style>
    <style:style style:name="P305" style:parent-style-name="Normal" style:family="paragraph">
      <style:paragraph-properties fo:text-align="start"/>
      <style:text-properties fo:language="en" fo:country="US"/>
    </style:style>
    <style:style style:name="P306" style:parent-style-name="Normal" style:family="paragraph">
      <style:paragraph-properties fo:text-align="start"/>
      <style:text-properties fo:language="en" fo:country="US"/>
    </style:style>
    <style:style style:name="P307" style:parent-style-name="Normal" style:family="paragraph">
      <style:paragraph-properties fo:text-align="start"/>
      <style:text-properties fo:language="en" fo:country="US"/>
    </style:style>
    <style:style style:name="P308" style:parent-style-name="Normal" style:family="paragraph">
      <style:paragraph-properties fo:text-align="start"/>
      <style:text-properties fo:language="en" fo:country="US"/>
    </style:style>
    <style:style style:name="P309" style:parent-style-name="Normal" style:family="paragraph">
      <style:paragraph-properties fo:text-align="start"/>
      <style:text-properties fo:language="en" fo:country="US"/>
    </style:style>
    <style:style style:name="P310" style:parent-style-name="Normal" style:family="paragraph">
      <style:paragraph-properties fo:text-align="start"/>
    </style:style>
    <style:style style:name="P311" style:parent-style-name="Normal" style:family="paragraph">
      <style:paragraph-properties fo:text-align="start"/>
    </style:style>
    <style:style style:name="P312" style:parent-style-name="Normal" style:family="paragraph">
      <style:paragraph-properties fo:text-align="start"/>
    </style:style>
    <style:style style:name="P313" style:parent-style-name="Normal" style:family="paragraph">
      <style:paragraph-properties fo:text-align="start"/>
      <style:text-properties fo:language="en" fo:country="US"/>
    </style:style>
    <style:style style:name="P314" style:parent-style-name="Normal" style:family="paragraph">
      <style:paragraph-properties fo:text-align="start"/>
      <style:text-properties fo:language="en" fo:country="US"/>
    </style:style>
    <style:style style:name="P315" style:parent-style-name="Normal" style:family="paragraph">
      <style:paragraph-properties fo:text-align="start"/>
      <style:text-properties fo:language="en" fo:country="US"/>
    </style:style>
    <style:style style:name="P316" style:parent-style-name="Normal" style:family="paragraph">
      <style:paragraph-properties fo:text-align="start"/>
      <style:text-properties fo:language="en" fo:country="US"/>
    </style:style>
    <style:style style:name="P317" style:parent-style-name="Normal" style:family="paragraph">
      <style:paragraph-properties fo:text-align="start"/>
      <style:text-properties fo:language="en" fo:country="US"/>
    </style:style>
    <style:style style:name="P318" style:parent-style-name="Normal" style:family="paragraph">
      <style:paragraph-properties fo:text-align="start"/>
      <style:text-properties fo:language="en" fo:country="US"/>
    </style:style>
    <style:style style:name="P319" style:parent-style-name="Normal" style:family="paragraph">
      <style:paragraph-properties fo:text-align="start"/>
      <style:text-properties fo:language="en" fo:country="US"/>
    </style:style>
    <style:style style:name="P320" style:parent-style-name="Normal" style:family="paragraph">
      <style:paragraph-properties fo:text-align="start"/>
      <style:text-properties fo:language="en" fo:country="US"/>
    </style:style>
    <style:style style:name="P321" style:parent-style-name="Normal" style:family="paragraph">
      <style:paragraph-properties fo:text-align="start"/>
      <style:text-properties fo:language="en" fo:country="US"/>
    </style:style>
    <style:style style:name="P322" style:parent-style-name="Normal" style:family="paragraph">
      <style:paragraph-properties fo:text-align="start"/>
      <style:text-properties fo:language="en" fo:country="US"/>
    </style:style>
    <style:style style:name="P323" style:parent-style-name="Normal" style:family="paragraph">
      <style:paragraph-properties fo:text-align="start"/>
    </style:style>
    <style:style style:name="T324" style:parent-style-name="DefaultParagraphFont" style:family="text">
      <style:text-properties fo:language="en" fo:country="US"/>
    </style:style>
    <style:style style:name="P325" style:parent-style-name="Normal" style:family="paragraph">
      <style:paragraph-properties fo:text-align="start"/>
    </style:style>
    <style:style style:name="P326" style:parent-style-name="Normal" style:family="paragraph">
      <style:paragraph-properties fo:text-align="start"/>
    </style:style>
    <style:style style:name="P327" style:parent-style-name="Normal" style:family="paragraph">
      <style:paragraph-properties fo:text-align="start"/>
    </style:style>
    <style:style style:name="P328" style:parent-style-name="Normal" style:family="paragraph">
      <style:paragraph-properties fo:text-align="start"/>
    </style:style>
    <style:style style:name="T329" style:parent-style-name="DefaultParagraphFont" style:family="text">
      <style:text-properties fo:language="en" fo:country="US"/>
    </style:style>
    <style:style style:name="P330" style:parent-style-name="Normal" style:family="paragraph">
      <style:paragraph-properties fo:text-align="start"/>
    </style:style>
    <style:style style:name="P331" style:parent-style-name="Normal" style:family="paragraph">
      <style:paragraph-properties fo:text-align="start"/>
    </style:style>
    <style:style style:name="P332" style:parent-style-name="Normal" style:family="paragraph">
      <style:paragraph-properties fo:text-align="start"/>
    </style:style>
    <style:style style:name="P333" style:parent-style-name="Normal" style:family="paragraph">
      <style:paragraph-properties fo:text-align="start"/>
    </style:style>
    <style:style style:name="P334" style:parent-style-name="Normal" style:family="paragraph">
      <style:paragraph-properties fo:text-align="start"/>
    </style:style>
    <style:style style:name="T335" style:parent-style-name="DefaultParagraphFont" style:family="text">
      <style:text-properties fo:language="en" fo:country="US"/>
    </style:style>
    <style:style style:name="P336" style:parent-style-name="Normal" style:family="paragraph">
      <style:paragraph-properties fo:text-align="start"/>
      <style:text-properties fo:language="en" fo:country="US"/>
    </style:style>
    <style:style style:name="P337" style:parent-style-name="Normal" style:family="paragraph">
      <style:paragraph-properties fo:text-align="start"/>
      <style:text-properties fo:language="en" fo:country="US"/>
    </style:style>
    <style:style style:name="P338" style:parent-style-name="Normal" style:family="paragraph">
      <style:paragraph-properties fo:text-align="start"/>
    </style:style>
    <style:style style:name="T339" style:parent-style-name="DefaultParagraphFont" style:family="text">
      <style:text-properties fo:language="en" fo:country="US"/>
    </style:style>
    <style:style style:name="P340" style:parent-style-name="Normal" style:family="paragraph">
      <style:paragraph-properties fo:text-align="start"/>
    </style:style>
    <style:style style:name="T341" style:parent-style-name="DefaultParagraphFont" style:family="text">
      <style:text-properties fo:language="en" fo:country="US"/>
    </style:style>
    <style:style style:name="P342" style:parent-style-name="Normal" style:family="paragraph">
      <style:paragraph-properties fo:text-align="start"/>
    </style:style>
    <style:style style:name="T343" style:parent-style-name="DefaultParagraphFont" style:family="text">
      <style:text-properties fo:language="en" fo:country="US"/>
    </style:style>
    <style:style style:name="P344" style:parent-style-name="Normal" style:family="paragraph">
      <style:paragraph-properties fo:text-align="start"/>
    </style:style>
    <style:style style:name="T345" style:parent-style-name="DefaultParagraphFont" style:family="text">
      <style:text-properties fo:language="en" fo:country="US"/>
    </style:style>
    <style:style style:name="P346" style:parent-style-name="Normal" style:family="paragraph">
      <style:paragraph-properties fo:text-align="start"/>
      <style:text-properties fo:language="en" fo:country="US"/>
    </style:style>
    <style:style style:name="P347" style:parent-style-name="Normal" style:family="paragraph">
      <style:paragraph-properties fo:text-align="start"/>
      <style:text-properties fo:language="en" fo:country="US"/>
    </style:style>
    <style:style style:name="P348" style:parent-style-name="Normal" style:family="paragraph">
      <style:paragraph-properties fo:text-align="start"/>
      <style:text-properties fo:language="en" fo:country="US"/>
    </style:style>
    <style:style style:name="P349" style:parent-style-name="Normal" style:family="paragraph">
      <style:paragraph-properties fo:text-align="start"/>
      <style:text-properties fo:language="en" fo:country="US"/>
    </style:style>
    <style:style style:name="P350" style:parent-style-name="Normal" style:family="paragraph">
      <style:paragraph-properties fo:text-align="start"/>
      <style:text-properties fo:language="en" fo:country="US"/>
    </style:style>
    <style:style style:name="P351" style:parent-style-name="Normal" style:family="paragraph">
      <style:paragraph-properties fo:text-align="start"/>
      <style:text-properties fo:language="en" fo:country="US"/>
    </style:style>
    <style:style style:name="P352" style:parent-style-name="Normal" style:family="paragraph">
      <style:paragraph-properties fo:text-align="start"/>
    </style:style>
    <style:style style:name="T353" style:parent-style-name="DefaultParagraphFont" style:family="text">
      <style:text-properties fo:language="en" fo:country="US"/>
    </style:style>
    <style:style style:name="P354" style:parent-style-name="Normal" style:family="paragraph">
      <style:paragraph-properties fo:text-align="start"/>
    </style:style>
    <style:style style:name="P355" style:parent-style-name="Normal" style:family="paragraph">
      <style:paragraph-properties fo:text-align="start"/>
    </style:style>
    <style:style style:name="P356" style:parent-style-name="Normal" style:family="paragraph">
      <style:paragraph-properties fo:text-align="start"/>
    </style:style>
    <style:style style:name="P357" style:parent-style-name="Normal" style:family="paragraph">
      <style:paragraph-properties fo:text-align="start"/>
    </style:style>
    <style:style style:name="P358" style:parent-style-name="Normal" style:family="paragraph">
      <style:paragraph-properties fo:text-align="start"/>
    </style:style>
    <style:style style:name="P359" style:parent-style-name="Normal" style:family="paragraph">
      <style:paragraph-properties fo:text-align="start"/>
    </style:style>
    <style:style style:name="P360" style:parent-style-name="Normal" style:family="paragraph">
      <style:paragraph-properties fo:text-align="start"/>
    </style:style>
    <style:style style:name="P361" style:parent-style-name="Normal" style:family="paragraph">
      <style:paragraph-properties fo:text-align="start"/>
    </style:style>
    <style:style style:name="P362" style:parent-style-name="Normal" style:family="paragraph">
      <style:paragraph-properties fo:text-align="start"/>
    </style:style>
    <style:style style:name="P363" style:parent-style-name="Normal" style:family="paragraph">
      <style:paragraph-properties fo:text-align="start"/>
    </style:style>
    <style:style style:name="P364" style:parent-style-name="Normal" style:family="paragraph">
      <style:paragraph-properties fo:text-align="start"/>
    </style:style>
    <style:style style:name="P365" style:parent-style-name="Normal" style:family="paragraph">
      <style:paragraph-properties fo:text-align="start"/>
    </style:style>
    <style:style style:name="P366" style:parent-style-name="Normal" style:family="paragraph">
      <style:paragraph-properties fo:text-align="start"/>
    </style:style>
    <style:style style:name="P367" style:parent-style-name="Normal" style:family="paragraph">
      <style:paragraph-properties fo:text-align="start"/>
    </style:style>
    <style:style style:name="P368" style:parent-style-name="Normal" style:family="paragraph">
      <style:paragraph-properties fo:text-align="start"/>
    </style:style>
    <style:style style:name="P369" style:parent-style-name="Normal" style:family="paragraph">
      <style:paragraph-properties fo:text-align="start"/>
    </style:style>
    <style:style style:name="P370" style:parent-style-name="Normal" style:family="paragraph">
      <style:paragraph-properties fo:text-align="start"/>
    </style:style>
    <style:style style:name="P371" style:parent-style-name="Normal" style:family="paragraph">
      <style:paragraph-properties fo:text-align="start"/>
    </style:style>
    <style:style style:name="P372" style:parent-style-name="Normal" style:family="paragraph">
      <style:paragraph-properties fo:text-align="start"/>
    </style:style>
    <style:style style:name="P373" style:parent-style-name="Normal" style:family="paragraph">
      <style:paragraph-properties fo:text-align="start"/>
    </style:style>
    <style:style style:name="P374" style:parent-style-name="Normal" style:family="paragraph">
      <style:paragraph-properties fo:text-align="start"/>
    </style:style>
    <style:style style:name="P375" style:parent-style-name="Normal" style:family="paragraph">
      <style:paragraph-properties fo:text-align="start"/>
    </style:style>
    <style:style style:name="P376" style:parent-style-name="Normal" style:family="paragraph">
      <style:paragraph-properties fo:text-align="start"/>
    </style:style>
    <style:style style:name="P377" style:parent-style-name="Normal" style:family="paragraph">
      <style:paragraph-properties fo:text-align="start"/>
    </style:style>
    <style:style style:name="P378" style:parent-style-name="Normal" style:family="paragraph">
      <style:paragraph-properties fo:text-align="start"/>
    </style:style>
    <style:style style:name="P379" style:parent-style-name="Normal" style:family="paragraph">
      <style:paragraph-properties fo:text-align="start"/>
    </style:style>
    <style:style style:name="P380" style:parent-style-name="Normal" style:family="paragraph">
      <style:paragraph-properties fo:text-align="start"/>
    </style:style>
    <style:style style:name="P381" style:parent-style-name="Normal" style:family="paragraph">
      <style:paragraph-properties fo:text-align="start"/>
    </style:style>
    <style:style style:name="T382" style:parent-style-name="DefaultParagraphFont" style:family="text">
      <style:text-properties fo:language="en" fo:country="US"/>
    </style:style>
    <style:style style:name="P383" style:parent-style-name="Normal" style:family="paragraph">
      <style:paragraph-properties fo:text-align="start"/>
      <style:text-properties fo:language="en" fo:country="US"/>
    </style:style>
    <style:style style:name="P384" style:parent-style-name="Normal" style:family="paragraph">
      <style:paragraph-properties fo:text-align="start"/>
      <style:text-properties fo:language="en" fo:country="US"/>
    </style:style>
    <style:style style:name="P385" style:parent-style-name="Normal" style:family="paragraph">
      <style:paragraph-properties fo:text-align="start"/>
      <style:text-properties fo:language="en" fo:country="US"/>
    </style:style>
    <style:style style:name="P386" style:parent-style-name="Normal" style:family="paragraph">
      <style:paragraph-properties fo:text-align="start"/>
      <style:text-properties fo:language="en" fo:country="US"/>
    </style:style>
    <style:style style:name="P387" style:parent-style-name="Normal" style:family="paragraph">
      <style:paragraph-properties fo:text-align="start"/>
      <style:text-properties fo:language="en" fo:country="US"/>
    </style:style>
    <style:style style:name="P388" style:parent-style-name="Normal" style:family="paragraph">
      <style:paragraph-properties fo:text-align="start"/>
      <style:text-properties fo:language="en" fo:country="US"/>
    </style:style>
    <style:style style:name="P389" style:parent-style-name="Normal" style:family="paragraph">
      <style:paragraph-properties fo:text-align="start"/>
      <style:text-properties fo:language="en" fo:country="US"/>
    </style:style>
    <style:style style:name="P390" style:parent-style-name="Normal" style:family="paragraph">
      <style:paragraph-properties fo:text-align="start"/>
    </style:style>
    <style:style style:name="P391" style:parent-style-name="SBCparagraph" style:family="paragraph">
      <style:paragraph-properties fo:text-align="center" fo:text-indent="0in"/>
    </style:style>
    <style:style style:name="T392" style:parent-style-name="DefaultParagraphFont" style:family="text">
      <style:text-properties style:font-name="Calibri"/>
    </style:style>
    <style:style style:name="P393" style:parent-style-name="Normal" style:family="paragraph">
      <style:paragraph-properties fo:text-align="start"/>
    </style:style>
    <style:style style:name="P394" style:parent-style-name="Normal" style:family="paragraph">
      <style:paragraph-properties fo:text-align="start"/>
    </style:style>
    <style:style style:name="P395" style:parent-style-name="Normal" style:family="paragraph">
      <style:paragraph-properties fo:text-align="start"/>
    </style:style>
    <style:style style:name="T396" style:parent-style-name="DefaultParagraphFont" style:family="text">
      <style:text-properties fo:language="en" fo:country="US"/>
    </style:style>
    <style:style style:name="P397" style:parent-style-name="Normal" style:family="paragraph">
      <style:paragraph-properties fo:text-align="start"/>
      <style:text-properties fo:language="en" fo:country="US"/>
    </style:style>
    <style:style style:name="P398" style:parent-style-name="Normal" style:family="paragraph">
      <style:paragraph-properties fo:text-align="start"/>
      <style:text-properties fo:language="en" fo:country="US"/>
    </style:style>
    <style:style style:name="P399" style:parent-style-name="Normal" style:family="paragraph">
      <style:paragraph-properties fo:text-align="start"/>
    </style:style>
    <style:style style:name="T400" style:parent-style-name="DefaultParagraphFont" style:family="text">
      <style:text-properties fo:language="en" fo:country="US"/>
    </style:style>
    <style:style style:name="P401" style:parent-style-name="Normal" style:family="paragraph">
      <style:paragraph-properties fo:text-align="start"/>
    </style:style>
    <style:style style:name="T402" style:parent-style-name="DefaultParagraphFont" style:family="text">
      <style:text-properties fo:language="en" fo:country="US"/>
    </style:style>
    <style:style style:name="P403" style:parent-style-name="Normal" style:family="paragraph">
      <style:paragraph-properties fo:text-align="start"/>
    </style:style>
    <style:style style:name="T404" style:parent-style-name="DefaultParagraphFont" style:family="text">
      <style:text-properties fo:language="en" fo:country="US"/>
    </style:style>
    <style:style style:name="P405" style:parent-style-name="Normal" style:family="paragraph">
      <style:paragraph-properties fo:text-align="start"/>
    </style:style>
    <style:style style:name="T406" style:parent-style-name="DefaultParagraphFont" style:family="text">
      <style:text-properties fo:language="en" fo:country="US"/>
    </style:style>
    <style:style style:name="P407" style:parent-style-name="Normal" style:family="paragraph">
      <style:paragraph-properties fo:text-align="start"/>
      <style:text-properties fo:language="en" fo:country="US"/>
    </style:style>
    <style:style style:name="P408" style:parent-style-name="Normal" style:family="paragraph">
      <style:paragraph-properties fo:text-align="start"/>
      <style:text-properties fo:language="en" fo:country="US"/>
    </style:style>
    <style:style style:name="P409" style:parent-style-name="Normal" style:family="paragraph">
      <style:paragraph-properties fo:text-align="start"/>
      <style:text-properties fo:language="en" fo:country="US"/>
    </style:style>
    <style:style style:name="P410" style:parent-style-name="Normal" style:family="paragraph">
      <style:paragraph-properties fo:text-align="start"/>
      <style:text-properties fo:language="en" fo:country="US"/>
    </style:style>
    <style:style style:name="P411" style:parent-style-name="Normal" style:family="paragraph">
      <style:paragraph-properties fo:text-align="start"/>
      <style:text-properties fo:language="en" fo:country="US"/>
    </style:style>
    <style:style style:name="P412" style:parent-style-name="Normal" style:family="paragraph">
      <style:paragraph-properties fo:text-align="start"/>
      <style:text-properties fo:language="en" fo:country="US"/>
    </style:style>
    <style:style style:name="P413" style:parent-style-name="Normal" style:family="paragraph">
      <style:paragraph-properties fo:text-align="start"/>
    </style:style>
    <style:style style:name="T414" style:parent-style-name="DefaultParagraphFont" style:family="text">
      <style:text-properties fo:language="en" fo:country="US"/>
    </style:style>
    <style:style style:name="P415" style:parent-style-name="Normal" style:family="paragraph">
      <style:paragraph-properties fo:text-align="start"/>
    </style:style>
    <style:style style:name="P416" style:parent-style-name="Normal" style:family="paragraph">
      <style:paragraph-properties fo:text-align="start"/>
    </style:style>
    <style:style style:name="P417" style:parent-style-name="Normal" style:family="paragraph">
      <style:paragraph-properties fo:text-align="start"/>
    </style:style>
    <style:style style:name="P418" style:parent-style-name="Normal" style:family="paragraph">
      <style:paragraph-properties fo:text-align="start"/>
    </style:style>
    <style:style style:name="P419" style:parent-style-name="Normal" style:family="paragraph">
      <style:paragraph-properties fo:text-align="start"/>
    </style:style>
    <style:style style:name="P420" style:parent-style-name="Normal" style:family="paragraph">
      <style:paragraph-properties fo:text-align="start"/>
    </style:style>
    <style:style style:name="P421" style:parent-style-name="Normal" style:family="paragraph">
      <style:paragraph-properties fo:text-align="start"/>
    </style:style>
    <style:style style:name="P422" style:parent-style-name="Normal" style:family="paragraph">
      <style:paragraph-properties fo:text-align="start"/>
    </style:style>
    <style:style style:name="P423" style:parent-style-name="Normal" style:family="paragraph">
      <style:paragraph-properties fo:text-align="start"/>
    </style:style>
    <style:style style:name="P424" style:parent-style-name="Normal" style:family="paragraph">
      <style:paragraph-properties fo:text-align="start"/>
    </style:style>
    <style:style style:name="P425" style:parent-style-name="Normal" style:family="paragraph">
      <style:paragraph-properties fo:text-align="start"/>
    </style:style>
    <style:style style:name="P426" style:parent-style-name="Normal" style:family="paragraph">
      <style:paragraph-properties fo:text-align="start"/>
    </style:style>
    <style:style style:name="P427" style:parent-style-name="Normal" style:family="paragraph">
      <style:paragraph-properties fo:text-align="start"/>
    </style:style>
    <style:style style:name="P428" style:parent-style-name="Normal" style:family="paragraph">
      <style:paragraph-properties fo:text-align="start"/>
    </style:style>
    <style:style style:name="P429" style:parent-style-name="Normal" style:family="paragraph">
      <style:paragraph-properties fo:text-align="start"/>
    </style:style>
    <style:style style:name="P430" style:parent-style-name="Normal" style:family="paragraph">
      <style:paragraph-properties fo:text-align="start"/>
    </style:style>
    <style:style style:name="P431" style:parent-style-name="Normal" style:family="paragraph">
      <style:paragraph-properties fo:text-align="start"/>
    </style:style>
    <style:style style:name="P432" style:parent-style-name="Normal" style:family="paragraph">
      <style:paragraph-properties fo:text-align="start"/>
    </style:style>
    <style:style style:name="P433" style:parent-style-name="Normal" style:family="paragraph">
      <style:paragraph-properties fo:text-align="start"/>
    </style:style>
    <style:style style:name="P434" style:parent-style-name="Normal" style:family="paragraph">
      <style:paragraph-properties fo:text-align="start"/>
    </style:style>
    <style:style style:name="P435" style:parent-style-name="Normal" style:family="paragraph">
      <style:paragraph-properties fo:text-align="start"/>
    </style:style>
    <style:style style:name="P436" style:parent-style-name="Normal" style:family="paragraph">
      <style:paragraph-properties fo:text-align="start"/>
    </style:style>
    <style:style style:name="P437" style:parent-style-name="Normal" style:family="paragraph">
      <style:paragraph-properties fo:text-align="start"/>
    </style:style>
    <style:style style:name="P438" style:parent-style-name="Normal" style:family="paragraph">
      <style:paragraph-properties fo:text-align="start"/>
    </style:style>
    <style:style style:name="P439" style:parent-style-name="Normal" style:family="paragraph">
      <style:paragraph-properties fo:text-align="start"/>
    </style:style>
    <style:style style:name="P440" style:parent-style-name="Normal" style:family="paragraph">
      <style:paragraph-properties fo:text-align="start"/>
    </style:style>
    <style:style style:name="P441" style:parent-style-name="Normal" style:family="paragraph">
      <style:paragraph-properties fo:text-align="start"/>
    </style:style>
    <style:style style:name="P442" style:parent-style-name="Normal" style:family="paragraph">
      <style:paragraph-properties fo:text-align="start"/>
    </style:style>
    <style:style style:name="T443" style:parent-style-name="DefaultParagraphFont" style:family="text">
      <style:text-properties fo:language="en" fo:country="US"/>
    </style:style>
    <style:style style:name="P444" style:parent-style-name="Normal" style:family="paragraph">
      <style:paragraph-properties fo:text-align="start"/>
      <style:text-properties fo:language="en" fo:country="US"/>
    </style:style>
    <style:style style:name="P445" style:parent-style-name="Normal" style:family="paragraph">
      <style:paragraph-properties fo:text-align="start"/>
      <style:text-properties fo:language="en" fo:country="US"/>
    </style:style>
    <style:style style:name="P446" style:parent-style-name="Normal" style:family="paragraph">
      <style:paragraph-properties fo:text-align="start"/>
      <style:text-properties fo:language="en" fo:country="US"/>
    </style:style>
    <style:style style:name="P447" style:parent-style-name="Normal" style:family="paragraph">
      <style:paragraph-properties fo:text-align="start"/>
      <style:text-properties fo:language="en" fo:country="US"/>
    </style:style>
    <style:style style:name="P448" style:parent-style-name="Normal" style:family="paragraph">
      <style:paragraph-properties fo:text-align="start"/>
      <style:text-properties fo:language="en" fo:country="US"/>
    </style:style>
    <style:style style:name="P449" style:parent-style-name="Normal" style:family="paragraph">
      <style:paragraph-properties fo:text-align="start"/>
      <style:text-properties fo:language="en" fo:country="US"/>
    </style:style>
    <style:style style:name="P450" style:parent-style-name="Normal" style:family="paragraph">
      <style:paragraph-properties fo:text-align="start"/>
      <style:text-properties fo:language="en" fo:country="US"/>
    </style:style>
    <style:style style:name="P451" style:parent-style-name="Normal" style:family="paragraph">
      <style:paragraph-properties fo:text-align="start"/>
    </style:style>
    <style:style style:name="P452" style:parent-style-name="SBCparagraph" style:family="paragraph">
      <style:paragraph-properties fo:text-align="center" fo:text-indent="0in"/>
    </style:style>
    <style:style style:name="T453" style:parent-style-name="DefaultParagraphFont" style:family="text">
      <style:text-properties style:font-name="Calibri"/>
    </style:style>
    <style:style style:name="P454" style:parent-style-name="Normal" style:family="paragraph">
      <style:paragraph-properties fo:text-align="start"/>
    </style:style>
    <style:style style:name="P455" style:parent-style-name="Normal" style:family="paragraph">
      <style:paragraph-properties fo:text-align="start"/>
    </style:style>
    <style:style style:name="P456" style:parent-style-name="Normal" style:family="paragraph">
      <style:paragraph-properties fo:text-align="start"/>
    </style:style>
    <style:style style:name="P457" style:parent-style-name="Normal" style:family="paragraph">
      <style:paragraph-properties fo:text-align="start"/>
    </style:style>
    <style:style style:name="P458" style:parent-style-name="Normal" style:family="paragraph">
      <style:paragraph-properties fo:text-align="start"/>
    </style:style>
    <style:style style:name="P459" style:parent-style-name="Normal" style:family="paragraph">
      <style:paragraph-properties fo:text-align="start"/>
    </style:style>
    <style:style style:name="P460" style:parent-style-name="Normal" style:family="paragraph">
      <style:paragraph-properties fo:text-align="start"/>
    </style:style>
    <style:style style:name="P461" style:parent-style-name="Normal" style:family="paragraph">
      <style:paragraph-properties fo:text-align="start"/>
    </style:style>
    <style:style style:name="P462" style:parent-style-name="Normal" style:family="paragraph">
      <style:paragraph-properties fo:text-align="start"/>
    </style:style>
    <style:style style:name="P463" style:parent-style-name="Normal" style:family="paragraph">
      <style:paragraph-properties fo:text-align="start"/>
    </style:style>
    <style:style style:name="T464" style:parent-style-name="DefaultParagraphFont" style:family="text">
      <style:text-properties fo:language="en" fo:country="US"/>
    </style:style>
    <style:style style:name="P465" style:parent-style-name="Normal" style:family="paragraph">
      <style:paragraph-properties fo:text-align="start"/>
      <style:text-properties fo:language="en" fo:country="US"/>
    </style:style>
    <style:style style:name="P466" style:parent-style-name="Normal" style:family="paragraph">
      <style:paragraph-properties fo:text-align="start"/>
      <style:text-properties fo:language="en" fo:country="US"/>
    </style:style>
    <style:style style:name="P467" style:parent-style-name="Normal" style:family="paragraph">
      <style:paragraph-properties fo:text-align="start"/>
      <style:text-properties fo:language="en" fo:country="US"/>
    </style:style>
    <style:style style:name="P468" style:parent-style-name="Normal" style:family="paragraph">
      <style:paragraph-properties fo:text-align="start"/>
      <style:text-properties fo:language="en" fo:country="US"/>
    </style:style>
    <style:style style:name="P469" style:parent-style-name="Normal" style:family="paragraph">
      <style:paragraph-properties fo:text-align="start"/>
      <style:text-properties fo:language="en" fo:country="US"/>
    </style:style>
    <style:style style:name="P470" style:parent-style-name="Normal" style:family="paragraph">
      <style:paragraph-properties fo:text-align="start"/>
      <style:text-properties fo:language="en" fo:country="US"/>
    </style:style>
    <style:style style:name="P471" style:parent-style-name="Normal" style:family="paragraph">
      <style:paragraph-properties fo:text-align="start"/>
      <style:text-properties fo:language="en" fo:country="US"/>
    </style:style>
    <style:style style:name="P472" style:parent-style-name="Normal" style:family="paragraph">
      <style:paragraph-properties fo:text-align="start"/>
    </style:style>
    <style:style style:name="P473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P474" style:parent-style-name="SBCtitle1" style:list-style-name="LFO8" style:family="paragraph"/>
    <style:style style:name="T475" style:parent-style-name="DefaultParagraphFont" style:family="text">
      <style:text-properties style:font-name="Calibri"/>
    </style:style>
    <style:style style:name="P476" style:parent-style-name="SBCparagraph" style:family="paragraph">
      <style:paragraph-properties fo:text-indent="0.1972in"/>
    </style:style>
    <style:style style:name="T477" style:parent-style-name="DefaultParagraphFont" style:family="text"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T478" style:parent-style-name="DefaultParagraphFont" style:family="text"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T479" style:parent-style-name="DefaultParagraphFont" style:family="text">
      <style:text-properties style:font-name="Calibri" fo:font-style="italic" style:font-style-asian="italic" style:font-style-complex="italic"/>
    </style:style>
    <style:style style:name="P480" style:parent-style-name="SBCparagraph" style:family="paragraph">
      <style:paragraph-properties fo:text-indent="0.1972in"/>
    </style:style>
    <style:style style:name="T481" style:parent-style-name="DefaultParagraphFont" style:family="text"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P482" style:parent-style-name="SBCparagraph" style:family="paragraph">
      <style:text-properties style:font-name="Calibri"/>
    </style:style>
    <style:style style:name="P483" style:parent-style-name="SBCparagraph" style:family="paragraph">
      <style:paragraph-properties fo:text-align="center" fo:text-indent="0in"/>
    </style:style>
    <style:style style:name="T484" style:parent-style-name="DefaultParagraphFont" style:family="text">
      <style:text-properties style:font-name="Calibri"/>
    </style:style>
    <style:style style:name="P485" style:parent-style-name="Normal" style:family="paragraph">
      <style:paragraph-properties fo:text-align="start"/>
      <style:text-properties fo:language="en" fo:country="US"/>
    </style:style>
    <style:style style:name="P486" style:parent-style-name="Normal" style:family="paragraph">
      <style:paragraph-properties fo:text-align="start"/>
      <style:text-properties fo:language="en" fo:country="US"/>
    </style:style>
    <style:style style:name="P487" style:parent-style-name="Normal" style:family="paragraph">
      <style:paragraph-properties fo:text-align="start"/>
      <style:text-properties fo:language="en" fo:country="US"/>
    </style:style>
    <style:style style:name="P488" style:parent-style-name="Normal" style:family="paragraph">
      <style:paragraph-properties fo:text-align="start"/>
      <style:text-properties fo:language="en" fo:country="US"/>
    </style:style>
    <style:style style:name="P489" style:parent-style-name="Normal" style:family="paragraph">
      <style:paragraph-properties fo:text-align="start"/>
      <style:text-properties fo:language="en" fo:country="US"/>
    </style:style>
    <style:style style:name="P490" style:parent-style-name="Normal" style:family="paragraph">
      <style:paragraph-properties fo:text-align="start"/>
      <style:text-properties fo:language="en" fo:country="US"/>
    </style:style>
    <style:style style:name="P491" style:parent-style-name="Normal" style:family="paragraph">
      <style:paragraph-properties fo:text-align="start"/>
      <style:text-properties fo:language="en" fo:country="US"/>
    </style:style>
    <style:style style:name="P492" style:parent-style-name="Normal" style:family="paragraph">
      <style:paragraph-properties fo:text-align="start"/>
      <style:text-properties fo:language="en" fo:country="US"/>
    </style:style>
    <style:style style:name="P493" style:parent-style-name="Normal" style:family="paragraph">
      <style:paragraph-properties fo:text-align="start"/>
      <style:text-properties fo:language="en" fo:country="US"/>
    </style:style>
    <style:style style:name="P494" style:parent-style-name="Normal" style:family="paragraph">
      <style:paragraph-properties fo:text-align="start"/>
      <style:text-properties fo:language="en" fo:country="US"/>
    </style:style>
    <style:style style:name="P495" style:parent-style-name="Normal" style:family="paragraph">
      <style:paragraph-properties fo:text-align="start"/>
      <style:text-properties fo:language="en" fo:country="US"/>
    </style:style>
    <style:style style:name="P496" style:parent-style-name="Normal" style:family="paragraph">
      <style:paragraph-properties fo:text-align="start"/>
      <style:text-properties fo:language="en" fo:country="US"/>
    </style:style>
    <style:style style:name="P497" style:parent-style-name="Normal" style:family="paragraph">
      <style:paragraph-properties fo:text-align="start"/>
      <style:text-properties fo:language="en" fo:country="US"/>
    </style:style>
    <style:style style:name="P498" style:parent-style-name="Normal" style:family="paragraph">
      <style:paragraph-properties fo:text-align="start"/>
      <style:text-properties fo:language="en" fo:country="US"/>
    </style:style>
    <style:style style:name="P499" style:parent-style-name="Normal" style:family="paragraph">
      <style:paragraph-properties fo:text-align="start"/>
      <style:text-properties fo:language="en" fo:country="US"/>
    </style:style>
    <style:style style:name="P500" style:parent-style-name="Normal" style:family="paragraph">
      <style:paragraph-properties fo:text-align="start"/>
      <style:text-properties fo:language="en" fo:country="US"/>
    </style:style>
    <style:style style:name="P501" style:parent-style-name="Normal" style:family="paragraph">
      <style:paragraph-properties fo:text-align="start"/>
      <style:text-properties fo:language="en" fo:country="US"/>
    </style:style>
    <style:style style:name="P502" style:parent-style-name="Normal" style:family="paragraph">
      <style:paragraph-properties fo:text-align="start"/>
      <style:text-properties fo:language="en" fo:country="US"/>
    </style:style>
    <style:style style:name="P503" style:parent-style-name="Normal" style:family="paragraph">
      <style:paragraph-properties fo:text-align="start"/>
      <style:text-properties fo:language="en" fo:country="US"/>
    </style:style>
    <style:style style:name="P504" style:parent-style-name="Normal" style:family="paragraph">
      <style:paragraph-properties fo:text-align="start"/>
      <style:text-properties fo:language="en" fo:country="US"/>
    </style:style>
    <style:style style:name="P505" style:parent-style-name="Normal" style:family="paragraph">
      <style:paragraph-properties fo:text-align="start"/>
      <style:text-properties fo:language="en" fo:country="US"/>
    </style:style>
    <style:style style:name="P506" style:parent-style-name="Normal" style:family="paragraph">
      <style:paragraph-properties fo:text-align="start"/>
      <style:text-properties fo:language="en" fo:country="US"/>
    </style:style>
    <style:style style:name="P507" style:parent-style-name="Normal" style:family="paragraph">
      <style:paragraph-properties fo:text-align="start"/>
      <style:text-properties fo:language="en" fo:country="US"/>
    </style:style>
    <style:style style:name="P508" style:parent-style-name="Normal" style:family="paragraph">
      <style:paragraph-properties fo:text-align="start"/>
    </style:style>
    <style:style style:name="T509" style:parent-style-name="DefaultParagraphFont" style:family="text">
      <style:text-properties fo:language="en" fo:country="US"/>
    </style:style>
    <style:style style:name="P510" style:parent-style-name="Normal" style:family="paragraph">
      <style:paragraph-properties fo:text-align="start"/>
    </style:style>
    <style:style style:name="P511" style:parent-style-name="Normal" style:family="paragraph">
      <style:paragraph-properties fo:text-align="start"/>
    </style:style>
    <style:style style:name="P512" style:parent-style-name="Normal" style:family="paragraph">
      <style:paragraph-properties fo:text-align="start"/>
    </style:style>
    <style:style style:name="P513" style:parent-style-name="Normal" style:family="paragraph">
      <style:paragraph-properties fo:text-align="start"/>
    </style:style>
    <style:style style:name="P514" style:parent-style-name="Normal" style:family="paragraph">
      <style:paragraph-properties fo:text-align="start"/>
    </style:style>
    <style:style style:name="P515" style:parent-style-name="Normal" style:family="paragraph">
      <style:paragraph-properties fo:text-align="start"/>
    </style:style>
    <style:style style:name="T516" style:parent-style-name="DefaultParagraphFont" style:family="text">
      <style:text-properties fo:language="en" fo:country="US"/>
    </style:style>
    <style:style style:name="P517" style:parent-style-name="Normal" style:family="paragraph">
      <style:paragraph-properties fo:text-align="start"/>
      <style:text-properties fo:language="en" fo:country="US"/>
    </style:style>
    <style:style style:name="P518" style:parent-style-name="Normal" style:family="paragraph">
      <style:paragraph-properties fo:text-align="start"/>
      <style:text-properties fo:language="en" fo:country="US"/>
    </style:style>
    <style:style style:name="P519" style:parent-style-name="Normal" style:family="paragraph">
      <style:paragraph-properties fo:text-align="start"/>
      <style:text-properties fo:language="en" fo:country="US"/>
    </style:style>
    <style:style style:name="P520" style:parent-style-name="Normal" style:family="paragraph">
      <style:paragraph-properties fo:text-align="start"/>
      <style:text-properties fo:language="en" fo:country="US"/>
    </style:style>
    <style:style style:name="P521" style:parent-style-name="Normal" style:family="paragraph">
      <style:paragraph-properties fo:text-align="start"/>
    </style:style>
    <style:style style:name="T522" style:parent-style-name="DefaultParagraphFont" style:family="text">
      <style:text-properties fo:language="en" fo:country="US"/>
    </style:style>
    <style:style style:name="P523" style:parent-style-name="Normal" style:family="paragraph">
      <style:paragraph-properties fo:text-align="start"/>
    </style:style>
    <style:style style:name="T524" style:parent-style-name="DefaultParagraphFont" style:family="text">
      <style:text-properties fo:language="en" fo:country="US"/>
    </style:style>
    <style:style style:name="P525" style:parent-style-name="Normal" style:family="paragraph">
      <style:paragraph-properties fo:text-align="start"/>
    </style:style>
    <style:style style:name="T526" style:parent-style-name="DefaultParagraphFont" style:family="text">
      <style:text-properties fo:language="en" fo:country="US"/>
    </style:style>
    <style:style style:name="P527" style:parent-style-name="Normal" style:family="paragraph">
      <style:paragraph-properties fo:text-align="start"/>
    </style:style>
    <style:style style:name="T528" style:parent-style-name="DefaultParagraphFont" style:family="text">
      <style:text-properties fo:language="en" fo:country="US"/>
    </style:style>
    <style:style style:name="P529" style:parent-style-name="Normal" style:family="paragraph">
      <style:paragraph-properties fo:text-align="start"/>
      <style:text-properties fo:language="en" fo:country="US"/>
    </style:style>
    <style:style style:name="P530" style:parent-style-name="Normal" style:family="paragraph">
      <style:paragraph-properties fo:text-align="start"/>
      <style:text-properties fo:language="en" fo:country="US"/>
    </style:style>
    <style:style style:name="P531" style:parent-style-name="Normal" style:family="paragraph">
      <style:paragraph-properties fo:text-align="start"/>
      <style:text-properties fo:language="en" fo:country="US"/>
    </style:style>
    <style:style style:name="P532" style:parent-style-name="Normal" style:family="paragraph">
      <style:paragraph-properties fo:text-align="start"/>
      <style:text-properties fo:language="en" fo:country="US"/>
    </style:style>
    <style:style style:name="P533" style:parent-style-name="Normal" style:family="paragraph">
      <style:paragraph-properties fo:text-align="start"/>
      <style:text-properties fo:language="en" fo:country="US"/>
    </style:style>
    <style:style style:name="P534" style:parent-style-name="Normal" style:family="paragraph">
      <style:paragraph-properties fo:text-align="start"/>
      <style:text-properties fo:language="en" fo:country="US"/>
    </style:style>
    <style:style style:name="P535" style:parent-style-name="Normal" style:family="paragraph">
      <style:paragraph-properties fo:text-align="start"/>
      <style:text-properties fo:language="en" fo:country="US"/>
    </style:style>
    <style:style style:name="P536" style:parent-style-name="Normal" style:family="paragraph">
      <style:paragraph-properties fo:text-align="start"/>
      <style:text-properties fo:language="en" fo:country="US"/>
    </style:style>
    <style:style style:name="P537" style:parent-style-name="Normal" style:family="paragraph">
      <style:paragraph-properties fo:text-align="start"/>
      <style:text-properties fo:language="en" fo:country="US"/>
    </style:style>
    <style:style style:name="P538" style:parent-style-name="Normal" style:family="paragraph">
      <style:paragraph-properties fo:text-align="start"/>
    </style:style>
    <style:style style:name="T539" style:parent-style-name="DefaultParagraphFont" style:family="text">
      <style:text-properties fo:language="en" fo:country="US"/>
    </style:style>
    <style:style style:name="P540" style:parent-style-name="Normal" style:family="paragraph">
      <style:paragraph-properties fo:text-align="start"/>
    </style:style>
    <style:style style:name="P541" style:parent-style-name="Normal" style:family="paragraph">
      <style:paragraph-properties fo:text-align="start"/>
    </style:style>
    <style:style style:name="P542" style:parent-style-name="Normal" style:family="paragraph">
      <style:paragraph-properties fo:text-align="start"/>
    </style:style>
    <style:style style:name="P543" style:parent-style-name="Normal" style:family="paragraph">
      <style:paragraph-properties fo:text-align="start"/>
    </style:style>
    <style:style style:name="P544" style:parent-style-name="Normal" style:family="paragraph">
      <style:paragraph-properties fo:text-align="start"/>
    </style:style>
    <style:style style:name="T545" style:parent-style-name="DefaultParagraphFont" style:family="text">
      <style:text-properties fo:language="en" fo:country="US"/>
    </style:style>
    <style:style style:name="P546" style:parent-style-name="Normal" style:family="paragraph">
      <style:paragraph-properties fo:text-align="start"/>
    </style:style>
    <style:style style:name="T547" style:parent-style-name="DefaultParagraphFont" style:family="text">
      <style:text-properties fo:language="en" fo:country="US"/>
    </style:style>
    <style:style style:name="P548" style:parent-style-name="Normal" style:family="paragraph">
      <style:paragraph-properties fo:text-align="start"/>
    </style:style>
    <style:style style:name="P549" style:parent-style-name="Normal" style:family="paragraph">
      <style:paragraph-properties fo:text-align="start"/>
    </style:style>
    <style:style style:name="T550" style:parent-style-name="DefaultParagraphFont" style:family="text">
      <style:text-properties fo:language="en" fo:country="US"/>
    </style:style>
    <style:style style:name="P551" style:parent-style-name="Normal" style:family="paragraph">
      <style:paragraph-properties fo:text-align="start"/>
      <style:text-properties fo:language="en" fo:country="US"/>
    </style:style>
    <style:style style:name="P552" style:parent-style-name="Normal" style:family="paragraph">
      <style:paragraph-properties fo:text-align="start"/>
      <style:text-properties fo:language="en" fo:country="US"/>
    </style:style>
    <style:style style:name="P553" style:parent-style-name="Normal" style:family="paragraph">
      <style:paragraph-properties fo:text-align="start"/>
      <style:text-properties fo:language="en" fo:country="US"/>
    </style:style>
    <style:style style:name="P554" style:parent-style-name="Normal" style:family="paragraph">
      <style:paragraph-properties fo:text-align="start"/>
    </style:style>
    <style:style style:name="T555" style:parent-style-name="DefaultParagraphFont" style:family="text">
      <style:text-properties fo:language="en" fo:country="US"/>
    </style:style>
    <style:style style:name="P556" style:parent-style-name="SBCparagraph" style:family="paragraph">
      <style:paragraph-properties fo:text-align="center" fo:text-indent="0in"/>
    </style:style>
    <style:style style:name="T557" style:parent-style-name="DefaultParagraphFont" style:family="text">
      <style:text-properties style:font-name="Calibri"/>
    </style:style>
    <style:style style:name="P558" style:parent-style-name="Normal" style:family="paragraph">
      <style:paragraph-properties fo:text-align="start"/>
      <style:text-properties fo:language="en" fo:country="US"/>
    </style:style>
    <style:style style:name="P559" style:parent-style-name="Normal" style:family="paragraph">
      <style:paragraph-properties fo:text-align="start"/>
      <style:text-properties fo:language="en" fo:country="US"/>
    </style:style>
    <style:style style:name="P560" style:parent-style-name="Normal" style:family="paragraph">
      <style:paragraph-properties fo:text-align="start"/>
      <style:text-properties fo:language="en" fo:country="US"/>
    </style:style>
    <style:style style:name="P561" style:parent-style-name="Normal" style:family="paragraph">
      <style:paragraph-properties fo:text-align="start"/>
      <style:text-properties fo:language="en" fo:country="US"/>
    </style:style>
    <style:style style:name="P562" style:parent-style-name="Normal" style:family="paragraph">
      <style:paragraph-properties fo:text-align="start"/>
      <style:text-properties fo:language="en" fo:country="US"/>
    </style:style>
    <style:style style:name="P563" style:parent-style-name="Normal" style:family="paragraph">
      <style:paragraph-properties fo:text-align="start"/>
      <style:text-properties fo:language="en" fo:country="US"/>
    </style:style>
    <style:style style:name="P564" style:parent-style-name="Normal" style:family="paragraph">
      <style:paragraph-properties fo:text-align="start"/>
      <style:text-properties fo:language="en" fo:country="US"/>
    </style:style>
    <style:style style:name="P565" style:parent-style-name="Normal" style:family="paragraph">
      <style:paragraph-properties fo:text-align="start"/>
      <style:text-properties fo:language="en" fo:country="US"/>
    </style:style>
    <style:style style:name="P566" style:parent-style-name="Normal" style:family="paragraph">
      <style:paragraph-properties fo:text-align="start"/>
      <style:text-properties fo:language="en" fo:country="US"/>
    </style:style>
    <style:style style:name="P567" style:parent-style-name="Normal" style:family="paragraph">
      <style:paragraph-properties fo:text-align="start"/>
      <style:text-properties fo:language="en" fo:country="US"/>
    </style:style>
    <style:style style:name="P568" style:parent-style-name="Normal" style:family="paragraph">
      <style:paragraph-properties fo:text-align="start"/>
      <style:text-properties fo:language="en" fo:country="US"/>
    </style:style>
    <style:style style:name="P569" style:parent-style-name="Normal" style:family="paragraph">
      <style:paragraph-properties fo:text-align="start"/>
      <style:text-properties fo:language="en" fo:country="US"/>
    </style:style>
    <style:style style:name="P570" style:parent-style-name="Normal" style:family="paragraph">
      <style:paragraph-properties fo:text-align="start"/>
      <style:text-properties fo:language="en" fo:country="US"/>
    </style:style>
    <style:style style:name="P571" style:parent-style-name="Normal" style:family="paragraph">
      <style:paragraph-properties fo:text-align="start"/>
      <style:text-properties fo:language="en" fo:country="US"/>
    </style:style>
    <style:style style:name="P572" style:parent-style-name="Normal" style:family="paragraph">
      <style:paragraph-properties fo:text-align="start"/>
      <style:text-properties fo:language="en" fo:country="US"/>
    </style:style>
    <style:style style:name="P573" style:parent-style-name="Normal" style:family="paragraph">
      <style:paragraph-properties fo:text-align="start"/>
      <style:text-properties fo:language="en" fo:country="US"/>
    </style:style>
    <style:style style:name="P574" style:parent-style-name="Normal" style:family="paragraph">
      <style:paragraph-properties fo:text-align="start"/>
      <style:text-properties fo:language="en" fo:country="US"/>
    </style:style>
    <style:style style:name="P575" style:parent-style-name="Normal" style:family="paragraph">
      <style:paragraph-properties fo:text-align="start"/>
      <style:text-properties fo:language="en" fo:country="US"/>
    </style:style>
    <style:style style:name="P576" style:parent-style-name="Normal" style:family="paragraph">
      <style:paragraph-properties fo:text-align="start"/>
      <style:text-properties fo:language="en" fo:country="US"/>
    </style:style>
    <style:style style:name="P577" style:parent-style-name="Normal" style:family="paragraph">
      <style:paragraph-properties fo:text-align="start"/>
    </style:style>
    <style:style style:name="T578" style:parent-style-name="DefaultParagraphFont" style:family="text">
      <style:text-properties fo:language="en" fo:country="US"/>
    </style:style>
    <style:style style:name="P579" style:parent-style-name="Normal" style:family="paragraph">
      <style:paragraph-properties fo:text-align="start"/>
    </style:style>
    <style:style style:name="P580" style:parent-style-name="Normal" style:family="paragraph">
      <style:paragraph-properties fo:text-align="start"/>
    </style:style>
    <style:style style:name="P581" style:parent-style-name="Normal" style:family="paragraph">
      <style:paragraph-properties fo:text-align="start"/>
    </style:style>
    <style:style style:name="P582" style:parent-style-name="Normal" style:family="paragraph">
      <style:paragraph-properties fo:text-align="start"/>
    </style:style>
    <style:style style:name="P583" style:parent-style-name="Normal" style:family="paragraph">
      <style:paragraph-properties fo:text-align="start"/>
    </style:style>
    <style:style style:name="P584" style:parent-style-name="Normal" style:family="paragraph">
      <style:paragraph-properties fo:text-align="start"/>
    </style:style>
    <style:style style:name="T585" style:parent-style-name="DefaultParagraphFont" style:family="text">
      <style:text-properties fo:language="en" fo:country="US"/>
    </style:style>
    <style:style style:name="P586" style:parent-style-name="Normal" style:family="paragraph">
      <style:paragraph-properties fo:text-align="start"/>
      <style:text-properties fo:language="en" fo:country="US"/>
    </style:style>
    <style:style style:name="P587" style:parent-style-name="Normal" style:family="paragraph">
      <style:paragraph-properties fo:text-align="start"/>
      <style:text-properties fo:language="en" fo:country="US"/>
    </style:style>
    <style:style style:name="P588" style:parent-style-name="Normal" style:family="paragraph">
      <style:paragraph-properties fo:text-align="start"/>
      <style:text-properties fo:language="en" fo:country="US"/>
    </style:style>
    <style:style style:name="P589" style:parent-style-name="Normal" style:family="paragraph">
      <style:paragraph-properties fo:text-align="start"/>
      <style:text-properties fo:language="en" fo:country="US"/>
    </style:style>
    <style:style style:name="P590" style:parent-style-name="Normal" style:family="paragraph">
      <style:paragraph-properties fo:text-align="start"/>
    </style:style>
    <style:style style:name="T591" style:parent-style-name="DefaultParagraphFont" style:family="text">
      <style:text-properties fo:language="en" fo:country="US"/>
    </style:style>
    <style:style style:name="P592" style:parent-style-name="Normal" style:family="paragraph">
      <style:paragraph-properties fo:text-align="start"/>
    </style:style>
    <style:style style:name="T593" style:parent-style-name="DefaultParagraphFont" style:family="text">
      <style:text-properties fo:language="en" fo:country="US"/>
    </style:style>
    <style:style style:name="P594" style:parent-style-name="Normal" style:family="paragraph">
      <style:paragraph-properties fo:text-align="start"/>
    </style:style>
    <style:style style:name="T595" style:parent-style-name="DefaultParagraphFont" style:family="text">
      <style:text-properties fo:language="en" fo:country="US"/>
    </style:style>
    <style:style style:name="P596" style:parent-style-name="Normal" style:family="paragraph">
      <style:paragraph-properties fo:text-align="start"/>
    </style:style>
    <style:style style:name="T597" style:parent-style-name="DefaultParagraphFont" style:family="text">
      <style:text-properties fo:language="en" fo:country="US"/>
    </style:style>
    <style:style style:name="P598" style:parent-style-name="Normal" style:family="paragraph">
      <style:paragraph-properties fo:text-align="start"/>
      <style:text-properties fo:language="en" fo:country="US"/>
    </style:style>
    <style:style style:name="P599" style:parent-style-name="Normal" style:family="paragraph">
      <style:paragraph-properties fo:text-align="start"/>
      <style:text-properties fo:language="en" fo:country="US"/>
    </style:style>
    <style:style style:name="P600" style:parent-style-name="Normal" style:family="paragraph">
      <style:paragraph-properties fo:text-align="start"/>
      <style:text-properties fo:language="en" fo:country="US"/>
    </style:style>
    <style:style style:name="P601" style:parent-style-name="Normal" style:family="paragraph">
      <style:paragraph-properties fo:text-align="start"/>
      <style:text-properties fo:language="en" fo:country="US"/>
    </style:style>
    <style:style style:name="P602" style:parent-style-name="Normal" style:family="paragraph">
      <style:paragraph-properties fo:text-align="start"/>
      <style:text-properties fo:language="en" fo:country="US"/>
    </style:style>
    <style:style style:name="P603" style:parent-style-name="Normal" style:family="paragraph">
      <style:paragraph-properties fo:text-align="start"/>
      <style:text-properties fo:language="en" fo:country="US"/>
    </style:style>
    <style:style style:name="P604" style:parent-style-name="Normal" style:family="paragraph">
      <style:paragraph-properties fo:text-align="start"/>
      <style:text-properties fo:language="en" fo:country="US"/>
    </style:style>
    <style:style style:name="P605" style:parent-style-name="Normal" style:family="paragraph">
      <style:paragraph-properties fo:text-align="start"/>
      <style:text-properties fo:language="en" fo:country="US"/>
    </style:style>
    <style:style style:name="P606" style:parent-style-name="Normal" style:family="paragraph">
      <style:paragraph-properties fo:text-align="start"/>
      <style:text-properties fo:language="en" fo:country="US"/>
    </style:style>
    <style:style style:name="P607" style:parent-style-name="Normal" style:family="paragraph">
      <style:paragraph-properties fo:text-align="start"/>
    </style:style>
    <style:style style:name="T608" style:parent-style-name="DefaultParagraphFont" style:family="text">
      <style:text-properties fo:language="en" fo:country="US"/>
    </style:style>
    <style:style style:name="P609" style:parent-style-name="Normal" style:family="paragraph">
      <style:paragraph-properties fo:text-align="start"/>
    </style:style>
    <style:style style:name="P610" style:parent-style-name="Normal" style:family="paragraph">
      <style:paragraph-properties fo:text-align="start"/>
    </style:style>
    <style:style style:name="P611" style:parent-style-name="Normal" style:family="paragraph">
      <style:paragraph-properties fo:text-align="start"/>
    </style:style>
    <style:style style:name="P612" style:parent-style-name="Normal" style:family="paragraph">
      <style:paragraph-properties fo:text-align="start"/>
    </style:style>
    <style:style style:name="P613" style:parent-style-name="Normal" style:family="paragraph">
      <style:paragraph-properties fo:text-align="start"/>
    </style:style>
    <style:style style:name="T614" style:parent-style-name="DefaultParagraphFont" style:family="text">
      <style:text-properties fo:language="en" fo:country="US"/>
    </style:style>
    <style:style style:name="P615" style:parent-style-name="Normal" style:family="paragraph">
      <style:paragraph-properties fo:text-align="start"/>
    </style:style>
    <style:style style:name="T616" style:parent-style-name="DefaultParagraphFont" style:family="text">
      <style:text-properties fo:language="en" fo:country="US"/>
    </style:style>
    <style:style style:name="P617" style:parent-style-name="Normal" style:family="paragraph">
      <style:paragraph-properties fo:text-align="start"/>
    </style:style>
    <style:style style:name="P618" style:parent-style-name="Normal" style:family="paragraph">
      <style:paragraph-properties fo:text-align="start"/>
    </style:style>
    <style:style style:name="T619" style:parent-style-name="DefaultParagraphFont" style:family="text">
      <style:text-properties fo:language="en" fo:country="US"/>
    </style:style>
    <style:style style:name="P620" style:parent-style-name="Normal" style:family="paragraph">
      <style:paragraph-properties fo:text-align="start"/>
      <style:text-properties fo:language="en" fo:country="US"/>
    </style:style>
    <style:style style:name="P621" style:parent-style-name="Normal" style:family="paragraph">
      <style:paragraph-properties fo:text-align="start"/>
      <style:text-properties fo:language="en" fo:country="US"/>
    </style:style>
    <style:style style:name="P622" style:parent-style-name="Normal" style:family="paragraph">
      <style:paragraph-properties fo:text-align="start"/>
      <style:text-properties fo:language="en" fo:country="US"/>
    </style:style>
    <style:style style:name="P623" style:parent-style-name="Normal" style:family="paragraph">
      <style:paragraph-properties fo:text-align="start"/>
    </style:style>
    <style:style style:name="T624" style:parent-style-name="DefaultParagraphFont" style:family="text">
      <style:text-properties fo:language="en" fo:country="US"/>
    </style:style>
    <style:style style:name="P625" style:parent-style-name="SBCparagraph" style:family="paragraph">
      <style:paragraph-properties fo:text-align="center" fo:text-indent="0in"/>
    </style:style>
    <style:style style:name="T626" style:parent-style-name="DefaultParagraphFont" style:family="text">
      <style:text-properties style:font-name="Calibri"/>
    </style:style>
    <style:style style:name="P627" style:parent-style-name="Normal" style:family="paragraph">
      <style:paragraph-properties fo:text-align="start"/>
    </style:style>
    <style:style style:name="T628" style:parent-style-name="DefaultParagraphFont" style:family="text">
      <style:text-properties fo:language="en" fo:country="US"/>
    </style:style>
    <style:style style:name="P629" style:parent-style-name="Normal" style:family="paragraph">
      <style:paragraph-properties fo:text-align="start"/>
      <style:text-properties fo:language="en" fo:country="US"/>
    </style:style>
    <style:style style:name="P630" style:parent-style-name="Normal" style:family="paragraph">
      <style:paragraph-properties fo:text-align="start"/>
      <style:text-properties fo:language="en" fo:country="US"/>
    </style:style>
    <style:style style:name="P631" style:parent-style-name="Normal" style:family="paragraph">
      <style:paragraph-properties fo:text-align="start"/>
      <style:text-properties fo:language="en" fo:country="US"/>
    </style:style>
    <style:style style:name="P632" style:parent-style-name="Normal" style:family="paragraph">
      <style:paragraph-properties fo:text-align="start"/>
      <style:text-properties fo:language="en" fo:country="US"/>
    </style:style>
    <style:style style:name="P633" style:parent-style-name="Normal" style:family="paragraph">
      <style:paragraph-properties fo:text-align="start"/>
      <style:text-properties fo:language="en" fo:country="US"/>
    </style:style>
    <style:style style:name="P634" style:parent-style-name="Normal" style:family="paragraph">
      <style:paragraph-properties fo:text-align="start"/>
      <style:text-properties fo:language="en" fo:country="US"/>
    </style:style>
    <style:style style:name="P635" style:parent-style-name="Normal" style:family="paragraph">
      <style:paragraph-properties fo:text-align="start"/>
      <style:text-properties fo:language="en" fo:country="US"/>
    </style:style>
    <style:style style:name="P636" style:parent-style-name="Normal" style:family="paragraph">
      <style:paragraph-properties fo:text-align="start"/>
      <style:text-properties fo:language="en" fo:country="US"/>
    </style:style>
    <style:style style:name="P637" style:parent-style-name="Normal" style:family="paragraph">
      <style:paragraph-properties fo:text-align="start"/>
      <style:text-properties fo:language="en" fo:country="US"/>
    </style:style>
    <style:style style:name="P638" style:parent-style-name="Normal" style:family="paragraph">
      <style:paragraph-properties fo:text-align="start"/>
    </style:style>
    <style:style style:name="T639" style:parent-style-name="DefaultParagraphFont" style:family="text">
      <style:text-properties fo:language="en" fo:country="US"/>
    </style:style>
    <style:style style:name="P640" style:parent-style-name="Normal" style:family="paragraph">
      <style:paragraph-properties fo:text-align="start"/>
    </style:style>
    <style:style style:name="P641" style:parent-style-name="Normal" style:family="paragraph">
      <style:paragraph-properties fo:text-align="start"/>
    </style:style>
    <style:style style:name="P642" style:parent-style-name="Normal" style:family="paragraph">
      <style:paragraph-properties fo:text-align="start"/>
    </style:style>
    <style:style style:name="P643" style:parent-style-name="Normal" style:family="paragraph">
      <style:paragraph-properties fo:text-align="start"/>
    </style:style>
    <style:style style:name="P644" style:parent-style-name="Normal" style:family="paragraph">
      <style:paragraph-properties fo:text-align="start"/>
    </style:style>
    <style:style style:name="T645" style:parent-style-name="DefaultParagraphFont" style:family="text">
      <style:text-properties fo:language="en" fo:country="US"/>
    </style:style>
    <style:style style:name="P646" style:parent-style-name="Normal" style:family="paragraph">
      <style:paragraph-properties fo:text-align="start"/>
    </style:style>
    <style:style style:name="T647" style:parent-style-name="DefaultParagraphFont" style:family="text">
      <style:text-properties fo:language="en" fo:country="US"/>
    </style:style>
    <style:style style:name="P648" style:parent-style-name="Normal" style:family="paragraph">
      <style:paragraph-properties fo:text-align="start"/>
    </style:style>
    <style:style style:name="P649" style:parent-style-name="Normal" style:family="paragraph">
      <style:paragraph-properties fo:text-align="start"/>
    </style:style>
    <style:style style:name="T650" style:parent-style-name="DefaultParagraphFont" style:family="text">
      <style:text-properties fo:language="en" fo:country="US"/>
    </style:style>
    <style:style style:name="P651" style:parent-style-name="Normal" style:family="paragraph">
      <style:paragraph-properties fo:text-align="start"/>
      <style:text-properties fo:language="en" fo:country="US"/>
    </style:style>
    <style:style style:name="P652" style:parent-style-name="Normal" style:family="paragraph">
      <style:paragraph-properties fo:text-align="start"/>
      <style:text-properties fo:language="en" fo:country="US"/>
    </style:style>
    <style:style style:name="P653" style:parent-style-name="Normal" style:family="paragraph">
      <style:paragraph-properties fo:text-align="start"/>
      <style:text-properties fo:language="en" fo:country="US"/>
    </style:style>
    <style:style style:name="P654" style:parent-style-name="Normal" style:family="paragraph">
      <style:paragraph-properties fo:text-align="start"/>
    </style:style>
    <style:style style:name="T655" style:parent-style-name="DefaultParagraphFont" style:family="text">
      <style:text-properties fo:language="en" fo:country="US"/>
    </style:style>
    <style:style style:name="P656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P657" style:parent-style-name="SBCparagraph" style:family="paragraph">
      <style:paragraph-properties fo:text-align="center" fo:text-indent="0in"/>
    </style:style>
    <style:style style:name="T658" style:parent-style-name="DefaultParagraphFont" style:family="text">
      <style:text-properties style:font-name="Calibri"/>
    </style:style>
    <style:style style:name="P659" style:parent-style-name="Normal" style:family="paragraph">
      <style:paragraph-properties fo:text-align="start"/>
      <style:text-properties fo:language="en" fo:country="US"/>
    </style:style>
    <style:style style:name="P660" style:parent-style-name="Normal" style:family="paragraph">
      <style:paragraph-properties fo:text-align="start"/>
      <style:text-properties fo:language="en" fo:country="US"/>
    </style:style>
    <style:style style:name="P661" style:parent-style-name="Normal" style:family="paragraph">
      <style:paragraph-properties fo:text-align="start"/>
      <style:text-properties fo:language="en" fo:country="US"/>
    </style:style>
    <style:style style:name="P662" style:parent-style-name="Normal" style:family="paragraph">
      <style:paragraph-properties fo:text-align="start"/>
      <style:text-properties fo:language="en" fo:country="US"/>
    </style:style>
    <style:style style:name="P663" style:parent-style-name="Normal" style:family="paragraph">
      <style:paragraph-properties fo:text-align="start"/>
      <style:text-properties fo:language="en" fo:country="US"/>
    </style:style>
    <style:style style:name="P664" style:parent-style-name="Normal" style:family="paragraph">
      <style:paragraph-properties fo:text-align="start"/>
      <style:text-properties fo:language="en" fo:country="US"/>
    </style:style>
    <style:style style:name="P665" style:parent-style-name="Normal" style:family="paragraph">
      <style:paragraph-properties fo:text-align="start"/>
      <style:text-properties fo:language="en" fo:country="US"/>
    </style:style>
    <style:style style:name="P666" style:parent-style-name="Normal" style:family="paragraph">
      <style:paragraph-properties fo:text-align="start"/>
      <style:text-properties fo:language="en" fo:country="US"/>
    </style:style>
    <style:style style:name="P667" style:parent-style-name="Normal" style:family="paragraph">
      <style:paragraph-properties fo:text-align="start"/>
      <style:text-properties fo:language="en" fo:country="US"/>
    </style:style>
    <style:style style:name="P668" style:parent-style-name="Normal" style:family="paragraph">
      <style:paragraph-properties fo:text-align="start"/>
      <style:text-properties fo:language="en" fo:country="US"/>
    </style:style>
    <style:style style:name="P669" style:parent-style-name="Normal" style:family="paragraph">
      <style:paragraph-properties fo:text-align="start"/>
      <style:text-properties fo:language="en" fo:country="US"/>
    </style:style>
    <style:style style:name="P670" style:parent-style-name="Normal" style:family="paragraph">
      <style:paragraph-properties fo:text-align="start"/>
      <style:text-properties fo:language="en" fo:country="US"/>
    </style:style>
    <style:style style:name="P671" style:parent-style-name="Normal" style:family="paragraph">
      <style:paragraph-properties fo:text-align="start"/>
      <style:text-properties fo:language="en" fo:country="US"/>
    </style:style>
    <style:style style:name="P672" style:parent-style-name="Normal" style:family="paragraph">
      <style:paragraph-properties fo:text-align="start"/>
      <style:text-properties fo:language="en" fo:country="US"/>
    </style:style>
    <style:style style:name="P673" style:parent-style-name="Normal" style:family="paragraph">
      <style:paragraph-properties fo:text-align="start"/>
      <style:text-properties fo:language="en" fo:country="US"/>
    </style:style>
    <style:style style:name="P674" style:parent-style-name="Normal" style:family="paragraph">
      <style:paragraph-properties fo:text-align="start"/>
      <style:text-properties fo:language="en" fo:country="US"/>
    </style:style>
    <style:style style:name="P675" style:parent-style-name="Normal" style:family="paragraph">
      <style:paragraph-properties fo:text-align="start"/>
      <style:text-properties fo:language="en" fo:country="US"/>
    </style:style>
    <style:style style:name="P676" style:parent-style-name="Normal" style:family="paragraph">
      <style:paragraph-properties fo:text-align="start"/>
      <style:text-properties fo:language="en" fo:country="US"/>
    </style:style>
    <style:style style:name="P677" style:parent-style-name="Normal" style:family="paragraph">
      <style:paragraph-properties fo:text-align="start"/>
      <style:text-properties fo:language="en" fo:country="US"/>
    </style:style>
    <style:style style:name="P678" style:parent-style-name="Normal" style:family="paragraph">
      <style:paragraph-properties fo:text-align="start"/>
      <style:text-properties fo:language="en" fo:country="US"/>
    </style:style>
    <style:style style:name="P679" style:parent-style-name="Normal" style:family="paragraph">
      <style:paragraph-properties fo:text-align="start"/>
      <style:text-properties fo:language="en" fo:country="US"/>
    </style:style>
    <style:style style:name="P680" style:parent-style-name="Normal" style:family="paragraph">
      <style:paragraph-properties fo:text-align="start"/>
      <style:text-properties fo:language="en" fo:country="US"/>
    </style:style>
    <style:style style:name="P681" style:parent-style-name="Normal" style:family="paragraph">
      <style:paragraph-properties fo:text-align="start"/>
      <style:text-properties fo:language="en" fo:country="US"/>
    </style:style>
    <style:style style:name="P682" style:parent-style-name="Normal" style:family="paragraph">
      <style:paragraph-properties fo:text-align="start"/>
      <style:text-properties fo:language="en" fo:country="US"/>
    </style:style>
    <style:style style:name="P683" style:parent-style-name="Normal" style:family="paragraph">
      <style:paragraph-properties fo:text-align="start"/>
      <style:text-properties fo:language="en" fo:country="US"/>
    </style:style>
    <style:style style:name="P684" style:parent-style-name="Normal" style:family="paragraph">
      <style:paragraph-properties fo:text-align="start"/>
    </style:style>
    <style:style style:name="T685" style:parent-style-name="DefaultParagraphFont" style:family="text">
      <style:text-properties fo:language="en" fo:country="US"/>
    </style:style>
    <style:style style:name="P686" style:parent-style-name="Normal" style:family="paragraph">
      <style:paragraph-properties fo:text-align="start"/>
    </style:style>
    <style:style style:name="P687" style:parent-style-name="Normal" style:family="paragraph">
      <style:paragraph-properties fo:text-align="start"/>
    </style:style>
    <style:style style:name="P688" style:parent-style-name="Normal" style:family="paragraph">
      <style:paragraph-properties fo:text-align="start"/>
    </style:style>
    <style:style style:name="P689" style:parent-style-name="Normal" style:family="paragraph">
      <style:paragraph-properties fo:text-align="start"/>
    </style:style>
    <style:style style:name="P690" style:parent-style-name="Normal" style:family="paragraph">
      <style:paragraph-properties fo:text-align="start"/>
    </style:style>
    <style:style style:name="P691" style:parent-style-name="Normal" style:family="paragraph">
      <style:paragraph-properties fo:text-align="start"/>
    </style:style>
    <style:style style:name="T692" style:parent-style-name="DefaultParagraphFont" style:family="text">
      <style:text-properties fo:language="en" fo:country="US"/>
    </style:style>
    <style:style style:name="P693" style:parent-style-name="Normal" style:family="paragraph">
      <style:paragraph-properties fo:text-align="start"/>
      <style:text-properties fo:language="en" fo:country="US"/>
    </style:style>
    <style:style style:name="P694" style:parent-style-name="Normal" style:family="paragraph">
      <style:paragraph-properties fo:text-align="start"/>
    </style:style>
    <style:style style:name="T695" style:parent-style-name="DefaultParagraphFont" style:family="text">
      <style:text-properties fo:language="en" fo:country="US"/>
    </style:style>
    <style:style style:name="P696" style:parent-style-name="Normal" style:family="paragraph">
      <style:paragraph-properties fo:text-align="start"/>
    </style:style>
    <style:style style:name="T697" style:parent-style-name="DefaultParagraphFont" style:family="text">
      <style:text-properties fo:language="en" fo:country="US"/>
    </style:style>
    <style:style style:name="P698" style:parent-style-name="Normal" style:family="paragraph">
      <style:paragraph-properties fo:text-align="start"/>
      <style:text-properties fo:language="en" fo:country="US"/>
    </style:style>
    <style:style style:name="P699" style:parent-style-name="Normal" style:family="paragraph">
      <style:paragraph-properties fo:text-align="start"/>
      <style:text-properties fo:language="en" fo:country="US"/>
    </style:style>
    <style:style style:name="P700" style:parent-style-name="Normal" style:family="paragraph">
      <style:paragraph-properties fo:text-align="start"/>
      <style:text-properties fo:language="en" fo:country="US"/>
    </style:style>
    <style:style style:name="P701" style:parent-style-name="Normal" style:family="paragraph">
      <style:paragraph-properties fo:text-align="start"/>
      <style:text-properties fo:language="en" fo:country="US"/>
    </style:style>
    <style:style style:name="P702" style:parent-style-name="Normal" style:family="paragraph">
      <style:paragraph-properties fo:text-align="start"/>
      <style:text-properties fo:language="en" fo:country="US"/>
    </style:style>
    <style:style style:name="P703" style:parent-style-name="Normal" style:family="paragraph">
      <style:paragraph-properties fo:text-align="start"/>
      <style:text-properties fo:language="en" fo:country="US"/>
    </style:style>
    <style:style style:name="P704" style:parent-style-name="Normal" style:family="paragraph">
      <style:paragraph-properties fo:text-align="start"/>
      <style:text-properties fo:language="en" fo:country="US"/>
    </style:style>
    <style:style style:name="P705" style:parent-style-name="Normal" style:family="paragraph">
      <style:paragraph-properties fo:text-align="start"/>
      <style:text-properties fo:language="en" fo:country="US"/>
    </style:style>
    <style:style style:name="P706" style:parent-style-name="Normal" style:family="paragraph">
      <style:paragraph-properties fo:text-align="start"/>
    </style:style>
    <style:style style:name="T707" style:parent-style-name="DefaultParagraphFont" style:family="text">
      <style:text-properties fo:language="en" fo:country="US"/>
    </style:style>
    <style:style style:name="P708" style:parent-style-name="Normal" style:family="paragraph">
      <style:paragraph-properties fo:text-align="start"/>
    </style:style>
    <style:style style:name="P709" style:parent-style-name="Normal" style:family="paragraph">
      <style:paragraph-properties fo:text-align="start"/>
    </style:style>
    <style:style style:name="P710" style:parent-style-name="Normal" style:family="paragraph">
      <style:paragraph-properties fo:text-align="start"/>
    </style:style>
    <style:style style:name="P711" style:parent-style-name="Normal" style:family="paragraph">
      <style:paragraph-properties fo:text-align="start"/>
    </style:style>
    <style:style style:name="P712" style:parent-style-name="Normal" style:family="paragraph">
      <style:paragraph-properties fo:text-align="start"/>
    </style:style>
    <style:style style:name="P713" style:parent-style-name="Normal" style:family="paragraph">
      <style:paragraph-properties fo:text-align="start"/>
    </style:style>
    <style:style style:name="P714" style:parent-style-name="Normal" style:family="paragraph">
      <style:paragraph-properties fo:text-align="start"/>
    </style:style>
    <style:style style:name="P715" style:parent-style-name="Normal" style:family="paragraph">
      <style:paragraph-properties fo:text-align="start"/>
    </style:style>
    <style:style style:name="P716" style:parent-style-name="Normal" style:family="paragraph">
      <style:paragraph-properties fo:text-align="start"/>
    </style:style>
    <style:style style:name="T717" style:parent-style-name="DefaultParagraphFont" style:family="text">
      <style:text-properties fo:language="en" fo:country="US"/>
    </style:style>
    <style:style style:name="P718" style:parent-style-name="Normal" style:family="paragraph">
      <style:paragraph-properties fo:text-align="start"/>
      <style:text-properties fo:language="en" fo:country="US"/>
    </style:style>
    <style:style style:name="P719" style:parent-style-name="Normal" style:family="paragraph">
      <style:paragraph-properties fo:text-align="start"/>
      <style:text-properties fo:language="en" fo:country="US"/>
    </style:style>
    <style:style style:name="P720" style:parent-style-name="Normal" style:family="paragraph">
      <style:paragraph-properties fo:text-align="start"/>
      <style:text-properties fo:language="en" fo:country="US"/>
    </style:style>
    <style:style style:name="P721" style:parent-style-name="Normal" style:family="paragraph">
      <style:paragraph-properties fo:text-align="start"/>
      <style:text-properties fo:language="en" fo:country="US"/>
    </style:style>
    <style:style style:name="P722" style:parent-style-name="Normal" style:family="paragraph">
      <style:paragraph-properties fo:text-align="start"/>
    </style:style>
    <style:style style:name="T723" style:parent-style-name="DefaultParagraphFont" style:family="text">
      <style:text-properties fo:language="en" fo:country="US"/>
    </style:style>
    <style:style style:name="T724" style:parent-style-name="DefaultParagraphFont" style:family="text">
      <style:text-properties style:font-name="Calibri"/>
    </style:style>
    <style:style style:name="P725" style:parent-style-name="Normal" style:family="paragraph">
      <style:paragraph-properties fo:text-align="start"/>
      <style:text-properties fo:language="en" fo:country="US"/>
    </style:style>
    <style:style style:name="P726" style:parent-style-name="Normal" style:family="paragraph">
      <style:paragraph-properties fo:text-align="start"/>
      <style:text-properties fo:language="en" fo:country="US"/>
    </style:style>
    <style:style style:name="P727" style:parent-style-name="Normal" style:family="paragraph">
      <style:paragraph-properties fo:text-align="start"/>
      <style:text-properties fo:language="en" fo:country="US"/>
    </style:style>
    <style:style style:name="P728" style:parent-style-name="Normal" style:family="paragraph">
      <style:paragraph-properties fo:text-align="start"/>
      <style:text-properties fo:language="en" fo:country="US"/>
    </style:style>
    <style:style style:name="P729" style:parent-style-name="Normal" style:family="paragraph">
      <style:paragraph-properties fo:text-align="start"/>
      <style:text-properties fo:language="en" fo:country="US"/>
    </style:style>
    <style:style style:name="P730" style:parent-style-name="Normal" style:family="paragraph">
      <style:paragraph-properties fo:text-align="start"/>
      <style:text-properties fo:language="en" fo:country="US"/>
    </style:style>
    <style:style style:name="P731" style:parent-style-name="Normal" style:family="paragraph">
      <style:paragraph-properties fo:text-align="start"/>
      <style:text-properties fo:language="en" fo:country="US"/>
    </style:style>
    <style:style style:name="P732" style:parent-style-name="Normal" style:family="paragraph">
      <style:paragraph-properties fo:text-align="start"/>
      <style:text-properties fo:language="en" fo:country="US"/>
    </style:style>
    <style:style style:name="P733" style:parent-style-name="Normal" style:family="paragraph">
      <style:paragraph-properties fo:text-align="start"/>
      <style:text-properties fo:language="en" fo:country="US"/>
    </style:style>
    <style:style style:name="P734" style:parent-style-name="Normal" style:family="paragraph">
      <style:paragraph-properties fo:text-align="start"/>
      <style:text-properties fo:language="en" fo:country="US"/>
    </style:style>
    <style:style style:name="P735" style:parent-style-name="Normal" style:family="paragraph">
      <style:paragraph-properties fo:text-align="start"/>
      <style:text-properties fo:language="en" fo:country="US"/>
    </style:style>
    <style:style style:name="P736" style:parent-style-name="Normal" style:family="paragraph">
      <style:paragraph-properties fo:text-align="start"/>
      <style:text-properties fo:language="en" fo:country="US"/>
    </style:style>
    <style:style style:name="P737" style:parent-style-name="Normal" style:family="paragraph">
      <style:paragraph-properties fo:text-align="start"/>
      <style:text-properties fo:language="en" fo:country="US"/>
    </style:style>
    <style:style style:name="P738" style:parent-style-name="Normal" style:family="paragraph">
      <style:paragraph-properties fo:text-align="start"/>
      <style:text-properties fo:language="en" fo:country="US"/>
    </style:style>
    <style:style style:name="P739" style:parent-style-name="Normal" style:family="paragraph">
      <style:paragraph-properties fo:text-align="start"/>
      <style:text-properties fo:language="en" fo:country="US"/>
    </style:style>
    <style:style style:name="P740" style:parent-style-name="Normal" style:family="paragraph">
      <style:paragraph-properties fo:text-align="start"/>
      <style:text-properties fo:language="en" fo:country="US"/>
    </style:style>
    <style:style style:name="P741" style:parent-style-name="Normal" style:family="paragraph">
      <style:paragraph-properties fo:text-align="start"/>
      <style:text-properties fo:language="en" fo:country="US"/>
    </style:style>
    <style:style style:name="P742" style:parent-style-name="Normal" style:family="paragraph">
      <style:paragraph-properties fo:text-align="start"/>
      <style:text-properties fo:language="en" fo:country="US"/>
    </style:style>
    <style:style style:name="P743" style:parent-style-name="Normal" style:family="paragraph">
      <style:paragraph-properties fo:text-align="start"/>
    </style:style>
    <style:style style:name="T744" style:parent-style-name="DefaultParagraphFont" style:family="text">
      <style:text-properties fo:language="en" fo:country="US"/>
    </style:style>
    <style:style style:name="P745" style:parent-style-name="Normal" style:family="paragraph">
      <style:paragraph-properties fo:text-align="start"/>
    </style:style>
    <style:style style:name="P746" style:parent-style-name="Normal" style:family="paragraph">
      <style:paragraph-properties fo:text-align="start"/>
    </style:style>
    <style:style style:name="P747" style:parent-style-name="Normal" style:family="paragraph">
      <style:paragraph-properties fo:text-align="start"/>
    </style:style>
    <style:style style:name="P748" style:parent-style-name="Normal" style:family="paragraph">
      <style:paragraph-properties fo:text-align="start"/>
    </style:style>
    <style:style style:name="P749" style:parent-style-name="Normal" style:family="paragraph">
      <style:paragraph-properties fo:text-align="start"/>
    </style:style>
    <style:style style:name="P750" style:parent-style-name="Normal" style:family="paragraph">
      <style:paragraph-properties fo:text-align="start"/>
    </style:style>
    <style:style style:name="T751" style:parent-style-name="DefaultParagraphFont" style:family="text">
      <style:text-properties fo:language="en" fo:country="US"/>
    </style:style>
    <style:style style:name="P752" style:parent-style-name="Normal" style:family="paragraph">
      <style:paragraph-properties fo:text-align="start"/>
      <style:text-properties fo:language="en" fo:country="US"/>
    </style:style>
    <style:style style:name="P753" style:parent-style-name="Normal" style:family="paragraph">
      <style:paragraph-properties fo:text-align="start"/>
    </style:style>
    <style:style style:name="T754" style:parent-style-name="DefaultParagraphFont" style:family="text">
      <style:text-properties fo:language="en" fo:country="US"/>
    </style:style>
    <style:style style:name="P755" style:parent-style-name="Normal" style:family="paragraph">
      <style:paragraph-properties fo:text-align="start"/>
    </style:style>
    <style:style style:name="T756" style:parent-style-name="DefaultParagraphFont" style:family="text">
      <style:text-properties fo:language="en" fo:country="US"/>
    </style:style>
    <style:style style:name="P757" style:parent-style-name="Normal" style:family="paragraph">
      <style:paragraph-properties fo:text-align="start"/>
      <style:text-properties fo:language="en" fo:country="US"/>
    </style:style>
    <style:style style:name="P758" style:parent-style-name="Normal" style:family="paragraph">
      <style:paragraph-properties fo:text-align="start"/>
      <style:text-properties fo:language="en" fo:country="US"/>
    </style:style>
    <style:style style:name="P759" style:parent-style-name="Normal" style:family="paragraph">
      <style:paragraph-properties fo:text-align="start"/>
      <style:text-properties fo:language="en" fo:country="US"/>
    </style:style>
    <style:style style:name="P760" style:parent-style-name="Normal" style:family="paragraph">
      <style:paragraph-properties fo:text-align="start"/>
      <style:text-properties fo:language="en" fo:country="US"/>
    </style:style>
    <style:style style:name="P761" style:parent-style-name="Normal" style:family="paragraph">
      <style:paragraph-properties fo:text-align="start"/>
      <style:text-properties fo:language="en" fo:country="US"/>
    </style:style>
    <style:style style:name="P762" style:parent-style-name="Normal" style:family="paragraph">
      <style:paragraph-properties fo:text-align="start"/>
      <style:text-properties fo:language="en" fo:country="US"/>
    </style:style>
    <style:style style:name="P763" style:parent-style-name="Normal" style:family="paragraph">
      <style:paragraph-properties fo:text-align="start"/>
      <style:text-properties fo:language="en" fo:country="US"/>
    </style:style>
    <style:style style:name="P764" style:parent-style-name="Normal" style:family="paragraph">
      <style:paragraph-properties fo:text-align="start"/>
      <style:text-properties fo:language="en" fo:country="US"/>
    </style:style>
    <style:style style:name="P765" style:parent-style-name="Normal" style:family="paragraph">
      <style:paragraph-properties fo:text-align="start"/>
    </style:style>
    <style:style style:name="T766" style:parent-style-name="DefaultParagraphFont" style:family="text">
      <style:text-properties fo:language="en" fo:country="US"/>
    </style:style>
    <style:style style:name="P767" style:parent-style-name="Normal" style:family="paragraph">
      <style:paragraph-properties fo:text-align="start"/>
    </style:style>
    <style:style style:name="P768" style:parent-style-name="Normal" style:family="paragraph">
      <style:paragraph-properties fo:text-align="start"/>
    </style:style>
    <style:style style:name="P769" style:parent-style-name="Normal" style:family="paragraph">
      <style:paragraph-properties fo:text-align="start"/>
    </style:style>
    <style:style style:name="P770" style:parent-style-name="Normal" style:family="paragraph">
      <style:paragraph-properties fo:text-align="start"/>
    </style:style>
    <style:style style:name="P771" style:parent-style-name="Normal" style:family="paragraph">
      <style:paragraph-properties fo:text-align="start"/>
    </style:style>
    <style:style style:name="P772" style:parent-style-name="Normal" style:family="paragraph">
      <style:paragraph-properties fo:text-align="start"/>
    </style:style>
    <style:style style:name="P773" style:parent-style-name="Normal" style:family="paragraph">
      <style:paragraph-properties fo:text-align="start"/>
    </style:style>
    <style:style style:name="P774" style:parent-style-name="Normal" style:family="paragraph">
      <style:paragraph-properties fo:text-align="start"/>
    </style:style>
    <style:style style:name="P775" style:parent-style-name="Normal" style:family="paragraph">
      <style:paragraph-properties fo:text-align="start"/>
    </style:style>
    <style:style style:name="T776" style:parent-style-name="DefaultParagraphFont" style:family="text">
      <style:text-properties fo:language="en" fo:country="US"/>
    </style:style>
    <style:style style:name="P777" style:parent-style-name="Normal" style:family="paragraph">
      <style:paragraph-properties fo:text-align="start"/>
      <style:text-properties fo:language="en" fo:country="US"/>
    </style:style>
    <style:style style:name="P778" style:parent-style-name="Normal" style:family="paragraph">
      <style:paragraph-properties fo:text-align="start"/>
      <style:text-properties fo:language="en" fo:country="US"/>
    </style:style>
    <style:style style:name="P779" style:parent-style-name="Normal" style:family="paragraph">
      <style:paragraph-properties fo:text-align="start"/>
      <style:text-properties fo:language="en" fo:country="US"/>
    </style:style>
    <style:style style:name="P780" style:parent-style-name="Normal" style:family="paragraph">
      <style:paragraph-properties fo:text-align="start"/>
      <style:text-properties fo:language="en" fo:country="US"/>
    </style:style>
    <style:style style:name="P781" style:parent-style-name="Normal" style:family="paragraph">
      <style:paragraph-properties fo:text-align="start"/>
    </style:style>
    <style:style style:name="T782" style:parent-style-name="DefaultParagraphFont" style:family="text">
      <style:text-properties fo:language="en" fo:country="US"/>
    </style:style>
    <style:style style:name="T783" style:parent-style-name="DefaultParagraphFont" style:family="text">
      <style:text-properties style:font-name="Calibri"/>
    </style:style>
    <style:style style:name="P784" style:parent-style-name="Normal" style:family="paragraph">
      <style:paragraph-properties fo:text-align="start"/>
      <style:text-properties fo:language="en" fo:country="US"/>
    </style:style>
    <style:style style:name="P785" style:parent-style-name="Normal" style:family="paragraph">
      <style:paragraph-properties fo:text-align="start"/>
      <style:text-properties fo:language="en" fo:country="US"/>
    </style:style>
    <style:style style:name="P786" style:parent-style-name="Normal" style:family="paragraph">
      <style:paragraph-properties fo:text-align="start"/>
      <style:text-properties fo:language="en" fo:country="US"/>
    </style:style>
    <style:style style:name="P787" style:parent-style-name="Normal" style:family="paragraph">
      <style:paragraph-properties fo:text-align="start"/>
      <style:text-properties fo:language="en" fo:country="US"/>
    </style:style>
    <style:style style:name="P788" style:parent-style-name="Normal" style:family="paragraph">
      <style:paragraph-properties fo:text-align="start"/>
    </style:style>
    <style:style style:name="T789" style:parent-style-name="DefaultParagraphFont" style:family="text">
      <style:text-properties fo:language="en" fo:country="US"/>
    </style:style>
    <style:style style:name="P790" style:parent-style-name="Normal" style:family="paragraph">
      <style:paragraph-properties fo:text-align="start"/>
    </style:style>
    <style:style style:name="P791" style:parent-style-name="Normal" style:family="paragraph">
      <style:paragraph-properties fo:text-align="start"/>
    </style:style>
    <style:style style:name="P792" style:parent-style-name="Normal" style:family="paragraph">
      <style:paragraph-properties fo:text-align="start"/>
    </style:style>
    <style:style style:name="P793" style:parent-style-name="Normal" style:family="paragraph">
      <style:paragraph-properties fo:text-align="start"/>
    </style:style>
    <style:style style:name="P794" style:parent-style-name="Normal" style:family="paragraph">
      <style:paragraph-properties fo:text-align="start"/>
    </style:style>
    <style:style style:name="P795" style:parent-style-name="Normal" style:family="paragraph">
      <style:paragraph-properties fo:text-align="start"/>
    </style:style>
    <style:style style:name="P796" style:parent-style-name="Normal" style:family="paragraph">
      <style:paragraph-properties fo:text-align="start"/>
    </style:style>
    <style:style style:name="P797" style:parent-style-name="Normal" style:family="paragraph">
      <style:paragraph-properties fo:text-align="start"/>
    </style:style>
    <style:style style:name="P798" style:parent-style-name="Normal" style:family="paragraph">
      <style:paragraph-properties fo:text-align="start"/>
    </style:style>
    <style:style style:name="T799" style:parent-style-name="DefaultParagraphFont" style:family="text">
      <style:text-properties fo:language="en" fo:country="US"/>
    </style:style>
    <style:style style:name="P800" style:parent-style-name="Normal" style:family="paragraph">
      <style:paragraph-properties fo:text-align="start"/>
      <style:text-properties fo:language="en" fo:country="US"/>
    </style:style>
    <style:style style:name="P801" style:parent-style-name="Normal" style:family="paragraph">
      <style:paragraph-properties fo:text-align="start"/>
      <style:text-properties fo:language="en" fo:country="US"/>
    </style:style>
    <style:style style:name="P802" style:parent-style-name="Normal" style:family="paragraph">
      <style:paragraph-properties fo:text-align="start"/>
    </style:style>
    <style:style style:name="T803" style:parent-style-name="DefaultParagraphFont" style:family="text">
      <style:text-properties fo:language="en" fo:country="US"/>
    </style:style>
    <style:style style:name="P804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T805" style:parent-style-name="DefaultParagraphFont" style:family="text">
      <style:text-properties style:font-name="Calibri"/>
    </style:style>
    <style:style style:name="T806" style:parent-style-name="DefaultParagraphFont" style:family="text">
      <style:text-properties style:font-name="Calibri" fo:font-weight="bold" style:font-weight-asian="bold" style:font-weight-complex="bold"/>
    </style:style>
    <style:style style:name="T807" style:parent-style-name="DefaultParagraphFont" style:family="text">
      <style:text-properties style:font-name="Calibri"/>
    </style:style>
    <style:style style:name="P808" style:parent-style-name="SBCparagraph" style:family="paragraph">
      <style:text-properties style:font-name="Calibri"/>
    </style:style>
    <style:style style:name="P809" style:parent-style-name="SBCparagraph" style:family="paragraph">
      <style:text-properties style:font-name="Calibri"/>
    </style:style>
    <style:style style:name="T810" style:parent-style-name="DefaultParagraphFont" style:family="text">
      <style:text-properties style:font-name="Calibri"/>
    </style:style>
    <style:style style:name="T811" style:parent-style-name="DefaultParagraphFont" style:family="text">
      <style:text-properties style:font-name="Calibri" fo:font-weight="bold" style:font-weight-asian="bold" style:font-weight-complex="bold"/>
    </style:style>
    <style:style style:name="T812" style:parent-style-name="DefaultParagraphFont" style:family="text">
      <style:text-properties style:font-name="Calibri"/>
    </style:style>
    <style:style style:name="P813" style:parent-style-name="SBCparagraph" style:family="paragraph">
      <style:text-properties style:font-name="Calibri"/>
    </style:style>
    <style:style style:name="P814" style:parent-style-name="SBCparagraph" style:family="paragraph">
      <style:text-properties style:font-name="Calibri"/>
    </style:style>
    <style:style style:name="P815" style:parent-style-name="SBCparagraph" style:family="paragraph">
      <style:text-properties style:font-name="Calibri"/>
    </style:style>
    <style:style style:name="T816" style:parent-style-name="DefaultParagraphFont" style:family="text">
      <style:text-properties style:font-name="Calibri"/>
    </style:style>
    <style:style style:name="T817" style:parent-style-name="DefaultParagraphFont" style:family="text">
      <style:text-properties style:font-name="Calibri" fo:font-weight="bold" style:font-weight-asian="bold" style:font-weight-complex="bold"/>
    </style:style>
    <style:style style:name="T818" style:parent-style-name="DefaultParagraphFont" style:family="text">
      <style:text-properties style:font-name="Calibri"/>
    </style:style>
    <style:style style:name="P819" style:parent-style-name="SBCparagraph" style:family="paragraph">
      <style:text-properties style:font-name="Calibri"/>
    </style:style>
    <style:style style:name="P820" style:parent-style-name="SBCparagraph" style:family="paragraph">
      <style:text-properties style:font-name="Calibri"/>
    </style:style>
    <style:style style:name="P821" style:parent-style-name="SBCparagraph" style:family="paragraph">
      <style:paragraph-properties fo:text-align="center" fo:text-indent="0in"/>
    </style:style>
    <style:style style:name="T822" style:parent-style-name="DefaultParagraphFont" style:family="text">
      <style:text-properties style:font-name="Calibri"/>
    </style:style>
    <style:style style:name="P823" style:parent-style-name="SBCparagraph" style:family="paragraph">
      <style:paragraph-properties fo:text-align="center" fo:text-indent="0.1972in"/>
      <style:text-properties style:font-name="Calibri" fo:font-weight="bold" style:font-weight-asian="bold" style:font-weight-complex="bold"/>
    </style:style>
    <style:style style:name="P824" style:parent-style-name="SBCtitle1" style:family="paragraph">
      <style:paragraph-properties fo:margin-left="0.3937in">
        <style:tab-stops/>
      </style:paragraph-properties>
    </style:style>
    <style:style style:name="T825" style:parent-style-name="DefaultParagraphFont" style:family="text">
      <style:text-properties style:font-name="Calibri"/>
    </style:style>
    <style:style style:name="P826" style:parent-style-name="SBCparagraph" style:family="paragraph">
      <style:paragraph-properties fo:text-indent="0.1972in"/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T827" style:parent-style-name="DefaultParagraphFont" style:family="text">
      <style:text-properties style:font-name="Calibri"/>
    </style:style>
    <style:style style:name="T828" style:parent-style-name="DefaultParagraphFont" style:family="text">
      <style:text-properties style:font-name="Calibri" fo:font-weight="bold" style:font-weight-asian="bold" style:font-weight-complex="bold"/>
    </style:style>
    <style:style style:name="T829" style:parent-style-name="DefaultParagraphFont" style:family="text">
      <style:text-properties style:font-name="Calibri"/>
    </style:style>
    <style:style style:name="T830" style:parent-style-name="DefaultParagraphFont" style:family="text">
      <style:text-properties style:font-name="Calibri"/>
    </style:style>
    <style:style style:name="P831" style:parent-style-name="SBCparagraph" style:family="paragraph">
      <style:text-properties style:font-name="Calibri"/>
    </style:style>
    <style:style style:name="P832" style:parent-style-name="SBCparagraph" style:family="paragraph">
      <style:text-properties style:font-name="Calibri"/>
    </style:style>
    <style:style style:name="P833" style:parent-style-name="SBCparagraph" style:family="paragraph">
      <style:paragraph-properties fo:text-align="center" fo:text-indent="0in"/>
    </style:style>
    <style:style style:name="T834" style:parent-style-name="DefaultParagraphFont" style:family="text">
      <style:text-properties style:font-name="Calibri"/>
    </style:style>
    <style:style style:name="P835" style:parent-style-name="Normal" style:family="paragraph">
      <style:paragraph-properties fo:text-align="start"/>
      <style:text-properties fo:language="en" fo:country="US"/>
    </style:style>
    <style:style style:name="P836" style:parent-style-name="Normal" style:family="paragraph">
      <style:paragraph-properties fo:text-align="start"/>
      <style:text-properties fo:language="en" fo:country="US"/>
    </style:style>
    <style:style style:name="P837" style:parent-style-name="Normal" style:family="paragraph">
      <style:paragraph-properties fo:text-align="start"/>
      <style:text-properties fo:language="en" fo:country="US"/>
    </style:style>
    <style:style style:name="P838" style:parent-style-name="Normal" style:family="paragraph">
      <style:paragraph-properties fo:text-align="start"/>
      <style:text-properties fo:language="en" fo:country="US"/>
    </style:style>
    <style:style style:name="P839" style:parent-style-name="Normal" style:family="paragraph">
      <style:paragraph-properties fo:text-align="start"/>
      <style:text-properties fo:language="en" fo:country="US"/>
    </style:style>
    <style:style style:name="P840" style:parent-style-name="Normal" style:family="paragraph">
      <style:paragraph-properties fo:text-align="start"/>
      <style:text-properties fo:language="en" fo:country="US"/>
    </style:style>
    <style:style style:name="P841" style:parent-style-name="Normal" style:family="paragraph">
      <style:paragraph-properties fo:text-align="start"/>
      <style:text-properties fo:language="en" fo:country="US"/>
    </style:style>
    <style:style style:name="P842" style:parent-style-name="Normal" style:family="paragraph">
      <style:paragraph-properties fo:text-align="start"/>
      <style:text-properties fo:language="en" fo:country="US"/>
    </style:style>
    <style:style style:name="P843" style:parent-style-name="Normal" style:family="paragraph">
      <style:paragraph-properties fo:text-align="start"/>
      <style:text-properties fo:language="en" fo:country="US"/>
    </style:style>
    <style:style style:name="P844" style:parent-style-name="Normal" style:family="paragraph">
      <style:paragraph-properties fo:text-align="start"/>
      <style:text-properties fo:language="en" fo:country="US"/>
    </style:style>
    <style:style style:name="P845" style:parent-style-name="Normal" style:family="paragraph">
      <style:paragraph-properties fo:text-align="start"/>
      <style:text-properties fo:language="en" fo:country="US"/>
    </style:style>
    <style:style style:name="P846" style:parent-style-name="Normal" style:family="paragraph">
      <style:paragraph-properties fo:text-align="start"/>
      <style:text-properties fo:language="en" fo:country="US"/>
    </style:style>
    <style:style style:name="P847" style:parent-style-name="Normal" style:family="paragraph">
      <style:paragraph-properties fo:text-align="start"/>
    </style:style>
    <style:style style:name="T848" style:parent-style-name="DefaultParagraphFont" style:family="text">
      <style:text-properties fo:language="en" fo:country="US"/>
    </style:style>
    <style:style style:name="P849" style:parent-style-name="Normal" style:family="paragraph">
      <style:paragraph-properties fo:text-align="start"/>
    </style:style>
    <style:style style:name="P850" style:parent-style-name="Normal" style:family="paragraph">
      <style:paragraph-properties fo:text-align="start"/>
    </style:style>
    <style:style style:name="P851" style:parent-style-name="Normal" style:family="paragraph">
      <style:paragraph-properties fo:text-align="start"/>
    </style:style>
    <style:style style:name="T852" style:parent-style-name="DefaultParagraphFont" style:family="text">
      <style:text-properties fo:language="en" fo:country="US"/>
    </style:style>
    <style:style style:name="P853" style:parent-style-name="Normal" style:family="paragraph">
      <style:paragraph-properties fo:text-align="start"/>
      <style:text-properties fo:language="en" fo:country="US"/>
    </style:style>
    <style:style style:name="P854" style:parent-style-name="Normal" style:family="paragraph">
      <style:paragraph-properties fo:text-align="start"/>
    </style:style>
    <style:style style:name="T855" style:parent-style-name="DefaultParagraphFont" style:family="text">
      <style:text-properties fo:language="en" fo:country="US"/>
    </style:style>
    <style:style style:name="P856" style:parent-style-name="Normal" style:family="paragraph">
      <style:paragraph-properties fo:text-align="start"/>
    </style:style>
    <style:style style:name="P857" style:parent-style-name="Normal" style:family="paragraph">
      <style:paragraph-properties fo:text-align="start"/>
    </style:style>
    <style:style style:name="P858" style:parent-style-name="Normal" style:family="paragraph">
      <style:paragraph-properties fo:text-align="start"/>
    </style:style>
    <style:style style:name="P859" style:parent-style-name="Normal" style:family="paragraph">
      <style:paragraph-properties fo:text-align="start"/>
    </style:style>
    <style:style style:name="T860" style:parent-style-name="DefaultParagraphFont" style:family="text">
      <style:text-properties fo:language="en" fo:country="US"/>
    </style:style>
    <style:style style:name="P861" style:parent-style-name="Normal" style:family="paragraph">
      <style:paragraph-properties fo:text-align="start"/>
    </style:style>
    <style:style style:name="T862" style:parent-style-name="DefaultParagraphFont" style:family="text">
      <style:text-properties fo:language="en" fo:country="US"/>
    </style:style>
    <style:style style:name="P863" style:parent-style-name="Normal" style:family="paragraph">
      <style:paragraph-properties fo:text-align="start"/>
    </style:style>
    <style:style style:name="P864" style:parent-style-name="Normal" style:family="paragraph">
      <style:paragraph-properties fo:text-align="start"/>
    </style:style>
    <style:style style:name="P865" style:parent-style-name="Normal" style:family="paragraph">
      <style:paragraph-properties fo:text-align="start"/>
    </style:style>
    <style:style style:name="T866" style:parent-style-name="DefaultParagraphFont" style:family="text">
      <style:text-properties fo:language="en" fo:country="US"/>
    </style:style>
    <style:style style:name="P867" style:parent-style-name="Normal" style:family="paragraph">
      <style:paragraph-properties fo:text-align="start"/>
      <style:text-properties fo:language="en" fo:country="US"/>
    </style:style>
    <style:style style:name="P868" style:parent-style-name="Normal" style:family="paragraph">
      <style:paragraph-properties fo:text-align="start"/>
    </style:style>
    <style:style style:name="T869" style:parent-style-name="DefaultParagraphFont" style:family="text">
      <style:text-properties fo:language="en" fo:country="US"/>
    </style:style>
    <style:style style:name="P870" style:parent-style-name="Normal" style:family="paragraph">
      <style:paragraph-properties fo:text-align="start"/>
    </style:style>
    <style:style style:name="P871" style:parent-style-name="Normal" style:family="paragraph">
      <style:paragraph-properties fo:text-align="start"/>
    </style:style>
    <style:style style:name="P872" style:parent-style-name="Normal" style:family="paragraph">
      <style:paragraph-properties fo:text-align="start"/>
    </style:style>
    <style:style style:name="P873" style:parent-style-name="Normal" style:family="paragraph">
      <style:paragraph-properties fo:text-align="start"/>
    </style:style>
    <style:style style:name="P874" style:parent-style-name="Normal" style:family="paragraph">
      <style:paragraph-properties fo:text-align="start"/>
    </style:style>
    <style:style style:name="P875" style:parent-style-name="Normal" style:family="paragraph">
      <style:paragraph-properties fo:text-align="start"/>
    </style:style>
    <style:style style:name="P876" style:parent-style-name="Normal" style:family="paragraph">
      <style:paragraph-properties fo:text-align="start"/>
    </style:style>
    <style:style style:name="P877" style:parent-style-name="Normal" style:family="paragraph">
      <style:paragraph-properties fo:text-align="start"/>
    </style:style>
    <style:style style:name="T878" style:parent-style-name="DefaultParagraphFont" style:family="text">
      <style:text-properties fo:language="en" fo:country="US"/>
    </style:style>
    <style:style style:name="P879" style:parent-style-name="Normal" style:family="paragraph">
      <style:paragraph-properties fo:text-align="start"/>
    </style:style>
    <style:style style:name="T880" style:parent-style-name="DefaultParagraphFont" style:family="text">
      <style:text-properties fo:language="en" fo:country="US"/>
    </style:style>
    <style:style style:name="P881" style:parent-style-name="Normal" style:family="paragraph">
      <style:paragraph-properties fo:text-align="start"/>
    </style:style>
    <style:style style:name="P882" style:parent-style-name="Normal" style:family="paragraph">
      <style:paragraph-properties fo:text-align="start"/>
    </style:style>
    <style:style style:name="P883" style:parent-style-name="Normal" style:family="paragraph">
      <style:paragraph-properties fo:text-align="start"/>
    </style:style>
    <style:style style:name="P884" style:parent-style-name="Normal" style:family="paragraph">
      <style:paragraph-properties fo:text-align="start"/>
    </style:style>
    <style:style style:name="P885" style:parent-style-name="Normal" style:family="paragraph">
      <style:paragraph-properties fo:text-align="start"/>
    </style:style>
    <style:style style:name="P886" style:parent-style-name="Normal" style:family="paragraph">
      <style:paragraph-properties fo:text-align="start"/>
    </style:style>
    <style:style style:name="T887" style:parent-style-name="DefaultParagraphFont" style:family="text">
      <style:text-properties fo:language="en" fo:country="US"/>
    </style:style>
    <style:style style:name="P888" style:parent-style-name="Normal" style:family="paragraph">
      <style:paragraph-properties fo:text-align="start"/>
      <style:text-properties fo:language="en" fo:country="US"/>
    </style:style>
    <style:style style:name="P889" style:parent-style-name="Normal" style:family="paragraph">
      <style:paragraph-properties fo:text-align="start"/>
      <style:text-properties fo:language="en" fo:country="US"/>
    </style:style>
    <style:style style:name="P890" style:parent-style-name="Normal" style:family="paragraph">
      <style:paragraph-properties fo:text-align="start"/>
      <style:text-properties fo:language="en" fo:country="US"/>
    </style:style>
    <style:style style:name="P891" style:parent-style-name="Normal" style:family="paragraph">
      <style:paragraph-properties fo:text-align="start"/>
    </style:style>
    <style:style style:name="T892" style:parent-style-name="DefaultParagraphFont" style:family="text">
      <style:text-properties fo:language="en" fo:country="US"/>
    </style:style>
    <style:style style:name="T893" style:parent-style-name="DefaultParagraphFont" style:family="text">
      <style:text-properties style:font-name="Calibri"/>
    </style:style>
    <style:style style:name="P894" style:parent-style-name="Normal" style:family="paragraph">
      <style:paragraph-properties fo:text-align="start"/>
    </style:style>
    <style:style style:name="T895" style:parent-style-name="DefaultParagraphFont" style:family="text">
      <style:text-properties fo:language="en" fo:country="US"/>
    </style:style>
    <style:style style:name="P896" style:parent-style-name="Normal" style:family="paragraph">
      <style:paragraph-properties fo:text-align="start"/>
      <style:text-properties fo:language="en" fo:country="US"/>
    </style:style>
    <style:style style:name="P897" style:parent-style-name="Normal" style:family="paragraph">
      <style:paragraph-properties fo:text-align="start"/>
    </style:style>
    <style:style style:name="T898" style:parent-style-name="DefaultParagraphFont" style:family="text">
      <style:text-properties fo:language="en" fo:country="US"/>
    </style:style>
    <style:style style:name="P899" style:parent-style-name="Normal" style:family="paragraph">
      <style:paragraph-properties fo:text-align="start"/>
    </style:style>
    <style:style style:name="P900" style:parent-style-name="Normal" style:family="paragraph">
      <style:paragraph-properties fo:text-align="start"/>
    </style:style>
    <style:style style:name="P901" style:parent-style-name="Normal" style:family="paragraph">
      <style:paragraph-properties fo:text-align="start"/>
    </style:style>
    <style:style style:name="P902" style:parent-style-name="Normal" style:family="paragraph">
      <style:paragraph-properties fo:text-align="start"/>
    </style:style>
    <style:style style:name="P903" style:parent-style-name="Normal" style:family="paragraph">
      <style:paragraph-properties fo:text-align="start"/>
    </style:style>
    <style:style style:name="P904" style:parent-style-name="Normal" style:family="paragraph">
      <style:paragraph-properties fo:text-align="start"/>
    </style:style>
    <style:style style:name="P905" style:parent-style-name="Normal" style:family="paragraph">
      <style:paragraph-properties fo:text-align="start"/>
    </style:style>
    <style:style style:name="P906" style:parent-style-name="Normal" style:family="paragraph">
      <style:paragraph-properties fo:text-align="start"/>
    </style:style>
    <style:style style:name="T907" style:parent-style-name="DefaultParagraphFont" style:family="text">
      <style:text-properties fo:language="en" fo:country="US"/>
    </style:style>
    <style:style style:name="P908" style:parent-style-name="Normal" style:family="paragraph">
      <style:paragraph-properties fo:text-align="start"/>
    </style:style>
    <style:style style:name="T909" style:parent-style-name="DefaultParagraphFont" style:family="text">
      <style:text-properties fo:language="en" fo:country="US"/>
    </style:style>
    <style:style style:name="P910" style:parent-style-name="Normal" style:family="paragraph">
      <style:paragraph-properties fo:text-align="start"/>
    </style:style>
    <style:style style:name="P911" style:parent-style-name="Normal" style:family="paragraph">
      <style:paragraph-properties fo:text-align="start"/>
    </style:style>
    <style:style style:name="P912" style:parent-style-name="Normal" style:family="paragraph">
      <style:paragraph-properties fo:text-align="start"/>
    </style:style>
    <style:style style:name="P913" style:parent-style-name="Normal" style:family="paragraph">
      <style:paragraph-properties fo:text-align="start"/>
    </style:style>
    <style:style style:name="P914" style:parent-style-name="Normal" style:family="paragraph">
      <style:paragraph-properties fo:text-align="start"/>
    </style:style>
    <style:style style:name="P915" style:parent-style-name="Normal" style:family="paragraph">
      <style:paragraph-properties fo:text-align="start"/>
    </style:style>
    <style:style style:name="T916" style:parent-style-name="DefaultParagraphFont" style:family="text">
      <style:text-properties fo:language="en" fo:country="US"/>
    </style:style>
    <style:style style:name="P917" style:parent-style-name="Normal" style:family="paragraph">
      <style:paragraph-properties fo:text-align="start"/>
      <style:text-properties fo:language="en" fo:country="US"/>
    </style:style>
    <style:style style:name="P918" style:parent-style-name="Normal" style:family="paragraph">
      <style:paragraph-properties fo:text-align="start"/>
      <style:text-properties fo:language="en" fo:country="US"/>
    </style:style>
    <style:style style:name="P919" style:parent-style-name="Normal" style:family="paragraph">
      <style:paragraph-properties fo:text-align="start"/>
    </style:style>
    <style:style style:name="T920" style:parent-style-name="DefaultParagraphFont" style:family="text">
      <style:text-properties fo:language="en" fo:country="US"/>
    </style:style>
    <style:style style:name="P921" style:parent-style-name="SBCparagraph" style:family="paragraph">
      <style:paragraph-properties fo:text-align="center" fo:text-indent="0in"/>
      <style:text-properties style:font-name="Calibri" fo:font-weight="bold" style:font-weight-asian="bold" style:font-weight-complex="bold"/>
    </style:style>
    <style:style style:name="P922" style:parent-style-name="SBCparagraph" style:family="paragraph">
      <style:paragraph-properties fo:text-align="center" fo:text-indent="0in"/>
    </style:style>
    <style:style style:name="T923" style:parent-style-name="DefaultParagraphFont" style:family="text">
      <style:text-properties style:font-name="Calibri"/>
    </style:style>
    <style:style style:name="P924" style:parent-style-name="SBCparagraph" style:family="paragraph">
      <style:paragraph-properties fo:text-align="center" fo:text-indent="0.1972in"/>
      <style:text-properties style:font-name="Calibri" fo:font-weight="bold" style:font-weight-asian="bold" style:font-weight-complex="bold"/>
    </style:style>
    <style:style style:name="P925" style:parent-style-name="SBCtitle1" style:list-style-name="LFO8" style:family="paragraph"/>
    <style:style style:name="T926" style:parent-style-name="DefaultParagraphFont" style:family="text">
      <style:text-properties style:font-name="Calibri"/>
    </style:style>
    <style:style style:name="P927" style:parent-style-name="SBCparagraph" style:family="paragraph">
      <style:paragraph-properties fo:text-indent="0.1972in"/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P928" style:parent-style-name="SBCparagraph" style:family="paragraph">
      <style:paragraph-properties fo:text-indent="0.1972in"/>
      <style:text-properties style:font-name="Calibri"/>
    </style:style>
    <style:style style:name="P929" style:parent-style-name="SBCparagraph" style:family="paragraph">
      <style:paragraph-properties fo:text-indent="0.1972in"/>
      <style:text-properties style:font-name="Calibri"/>
    </style:style>
    <style:style style:name="P930" style:parent-style-name="SBCparagraph" style:family="paragraph">
      <style:paragraph-properties fo:text-align="center" fo:text-indent="0in"/>
    </style:style>
    <style:style style:name="T931" style:parent-style-name="DefaultParagraphFont" style:family="text">
      <style:text-properties style:font-name="Calibri"/>
    </style:style>
    <style:style style:name="P932" style:parent-style-name="SBCparagraph" style:family="paragraph">
      <style:paragraph-properties fo:text-align="center" fo:text-indent="0.1972in"/>
      <style:text-properties style:font-name="Calibri" fo:font-weight="bold" style:font-weight-asian="bold" style:font-weight-complex="bold"/>
    </style:style>
    <style:style style:name="P933" style:parent-style-name="SBCparagraph" style:family="paragraph">
      <style:paragraph-properties fo:text-indent="0.1972in"/>
      <style:text-properties style:font-name="Calibri"/>
    </style:style>
    <style:style style:name="P934" style:parent-style-name="SBCparagraph" style:family="paragraph">
      <style:paragraph-properties fo:text-align="center" fo:text-indent="0.1972in"/>
    </style:style>
    <style:style style:name="T935" style:parent-style-name="DefaultParagraphFont" style:family="text">
      <style:text-properties style:font-name="Calibri"/>
    </style:style>
    <style:style style:name="P936" style:parent-style-name="SBCparagraph" style:family="paragraph">
      <style:paragraph-properties fo:text-align="center" fo:text-indent="0.1972in"/>
      <style:text-properties style:font-name="Calibri" fo:font-weight="bold" style:font-weight-asian="bold" style:font-weight-complex="bold"/>
    </style:style>
    <style:style style:name="P937" style:parent-style-name="SBCparagraph" style:family="paragraph">
      <style:paragraph-properties fo:text-indent="0.1972in"/>
      <style:text-properties style:font-name="Calibri"/>
    </style:style>
    <style:style style:name="P938" style:parent-style-name="SBCparagraph" style:list-style-name="LFO12" style:family="paragraph">
      <style:text-properties style:font-name="Calibri"/>
    </style:style>
    <style:style style:name="P939" style:parent-style-name="SBCparagraph" style:list-style-name="LFO12" style:family="paragraph">
      <style:text-properties style:font-name="Calibri"/>
    </style:style>
    <style:style style:name="P940" style:parent-style-name="SBCparagraph" style:family="paragraph">
      <style:paragraph-properties fo:text-indent="0.1972in"/>
      <style:text-properties style:font-name="Calibri"/>
    </style:style>
    <style:style style:name="T941" style:parent-style-name="DefaultParagraphFont" style:family="text">
      <style:text-properties style:font-name="Calibri"/>
    </style:style>
    <style:style style:name="P942" style:parent-style-name="SBCparagraph" style:family="paragraph">
      <style:paragraph-properties fo:text-align="center" fo:text-indent="0.1972in"/>
      <style:text-properties style:font-name="Calibri" fo:font-weight="bold" style:font-weight-asian="bold" style:font-weight-complex="bold"/>
    </style:style>
    <style:style style:name="P943" style:parent-style-name="SBCparagraph" style:family="paragraph">
      <style:text-properties style:font-name="Calibri"/>
    </style:style>
    <style:style style:name="P944" style:parent-style-name="ListParagraph" style:list-style-name="LFO8" style:family="paragraph">
      <style:text-properties fo:font-weight="bold" style:font-weight-asian="bold" style:font-weight-complex="bold"/>
    </style:style>
    <style:style style:name="P945" style:parent-style-name="SBCparagraph" style:list-style-name="LFO11" style:family="paragraph"/>
    <style:style style:name="T946" style:parent-style-name="DefaultParagraphFont" style:family="text">
      <style:text-properties style:font-name="Times New Roman"/>
    </style:style>
    <style:style style:name="T947" style:parent-style-name="DefaultParagraphFont" style:family="text">
      <style:text-properties style:font-name="Times New Roman"/>
    </style:style>
    <style:style style:family="graphic" style:name="a2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ETO 4: MINIX</text:p>
      <text:p text:style-name="SBCauthors"><text:span text:style-name="T2">Gustavo Borges Peres da Silva</text:span><text:span text:style-name="T3">1</text:span></text:p>
      <text:p text:style-name="SBCinstitution"><text:span text:style-name="T4">1</text:span><text:span text:style-name="T5">Departamento de Ciência da Computação – Universidade Federal de Catalão (UFCAT)</text:span></text:p>
      <text:p text:style-name="P6">gustavo.silva@discente.ufcat.edu.br</text:p>
      <text:p text:style-name="P7"/>
      <text:p text:style-name="SBCtitle1">Objetivos</text:p>
      <text:list text:style-name="LFO7" text:continue-numbering="true">
        <text:list-item>
          <text:p text:style-name="P8">Familiarizar o aluno com o SO MINIX e testes em<text:s/>ambiente de máquina virtual.</text:p>
        </text:list-item>
        <text:list-item>
          <text:p text:style-name="P9">Criação de processos, IPC, gerenciamento de sinais.</text:p>
        </text:list-item>
      </text:list>
      <text:list text:style-name="LFO8" text:continue-numbering="true">
        <text:list-item>
          <text:p text:style-name="P10">Tarefa 4<text:span text:style-name="T11">:<text:s/></text:span><text:s/>(gerenciamento de processos): criação de processos, IPC, gerenciamento de sinais (de 08/02/2024 a 11/02/2024)</text:p>
        </text:list-item>
      </text:list>
      <text:p text:style-name="P12">Antes de prosseguirmos com essa tarefa, gostaria de deixar um adendo de que, todas as correções foram realizadas, aprendi a utilizar o recurso patch demonstrado no video de correção da tarefa 3, entendi como funciona a compilação e modificação do kernel, e estou com expectativas de que os próximos relatórios serão mais organizados que os outros.</text:p>
      <text:p text:style-name="P13">A tarefa 4, tem como base o Projeto 1, onde trabalhamos especificamente com threads. Durante esse projeto, no contexto do MINIX, trabalharemos com chamadas de sistemas para a criação e comunicação de processos. Sendo assim, a tarefa se constitui em alguns exercicios nas quais deveremos responde-los e demonstra-los.<text:s/><text:span text:style-name="T14">Além disso, tem a seguinte observação realizada pelo professor, no qual para que seja compilado os nossos novos programas, podemos inserir linhas apropriadas no arquivo Makefile. E a forma mais simples de compilação seria:</text:span></text:p>
      <text:p text:style-name="P15">$gcc exemplo.c -o exemplo</text:p>
      <text:p text:style-name="P16"><text:span text:style-name="T17">Onde o parâmetro “-o exemplo” indica que o arquivo binário gerado (output) deverá se chamar exemplo.</text:span></text:p>
      <text:p text:style-name="P18">Conquanto, para uma melhor organiza<text:span text:style-name="T19">ção do mesmo,<text:s/></text:span><text:span text:style-name="T20">dividiremos em topicos cada exercício anunciado.</text:span></text:p>
      <text:list text:style-name="LFO8" text:continue-numbering="true">
        <text:list-item>
          <text:list>
            <text:list-item>
              <text:p text:style-name="P21">Exerc<text:span text:style-name="T22">í</text:span>cio letra A</text:p>
            </text:list-item>
          </text:list>
        </text:list-item>
      </text:list>
      <text:p text:style-name="P23">Como funciona a chamada de sistema fork. Explique no contexto do programa fork-ex.c. Como você pode ter a certeza que o programa fork-ex.c está de fato funcionando? Demonstre.</text:p>
      <text:p text:style-name="P24">A chamada de sistema fork() é uma operação fundamental em sistemas Unix-like, incluindo o MINIX. Ela é usada para criar um novo processo filho que é uma cópia exata do processo pai.</text:p>
      <text:p text:style-name="P25"><text:span text:style-name="T26">Sendo assim, em relação ao Código 1, o programa fork-ex.c inicia com a definição de<text:s/></text:span><text:soft-page-break/><text:span text:style-name="T27">uma função<text:s/></text:span><text:span text:style-name="T28">do_nothing()</text:span><text:span text:style-name="T29"><text:s/>que não faz nada além de atribuir zero a uma variável. Essa função será usada para simular um tempo de execução para cada processo filho.</text:span></text:p>
      <text:p text:style-name="P30"><text:span text:style-name="T31">No<text:s/></text:span><text:span text:style-name="T32">main()</text:span><text:span text:style-name="T33">, um loop for é executado<text:s/></text:span><text:span text:style-name="T34">NFORKS vezes</text:span><text:span text:style-name="T35">. Dentro do loop, a chamada<text:s/></text:span><text:span text:style-name="T36">fork()</text:span><text:span text:style-name="T37"><text:s/>é feita.<text:s/></text:span><text:span text:style-name="T38">Aqui está o que acontece em cada iteração do loop:</text:span></text:p>
      <text:list text:style-name="LFO9" text:continue-numbering="true">
        <text:list-item>
          <text:p text:style-name="P39"><text:span text:style-name="T40">Se fork()<text:s/></text:span><text:span text:style-name="T41">retorna um valor negativo</text:span><text:span text:style-name="T42">, indica que a criação do processo filho falhou.</text:span></text:p>
        </text:list-item>
        <text:list-item>
          <text:p text:style-name="P43"><text:span text:style-name="T44">Se fork()<text:s/></text:span><text:span text:style-name="T45">retorna zero</text:span><text:span text:style-name="T46">, isso significa que o processo atual é o processo filho. Neste caso, a função do_nothing() é chamada e o processo filho sai.</text:span></text:p>
        </text:list-item>
        <text:list-item>
          <text:p text:style-name="P47"><text:span text:style-name="T48">Se fork()<text:s/></text:span><text:span text:style-name="T49">retorna um valor positivo</text:span><text:span text:style-name="T50">, esse valor é o ID do processo filho para o processo pai. Neste caso, o processo pai espera pelo término do processo filho com waitpid(). O valor de retorno de waitpid() é ignorado aqui.</text:span></text:p>
        </text:list-item>
      </text:list>
      <text:p text:style-name="P51">Após o loop, o programa termina.</text:p>
      <text:p text:style-name="P52"><text:span text:style-name="T53"><draw:frame draw:id="id0" draw:style-name="a0" draw:name="Text Box 2" text:anchor-type="as-char" svg:x="0in" svg:y="0in" svg:width="5.74792in" svg:height="6.38542in" style:rel-width="scale" style:rel-height="scale"><draw:text-box><text:p text:style-name="P54">#include &lt;stdio.h&gt;</text:p><text:p text:style-name="P55">#include &lt;stdlib.h&gt;</text:p><text:p text:style-name="P56">#include &lt;sys/wait.h&gt; // Incluir a biblioteca para a função waitpid</text:p><text:p text:style-name="P57"/><text:p text:style-name="P58">#define NFORKS 50000</text:p><text:p text:style-name="P59"/><text:p text:style-name="P60">void do_nothing () {</text:p><text:p text:style-name="P61"><text:s text:c="4"/>int i;</text:p><text:p text:style-name="P62"><text:s text:c="4"/>i = 0;</text:p><text:p text:style-name="P63">}</text:p><text:p text:style-name="P64"/><text:p text:style-name="P65">int main (int argc, char *argv[]) {</text:p><text:p text:style-name="P66"><text:span text:style-name="T67"><text:s text:c="4"/></text:span>int<text:s/>pid, j, status;</text:p><text:p text:style-name="P68"><text:s text:c="4"/>printf("Iniciando o programa...\n");</text:p><text:p text:style-name="P69"><text:s text:c="4"/>// Loop para criar NFORKS processos filhos</text:p><text:p text:style-name="P70"><text:s text:c="4"/><text:span text:style-name="T71">for (j = 0; j &lt; NFORKS; j++) {</text:span></text:p><text:p text:style-name="P72"><text:span text:style-name="T73"><text:s text:c="8"/></text:span>// Tentativa de criar um processo filho</text:p><text:p text:style-name="P74"><text:s text:c="8"/>if ((pid = fork ()) &lt; 0) {</text:p><text:p text:style-name="P75"><text:s text:c="12"/>// Se a chamada fork() falhou, exibe uma mensagem de erro e sai do programa</text:p><text:p text:style-name="P76"><text:s text:c="12"/>printf ("fork falhou com o código de erro= %d\n", pid);</text:p><text:p text:style-name="P77"><text:s text:c="12"/>exit (0);</text:p><text:p text:style-name="P78"><text:s text:c="8"/>}</text:p><text:p text:style-name="P79"/><text:p text:style-name="P80"><text:s text:c="8"/>// Se a chamada fork() retornar 0, estamos no processo filho</text:p><text:p text:style-name="P81"><text:s text:c="8"/>else if (pid == 0) {</text:p><text:p text:style-name="P82"><text:s text:c="12"/>printf("Processo filho %d iniciado\n", getpid());</text:p><text:p text:style-name="P83"><text:s text:c="12"/>// Chama a função do_nothing() no processo filho</text:p><text:p text:style-name="P84"><text:s text:c="12"/>do_nothing ();</text:p><text:p text:style-name="P85"><text:s text:c="12"/>printf("Processo filho %d concluído\n",getpid());</text:p><text:p text:style-name="P86"><text:s text:c="12"/>// Sai do processo filho</text:p><text:p text:style-name="P87"><text:s text:c="12"/>exit (0);</text:p><text:p text:style-name="P88"><text:s text:c="8"/>}</text:p><text:p text:style-name="P89"/><text:p text:style-name="P90"><text:s text:c="8"/>// Se a chamada fork() retornar um valor positivo, estamos no processo pai</text:p><text:p text:style-name="P91"><text:s text:c="8"/>else {</text:p><text:p text:style-name="P92"><text:s text:c="12"/>// O processo pai espera pelo término do processo filho com waitpid()</text:p><text:p text:style-name="P93"><text:s text:c="12"/>waitpid (pid, &amp;status, 0);</text:p><text:p text:style-name="P94"><text:s text:c="8"/>}</text:p><text:p text:style-name="P95"><text:s text:c="4"/>}</text:p><text:p text:style-name="P96"/><text:p text:style-name="P97"><text:s text:c="4"/>printf("Todos os processos filhos concluídos\n");</text:p><text:p text:style-name="P98"/><text:p text:style-name="P99"><text:s text:c="4"/><text:span text:style-name="T100">return 0;</text:span></text:p><text:p text:style-name="P101">}</text:p></draw:text-box><svg:title/><svg:desc/></draw:frame></text:span></text:p>
      <text:soft-page-break/>
      <text:p text:style-name="P102"><text:span text:style-name="T103"><draw:frame draw:id="id1" draw:style-name="a1" draw:name="Text Box 2" text:anchor-type="as-char" svg:x="0in" svg:y="0in" svg:width="5.74792in" svg:height="5.39514in" style:rel-width="scale" style:rel-height="scale"><draw:text-box><text:p text:style-name="P104"><text:s text:c="8"/>// Se a chamada fork() retornar 0, estamos no processo filho</text:p><text:p text:style-name="P105"><text:s text:c="8"/>else if (pid == 0) {</text:p><text:p text:style-name="P106"><text:s text:c="12"/>printf("Processo filho %d iniciado\n", getpid());</text:p><text:p text:style-name="P107"><text:s text:c="12"/>// Chama a função do_nothing() no processo filho</text:p><text:p text:style-name="P108"><text:s text:c="12"/>do_nothing ();</text:p><text:p text:style-name="P109"><text:s text:c="12"/>printf("Processo filho %d concluído\n",getpid());</text:p><text:p text:style-name="P110"><text:s text:c="12"/>// Sai do processo filho</text:p><text:p text:style-name="P111"><text:s text:c="12"/>exit (0);</text:p><text:p text:style-name="P112"><text:s text:c="8"/>}</text:p><text:p text:style-name="P113"/><text:p text:style-name="P114"><text:s text:c="8"/>// Se a chamada fork() retornar um valor positivo, estamos no processo pai</text:p><text:p text:style-name="P115"><text:s text:c="8"/>else {</text:p><text:p text:style-name="P116"><text:s text:c="12"/>// O processo pai espera pelo término do processo filho com waitpid()</text:p><text:p text:style-name="P117"><text:s text:c="12"/>waitpid (pid, &amp;status, 0);</text:p><text:p text:style-name="P118"><text:s text:c="8"/>}</text:p><text:p text:style-name="P119"><text:s text:c="4"/>}</text:p><text:p text:style-name="P120"><text:s text:c="4"/>printf("Todos os processos filhos concluídos\n");</text:p><text:p text:style-name="P121"><text:s text:c="4"/><text:span text:style-name="T122">return 0;</text:span></text:p><text:p text:style-name="P123">}</text:p></draw:text-box><svg:title/><svg:desc/></draw:frame></text:span></text:p>
      <text:p text:style-name="P124">Codigo 1: Conteúdo do arquivo fork-ex.c</text:p>
      <text:p text:style-name="P125">Por outro lado, para termos a certeza de que o programa do Código 1 esteja funcionando corretamente, iremos compilar e executá-lo em nosso sistema MINIX conforme iremos demonstrar abaixo.<text:s/></text:p>
      <text:p text:style-name="P126">Mas<text:s/>antes precisamos instalar o GCC (GNU Compiler Collection) para conseguirmos compilar nossos codigos</text:p>
      <text:p text:style-name="P127"><text:span text:style-name="T128"><draw:frame draw:style-name="a2" draw:name="Picture 1" text:anchor-type="as-char" svg:x="0in" svg:y="0in" svg:width="5.90556in" svg:height="1.53819in" style:rel-width="scale" style:rel-height="scale"><draw:image xlink:href="media/image1.png" xlink:type="simple" xlink:show="embed" xlink:actuate="onLoad"/><svg:title/><svg:desc>A computer screen with white text

Description automatically generated</svg:desc></draw:frame></text:span></text:p>
      <text:p text:style-name="P129">Figura 1: baixando e instalando GCC.</text:p>
      <text:p text:style-name="P130"/>
      <text:soft-page-break/>
      <text:p text:style-name="P131"><text:span text:style-name="T132"><draw:frame draw:style-name="a3" draw:name="Picture 1" text:anchor-type="as-char" svg:x="0in" svg:y="0in" svg:width="3.47965in" svg:height="0.37505in" style:rel-width="scale" style:rel-height="scale"><draw:image xlink:href="media/image2.png" xlink:type="simple" xlink:show="embed" xlink:actuate="onLoad"/><svg:title/><svg:desc/></draw:frame></text:span></text:p>
      <text:p text:style-name="P133">Figura 2: confirmando a instalação.</text:p>
      <text:p text:style-name="P134"><text:span text:style-name="T135"><draw:frame draw:style-name="a4" draw:name="Picture 1" text:anchor-type="as-char" svg:x="0in" svg:y="0in" svg:width="3.51855in" svg:height="0.98058in" style:rel-width="scale" style:rel-height="scale"><draw:image xlink:href="media/image3.png" xlink:type="simple" xlink:show="embed" xlink:actuate="onLoad"/><svg:title/><svg:desc>A screenshot of a computer program

Description automatically generated</svg:desc></draw:frame></text:span></text:p>
      <text:p text:style-name="P136">Figura 3: compilando o fork-ex.c e preparando para executar.</text:p>
      <text:p text:style-name="P137">Após rodarmos o codigo, veremos que o programa está funcionando conforme o esperado. Ele cria vários processos filhos e, para cada um deles, imprime mensagens indicando quando o processo filho é iniciado e quando é concluído (Figura 4).</text:p>
      <text:p text:style-name="P138">O comportamento em que os processos filhos são iniciados e concluídos é esperado, pois o programa está criando um grande número de processos filhos em um loop e, em seguida, cada processo filho executa a função do_nothing() e termina.</text:p>
      <text:p text:style-name="P139">A mensagem "Todos os processos filhos concluídos" é impressa no final do programa, indicando que todos os processos filhos foram criados e concluídos com sucesso conforme na Figura 5.</text:p>
      <text:p text:style-name="P140"><text:span text:style-name="T141"><draw:frame draw:style-name="a5" draw:name="Picture 1" text:anchor-type="as-char" svg:x="0in" svg:y="0in" svg:width="2.44293in" svg:height="3.61129in" style:rel-width="scale" style:rel-height="scale"><draw:image xlink:href="media/image4.png" xlink:type="simple" xlink:show="embed" xlink:actuate="onLoad"/><svg:title/><svg:desc>A screen shot of a computer

Description automatically generated</svg:desc></draw:frame></text:span></text:p>
      <text:p text:style-name="P142">Figura 4: criaçao de processos filhos.</text:p>
      <text:p text:style-name="P143"><text:span text:style-name="T144"><draw:frame draw:style-name="a6" draw:name="Picture 1" text:anchor-type="as-char" svg:x="0in" svg:y="0in" svg:width="2.96378in" svg:height="0.7338in" style:rel-width="scale" style:rel-height="scale"><draw:image xlink:href="media/image5.png" xlink:type="simple" xlink:show="embed" xlink:actuate="onLoad"/><svg:title/><svg:desc>A black screen with white text

Description automatically generated</svg:desc></draw:frame></text:span></text:p>
      <text:p text:style-name="P145">Figura 5: finalização da criação dos processos filhos.</text:p>
      <text:p text:style-name="P146"/>
      <text:list text:style-name="LFO8" text:continue-numbering="true">
        <text:list-item>
          <text:list>
            <text:list-item>
              <text:p text:style-name="P147">Exerc<text:span text:style-name="T148">í</text:span>cio letra B</text:p>
            </text:list-item>
          </text:list>
        </text:list-item>
      </text:list>
      <text:p text:style-name="P149">Modifique o programa fork-ex.c para que este realize a criação de 10 processos filhos. Modifique a função void do_nothing (void) de modo que esta imprima para cada execução de processo filho o pid do processo pai e o pid do processo filho (OBS. O PROTÓTIPO DESTA FUNÇÃO NÃO DEVE SER MODIFICADO). Além disso, crie mecanismos em seu programa para permitir a coleta de dados dos 10 processos simultaneamente por meio do comando ps.</text:p>
      <text:p text:style-name="P150"><text:span text:style-name="T151"><draw:frame draw:id="id2" draw:style-name="a7" draw:name="Text Box 2" text:anchor-type="as-char" svg:x="0in" svg:y="0in" svg:width="5.74792in" svg:height="7.01042in" style:rel-width="scale" style:rel-height="scale"><draw:text-box><text:p text:style-name="P152">#include &lt;stdio.h&gt;</text:p><text:p text:style-name="P153">#include &lt;stdlib.h&gt;</text:p><text:p text:style-name="P154">#include &lt;sys/wait.h&gt;</text:p><text:p text:style-name="P155">#include &lt;unistd.h&gt;</text:p><text:p text:style-name="P156"/><text:p text:style-name="P157">#define NFORKS 10</text:p><text:p text:style-name="P158"/><text:p text:style-name="P159">void do_nothing() {</text:p><text:p text:style-name="P160"><text:span text:style-name="T161"><text:s text:c="4"/></text:span>pid_t parent_pid = getppid(); // Obter o PID do processo pai</text:p><text:p text:style-name="P162"><text:s text:c="4"/>pid_t child_pid = getpid(); // Obter o PID do processo filho</text:p><text:p text:style-name="P163"><text:s text:c="4"/>printf("PID do processo pai: %d, PID do processo filho: %d\n", parent_pid, child_pid);</text:p><text:p text:style-name="P164"><text:s text:c="4"/>fflush(stdout); // Limpar o buffer de saída para garantir que a mensagem seja exibida imediatamente</text:p><text:p text:style-name="P165">}</text:p><text:p text:style-name="P166"/><text:p text:style-name="P167">int main(int argc, char *argv[]) {</text:p><text:p text:style-name="P168"><text:span text:style-name="T169"><text:s text:c="4"/></text:span>int pid, j, status;</text:p><text:p text:style-name="P170"><text:s text:c="4"/>printf("Iniciando o programa...\n");</text:p><text:p text:style-name="P171"/><text:p text:style-name="P172"><text:s text:c="4"/>// Loop para criar NFORKS<text:s/>processos filhos</text:p><text:p text:style-name="P173"><text:s text:c="4"/><text:span text:style-name="T174">for (j = 0; j &lt; NFORKS; j++) {</text:span></text:p><text:p text:style-name="P175"><text:span text:style-name="T176"><text:s text:c="8"/></text:span>// Tentativa de criar um processo filho</text:p><text:p text:style-name="P177"><text:s text:c="8"/>if ((pid = fork()) &lt; 0) {</text:p><text:p text:style-name="P178"><text:s text:c="12"/>// Se a chamada fork() falhou, exibe uma mensagem de erro e sai do programa</text:p><text:p text:style-name="P179"><text:s text:c="12"/>printf("fork falhou com o código de erro= %d\n", pid);</text:p><text:p text:style-name="P180"><text:s text:c="12"/>exit(0);</text:p><text:p text:style-name="P181"><text:s text:c="8"/>} else if (pid == 0) {</text:p><text:p text:style-name="P182"><text:s text:c="12"/>// Se a chamada fork() retornar 0, estamos no processo filho</text:p><text:p text:style-name="P183"><text:s text:c="12"/>printf("Processo filho %d iniciado\n", getpid());</text:p><text:p text:style-name="P184"><text:s text:c="12"/>// Chama a função do_nothing() no processo filho</text:p><text:p text:style-name="P185"><text:s text:c="12"/>do_nothing();</text:p><text:p text:style-name="P186"><text:s text:c="12"/>printf("Processo filho %d concluído\n", getpid());</text:p><text:p text:style-name="P187"><text:s text:c="12"/>// Sai do processo filho</text:p><text:p text:style-name="P188"><text:s text:c="12"/>exit(0);</text:p><text:p text:style-name="P189"><text:s text:c="8"/>}</text:p><text:p text:style-name="P190"><text:s text:c="4"/>}</text:p><text:p text:style-name="P191"/><text:p text:style-name="P192"><text:s text:c="4"/>// O processo pai espera pelo término dos processos<text:s/>filhos com waitpid()</text:p><text:p text:style-name="P193"><text:s text:c="4"/><text:span text:style-name="T194">for (j = 0; j &lt; NFORKS; j++) {</text:span></text:p><text:p text:style-name="P195"><text:span text:style-name="T196"><text:s text:c="8"/></text:span>wait(&amp;status);</text:p><text:p text:style-name="P197"><text:s text:c="4"/>}</text:p><text:p text:style-name="P198"/><text:p text:style-name="P199"><text:s text:c="4"/>printf("Todos os processos filhos concluídos\n");</text:p><text:p text:style-name="P200"/><text:p text:style-name="P201"><text:s text:c="4"/><text:span text:style-name="T202">return 0;</text:span></text:p><text:p text:style-name="P203">}</text:p></draw:text-box><svg:title/><svg:desc/></draw:frame></text:span><text:soft-page-break/><text:span text:style-name="T204"><draw:frame draw:id="id3" draw:style-name="a8" draw:name="Text Box 2" text:anchor-type="as-char" svg:x="0in" svg:y="0in" svg:width="5.74792in" svg:height="6.18681in" style:rel-width="scale" style:rel-height="scale"><draw:text-box><text:p text:style-name="P205"><text:s text:c="12"/>printf("fork falhou com o código de erro= %d\n", pid);</text:p><text:p text:style-name="P206"><text:s text:c="12"/>exit(0);</text:p><text:p text:style-name="P207"><text:s text:c="8"/>} else if (pid == 0) {</text:p><text:p text:style-name="P208"><text:s text:c="12"/>// Se a chamada fork() retornar 0, estamos no processo filho</text:p><text:p text:style-name="P209"><text:s text:c="12"/>printf("Processo filho %d iniciado\n", getpid());</text:p><text:p text:style-name="P210"><text:s text:c="12"/>// Chama a função do_nothing() no processo filho</text:p><text:p text:style-name="P211"><text:s text:c="12"/>do_nothing();</text:p><text:p text:style-name="P212"><text:s text:c="12"/>printf("Processo filho %d concluído\n", getpid());</text:p><text:p text:style-name="P213"><text:s text:c="12"/>// Sai do processo filho</text:p><text:p text:style-name="P214"><text:s text:c="12"/>exit(0);</text:p><text:p text:style-name="P215"><text:s text:c="8"/>}</text:p><text:p text:style-name="P216"><text:s text:c="4"/>}</text:p><text:p text:style-name="P217"/><text:p text:style-name="P218"><text:s text:c="4"/>// O processo pai espera pelo término dos processos filhos com waitpid()</text:p><text:p text:style-name="P219"><text:s text:c="4"/><text:span text:style-name="T220">for (j = 0; j &lt; NFORKS; j++) {</text:span></text:p><text:p text:style-name="P221"><text:span text:style-name="T222"><text:s text:c="8"/></text:span>wait(&amp;status);</text:p><text:p text:style-name="P223"><text:s text:c="4"/>}</text:p><text:p text:style-name="P224"/><text:p text:style-name="P225"><text:s text:c="4"/>printf("Todos os processos filhos concluídos\n");</text:p><text:p text:style-name="P226"/><text:p text:style-name="P227"><text:s text:c="4"/><text:span text:style-name="T228">return 0;</text:span></text:p><text:p text:style-name="P229">}</text:p></draw:text-box><svg:title/><svg:desc/></draw:frame></text:span></text:p>
      <text:p text:style-name="P230">Codigo 2: Atualização do arquivo fork-ex.c</text:p>
      <text:p text:style-name="SBCparagraph"><text:span text:style-name="T231">Nesta versão modificada do programa fork-ex.c, a constante<text:s/></text:span><text:span text:style-name="T232">NFORKS</text:span><text:span text:style-name="T233"><text:s/>foi definida<text:s/></text:span><text:span text:style-name="T234">como 10</text:span><text:span text:style-name="T235">,<text:s/></text:span><text:span text:style-name="T236">para criar apenas 10 processos filhos</text:span><text:span text:style-name="T237">.</text:span></text:p>
      <text:p text:style-name="SBCparagraph"><text:span text:style-name="T238">A função<text:s/></text:span><text:span text:style-name="T239">do_nothing()</text:span><text:span text:style-name="T240"><text:s/>foi modificada para imprimir o PID do processo<text:s/></text:span><text:span text:style-name="T241">pai</text:span><text:span text:style-name="T242"><text:s/>e o PID do processo<text:s/></text:span><text:span text:style-name="T243">filho</text:span><text:span text:style-name="T244"><text:s/>em<text:s/></text:span><text:span text:style-name="T245">cada execução do processo filho</text:span><text:span text:style-name="T246">.</text:span></text:p>
      <text:p text:style-name="SBCparagraph"><text:span text:style-name="T247">Foram<text:s/></text:span><text:span text:style-name="T248">adicionados mecanismos</text:span><text:span text:style-name="T249"><text:s/>para esperar pelo término de todos os processos filhos no processo pai, utilizando um segundo loop for e a função<text:s/></text:span><text:span text:style-name="T250">wait().</text:span></text:p>
      <text:p text:style-name="SBCparagraph"><text:span text:style-name="T251">O buffer de saída é limpo usando<text:s/></text:span><text:span text:style-name="T252">fflush(stdout)</text:span><text:span text:style-name="T253"><text:s/>após a impressão do PID do processo pai e do processo filho, garantindo que a mensagem seja exibida imediatamente.</text:span></text:p>
      <text:p text:style-name="P254">Essas modificações permitem que o programa crie 10 processos filhos e colete dados deles, além de garantir que todos os processos filhos sejam concluídos antes que o<text:s/><text:soft-page-break/>processo pai termine conforme podemos verificar o resultado na Figura 6.</text:p>
      <text:p text:style-name="P255"><text:span text:style-name="T256"><draw:frame draw:style-name="a9" draw:name="Picture 1" text:anchor-type="as-char" svg:x="0in" svg:y="0in" svg:width="4.91667in" svg:height="6.0625in" style:rel-width="scale" style:rel-height="scale"><draw:image xlink:href="media/image6.png" xlink:type="simple" xlink:show="embed" xlink:actuate="onLoad"/><svg:title/><svg:desc/></draw:frame></text:span></text:p>
      <text:p text:style-name="P257">Figura 6: resultado do fork-ex com 10 processos.</text:p>
      <text:list text:style-name="LFO8" text:continue-numbering="true">
        <text:list-item>
          <text:list>
            <text:list-item>
              <text:p text:style-name="P258">Exerc<text:span text:style-name="T259">í</text:span>cio letra C</text:p>
            </text:list-item>
          </text:list>
        </text:list-item>
      </text:list>
      <text:p text:style-name="P260">Escreva um programa o qual deve criar 3 processos: 2 escritores e 1 leitor. Os escritores devem escrever em um pipe mensagens de tamanho pré-definido (sizeof(PACKET) bytes). O leitor deve ler as mensagens inseridas pelos escritores, imprimir as mensagens e identificar o processo escritor que a originou. Para este exercício utilize a definição de um pacote conforme segue:</text:p>
      <text:soft-page-break/>
      <text:p text:style-name="P261"><text:span text:style-name="T262"><draw:frame draw:id="id4" draw:style-name="a10" draw:name="Text Box 2" text:anchor-type="as-char" svg:x="0in" svg:y="0in" svg:width="5.74792in" svg:height="1.89514in" style:rel-width="scale" style:rel-height="scale"><draw:text-box><text:p text:style-name="P263">typedef struct {</text:p><text:p text:style-name="P264"><text:s text:c="3"/>int id; /* Deve guardar o pid do processo originário */</text:p><text:p text:style-name="P265"><text:s text:c="3"/>char data[256];</text:p><text:p text:style-name="P266"><text:s text:c="3"/>int lastone; /* Usado para<text:s/>identificar a última struct inserida no pipe */</text:p><text:p text:style-name="P267">}</text:p><text:p text:style-name="P268">PACKET;</text:p></draw:text-box><svg:title/><svg:desc/></draw:frame></text:span></text:p>
      <text:p text:style-name="P269">Codigo 3: Trecho a ser implementado no codigo escrito em C.</text:p>
      <text:p text:style-name="P270">Use a implementação com FIFO, tendo em vista que o PIPE a ser criado não é utilizado exclusivamente para a comunicação entre<text:s/>processo pai e processo filho. Além disso, sua solução deve ser capaz de generalizar o caso de múltiplos escritores e um leitor. Referência: Beej's Guide to Unix Interprocess Communication.</text:p>
      <text:p text:style-name="P271">Com base no que o exercicios nos falou, iremos criar um arquivo multiwriter_single_reader.c, pois esse nome reflete a capacidade do programa de lidar com múltiplos escritores (no caso, dois) e um único leitor, que é o requisito descrito na atividade.<text:s/></text:p>
      <text:p text:style-name="SBCparagraph"><text:span text:style-name="T272">O<text:s/></text:span><text:span text:style-name="T273">codigo 4</text:span><text:span text:style-name="T274">, cria um processo leitor e dois processos escritores que se comunicam por meio de um pipe nomeado (FIFO). Abaixo está uma explicação sobre como o programa funciona e qual será a saída esperada:</text:span></text:p>
      <text:list text:style-name="LFO10" text:continue-numbering="true">
        <text:list-item>
          <text:p text:style-name="P275"><text:span text:style-name="T276">Criação do FIFO (pipe nomeado)</text:span><text:span text:style-name="T277">: o programa cria um FIFO chamado fifo_pipe com permissões de leitura e escrita para todos os usuários (permissões 0666).</text:span></text:p>
        </text:list-item>
        <text:list-item>
          <text:p text:style-name="P278"><text:span text:style-name="T279">Criação dos Processos</text:span><text:span text:style-name="T280">: o programa cria três processos usando a função fork():<text:s/></text:span><text:span text:style-name="T281">Um</text:span><text:span text:style-name="T282"><text:s/>processo leitor que fica aguardando mensagens no FIFO.<text:s/></text:span><text:span text:style-name="T283">Dois</text:span><text:span text:style-name="T284"><text:s/>processos escritores que escrevem mensagens no FIFO.</text:span></text:p>
        </text:list-item>
        <text:list-item>
          <text:p text:style-name="P285"><text:span text:style-name="T286">Processo Leitor:</text:span><text:span text:style-name="T287"><text:s/>o processo leitor abre o FIFO em modo de leitura (O_RDONLY) e chama a função reader(fd) para ler as mensagens recebidas. A função reader(fd) lê continuamente mensagens do FIFO e as imprime na tela junto com o PID do escritor.</text:span></text:p>
        </text:list-item>
        <text:list-item>
          <text:p text:style-name="P288"><text:span text:style-name="T289">Processos Escritores:</text:span><text:span text:style-name="T290"><text:s/>cada processo escritor abre o FIFO em modo de escrita (O_WRONLY) e chama a função writer(fd) para escrever uma mensagem no FIFO. A função writer(fd) cria um pacote (PACKET) com uma mensagem (message) e o PID do escritor (writer_pid), e o escreve no FIFO.</text:span></text:p>
        </text:list-item>
        <text:list-item>
          <text:p text:style-name="P291"><text:span text:style-name="T292">Espera pelos Processos Filhos</text:span><text:span text:style-name="T293">: o processo pai espera a finalização dos três processos filhos utilizando a função wait(NULL). Isso garante que o programa principal aguarde a conclusão de todos os processos filhos antes de continuar.</text:span></text:p>
        </text:list-item>
        <text:list-item>
          <text:p text:style-name="P294"><text:span text:style-name="T295">Remoção do FIFO</text:span><text:span text:style-name="T296">: após todos os processos terminarem, o programa remove o FIFO da sistema utilizando a função unlink("fifo_pipe").</text:span></text:p>
        </text:list-item>
        <text:list-item>
          <text:p text:style-name="P297">Saída Esperada: como resultado, a saída esperada será a impressão das mensagens recebidas pelo processo leitor, junto com o PID do escritor que originou cada mensagem.</text:p>
        </text:list-item>
      </text:list>
      <text:p text:style-name="P298">Por exemplo, a saída pode ser algo como a Figura 7 abaixo:</text:p>
      <text:p text:style-name="P299"><text:span text:style-name="T300"><draw:frame draw:style-name="a11" draw:name="Picture 1" text:anchor-type="as-char" svg:x="0in" svg:y="0in" svg:width="5.90556in" svg:height="0.69444in" style:rel-width="scale" style:rel-height="scale"><draw:image xlink:href="media/image7.png" xlink:type="simple" xlink:show="embed" xlink:actuate="onLoad"/><svg:title/><svg:desc/></draw:frame></text:span></text:p>
      <text:p text:style-name="P301">Figura 7: resultado do multiwriter_single_reader.</text:p>
      <text:p text:style-name="P302"><text:span text:style-name="T303"><draw:frame draw:id="id5" draw:style-name="a12" draw:name="Text Box 2" text:anchor-type="as-char" svg:x="0in" svg:y="0in" svg:width="5.74792in" svg:height="7.23889in" style:rel-width="scale" style:rel-height="scale"><draw:text-box><text:p text:style-name="P304">#include &lt;stdio.h&gt;</text:p><text:p text:style-name="P305">#include &lt;stdlib.h&gt;</text:p><text:p text:style-name="P306">#include &lt;unistd.h&gt;</text:p><text:p text:style-name="P307">#include &lt;string.h&gt;</text:p><text:p text:style-name="P308">#include &lt;sys/types.h&gt;</text:p><text:p text:style-name="P309">#include &lt;sys/stat.h&gt;</text:p><text:p text:style-name="P310">#include<text:s/>&lt;fcntl.h&gt;</text:p><text:p text:style-name="P311">#include &lt;sys/wait.h&gt; // Incluindo a biblioteca para a função wait</text:p><text:p text:style-name="P312"/><text:p text:style-name="P313">#define PACKET_SIZE 100</text:p><text:p text:style-name="P314"/><text:p text:style-name="P315">typedef struct {</text:p><text:p text:style-name="P316"><text:s text:c="4"/>char message[PACKET_SIZE];</text:p><text:p text:style-name="P317"><text:s text:c="4"/>pid_t writer_pid;</text:p><text:p text:style-name="P318">} PACKET;</text:p><text:p text:style-name="P319"/><text:p text:style-name="P320">// Função para escritores</text:p><text:p text:style-name="P321">void writer(int fd) {</text:p><text:p text:style-name="P322"><text:s text:c="4"/>PACKET<text:s/>packet;</text:p><text:p text:style-name="P323"><text:span text:style-name="T324"><text:s text:c="4"/></text:span>packet.writer_pid = getpid(); // Obtém o PID do escritor atual</text:p><text:p text:style-name="P325"/><text:p text:style-name="P326"><text:s text:c="4"/>// Escreve uma mensagem no FIFO</text:p><text:p text:style-name="P327"><text:s text:c="4"/>strcpy(packet.message, "Mensagem do escritor");</text:p><text:p text:style-name="P328"><text:s text:c="4"/><text:span text:style-name="T329">write(fd, &amp;packet, sizeof(PACKET));</text:span></text:p><text:p text:style-name="P330">}</text:p><text:p text:style-name="P331"/><text:p text:style-name="P332">// Função para o leitor</text:p><text:p text:style-name="P333">void reader(int fd) {</text:p><text:p text:style-name="P334"><text:s text:c="4"/><text:span text:style-name="T335">PACKET packet;</text:span></text:p><text:p text:style-name="P336"><text:s text:c="4"/>int bytes_read;</text:p><text:p text:style-name="P337"/><text:p text:style-name="P338"><text:span text:style-name="T339"><text:s text:c="4"/></text:span>// Lê mensagens do FIFO e imprime junto com o PID do escritor</text:p><text:p text:style-name="P340"><text:s text:c="4"/><text:span text:style-name="T341">while ((bytes_read = read(fd, &amp;packet, sizeof(PACKET))) &gt; 0) {</text:span></text:p><text:p text:style-name="P342"><text:span text:style-name="T343"><text:s text:c="8"/></text:span>printf("Mensagem recebida: %s, escritor PID: %d\n", packet.message, packet.writer_pid);</text:p><text:p text:style-name="P344"><text:s text:c="4"/><text:span text:style-name="T345">}</text:span></text:p><text:p text:style-name="P346">}</text:p><text:p text:style-name="P347"/><text:p text:style-name="P348">int main() {</text:p><text:p text:style-name="P349"><text:s text:c="4"/>int fd;</text:p><text:p text:style-name="P350"><text:s text:c="4"/>pid_t pid;</text:p><text:p text:style-name="P351"/><text:p text:style-name="P352"><text:span text:style-name="T353"><text:s text:c="4"/></text:span>// Criando o FIFO (pipe nomeado)</text:p><text:p text:style-name="P354"><text:s text:c="4"/>mkfifo("fifo_pipe", 0666);</text:p><text:p text:style-name="P355"/><text:p text:style-name="P356"><text:s text:c="4"/>// Criando processo leitor</text:p><text:p text:style-name="P357"><text:s text:c="4"/>if ((pid = fork()) == 0) {</text:p><text:p text:style-name="P358"><text:s text:c="8"/>fd = open("fifo_pipe", O_RDONLY); // Abre o FIFO para<text:s/>leitura</text:p><text:p text:style-name="P359"><text:s text:c="8"/>reader(fd); // Chama a função leitor</text:p><text:p text:style-name="P360"><text:s text:c="8"/>close(fd);</text:p><text:p text:style-name="P361"><text:s text:c="8"/>exit(0);</text:p><text:p text:style-name="P362"><text:s text:c="4"/>}</text:p><text:p text:style-name="P363"/><text:p text:style-name="P364"><text:s text:c="4"/>// Criando processo escritor 1</text:p><text:p text:style-name="P365"><text:s text:c="4"/>if ((pid = fork()) == 0) {</text:p><text:p text:style-name="P366"><text:s text:c="8"/>fd = open("fifo_pipe", O_WRONLY); // Abre o FIFO para escrita</text:p><text:p text:style-name="P367"><text:s text:c="8"/>writer(fd); // Chama a função escritor</text:p><text:p text:style-name="P368"><text:s text:c="8"/>close(fd);</text:p><text:p text:style-name="P369"><text:s text:c="8"/>exit(0);</text:p><text:p text:style-name="P370"><text:s text:c="4"/>}</text:p><text:p text:style-name="P371"/><text:p text:style-name="P372"><text:s text:c="4"/>// Criando processo escritor 2</text:p><text:p text:style-name="P373"><text:s text:c="4"/>if ((pid = fork()) == 0) {</text:p><text:p text:style-name="P374"><text:s text:c="8"/>fd = open("fifo_pipe", O_WRONLY); // Abre o FIFO para escrita</text:p><text:p text:style-name="P375"><text:s text:c="8"/>writer(fd); // Chama a função escritor</text:p><text:p text:style-name="P376"><text:s text:c="8"/>close(fd);</text:p><text:p text:style-name="P377"><text:s text:c="8"/>exit(0);</text:p><text:p text:style-name="P378"><text:s text:c="4"/>}</text:p><text:p text:style-name="P379"/><text:p text:style-name="P380"><text:s text:c="4"/>// Espera pelos processos filhos</text:p><text:p text:style-name="P381"><text:s text:c="4"/><text:span text:style-name="T382">for (int i = 0; i &lt; 3; i++) {</text:span></text:p><text:p text:style-name="P383"><text:s text:c="8"/>wait(NULL);</text:p><text:p text:style-name="P384"><text:s text:c="4"/>}</text:p><text:p text:style-name="P385"/><text:p text:style-name="P386"><text:s text:c="4"/>// Remove o FIFO</text:p><text:p text:style-name="P387"><text:s text:c="4"/>unlink("fifo_pipe");</text:p><text:p text:style-name="P388"/><text:p text:style-name="P389"><text:s text:c="4"/>return 0;</text:p><text:p text:style-name="P390">}</text:p></draw:text-box><svg:title/><svg:desc/></draw:frame></text:span></text:p>
      <text:soft-page-break/>
      <text:p text:style-name="P391"><text:span text:style-name="T392"><draw:frame draw:id="id6" draw:style-name="a13" draw:name="Text Box 2" text:anchor-type="as-char" svg:x="0in" svg:y="0in" svg:width="5.74792in" svg:height="9.46875in" style:rel-width="scale" style:rel-height="scale"><draw:text-box><text:p text:style-name="P393">// Função para o leitor</text:p><text:p text:style-name="P394">void<text:s/>reader(int fd) {</text:p><text:p text:style-name="P395"><text:s text:c="4"/><text:span text:style-name="T396">PACKET packet;</text:span></text:p><text:p text:style-name="P397"><text:s text:c="4"/>int bytes_read;</text:p><text:p text:style-name="P398"/><text:p text:style-name="P399"><text:span text:style-name="T400"><text:s text:c="4"/></text:span>// Lê mensagens do FIFO e imprime junto com o PID do escritor</text:p><text:p text:style-name="P401"><text:s text:c="4"/><text:span text:style-name="T402">while ((bytes_read = read(fd, &amp;packet, sizeof(PACKET))) &gt; 0) {</text:span></text:p><text:p text:style-name="P403"><text:span text:style-name="T404"><text:s text:c="8"/></text:span>printf("Mensagem recebida: %s, escritor PID: %d\n", packet.message, packet.writer_pid);</text:p><text:p text:style-name="P405"><text:s text:c="4"/><text:span text:style-name="T406">}</text:span></text:p><text:p text:style-name="P407">}</text:p><text:p text:style-name="P408"/><text:p text:style-name="P409">int main() {</text:p><text:p text:style-name="P410"><text:s text:c="4"/>int fd;</text:p><text:p text:style-name="P411"><text:s text:c="4"/>pid_t pid;</text:p><text:p text:style-name="P412"/><text:p text:style-name="P413"><text:span text:style-name="T414"><text:s text:c="4"/></text:span>// Criando o FIFO (pipe nomeado)</text:p><text:p text:style-name="P415"><text:s text:c="4"/>mkfifo("fifo_pipe", 0666);</text:p><text:p text:style-name="P416"/><text:p text:style-name="P417"><text:s text:c="4"/>// Criando processo leitor</text:p><text:p text:style-name="P418"><text:s text:c="4"/>if ((pid = fork()) == 0) {</text:p><text:p text:style-name="P419"><text:s text:c="8"/>fd =<text:s/>open("fifo_pipe", O_RDONLY); // Abre o FIFO para leitura</text:p><text:p text:style-name="P420"><text:s text:c="8"/>reader(fd); // Chama a função leitor</text:p><text:p text:style-name="P421"><text:s text:c="8"/>close(fd);</text:p><text:p text:style-name="P422"><text:s text:c="8"/>exit(0);</text:p><text:p text:style-name="P423"><text:s text:c="4"/>}</text:p><text:p text:style-name="P424"/><text:p text:style-name="P425"><text:s text:c="4"/>// Criando processo escritor 1</text:p><text:p text:style-name="P426"><text:s text:c="4"/>if ((pid = fork()) == 0) {</text:p><text:p text:style-name="P427"><text:s text:c="8"/>fd = open("fifo_pipe", O_WRONLY); // Abre o FIFO para escrita</text:p><text:p text:style-name="P428"><text:s text:c="8"/>writer(fd); // Chama a função escritor</text:p><text:p text:style-name="P429"><text:s text:c="8"/>close(fd);</text:p><text:p text:style-name="P430"><text:s text:c="8"/>exit(0);</text:p><text:p text:style-name="P431"><text:s text:c="4"/>}</text:p><text:p text:style-name="P432"/><text:p text:style-name="P433"><text:s text:c="4"/>// Criando processo escritor 2</text:p><text:p text:style-name="P434"><text:s text:c="4"/>if ((pid = fork()) == 0) {</text:p><text:p text:style-name="P435"><text:s text:c="8"/>fd = open("fifo_pipe", O_WRONLY); // Abre o FIFO para escrita</text:p><text:p text:style-name="P436"><text:s text:c="8"/>writer(fd); // Chama a função escritor</text:p><text:p text:style-name="P437"><text:s text:c="8"/>close(fd);</text:p><text:p text:style-name="P438"><text:s text:c="8"/>exit(0);</text:p><text:p text:style-name="P439"><text:s text:c="4"/>}</text:p><text:p text:style-name="P440"/><text:p text:style-name="P441"><text:s text:c="4"/>// Espera pelos processos filhos</text:p><text:p text:style-name="P442"><text:s text:c="4"/><text:span text:style-name="T443">for (int i = 0; i &lt; 3; i++) {</text:span></text:p><text:p text:style-name="P444"><text:s text:c="8"/>wait(NULL);</text:p><text:p text:style-name="P445"><text:s text:c="4"/>}</text:p><text:p text:style-name="P446"/><text:p text:style-name="P447"><text:s text:c="4"/>// Remove o FIFO</text:p><text:p text:style-name="P448"><text:s text:c="4"/>unlink("fifo_pipe");</text:p><text:p text:style-name="P449"/><text:p text:style-name="P450"><text:s text:c="4"/>return 0;</text:p><text:p text:style-name="P451">}</text:p></draw:text-box><svg:title/><svg:desc/></draw:frame></text:span></text:p>
      <text:soft-page-break/>
      <text:p text:style-name="P452"><text:span text:style-name="T453"><draw:frame draw:id="id7" draw:style-name="a14" draw:name="Text Box 2" text:anchor-type="as-char" svg:x="0in" svg:y="0in" svg:width="5.74792in" svg:height="5.15625in" style:rel-width="scale" style:rel-height="scale"><draw:text-box><text:p text:style-name="P454"><text:s text:c="4"/>// Criando processo escritor 2</text:p><text:p text:style-name="P455"><text:s text:c="4"/>if ((pid = fork()) == 0) {</text:p><text:p text:style-name="P456"><text:s text:c="8"/>fd = open("fifo_pipe", O_WRONLY); // Abre o FIFO para escrita</text:p><text:p text:style-name="P457"><text:s text:c="8"/>writer(fd); // Chama a função escritor</text:p><text:p text:style-name="P458"><text:s text:c="8"/>close(fd);</text:p><text:p text:style-name="P459"><text:s text:c="8"/>exit(0);</text:p><text:p text:style-name="P460"><text:s text:c="4"/>}</text:p><text:p text:style-name="P461"/><text:p text:style-name="P462"><text:s text:c="4"/>// Espera pelos processos filhos</text:p><text:p text:style-name="P463"><text:s text:c="4"/><text:span text:style-name="T464">for (int i = 0; i &lt; 3; i++) {</text:span></text:p><text:p text:style-name="P465"><text:s text:c="8"/>wait(NULL);</text:p><text:p text:style-name="P466"><text:s text:c="4"/>}</text:p><text:p text:style-name="P467"/><text:p text:style-name="P468"><text:s text:c="4"/>// Remove o FIFO</text:p><text:p text:style-name="P469"><text:s text:c="4"/>unlink("fifo_pipe");</text:p><text:p text:style-name="P470"/><text:p text:style-name="P471"><text:s text:c="4"/>return 0;</text:p><text:p text:style-name="P472">}</text:p></draw:text-box><svg:title/><svg:desc/></draw:frame></text:span></text:p>
      <text:p text:style-name="P473">Codigo 4: Conteudo do arquivo multiwriter_single_reader.c.</text:p>
      <text:list text:style-name="LFO8" text:continue-numbering="true">
        <text:list-item>
          <text:list>
            <text:list-item>
              <text:p text:style-name="P474">Exerc<text:span text:style-name="T475">í</text:span>cio letra D</text:p>
            </text:list-item>
          </text:list>
        </text:list-item>
      </text:list>
      <text:p text:style-name="P476"><text:span text:style-name="T477">Como você implementaria o exercício da<text:s/></text:span><text:span text:style-name="T478">letra (c) usando sockets TCP? Forneça um exemplo de código usando um único leitor e um escritor. Use a definição de PACKET fornecida. Como generalizar a solução para múltiplos escritores? É possível? Explique</text:span><text:span text:style-name="T479">.<text:s/></text:span></text:p>
      <text:p text:style-name="P480"><text:span text:style-name="T481">Dica: quem será o cliente? Quem será o servidor?</text:span></text:p>
      <text:p text:style-name="P482">Para implementar o exercício utilizando sockets TCP, precisaríamos de um servidor (responsável por receber as mensagens dos escritores) e um cliente (responsável por enviar as mensagens). No contexto do exercício, o servidor (Codigo 5) seria o processo leitor e o cliente (Codigo 6) seria o processo escritor.</text:p>
      <text:p text:style-name="P483"><text:span text:style-name="T484"><draw:frame draw:id="id8" draw:style-name="a15" draw:name="Text Box 2" text:anchor-type="as-char" svg:x="0in" svg:y="0in" svg:width="5.74792in" svg:height="1.21875in" style:rel-width="scale" style:rel-height="scale"><draw:text-box><text:p text:style-name="P485">#include &lt;stdio.h&gt;</text:p><text:p text:style-name="P486">#include &lt;stdlib.h&gt;</text:p><text:p text:style-name="P487">#include &lt;unistd.h&gt;</text:p><text:p text:style-name="P488">#include &lt;string.h&gt;</text:p><text:p text:style-name="P489">#include &lt;sys/types.h&gt;</text:p><text:p text:style-name="P490">#include &lt;sys/socket.h&gt;</text:p><text:p text:style-name="P491">#include &lt;netinet/in.h&gt;</text:p><text:p text:style-name="P492"/><text:p text:style-name="P493">#define PORT 8080</text:p><text:p text:style-name="P494">#define PACKET_SIZE 100</text:p><text:p text:style-name="P495"/><text:p text:style-name="P496">typedef struct {</text:p><text:p text:style-name="P497"><text:s text:c="4"/>char message[PACKET_SIZE];</text:p><text:p text:style-name="P498"><text:s text:c="4"/>pid_t writer_pid;</text:p><text:p text:style-name="P499">} PACKET;</text:p><text:p text:style-name="P500"/><text:p text:style-name="P501">int main() {</text:p><text:p text:style-name="P502"><text:s text:c="4"/>int sockfd, newsockfd, clilen;</text:p><text:p text:style-name="P503"><text:s text:c="4"/>struct sockaddr_in serv_addr, cli_addr;</text:p><text:p text:style-name="P504"><text:s text:c="4"/>PACKET packet;</text:p><text:p text:style-name="P505"/><text:p text:style-name="P506"><text:s text:c="4"/>// Criando socket TCP</text:p><text:p text:style-name="P507"><text:s text:c="4"/>sockfd =<text:s/>socket(AF_INET, SOCK_STREAM, 0);</text:p><text:p text:style-name="P508"><text:span text:style-name="T509"><text:s text:c="4"/></text:span>if (sockfd &lt; 0) {</text:p><text:p text:style-name="P510"><text:s text:c="8"/>perror("Erro ao abrir o socket");</text:p><text:p text:style-name="P511"><text:s text:c="8"/>exit(EXIT_FAILURE);</text:p><text:p text:style-name="P512"><text:s text:c="4"/>}</text:p><text:p text:style-name="P513"/><text:p text:style-name="P514"><text:s text:c="4"/>// Configurando endereço do servidor</text:p><text:p text:style-name="P515"><text:s text:c="4"/><text:span text:style-name="T516">memset((char *) &amp;serv_addr, 0, sizeof(serv_addr));</text:span></text:p><text:p text:style-name="P517"><text:s text:c="4"/>serv_addr.sin_family = AF_INET;</text:p><text:p text:style-name="P518"><text:s text:c="4"/>serv_addr.sin_addr.s_addr = INADDR_ANY;</text:p><text:p text:style-name="P519"><text:s text:c="4"/>serv_addr.sin_port = htons(PORT);</text:p><text:p text:style-name="P520"/><text:p text:style-name="P521"><text:span text:style-name="T522"><text:s text:c="4"/></text:span>// Ligando o socket ao endereço do servidor</text:p><text:p text:style-name="P523"><text:s text:c="4"/><text:span text:style-name="T524">if (bind(sockfd, (struct sockaddr *) &amp;serv_addr, sizeof(serv_addr)) &lt; 0) {</text:span></text:p><text:p text:style-name="P525"><text:span text:style-name="T526"><text:s text:c="8"/></text:span>perror("Erro ao fazer bind");</text:p><text:p text:style-name="P527"><text:s text:c="8"/><text:span text:style-name="T528">exit(EXIT_FAILURE);</text:span></text:p><text:p text:style-name="P529"><text:s text:c="4"/>}</text:p><text:p text:style-name="P530"/><text:p text:style-name="P531"><text:s text:c="4"/>// Aguardando conexões</text:p><text:p text:style-name="P532"><text:s text:c="4"/>listen(sockfd, 5);</text:p><text:p text:style-name="P533"><text:s text:c="4"/>clilen = sizeof(cli_addr);</text:p><text:p text:style-name="P534"/><text:p text:style-name="P535"><text:s text:c="4"/>// Aceitando conexão do escritor</text:p><text:p text:style-name="P536"><text:s text:c="4"/>newsockfd = accept(sockfd, (struct sockaddr *) &amp;cli_addr,<text:s/>&amp;clilen);</text:p><text:p text:style-name="P537"><text:s text:c="4"/>if (newsockfd &lt; 0) {</text:p><text:p text:style-name="P538"><text:span text:style-name="T539"><text:s text:c="8"/></text:span>perror("Erro ao aceitar conexão");</text:p><text:p text:style-name="P540"><text:s text:c="8"/>exit(EXIT_FAILURE);</text:p><text:p text:style-name="P541"><text:s text:c="4"/>}</text:p><text:p text:style-name="P542"/><text:p text:style-name="P543"><text:s text:c="4"/>// Recebendo mensagem do escritor</text:p><text:p text:style-name="P544"><text:s text:c="4"/><text:span text:style-name="T545">read(newsockfd, &amp;packet, sizeof(PACKET));</text:span></text:p><text:p text:style-name="P546"><text:span text:style-name="T547"><text:s text:c="4"/></text:span>printf("Mensagem recebida: %s, escritor PID: %d\n", packet.message, packet.writer_pid);</text:p><text:p text:style-name="P548"/><text:p text:style-name="P549"><text:s text:c="4"/><text:span text:style-name="T550">close(newsockfd);</text:span></text:p><text:p text:style-name="P551"><text:s text:c="4"/>close(sockfd);</text:p><text:p text:style-name="P552"/><text:p text:style-name="P553"><text:s text:c="4"/>return 0;</text:p><text:p text:style-name="P554"><text:span text:style-name="T555">}</text:span></text:p></draw:text-box><svg:title/><svg:desc/></draw:frame></text:span></text:p>
      <text:soft-page-break/>
      <text:p text:style-name="P556"><text:span text:style-name="T557"><draw:frame draw:id="id9" draw:style-name="a16" draw:name="Text Box 2" text:anchor-type="as-char" svg:x="0in" svg:y="0in" svg:width="5.74792in" svg:height="9.21806in" style:rel-width="scale" style:rel-height="scale"><draw:text-box><text:p text:style-name="P558">#include &lt;sys/types.h&gt;</text:p><text:p text:style-name="P559">#include &lt;sys/socket.h&gt;</text:p><text:p text:style-name="P560">#include &lt;netinet/in.h&gt;</text:p><text:p text:style-name="P561"/><text:p text:style-name="P562">#define PORT 8080</text:p><text:p text:style-name="P563">#define PACKET_SIZE 100</text:p><text:p text:style-name="P564"/><text:p text:style-name="P565">typedef struct {</text:p><text:p text:style-name="P566"><text:s text:c="4"/>char<text:s/>message[PACKET_SIZE];</text:p><text:p text:style-name="P567"><text:s text:c="4"/>pid_t writer_pid;</text:p><text:p text:style-name="P568">} PACKET;</text:p><text:p text:style-name="P569"/><text:p text:style-name="P570">int main() {</text:p><text:p text:style-name="P571"><text:s text:c="4"/>int sockfd, newsockfd, clilen;</text:p><text:p text:style-name="P572"><text:s text:c="4"/>struct sockaddr_in serv_addr, cli_addr;</text:p><text:p text:style-name="P573"><text:s text:c="4"/>PACKET packet;</text:p><text:p text:style-name="P574"/><text:p text:style-name="P575"><text:s text:c="4"/>// Criando socket TCP</text:p><text:p text:style-name="P576"><text:s text:c="4"/>sockfd = socket(AF_INET, SOCK_STREAM, 0);</text:p><text:p text:style-name="P577"><text:span text:style-name="T578"><text:s text:c="4"/></text:span>if<text:s/>(sockfd &lt; 0) {</text:p><text:p text:style-name="P579"><text:s text:c="8"/>perror("Erro ao abrir o socket");</text:p><text:p text:style-name="P580"><text:s text:c="8"/>exit(EXIT_FAILURE);</text:p><text:p text:style-name="P581"><text:s text:c="4"/>}</text:p><text:p text:style-name="P582"/><text:p text:style-name="P583"><text:s text:c="4"/>// Configurando endereço do servidor</text:p><text:p text:style-name="P584"><text:s text:c="4"/><text:span text:style-name="T585">memset((char *) &amp;serv_addr, 0, sizeof(serv_addr));</text:span></text:p><text:p text:style-name="P586"><text:s text:c="4"/>serv_addr.sin_family = AF_INET;</text:p><text:p text:style-name="P587"><text:s text:c="4"/>serv_addr.sin_addr.s_addr = INADDR_ANY;</text:p><text:p text:style-name="P588"><text:s text:c="4"/>serv_addr.sin_port = htons(PORT);</text:p><text:p text:style-name="P589"/><text:p text:style-name="P590"><text:span text:style-name="T591"><text:s text:c="4"/></text:span>// Ligando o socket ao endereço do servidor</text:p><text:p text:style-name="P592"><text:s text:c="4"/><text:span text:style-name="T593">if (bind(sockfd, (struct sockaddr *) &amp;serv_addr, sizeof(serv_addr)) &lt; 0) {</text:span></text:p><text:p text:style-name="P594"><text:span text:style-name="T595"><text:s text:c="8"/></text:span>perror("Erro ao fazer bind");</text:p><text:p text:style-name="P596"><text:s text:c="8"/><text:span text:style-name="T597">exit(EXIT_FAILURE);</text:span></text:p><text:p text:style-name="P598"><text:s text:c="4"/>}</text:p><text:p text:style-name="P599"/><text:p text:style-name="P600"><text:s text:c="4"/>// Aguardando conexões</text:p><text:p text:style-name="P601"><text:s text:c="4"/>listen(sockfd, 5);</text:p><text:p text:style-name="P602"><text:s text:c="4"/>clilen = sizeof(cli_addr);</text:p><text:p text:style-name="P603"/><text:p text:style-name="P604"><text:s text:c="4"/>// Aceitando conexão do escritor</text:p><text:p text:style-name="P605"><text:s text:c="4"/>newsockfd = accept(sockfd, (struct sockaddr *) &amp;cli_addr, &amp;clilen);</text:p><text:p text:style-name="P606"><text:s text:c="4"/>if (newsockfd &lt; 0) {</text:p><text:p text:style-name="P607"><text:span text:style-name="T608"><text:s text:c="8"/></text:span>perror("Erro ao aceitar<text:s/>conexão");</text:p><text:p text:style-name="P609"><text:s text:c="8"/>exit(EXIT_FAILURE);</text:p><text:p text:style-name="P610"><text:s text:c="4"/>}</text:p><text:p text:style-name="P611"/><text:p text:style-name="P612"><text:s text:c="4"/>// Recebendo mensagem do escritor</text:p><text:p text:style-name="P613"><text:s text:c="4"/><text:span text:style-name="T614">read(newsockfd, &amp;packet, sizeof(PACKET));</text:span></text:p><text:p text:style-name="P615"><text:span text:style-name="T616"><text:s text:c="4"/></text:span>printf("Mensagem recebida: %s, escritor PID: %d\n", packet.message, packet.writer_pid);</text:p><text:p text:style-name="P617"/><text:p text:style-name="P618"><text:s text:c="4"/><text:span text:style-name="T619">close(newsockfd);</text:span></text:p><text:p text:style-name="P620"><text:s text:c="4"/>close(sockfd);</text:p><text:p text:style-name="P621"/><text:p text:style-name="P622"><text:s text:c="4"/>return 0;</text:p><text:p text:style-name="P623"><text:span text:style-name="T624">}</text:span></text:p></draw:text-box><svg:title/><svg:desc/></draw:frame></text:span></text:p>
      <text:soft-page-break/>
      <text:p text:style-name="P625"><text:span text:style-name="T626"><draw:frame draw:id="id10" draw:style-name="a17" draw:name="Text Box 2" text:anchor-type="as-char" svg:x="0in" svg:y="0in" svg:width="5.74792in" svg:height="6.67639in" style:rel-width="scale" style:rel-height="scale"><draw:text-box><text:p text:style-name="P627"><text:s text:c="8"/><text:span text:style-name="T628">exit(EXIT_FAILURE);</text:span></text:p><text:p text:style-name="P629"><text:s text:c="4"/>}</text:p><text:p text:style-name="P630"/><text:p text:style-name="P631"><text:s text:c="4"/>// Aguardando conexões</text:p><text:p text:style-name="P632"><text:s text:c="4"/>listen(sockfd, 5);</text:p><text:p text:style-name="P633"><text:s text:c="4"/>clilen = sizeof(cli_addr);</text:p><text:p text:style-name="P634"/><text:p text:style-name="P635"><text:s text:c="4"/>// Aceitando conexão do escritor</text:p><text:p text:style-name="P636"><text:s text:c="4"/>newsockfd = accept(sockfd, (struct sockaddr *) &amp;cli_addr,<text:s/>&amp;clilen);</text:p><text:p text:style-name="P637"><text:s text:c="4"/>if (newsockfd &lt; 0) {</text:p><text:p text:style-name="P638"><text:span text:style-name="T639"><text:s text:c="8"/></text:span>perror("Erro ao aceitar conexão");</text:p><text:p text:style-name="P640"><text:s text:c="8"/>exit(EXIT_FAILURE);</text:p><text:p text:style-name="P641"><text:s text:c="4"/>}</text:p><text:p text:style-name="P642"/><text:p text:style-name="P643"><text:s text:c="4"/>// Recebendo mensagem do escritor</text:p><text:p text:style-name="P644"><text:s text:c="4"/><text:span text:style-name="T645">read(newsockfd, &amp;packet, sizeof(PACKET));</text:span></text:p><text:p text:style-name="P646"><text:span text:style-name="T647"><text:s text:c="4"/></text:span>printf("Mensagem recebida: %s, escritor PID: %d\n", packet.message, packet.writer_pid);</text:p><text:p text:style-name="P648"/><text:p text:style-name="P649"><text:s text:c="4"/><text:span text:style-name="T650">close(newsockfd);</text:span></text:p><text:p text:style-name="P651"><text:s text:c="4"/>close(sockfd);</text:p><text:p text:style-name="P652"/><text:p text:style-name="P653"><text:s text:c="4"/>return 0;</text:p><text:p text:style-name="P654"><text:span text:style-name="T655">}</text:span></text:p></draw:text-box><svg:title/><svg:desc/></draw:frame></text:span></text:p>
      <text:p text:style-name="P656">Codigo 5: Conteudo do arquivo servidor.c.</text:p>
      <text:p text:style-name="P657"><text:span text:style-name="T658"><draw:frame draw:id="id11" draw:style-name="a18" draw:name="Text Box 2" text:anchor-type="as-char" svg:x="0in" svg:y="0in" svg:width="5.74792in" svg:height="2.04167in" style:rel-width="scale" style:rel-height="scale"><draw:text-box><text:p text:style-name="P659">#include &lt;stdio.h&gt;</text:p><text:p text:style-name="P660">#include &lt;stdlib.h&gt;</text:p><text:p text:style-name="P661">#include &lt;unistd.h&gt;</text:p><text:p text:style-name="P662">#include &lt;string.h&gt;</text:p><text:p text:style-name="P663">#include &lt;sys/types.h&gt;</text:p><text:p text:style-name="P664">#include &lt;sys/socket.h&gt;</text:p><text:p text:style-name="P665">#include &lt;netinet/in.h&gt;</text:p><text:p text:style-name="P666">#include &lt;netdb.h&gt;</text:p><text:p text:style-name="P667"/><text:p text:style-name="P668">#define PORT 8080</text:p><text:p text:style-name="P669">#define PACKET_SIZE 100</text:p><text:p text:style-name="P670"/><text:p text:style-name="P671">typedef struct {</text:p><text:p text:style-name="P672"><text:s text:c="4"/>char message[PACKET_SIZE];</text:p><text:p text:style-name="P673"><text:s text:c="4"/>pid_t writer_pid;</text:p><text:p text:style-name="P674">} PACKET;</text:p><text:p text:style-name="P675"/><text:p text:style-name="P676">int main() {</text:p><text:p text:style-name="P677"><text:s text:c="4"/>int sockfd;</text:p><text:p text:style-name="P678"><text:s text:c="4"/>struct sockaddr_in serv_addr;</text:p><text:p text:style-name="P679"><text:s text:c="4"/>struct<text:s/>hostent *server;</text:p><text:p text:style-name="P680"><text:s text:c="4"/>PACKET packet;</text:p><text:p text:style-name="P681"/><text:p text:style-name="P682"><text:s text:c="4"/>// Criando socket TCP</text:p><text:p text:style-name="P683"><text:s text:c="4"/>sockfd = socket(AF_INET, SOCK_STREAM, 0);</text:p><text:p text:style-name="P684"><text:span text:style-name="T685"><text:s text:c="4"/></text:span>if (sockfd &lt; 0) {</text:p><text:p text:style-name="P686"><text:s text:c="8"/>perror("Erro ao abrir o socket");</text:p><text:p text:style-name="P687"><text:s text:c="8"/>exit(EXIT_FAILURE);</text:p><text:p text:style-name="P688"><text:s text:c="4"/>}</text:p><text:p text:style-name="P689"/><text:p text:style-name="P690"><text:s text:c="4"/>// Configurando endereço do servidor</text:p><text:p text:style-name="P691"><text:s text:c="4"/><text:span text:style-name="T692">server = gethostbyname("localhost");</text:span></text:p><text:p text:style-name="P693"><text:s text:c="4"/>if (server == NULL) {</text:p><text:p text:style-name="P694"><text:span text:style-name="T695"><text:s text:c="8"/></text:span>fprintf(stderr, "Erro, host não encontrado\n");</text:p><text:p text:style-name="P696"><text:s text:c="8"/><text:span text:style-name="T697">exit(EXIT_FAILURE);</text:span></text:p><text:p text:style-name="P698"><text:s text:c="4"/>}</text:p><text:p text:style-name="P699"><text:s text:c="4"/>memset((char *) &amp;serv_addr, 0, sizeof(serv_addr));</text:p><text:p text:style-name="P700"><text:s text:c="4"/>serv_addr.sin_family = AF_INET;</text:p><text:p text:style-name="P701"><text:s text:c="4"/>memcpy((char *)&amp;serv_addr.sin_addr.s_addr, (char *)server-&gt;h_addr, server-&gt;h_length);</text:p><text:p text:style-name="P702"><text:s text:c="4"/>serv_addr.sin_port = htons(PORT);</text:p><text:p text:style-name="P703"/><text:p text:style-name="P704"><text:s text:c="4"/>// Conectando ao servidor</text:p><text:p text:style-name="P705"><text:s text:c="4"/>if (connect(sockfd, (struct sockaddr *) &amp;serv_addr, sizeof(serv_addr)) &lt; 0) {</text:p><text:p text:style-name="P706"><text:span text:style-name="T707"><text:s text:c="8"/></text:span>perror("Erro ao conectar");</text:p><text:p text:style-name="P708"><text:s text:c="8"/>exit(EXIT_FAILURE);</text:p><text:p text:style-name="P709"><text:s text:c="4"/>}</text:p><text:p text:style-name="P710"/><text:p text:style-name="P711"><text:s text:c="4"/>// Preenchendo a estrutura de pacote com uma mensagem</text:p><text:p text:style-name="P712"><text:s text:c="4"/>strcpy(packet.message, "Mensagem do escritor");</text:p><text:p text:style-name="P713"><text:s text:c="4"/>packet.writer_pid = getpid();</text:p><text:p text:style-name="P714"/><text:p text:style-name="P715"><text:s text:c="4"/>// Enviando mensagem para o servidor</text:p><text:p text:style-name="P716"><text:s text:c="4"/><text:span text:style-name="T717">write(sockfd, &amp;packet, sizeof(PACKET));</text:span></text:p><text:p text:style-name="P718"/><text:p text:style-name="P719"><text:s text:c="4"/>close(sockfd);</text:p><text:p text:style-name="P720"/><text:p text:style-name="P721"><text:s text:c="4"/>return 0;</text:p><text:p text:style-name="P722"><text:span text:style-name="T723">}</text:span></text:p></draw:text-box><svg:title/><svg:desc/></draw:frame></text:span><text:soft-page-break/><text:span text:style-name="T724"><draw:frame draw:id="id12" draw:style-name="a19" draw:name="Text Box 2" text:anchor-type="as-char" svg:x="0in" svg:y="0in" svg:width="5.74792in" svg:height="9.08264in" style:rel-width="scale" style:rel-height="scale"><draw:text-box><text:p text:style-name="P725">#include &lt;netdb.h&gt;</text:p><text:p text:style-name="P726"/><text:p text:style-name="P727">#define PORT 8080</text:p><text:p text:style-name="P728">#define PACKET_SIZE 100</text:p><text:p text:style-name="P729"/><text:p text:style-name="P730">typedef struct {</text:p><text:p text:style-name="P731"><text:s text:c="4"/>char message[PACKET_SIZE];</text:p><text:p text:style-name="P732"><text:s text:c="4"/>pid_t writer_pid;</text:p><text:p text:style-name="P733">} PACKET;</text:p><text:p text:style-name="P734"/><text:p text:style-name="P735">int main() {</text:p><text:p text:style-name="P736"><text:s text:c="4"/>int sockfd;</text:p><text:p text:style-name="P737"><text:s text:c="4"/>struct<text:s/>sockaddr_in serv_addr;</text:p><text:p text:style-name="P738"><text:s text:c="4"/>struct hostent *server;</text:p><text:p text:style-name="P739"><text:s text:c="4"/>PACKET packet;</text:p><text:p text:style-name="P740"/><text:p text:style-name="P741"><text:s text:c="4"/>// Criando socket TCP</text:p><text:p text:style-name="P742"><text:s text:c="4"/>sockfd = socket(AF_INET, SOCK_STREAM, 0);</text:p><text:p text:style-name="P743"><text:span text:style-name="T744"><text:s text:c="4"/></text:span>if (sockfd &lt; 0) {</text:p><text:p text:style-name="P745"><text:s text:c="8"/>perror("Erro ao abrir o socket");</text:p><text:p text:style-name="P746"><text:s text:c="8"/>exit(EXIT_FAILURE);</text:p><text:p text:style-name="P747"><text:s text:c="4"/>}</text:p><text:p text:style-name="P748"/><text:p text:style-name="P749"><text:s text:c="4"/>// Configurando endereço do servidor</text:p><text:p text:style-name="P750"><text:s text:c="4"/><text:span text:style-name="T751">server = gethostbyname("localhost");</text:span></text:p><text:p text:style-name="P752"><text:s text:c="4"/>if (server == NULL) {</text:p><text:p text:style-name="P753"><text:span text:style-name="T754"><text:s text:c="8"/></text:span>fprintf(stderr, "Erro, host não encontrado\n");</text:p><text:p text:style-name="P755"><text:s text:c="8"/><text:span text:style-name="T756">exit(EXIT_FAILURE);</text:span></text:p><text:p text:style-name="P757"><text:s text:c="4"/>}</text:p><text:p text:style-name="P758"><text:s text:c="4"/>memset((char *) &amp;serv_addr, 0, sizeof(serv_addr));</text:p><text:p text:style-name="P759"><text:s text:c="4"/>serv_addr.sin_family = AF_INET;</text:p><text:p text:style-name="P760"><text:s text:c="4"/>memcpy((char *)&amp;serv_addr.sin_addr.s_addr, (char *)server-&gt;h_addr, server-&gt;h_length);</text:p><text:p text:style-name="P761"><text:s text:c="4"/>serv_addr.sin_port = htons(PORT);</text:p><text:p text:style-name="P762"/><text:p text:style-name="P763"><text:s text:c="4"/>// Conectando ao servidor</text:p><text:p text:style-name="P764"><text:s text:c="4"/>if (connect(sockfd, (struct sockaddr *) &amp;serv_addr,<text:s/>sizeof(serv_addr)) &lt; 0) {</text:p><text:p text:style-name="P765"><text:span text:style-name="T766"><text:s text:c="8"/></text:span>perror("Erro ao conectar");</text:p><text:p text:style-name="P767"><text:s text:c="8"/>exit(EXIT_FAILURE);</text:p><text:p text:style-name="P768"><text:s text:c="4"/>}</text:p><text:p text:style-name="P769"/><text:p text:style-name="P770"><text:s text:c="4"/>// Preenchendo a estrutura de pacote com uma mensagem</text:p><text:p text:style-name="P771"><text:s text:c="4"/>strcpy(packet.message, "Mensagem do escritor");</text:p><text:p text:style-name="P772"><text:s text:c="4"/>packet.writer_pid = getpid();</text:p><text:p text:style-name="P773"/><text:p text:style-name="P774"><text:s text:c="4"/>// Enviando mensagem para o servidor</text:p><text:p text:style-name="P775"><text:s text:c="4"/><text:span text:style-name="T776">write(sockfd, &amp;packet, sizeof(PACKET));</text:span></text:p><text:p text:style-name="P777"/><text:p text:style-name="P778"><text:s text:c="4"/>close(sockfd);</text:p><text:p text:style-name="P779"/><text:p text:style-name="P780"><text:s text:c="4"/>return 0;</text:p><text:p text:style-name="P781"><text:span text:style-name="T782">}</text:span></text:p></draw:text-box><svg:title/><svg:desc/></draw:frame></text:span><text:soft-page-break/><text:span text:style-name="T783"><draw:frame draw:id="id13" draw:style-name="a20" draw:name="Text Box 2" text:anchor-type="as-char" svg:x="0in" svg:y="0in" svg:width="5.74792in" svg:height="4.83264in" style:rel-width="scale" style:rel-height="scale"><draw:text-box><text:p text:style-name="P784"><text:s text:c="4"/>serv_addr.sin_port = htons(PORT);</text:p><text:p text:style-name="P785"/><text:p text:style-name="P786"><text:s text:c="4"/>// Conectando ao servidor</text:p><text:p text:style-name="P787"><text:s text:c="4"/>if (connect(sockfd, (struct sockaddr *) &amp;serv_addr, sizeof(serv_addr)) &lt; 0) {</text:p><text:p text:style-name="P788"><text:span text:style-name="T789"><text:s text:c="8"/></text:span>perror("Erro ao conectar");</text:p><text:p text:style-name="P790"><text:s text:c="8"/>exit(EXIT_FAILURE);</text:p><text:p text:style-name="P791"><text:s text:c="4"/>}</text:p><text:p text:style-name="P792"/><text:p text:style-name="P793"><text:s text:c="4"/>// Preenchendo a estrutura de pacote com uma mensagem</text:p><text:p text:style-name="P794"><text:s text:c="4"/>strcpy(packet.message, "Mensagem do escritor");</text:p><text:p text:style-name="P795"><text:s text:c="4"/>packet.writer_pid = getpid();</text:p><text:p text:style-name="P796"/><text:p text:style-name="P797"><text:s text:c="4"/>// Enviando mensagem para o<text:s/>servidor</text:p><text:p text:style-name="P798"><text:s text:c="4"/><text:span text:style-name="T799">write(sockfd, &amp;packet, sizeof(PACKET));</text:span></text:p><text:p text:style-name="P800"><text:s text:c="4"/>close(sockfd);</text:p><text:p text:style-name="P801"><text:s text:c="4"/>return 0;</text:p><text:p text:style-name="P802"><text:span text:style-name="T803">}</text:span></text:p></draw:text-box><svg:title/><svg:desc/></draw:frame></text:span></text:p>
      <text:p text:style-name="P804">Codigo 6: Conteudo do arquivo cliente.c.</text:p>
      <text:p text:style-name="SBCparagraph"><text:span text:style-name="T805">O<text:s/></text:span><text:span text:style-name="T806">servidor</text:span><text:span text:style-name="T807"><text:s/>inicia criando um socket TCP usando a função socket(). Esse socket será usado para aceitar conexões dos clientes. Em seguida, ele configura o endereço do servidor usando a estrutura sockaddr_in, especificando a família de endereços, o endereço IP e a porta. Após isso, ele associa o socket ao endereço do servidor usando a função bind(), que vincula o socket a um endereço específico. Se a ligação for bem-sucedida, o servidor aguarda conexões usando a função listen().</text:span></text:p>
      <text:p text:style-name="P808">Quando uma conexão é estabelecida por um cliente, o servidor a aceita usando a função accept(). Isso cria um novo socket de comunicação com o cliente. O servidor então lê os dados enviados pelo cliente através desse socket usando a função read(). Os dados lidos são armazenados em uma estrutura de pacote e são processados conforme necessário. Neste caso, o servidor imprime a mensagem recebida junto com o PID do processo escritor.</text:p>
      <text:p text:style-name="P809">Finalmente, o servidor fecha os sockets usando a função close() e encerra sua execução.</text:p>
      <text:p text:style-name="SBCparagraph"><text:span text:style-name="T810">O<text:s/></text:span><text:span text:style-name="T811">cliente</text:span><text:span text:style-name="T812"><text:s/>também começa criando um socket TCP usando a função socket(). Em seguida, ele obtém o endereço do servidor usando a função gethostbyname() e configura o endereço do servidor da mesma forma que o servidor. Após isso, o cliente estabelece uma conexão com o servidor usando a função connect().</text:span></text:p>
      <text:p text:style-name="P813"/>
      <text:p text:style-name="P814">Uma vez conectado, o cliente preenche uma estrutura de pacote com os dados que deseja enviar ao servidor, neste caso, uma mensagem e o PID do processo escritor. Em seguida, ele envia essa estrutura para o servidor usando a função write().</text:p>
      <text:p text:style-name="P815">Depois que os dados são enviados, o cliente fecha o socket e encerra sua execução.</text:p>
      <text:p text:style-name="SBCparagraph"><text:span text:style-name="T816">Em relação a<text:s/></text:span><text:span text:style-name="T817">Generalização para Múltiplos Escritores</text:span><text:span text:style-name="T818">, para permitir múltiplos escritores, cada processo escritor (cliente) deve se conectar ao servidor separadamente e enviar suas mensagens. O servidor pode lidar com várias conexões de clientes usando múltiplos sockets e threads para gerenciar cada conexão de forma concorrente. Dessa forma, cada escritor pode enviar suas mensagens independentemente, e o servidor pode processá-las e responder conforme necessário.</text:span></text:p>
      <text:p text:style-name="P819">Essa abordagem de sockets TCP permite uma comunicação bidirecional entre processos em diferentes hosts, possibilitando uma ampla gama de aplicações distribuídas e sistemas de comunicação robustos.</text:p>
      <text:p text:style-name="P820">Por fim, abaixo na Figura 8, vemos uma conexão, onde do lado esquerdo está o server aguardando uma mensagem, e do lado direito o client que executou e encaminhou a mensagem para o server, apos o servidor ter recebido a mensagem o codigo chegou ao seu fim e retornou uma mensagem indicando o PID do escritor.</text:p>
      <text:p text:style-name="P821"><text:span text:style-name="T822"><draw:frame draw:style-name="a21" draw:name="Picture 1" text:anchor-type="as-char" svg:x="0in" svg:y="0in" svg:width="5.86461in" svg:height="2.62128in" style:rel-width="scale" style:rel-height="scale"><draw:image xlink:href="media/image8.png" xlink:type="simple" xlink:show="embed" xlink:actuate="onLoad"/><svg:title/><svg:desc>A screenshot of a computer program

Description automatically generated</svg:desc></draw:frame></text:span></text:p>
      <text:p text:style-name="P823">Figura 8: resultado do servidor e cliente.</text:p>
      <text:h text:style-name="P824" text:outline-level="1">Exerc<text:span text:style-name="T825">í</text:span>cio letra E</text:h>
      <text:p text:style-name="P826">Considere as modificações implementadas na letra (b). Pesquise o funcionamento da macro WEXITSTATUS(status) em C e modifique seu programa de modo que, para cada um dos 10 processos filhos criados, eles possuam um status de saída diferente e controlado pelo usuário (ex. você pode especificar o status de saída a partir da linha de comando para cada um dos 10 processos ou simplesmente inserir no código um valor de saída diferenciado para cada processo filho).</text:p>
      <text:p text:style-name="SBCparagraph"><text:span text:style-name="T827">A macro<text:s/></text:span><text:span text:style-name="T828">WEXITSTATUS(status)</text:span><text:span text:style-name="T829"><text:s/>em C é usada para extrair o código de saída de um<text:s/></text:span><text:soft-page-break/><text:span text:style-name="T830">processo filho que terminou normalmente. Ela retorna o código de saída real do processo, que foi definido pelo programador utilizando a função exit() ou algum valor retornado pela função main().</text:span></text:p>
      <text:p text:style-name="P831">Para modificar o programa de modo que cada um dos 10 processos filhos possua um status de saída diferente e controlado pelo usuário, vamos poder modificar o código para que o valor de saída de cada processo seja passado como argumento de linha de comando ou definido diretamente no código.</text:p>
      <text:p text:style-name="P832">Abaixo está o nosso<text:s/>codigo (Codigo 7) chamado status-control-forks.c modificado com base nos forks(), para permitir que o usuário especifique o status de saída para cada processo filho a partir da linha de comando e sua demonstração na Figura 9.</text:p>
      <text:p text:style-name="P833"><text:span text:style-name="T834"><draw:frame draw:id="id14" draw:style-name="a22" draw:name="Text Box 2" text:anchor-type="as-char" svg:x="0in" svg:y="0in" svg:width="5.74792in" svg:height="7.01042in" style:rel-width="scale" style:rel-height="scale"><draw:text-box><text:p text:style-name="P835">#include &lt;stdio.h&gt;</text:p><text:p text:style-name="P836">#include &lt;stdlib.h&gt;</text:p><text:p text:style-name="P837">#include &lt;unistd.h&gt;</text:p><text:p text:style-name="P838">#include &lt;sys/types.h&gt;</text:p><text:p text:style-name="P839">#include &lt;sys/wait.h&gt;</text:p><text:p text:style-name="P840">#define NFORKS 10</text:p><text:p text:style-name="P841"/><text:p text:style-name="P842">void do_nothing() {</text:p><text:p text:style-name="P843"><text:s text:c="4"/>int i;</text:p><text:p text:style-name="P844"><text:s text:c="4"/>i = 0;</text:p><text:p text:style-name="P845">}</text:p><text:p text:style-name="P846">int main(int argc, char *argv[]) {</text:p><text:p text:style-name="P847"><text:span text:style-name="T848"><text:s text:c="4"/></text:span>int pid, j, status;</text:p><text:p text:style-name="P849"/><text:p text:style-name="P850"><text:s text:c="4"/>// Verifica se o número de argumentos é correto</text:p><text:p text:style-name="P851"><text:s text:c="4"/><text:span text:style-name="T852">if (argc != NFORKS + 1) {</text:span></text:p><text:p text:style-name="P853"><text:s text:c="8"/>printf("Uso: %s status1 status2 ... status%d\n", argv[0], NFORKS);</text:p><text:p text:style-name="P854"><text:span text:style-name="T855"><text:s text:c="8"/></text:span>exit(EXIT_FAILURE);</text:p><text:p text:style-name="P856"><text:s text:c="4"/>}</text:p><text:p text:style-name="P857"/><text:p text:style-name="P858"><text:s text:c="4"/>// Loop para criar NFORKS processos filhos</text:p><text:p text:style-name="P859"><text:s text:c="4"/><text:span text:style-name="T860">for (j = 1; j &lt;= NFORKS; j++) {</text:span></text:p><text:p text:style-name="P861"><text:span text:style-name="T862"><text:s text:c="8"/></text:span>// Criação do processo filho</text:p><text:p text:style-name="P863"><text:s text:c="8"/>if ((pid = fork()) &lt; 0) {</text:p><text:p text:style-name="P864"><text:s text:c="12"/>printf("fork falhou com o código de erro= %d\n", pid);</text:p><text:p text:style-name="P865"><text:s text:c="12"/><text:span text:style-name="T866">exit(EXIT_FAILURE);</text:span></text:p><text:p text:style-name="P867"><text:s text:c="8"/>} else if (pid == 0) {</text:p><text:p text:style-name="P868"><text:span text:style-name="T869"><text:s text:c="12"/></text:span>// Código executado pelo processo filho</text:p><text:p text:style-name="P870"><text:s text:c="12"/>do_nothing();</text:p><text:p text:style-name="P871"><text:s text:c="12"/>// Sai do processo filho com o status fornecido pelo argumento correspondente</text:p><text:p text:style-name="P872"><text:s text:c="12"/>exit(atoi(argv[j]));</text:p><text:p text:style-name="P873"><text:s text:c="8"/>}</text:p><text:p text:style-name="P874"><text:s text:c="4"/>}</text:p><text:p text:style-name="P875"/><text:p text:style-name="P876"><text:s text:c="4"/>// Loop para esperar por todos os processos filhos</text:p><text:p text:style-name="P877"><text:s text:c="4"/><text:span text:style-name="T878">for (j = 0; j &lt; NFORKS; j++) {</text:span></text:p><text:p text:style-name="P879"><text:span text:style-name="T880"><text:s text:c="8"/></text:span>// Espera pelo término de um processo filho</text:p><text:p text:style-name="P881"><text:s text:c="8"/>wait(&amp;status);</text:p><text:p text:style-name="P882"><text:s text:c="8"/>// Verifica se o processo filho terminou normalmente</text:p><text:p text:style-name="P883"><text:s text:c="8"/>if (WIFEXITED(status)) {</text:p><text:p text:style-name="P884"><text:s text:c="12"/>// Imprime o status de saída do processo filho</text:p><text:p text:style-name="P885"><text:s text:c="12"/>printf("Processo filho %d finalizado com status de saída: %d\n", WEXITSTATUS(status));</text:p><text:p text:style-name="P886"><text:s text:c="8"/><text:span text:style-name="T887">}</text:span></text:p><text:p text:style-name="P888"><text:s text:c="4"/>}</text:p><text:p text:style-name="P889"/><text:p text:style-name="P890"><text:s text:c="4"/>return 0;</text:p><text:p text:style-name="P891"><text:span text:style-name="T892">}</text:span></text:p></draw:text-box><svg:title/><svg:desc/></draw:frame></text:span><text:soft-page-break/><text:span text:style-name="T893"><draw:frame draw:id="id15" draw:style-name="a23" draw:name="Text Box 2" text:anchor-type="as-char" svg:x="0in" svg:y="0in" svg:width="5.74792in" svg:height="6.28125in" style:rel-width="scale" style:rel-height="scale"><draw:text-box><text:p text:style-name="P894"><text:s text:c="12"/><text:span text:style-name="T895">exit(EXIT_FAILURE);</text:span></text:p><text:p text:style-name="P896"><text:s text:c="8"/>} else if (pid == 0) {</text:p><text:p text:style-name="P897"><text:span text:style-name="T898"><text:s text:c="12"/></text:span>// Código executado pelo processo filho</text:p><text:p text:style-name="P899"><text:s text:c="12"/>do_nothing();</text:p><text:p text:style-name="P900"><text:s text:c="12"/>// Sai do processo filho com o status fornecido pelo argumento correspondente</text:p><text:p text:style-name="P901"><text:s text:c="12"/>exit(atoi(argv[j]));</text:p><text:p text:style-name="P902"><text:s text:c="8"/>}</text:p><text:p text:style-name="P903"><text:s text:c="4"/>}</text:p><text:p text:style-name="P904"/><text:p text:style-name="P905"><text:s text:c="4"/>// Loop para esperar por todos os processos filhos</text:p><text:p text:style-name="P906"><text:s text:c="4"/><text:span text:style-name="T907">for (j = 0; j &lt; NFORKS; j++) {</text:span></text:p><text:p text:style-name="P908"><text:span text:style-name="T909"><text:s text:c="8"/></text:span>// Espera pelo<text:s/>término de um processo filho</text:p><text:p text:style-name="P910"><text:s text:c="8"/>wait(&amp;status);</text:p><text:p text:style-name="P911"><text:s text:c="8"/>// Verifica se o processo filho terminou normalmente</text:p><text:p text:style-name="P912"><text:s text:c="8"/>if (WIFEXITED(status)) {</text:p><text:p text:style-name="P913"><text:s text:c="12"/>// Imprime o status de saída do processo filho</text:p><text:p text:style-name="P914"><text:s text:c="12"/>printf("Processo filho %d finalizado com status de saída: %d\n", WEXITSTATUS(status));</text:p><text:p text:style-name="P915"><text:s text:c="8"/><text:span text:style-name="T916">}</text:span></text:p><text:p text:style-name="P917"><text:s text:c="4"/>}</text:p><text:p text:style-name="P918"><text:s text:c="4"/>return 0;</text:p><text:p text:style-name="P919"><text:span text:style-name="T920">}</text:span></text:p></draw:text-box><svg:title/><svg:desc/></draw:frame></text:span></text:p>
      <text:p text:style-name="P921">Codigo 7: Conteudo do arquivo status-control-forks.c.</text:p>
      <text:p text:style-name="P922"><text:span text:style-name="T923"><draw:frame draw:style-name="a24" draw:name="Picture 1" text:anchor-type="as-char" svg:x="0in" svg:y="0in" svg:width="5.51147in" svg:height="2.08171in" style:rel-width="scale" style:rel-height="scale"><draw:image xlink:href="media/image9.png" xlink:type="simple" xlink:show="embed" xlink:actuate="onLoad"/><svg:title/><svg:desc>A screen shot of a computer

Description automatically generated</svg:desc></draw:frame></text:span></text:p>
      <text:p text:style-name="P924">Figura 9: resultado do status de controle dos forks.</text:p>
      <text:soft-page-break/>
      <text:list text:style-name="LFO8" text:continue-numbering="true">
        <text:list-item>
          <text:list>
            <text:list-item>
              <text:p text:style-name="P925">Exerc<text:span text:style-name="T926">í</text:span>cio letra F</text:p>
            </text:list-item>
          </text:list>
        </text:list-item>
      </text:list>
      <text:p text:style-name="P927">Analise o código ctrlc.c. Explique o que este código realiza. Teste este código no MINIX e no Linux. Você observou alguma diferença quanto a execução? Explique. Referência: Beej's Guide to Unix Interprocess Communication.</text:p>
      <text:p text:style-name="P928">O código ctrlc.c é um programa simples em C que lida com o sinal SIGINT<text:s/>(geralmente gerado quando você pressiona Ctrl+C no terminal). Ele configura um manipulador de sinal para SIGINT, que imprime uma mensagem quando o sinal é recebido. Em seguida, solicita ao usuário que insira uma string e a imprime na tela. Quando o usuário pressiona Ctrl+C, o manipulador de sinal é acionado e exibe uma mensagem indicando que o comando não deve ser interrompido. Este código pode ser testado no MINIX e no Linux, e embora o comportamento geral deva ser o mesmo em ambos os sistemas, pode haver<text:s/>diferenças sutis dependendo das configurações específicas do sistema.</text:p>
      <text:p text:style-name="P929">Sendo assim, na Figura 10 vemos o teste realizado em nosso ambiente MINIX, e na Figura 11 no ambiente LINUX.</text:p>
      <text:p text:style-name="P930"><text:span text:style-name="T931"><draw:frame draw:style-name="a25" draw:name="Picture 1" text:anchor-type="as-char" svg:x="0in" svg:y="0in" svg:width="5.2983in" svg:height="2.54697in" style:rel-width="scale" style:rel-height="scale"><draw:image xlink:href="media/image10.png" xlink:type="simple" xlink:show="embed" xlink:actuate="onLoad"/><svg:title/><svg:desc>A screenshot of a computer program

Description automatically generated</svg:desc></draw:frame></text:span></text:p>
      <text:p text:style-name="P932">Figura 10: teste do ctrl + c no MINIX.</text:p>
      <text:p text:style-name="P933">Ja no Linux deu erro conforme podemos observar abaixo na Figura 11.</text:p>
      <text:p text:style-name="P934"><text:span text:style-name="T935"><draw:frame draw:style-name="a26" draw:name="Picture 1" text:anchor-type="as-char" svg:x="0in" svg:y="0in" svg:width="5.11913in" svg:height="2.12494in" style:rel-width="scale" style:rel-height="scale"><draw:image xlink:href="media/image11.png" xlink:type="simple" xlink:show="embed" xlink:actuate="onLoad"/><svg:title/><svg:desc>A screenshot of a computer

Description automatically generated</svg:desc></draw:frame></text:span></text:p>
      <text:p text:style-name="P936">Figura 11: teste do ctrl + c no Linux Debian<text:s/>&gt;&gt; ERRO.</text:p>
      <text:p text:style-name="P937"><text:line-break/><text:line-break/><text:soft-page-break/>O código ctrlc.c foi compilado com sucesso, mas foram gerados alguns avisos durante<text:s/>a<text:s/>compilação:<text:s/></text:p>
      <text:list text:style-name="LFO12" text:continue-numbering="true">
        <text:list-item>
          <text:p text:style-name="P938">O primeiro aviso indica que a função gets está<text:s/>sendo usada implicitamente. A função gets<text:s/>é<text:s/>considerada perigosa porque não limita o tamanho de entrada e pode causar estouro de buffer. O compilador sugere usar fgets em vez de gets.</text:p>
        </text:list-item>
        <text:list-item>
          <text:p text:style-name="P939">O segundo aviso indica uma comparação entre um ponteiro e um inteiro. Isso ocorre devido ao uso da função gets, que retorna um ponteiro e<text:s/>é<text:s/>comparado com NULL. Como NULL<text:s/>é<text:s/>um valor inteiro que representa um ponteiro nulo, a comparação está<text:s/>incorreta.</text:p>
        </text:list-item>
      </text:list>
      <text:p text:style-name="P940">Para corrigir esses avisos, podemos<text:s/>substituir a função gets pela função fgets e ajustar a comparação conforme necessário.<text:s/></text:p>
      <text:p text:style-name="SBCparagraph"><text:span text:style-name="T941"><draw:frame draw:style-name="a27" draw:name="Picture 1" text:anchor-type="as-char" svg:x="0in" svg:y="0in" svg:width="5.33408in" svg:height="2.50035in" style:rel-width="scale" style:rel-height="scale"><draw:image xlink:href="media/image12.png" xlink:type="simple" xlink:show="embed" xlink:actuate="onLoad"/><svg:title/><svg:desc>A screenshot of a computer program

Description automatically generated</svg:desc></draw:frame></text:span></text:p>
      <text:p text:style-name="P942">Figura 12. teste do ctrl + c no Linux Debian.</text:p>
      <text:p text:style-name="P943"/>
      <text:list text:style-name="LFO8" text:continue-numbering="true">
        <text:list-item>
          <text:p text:style-name="P944">Referências</text:p>
        </text:list-item>
      </text:list>
      <text:list text:style-name="LFO11" text:continue-numbering="true">
        <text:list-item>
          <text:p text:style-name="P945"><text:bookmark-start text:name="_Ref153130300"/><text:span text:style-name="T946">Dalton Matsuo<text:s/></text:span><text:span text:style-name="T947">Tavares, (2024) “PROJETO 4 – MINIX”, material disponibilizado no google classroom e SIGAA, Janeiro.</text:span><text:bookmark-end text:name="_Ref153130300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BCparagraph" style:default-outline-level="1">
      <style:paragraph-properties fo:text-align="center"/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1" style:next-style-name="SBCparagraph" style:default-outline-level="2">
      <style:paragraph-properties fo:margin-top="0.1666in"/>
      <style:text-properties fo:font-variant="small-caps" fo:font-size="13pt" style:font-size-asian="13pt" fo:hyphenate="false"/>
    </style:style>
    <style:style style:name="Heading3" style:display-name="Heading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BCparagraph" style:default-outline-level="5">
      <style:paragraph-properties fo:keep-with-next="always"/>
      <style:text-properties style:font-name="TimesNewRoman,Bold" style:font-name-asian="TimesNewRoman,Bold" style:font-name-complex="TimesNewRoman,Bold" fo:font-weight="bold" style:font-weight-asian="bold" fo:color="#000000" fo:hyphenate="false"/>
    </style:style>
    <style:style style:name="Heading6" style:display-name="Heading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Heading7" style:display-name="Heading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Heading8" style:display-name="Heading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Heading9" style:display-name="Heading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paragraph-properties fo:text-align="justify" fo:margin-top="0.0826in" fo:text-indent="0.1972in"/>
      <style:text-properties style:font-name="Times" style:font-name-asian="Times New Roman" style:font-name-complex="Times New Roman" fo:color="#000000" style:font-size-complex="10pt" fo:hyphenate="false"/>
    </style:style>
    <style:style style:name="DefaultParagraphFont" style:display-name="Default Paragraph Font" style:family="text"/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/>
      <style:text-properties fo:font-weight="bold" style:font-weight-asian="bold" fo:hyphenate="false"/>
    </style: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itle" style:display-name="Title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itle" style:next-style-name="Textbody">
      <style:text-properties style:font-weight-complex="bold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-5.2069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22.7875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PageNumber" style:display-name="Page Number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Endnoteanchor" style:display-name="Endnote anchor" style:family="text">
      <style:text-properties style:text-position="super 66.6%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PlaceholderText" style:display-name="Placeholder Text" style:family="text" style:parent-style-name="DefaultParagraphFont">
      <style:text-properties fo:color="#666666"/>
    </style:style>
    <style:style style:name="NoSpacing" style:display-name="No Spacing" style:family="paragraph">
      <style:paragraph-properties fo:text-align="justify" fo:text-indent="0.2958in"/>
      <style:text-properties style:font-name="Times" style:font-name-asian="Times New Roman" style:font-name-complex="Times New Roman" fo:color="#000000" style:font-size-complex="10pt" fo:hyphenate="false"/>
    </style:style>
    <style:style style:name="HeaderChar" style:display-name="Header Char" style:family="text" style:parent-style-name="DefaultParagraphFont">
      <style:text-properties style:font-name="Times" style:font-name-asian="Times New Roman" style:font-name-complex="Times New Roman" style:font-size-complex="10pt"/>
    </style:style>
    <style:style style:name="Style1" style:display-name="Style1" style:family="paragraph" style:parent-style-name="Normal">
      <style:paragraph-properties fo:text-align="center"/>
      <style:text-properties fo:font-weight="bold" style:font-weight-asian="bold" style:font-weight-complex="bold" fo:hyphenate="false"/>
    </style:style>
    <style:style style:name="Style1Char" style:display-name="Style1 Char" style:family="text" style:parent-style-name="DefaultParagraphFont">
      <style:text-properties style:font-name="Times" style:font-name-asian="Times New Roman" style:font-name-complex="Times New Roman" fo:font-weight="bold" style:font-weight-asian="bold" style:font-weight-complex="bold" fo:color="#000000" style:font-size-complex="10pt"/>
    </style:style>
    <style:style style:name="Style2" style:display-name="Style2" style:family="paragraph" style:parent-style-name="Normal">
      <style:text-properties fo:hyphenate="false"/>
    </style:style>
    <style:style style:name="Style2Char" style:display-name="Style2 Char" style:family="text" style:parent-style-name="DefaultParagraphFont">
      <style:text-properties style:font-name="Times" style:font-name-asian="Times New Roman" style:font-name-complex="Times New Roman" fo:color="#000000" style:font-size-complex="10pt"/>
    </style: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2.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SBCnumberlist" style:display-name="SBC:number:list">
      <text:list-level-style-bullet text:level="1" text:style-name="WW_CharLFO5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77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Gustavo Borges</meta:initial-creator>
    <dc:creator>Gustavo Borges</dc:creator>
    <meta:creation-date>2024-02-11T22:39:00Z</meta:creation-date>
    <dc:date>2024-02-12T02:58:00Z</dc:date>
    <meta:template xlink:href="Normal.dotm" xlink:type="simple"/>
    <meta:editing-cycles>27</meta:editing-cycles>
    <meta:editing-duration>PT9780S</meta:editing-duration>
    <meta:user-defined meta:name="Info 1"/>
    <meta:user-defined meta:name="Info 2"/>
    <meta:user-defined meta:name="Info 3"/>
    <meta:user-defined meta:name="Info 4"/>
    <meta:document-statistic meta:page-count="20" meta:paragraph-count="29" meta:word-count="2342" meta:character-count="14965" meta:row-count="105" meta:non-whitespace-character-count="12652"/>
  </office:meta>
</office:document-meta>
</file>