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BCtitle" style:master-page-name="MP0" style:family="paragraph">
      <style:paragraph-properties fo:break-before="page"/>
      <style:text-properties style:font-name="Times New Roman"/>
    </style:style>
    <style:style style:name="T2" style:parent-style-name="DefaultParagraphFont" style:family="text">
      <style:text-properties style:font-name="Times New Roman"/>
    </style:style>
    <style:style style:name="T3" style:parent-style-name="DefaultParagraphFont" style:family="text">
      <style:text-properties style:font-name="Times New Roman" style:text-position="super 66.6%"/>
    </style:style>
    <style:style style:name="T4" style:parent-style-name="DefaultParagraphFont" style:family="text">
      <style:text-properties style:font-name="Times New Roman" style:text-position="super 66.6%"/>
    </style:style>
    <style:style style:name="T5" style:parent-style-name="DefaultParagraphFont" style:family="text">
      <style:text-properties style:font-name="Times New Roman"/>
    </style:style>
    <style:style style:name="P6" style:parent-style-name="SBCemail" style:family="paragraph">
      <style:text-properties style:font-name="Times New Roman" style:font-name-complex="Times New Roman"/>
    </style:style>
    <style:style style:name="P7" style:parent-style-name="SBCresumo" style:family="paragraph">
      <style:text-properties style:font-name="Times New Roman"/>
    </style:style>
    <style:style style:name="P8" style:parent-style-name="ListParagraph" style:list-style-name="LFO7" style:family="paragraph"/>
    <style:style style:name="P9" style:parent-style-name="ListParagraph" style:list-style-name="LFO7" style:family="paragraph"/>
    <style:style style:name="P10" style:parent-style-name="SBCtitle1" style:list-style-name="LFO8" style:family="paragraph"/>
    <style:style style:name="P11" style:parent-style-name="SBCparagraph" style:family="paragraph">
      <style:paragraph-properties fo:text-indent="0.1972in"/>
    </style:style>
    <style:style style:name="P12" style:parent-style-name="SBCparagraph" style:family="paragraph">
      <style:paragraph-properties fo:text-indent="0.1972in"/>
    </style:style>
    <style:style style:name="T13" style:parent-style-name="DefaultParagraphFont" style:family="text">
      <style:text-properties style:font-name="Calibri"/>
    </style:style>
    <style:style style:name="P14" style:parent-style-name="SBCparagraph" style:list-style-name="LFO9" style:family="paragraph">
      <style:paragraph-properties fo:margin-left="0.4923in">
        <style:tab-stops/>
      </style:paragraph-properties>
    </style:style>
    <style:style style:name="T15" style:parent-style-name="DefaultParagraphFont" style:family="text">
      <style:text-properties style:font-name="Calibri" fo:font-weight="bold" style:font-weight-asian="bold" style:font-weight-complex="bold"/>
    </style:style>
    <style:style style:name="T16" style:parent-style-name="DefaultParagraphFont" style:family="text">
      <style:text-properties style:font-name="Calibri"/>
    </style:style>
    <style:style style:name="P17" style:parent-style-name="SBCparagraph" style:list-style-name="LFO9" style:family="paragraph">
      <style:paragraph-properties fo:margin-left="0.4923in">
        <style:tab-stops/>
      </style:paragraph-properties>
    </style:style>
    <style:style style:name="T18" style:parent-style-name="DefaultParagraphFont" style:family="text">
      <style:text-properties style:font-name="Calibri" fo:font-weight="bold" style:font-weight-asian="bold" style:font-weight-complex="bold"/>
    </style:style>
    <style:style style:name="T19" style:parent-style-name="DefaultParagraphFont" style:family="text">
      <style:text-properties style:font-name="Calibri"/>
    </style:style>
    <style:style style:name="T20" style:parent-style-name="DefaultParagraphFont" style:family="text">
      <style:text-properties style:font-name="Calibri"/>
    </style:style>
    <style:style style:name="T21" style:parent-style-name="DefaultParagraphFont" style:family="text">
      <style:text-properties style:font-name="Calibri"/>
    </style:style>
    <style:style style:name="P22" style:parent-style-name="SBCtitle1" style:list-style-name="LFO8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Calibri"/>
    </style:style>
    <style:style style:name="P33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P34" style:parent-style-name="Normal" style:family="paragraph">
      <style:paragraph-properties fo:text-indent="0in"/>
    </style:style>
    <style:style style:name="T35" style:parent-style-name="DefaultParagraphFont" style:family="text">
      <style:text-properties style:font-name="Calibri"/>
    </style:style>
    <style:style style:name="P36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T37" style:parent-style-name="DefaultParagraphFont" style:family="text">
      <style:text-properties style:font-name="Calibri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font-name="Calibri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style:font-name="Calibri" fo:font-weight="bold" style:font-weight-asian="bold" style:font-weight-complex="bold"/>
    </style:style>
    <style:style style:name="T42" style:parent-style-name="DefaultParagraphFont" style:family="text">
      <style:text-properties style:font-name="Calibri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style:font-name="Calibri"/>
    </style:style>
    <style:style style:name="P45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T46" style:parent-style-name="DefaultParagraphFont" style:family="text">
      <style:text-properties style:font-name="Calibri"/>
    </style:style>
    <style:style style:name="T47" style:parent-style-name="DefaultParagraphFont" style:family="text">
      <style:text-properties style:font-name="Calibri" fo:font-weight="bold" style:font-weight-asian="bold" style:font-weight-complex="bold"/>
    </style:style>
    <style:style style:name="T48" style:parent-style-name="DefaultParagraphFont" style:family="text">
      <style:text-properties style:font-name="Calibri"/>
    </style:style>
    <style:style style:name="T49" style:parent-style-name="DefaultParagraphFont" style:family="text">
      <style:text-properties style:font-name="Calibri" fo:font-weight="bold" style:font-weight-asian="bold" style:font-weight-complex="bold"/>
    </style:style>
    <style:style style:name="T50" style:parent-style-name="DefaultParagraphFont" style:family="text">
      <style:text-properties style:font-name="Calibri"/>
    </style:style>
    <style:style style:name="T51" style:parent-style-name="DefaultParagraphFont" style:family="text">
      <style:text-properties style:font-name="Calibri"/>
    </style:style>
    <style:style style:name="T52" style:parent-style-name="DefaultParagraphFont" style:family="text">
      <style:text-properties style:font-name="Calibri"/>
    </style:style>
    <style:style style:name="P53" style:parent-style-name="ListParagraph" style:list-style-name="LFO10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ListParagraph" style:list-style-name="LFO10" style:family="paragraph"/>
    <style:style style:name="T56" style:parent-style-name="DefaultParagraphFont" style:family="text">
      <style:text-properties style:font-name="Calibri"/>
    </style:style>
    <style:style style:name="T57" style:parent-style-name="DefaultParagraphFont" style:family="text">
      <style:text-properties style:font-name="Calibri"/>
    </style:style>
    <style:style style:name="P58" style:parent-style-name="ListParagraph" style:list-style-name="LFO10" style:family="paragraph"/>
    <style:style style:name="T59" style:parent-style-name="DefaultParagraphFont" style:family="text">
      <style:text-properties style:font-name="Calibri"/>
    </style:style>
    <style:style style:name="P60" style:parent-style-name="ListParagraph" style:list-style-name="LFO10" style:family="paragraph"/>
    <style:style style:name="T61" style:parent-style-name="DefaultParagraphFont" style:family="text">
      <style:text-properties style:font-name="Calibri"/>
    </style:style>
    <style:style style:name="P62" style:parent-style-name="Normal" style:family="paragraph">
      <style:paragraph-properties fo:text-align="center" fo:text-indent="0in"/>
    </style:style>
    <style:style style:name="P63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64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65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66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67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68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69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70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71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72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73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74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75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76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77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78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79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80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81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82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83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84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85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86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87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88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89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90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91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92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93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94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95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96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97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98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99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00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01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02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03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04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05" style:parent-style-name="Normal" style:family="paragraph">
      <style:paragraph-properties fo:margin-top="0in"/>
    </style:style>
    <style:style style:name="T106" style:parent-style-name="DefaultParagraphFont" style:family="text">
      <style:text-properties fo:font-size="11pt" style:font-size-asian="11pt" style:font-size-complex="9pt" fo:language="en" fo:country="US"/>
    </style:style>
    <style:style style:name="T107" style:parent-style-name="DefaultParagraphFont" style:family="text">
      <style:text-properties fo:font-size="11pt" style:font-size-asian="11pt" style:font-size-complex="9pt"/>
    </style:style>
    <style:style style:name="P108" style:parent-style-name="Normal" style:family="paragraph">
      <style:paragraph-properties fo:margin-top="0in"/>
      <style:text-properties fo:font-size="11pt" style:font-size-asian="11pt" style:font-size-complex="9pt"/>
    </style:style>
    <style:style style:name="P109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10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11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12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13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14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15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16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17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18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19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20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21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22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23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24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25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26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27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28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29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30" style:parent-style-name="Normal" style:family="paragraph">
      <style:paragraph-properties fo:margin-top="0in"/>
    </style:style>
    <style:style style:name="T131" style:parent-style-name="DefaultParagraphFont" style:family="text">
      <style:text-properties fo:font-size="11pt" style:font-size-asian="11pt" style:font-size-complex="9pt" fo:language="en" fo:country="US"/>
    </style:style>
    <style:style style:name="T132" style:parent-style-name="DefaultParagraphFont" style:family="text">
      <style:text-properties fo:font-size="11pt" style:font-size-asian="11pt" style:font-size-complex="9pt"/>
    </style:style>
    <style:style style:name="P133" style:parent-style-name="Normal" style:family="paragraph">
      <style:paragraph-properties fo:margin-top="0in"/>
      <style:text-properties fo:font-size="11pt" style:font-size-asian="11pt" style:font-size-complex="9pt"/>
    </style:style>
    <style:style style:name="P134" style:parent-style-name="Normal" style:family="paragraph">
      <style:paragraph-properties fo:margin-top="0in"/>
      <style:text-properties fo:font-size="11pt" style:font-size-asian="11pt" style:font-size-complex="9pt" fo:language="en" fo:country="US"/>
    </style:style>
    <style:style style:name="P135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T136" style:parent-style-name="DefaultParagraphFont" style:family="text">
      <style:text-properties style:font-name="Calibri"/>
    </style:style>
    <style:style style:name="P137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T138" style:parent-style-name="DefaultParagraphFont" style:family="text">
      <style:text-properties style:font-name="Calibri"/>
    </style:style>
    <style:style style:name="P139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T140" style:parent-style-name="DefaultParagraphFont" style:family="text">
      <style:text-properties style:font-name="Calibri"/>
    </style:style>
    <style:style style:name="P141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T142" style:parent-style-name="DefaultParagraphFont" style:family="text">
      <style:text-properties style:font-name="Calibri"/>
    </style:style>
    <style:style style:name="P143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P144" style:parent-style-name="SBCtitle1" style:list-style-name="LFO8" style:family="paragraph"/>
    <style:style style:name="P145" style:parent-style-name="ListParagraph" style:list-style-name="LFO10" style:family="paragraph"/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ListParagraph" style:list-style-name="LFO10" style:family="paragraph"/>
    <style:style style:name="T148" style:parent-style-name="DefaultParagraphFont" style:family="text">
      <style:text-properties style:font-name="Calibri"/>
    </style:style>
    <style:style style:name="T149" style:parent-style-name="DefaultParagraphFont" style:family="text">
      <style:text-properties style:font-name="Calibri"/>
    </style:style>
    <style:style style:name="P150" style:parent-style-name="ListParagraph" style:list-style-name="LFO10" style:family="paragraph"/>
    <style:style style:name="T151" style:parent-style-name="DefaultParagraphFont" style:family="text">
      <style:text-properties style:font-name="Calibri"/>
    </style:style>
    <style:style style:name="P152" style:parent-style-name="ListParagraph" style:list-style-name="LFO10" style:family="paragraph"/>
    <style:style style:name="T153" style:parent-style-name="DefaultParagraphFont" style:family="text">
      <style:text-properties style:font-name="Calibri"/>
    </style:style>
    <style:style style:name="P154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P155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P156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P157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P158" style:parent-style-name="SBCtitle1" style:list-style-name="LFO8" style:family="paragraph"/>
    <style:style style:name="P159" style:parent-style-name="ListParagraph" style:list-style-name="LFO10" style:family="paragraph"/>
    <style:style style:name="T160" style:parent-style-name="DefaultParagraphFont" style:family="text">
      <style:text-properties fo:font-weight="bold" style:font-weight-asian="bold" style:font-weight-complex="bold"/>
    </style:style>
    <style:style style:name="P161" style:parent-style-name="ListParagraph" style:list-style-name="LFO10" style:family="paragraph"/>
    <style:style style:name="T162" style:parent-style-name="DefaultParagraphFont" style:family="text">
      <style:text-properties style:font-name="Calibri"/>
    </style:style>
    <style:style style:name="T163" style:parent-style-name="DefaultParagraphFont" style:family="text">
      <style:text-properties style:font-name="Calibri"/>
    </style:style>
    <style:style style:name="P164" style:parent-style-name="ListParagraph" style:list-style-name="LFO10" style:family="paragraph"/>
    <style:style style:name="T165" style:parent-style-name="DefaultParagraphFont" style:family="text">
      <style:text-properties style:font-name="Calibri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style:font-name="Calibri"/>
    </style:style>
    <style:style style:name="P168" style:parent-style-name="ListParagraph" style:list-style-name="LFO10" style:family="paragraph"/>
    <style:style style:name="T169" style:parent-style-name="DefaultParagraphFont" style:family="text">
      <style:text-properties style:font-name="Calibri"/>
    </style:style>
    <style:style style:name="T170" style:parent-style-name="DefaultParagraphFont" style:family="text">
      <style:text-properties fo:font-style="italic" style:font-style-asian="italic" style:font-style-complex="italic"/>
    </style:style>
    <style:style style:name="T171" style:parent-style-name="DefaultParagraphFont" style:family="text">
      <style:text-properties style:font-name="Calibri" fo:font-style="italic" style:font-style-asian="italic" style:font-style-complex="italic"/>
    </style:style>
    <style:style style:name="T172" style:parent-style-name="DefaultParagraphFont" style:family="text"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T173" style:parent-style-name="DefaultParagraphFont" style:family="text">
      <style:text-properties style:font-name="Calibri" fo:font-style="italic" style:font-style-asian="italic" style:font-style-complex="italic"/>
    </style:style>
    <style:style style:name="P174" style:parent-style-name="Normal" style:family="paragraph">
      <style:paragraph-properties fo:text-align="center"/>
    </style:style>
    <style:style style:name="P175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P176" style:parent-style-name="Normal" style:family="paragraph">
      <style:paragraph-properties fo:text-align="center"/>
    </style:style>
    <style:style style:name="T177" style:parent-style-name="DefaultParagraphFont" style:family="text">
      <style:text-properties style:font-name="Calibri" fo:font-weight="bold" style:font-weight-asian="bold" style:font-weight-complex="bold"/>
    </style:style>
    <style:style style:name="P178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P179" style:parent-style-name="Normal" style:family="paragraph">
      <style:paragraph-properties fo:text-indent="0in"/>
    </style:style>
    <style:style style:name="P180" style:parent-style-name="Normal" style:family="paragraph">
      <style:paragraph-properties fo:text-indent="0in"/>
    </style:style>
    <style:style style:name="P181" style:parent-style-name="Normal" style:family="paragraph">
      <style:paragraph-properties fo:text-indent="0in"/>
    </style:style>
    <style:style style:name="P182" style:parent-style-name="Normal" style:family="paragraph">
      <style:paragraph-properties fo:text-align="center" fo:text-indent="0in"/>
    </style:style>
    <style:style style:name="P183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P184" style:parent-style-name="Normal" style:family="paragraph">
      <style:paragraph-properties fo:text-indent="0in"/>
    </style:style>
    <style:style style:name="P185" style:parent-style-name="Normal" style:family="paragraph">
      <style:paragraph-properties fo:text-indent="0in"/>
    </style:style>
    <style:style style:name="P186" style:parent-style-name="Normal" style:family="paragraph">
      <style:paragraph-properties fo:text-align="center" fo:text-indent="0in"/>
    </style:style>
    <style:style style:name="P187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P188" style:parent-style-name="Normal" style:family="paragraph">
      <style:paragraph-properties fo:text-indent="0in"/>
    </style:style>
    <style:style style:name="P189" style:parent-style-name="Normal" style:family="paragraph">
      <style:paragraph-properties fo:text-align="center" fo:text-indent="0in"/>
    </style:style>
    <style:style style:name="T190" style:parent-style-name="DefaultParagraphFont" style:family="text">
      <style:text-properties style:font-name="Calibri"/>
    </style:style>
    <style:style style:name="P191" style:parent-style-name="Normal" style:family="paragraph">
      <style:paragraph-properties fo:text-align="center"/>
      <style:text-properties style:font-name="Calibri" fo:font-weight="bold" style:font-weight-asian="bold" style:font-weight-complex="bold"/>
    </style:style>
    <style:style style:name="T192" style:parent-style-name="DefaultParagraphFont" style:family="text">
      <style:text-properties style:font-name="Calibri"/>
    </style:style>
    <style:style style:name="P193" style:parent-style-name="ListParagraph" style:list-style-name="LFO8" style:family="paragraph">
      <style:text-properties fo:font-weight="bold" style:font-weight-asian="bold" style:font-weight-complex="bold"/>
    </style:style>
    <style:style style:name="P194" style:parent-style-name="SBCparagraph" style:list-style-name="LFO11" style:family="paragraph"/>
    <style:style style:name="T195" style:parent-style-name="DefaultParagraphFont" style:family="text">
      <style:text-properties style:font-name="Times New Roman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3.68375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JETO 4: MINIX</text:p>
      <text:p text:style-name="SBCauthors"><text:span text:style-name="T2">Gustavo Borges Peres da Silva</text:span><text:span text:style-name="T3">1</text:span></text:p>
      <text:p text:style-name="SBCinstitution"><text:span text:style-name="T4">1</text:span><text:span text:style-name="T5">Departamento de Ciência da Computação – Universidade Federal de Catalão (UFCAT)</text:span></text:p>
      <text:p text:style-name="P6">gustavo.silva@discente.ufcat.edu.br</text:p>
      <text:p text:style-name="P7"/>
      <text:p text:style-name="SBCtitle1">Objetivos</text:p>
      <text:list text:style-name="LFO7" text:continue-numbering="true">
        <text:list-item>
          <text:p text:style-name="P8">Familiarizar o aluno com o SO MINIX e testes em<text:s/>ambiente de máquina virtual.</text:p>
        </text:list-item>
        <text:list-item>
          <text:p text:style-name="P9">Processos órfãos e zumbis.</text:p>
        </text:list-item>
      </text:list>
      <text:list text:style-name="LFO8" text:continue-numbering="true">
        <text:list-item>
          <text:p text:style-name="P10">TAREFA 5 (gerenciamento de processos): Processos órfãos (de 15/02/2024 a 18/02/2024)</text:p>
        </text:list-item>
      </text:list>
      <text:p text:style-name="P11">Um processo órfão é um processo cujo processo pai terminou ou foi terminado.</text:p>
      <text:p text:style-name="P12">Processos órfãos desperdiçam recursos e podem potencialmente complicar a operação de um servidor. Entretanto, existem algumas soluções para o problema de processos órfãos<text:span text:style-name="T13">:</text:span></text:p>
      <text:list text:style-name="LFO9" text:continue-numbering="true">
        <text:list-item>
          <text:p text:style-name="P14"><text:span text:style-name="T15">Exterminar o processo</text:span><text:span text:style-name="T16"><text:s/>é a técnica mais comumente usada. Neste caso o processo órfão é terminado;</text:span></text:p>
        </text:list-item>
        <text:list-item>
          <text:p text:style-name="P17"><text:span text:style-name="T18">Expiração</text:span><text:span text:style-name="T19"><text:s/>é uma té</text:span><text:span text:style-name="T20">cnica na qual cada processo é alocado por um certo período de tempo para que possa terminar antes que o processo seja finalizado. Caso necessário, um pocesso pode pedir mais tempo para terminar antes que seu tempo expire.</text:span></text:p>
        </text:list-item>
      </text:list>
      <text:p text:style-name="Normal">Ao se tornar órfão em um sistema Unix-like, um processo é automaticamente adotado pelo processo “init”. Esta operação é chamada re-parenting (em uma tradução livre, apadrinhamento) e ocorre por padrão. Embora o processo tenha o processo init como seu pai, ele ainda é chamado processo órfão pois o processo que o gerou originalmente não existe mais.</text:p>
      <text:p text:style-name="Normal">Sendo assim, para essa tarefa, iremos simular a quest<text:span text:style-name="T21">ão de processos órfãos, usando o comando kill no processo pai da Tarefa 4, item (b) desta lista. Além disso, iremos demonstrar o re-parenting dos processos filhos e descreveremos o método usado para realizar esse experimento.</text:span></text:p>
      <text:list text:style-name="LFO8" text:continue-numbering="true">
        <text:list-item>
          <text:list>
            <text:list-item>
              <text:p text:style-name="P22">Experimento 1 – MINIX – Usando ps</text:p>
            </text:list-item>
          </text:list>
        </text:list-item>
      </text:list>
      <text:p text:style-name="Normal">Para essa simulação, usaremos a técnica de "<text:span text:style-name="T23">Exterminar o processo</text:span>". Neste caso, o<text:s/><text:span text:style-name="T24">processo</text:span><text:s/><text:span text:style-name="T25">pai será encerrado</text:span>, e todos os seus<text:s/><text:span text:style-name="T26">processos filhos se tornarão órfãos</text:span>. O sistema operacional, então,<text:s/><text:span text:style-name="T27">adotará esses processos</text:span><text:s/>órfãos e os colocará sob a<text:s/><text:span text:style-name="T28">responsabilidade do processo init</text:span>. O processo init é o<text:s/><text:span text:style-name="T29">primeiro</text:span><text:s/>processo iniciado pelo kernel do sistema operacional e tem o PID 1. Ele é responsável por<text:s/><text:span text:style-name="T30">iniciar e encerrar</text:span><text:s/>todos os outros processos do sistema. Quando um processo órfão é adotado pelo processo<text:s/><text:soft-page-break/>init, ele deixa de ser um processo órfão e passa a<text:s/>ter o processo init como pai.</text:p>
      <text:p text:style-name="Normal">Antes de iniciarmos o teste, iremos tentar instalar o pstree no MINIX.</text:p>
      <text:p text:style-name="Normal">Infelizmente após algumas horas de estudos e tentativas, nao conseguimos implementa-lo, pois não existia nenhuma documentação a respeito da disponibilidade de baixar via pkgin ou pkgin_cd (Figura 1), e ao utilizar o repositorio disponivel em<text:s/><text:a xlink:href="https://www.minix3.org/distfiles-backup/" office:target-frame-name="_top" xlink:show="replace"><text:span text:style-name="Hyperlink">https://www.minix3.org/distfiles-bac</text:span><text:bookmark-start text:name="_Hlt159183625"/><text:bookmark-start text:name="_Hlt159183626"/><text:bookmark-start text:name="_Hlt159183627"/><text:span text:style-name="Hyperlink">k</text:span><text:bookmark-end text:name="_Hlt159183625"/><text:bookmark-end text:name="_Hlt159183626"/><text:bookmark-end text:name="_Hlt159183627"/><text:span text:style-name="Hyperlink">up/</text:span></text:a><text:s/>(Figura 2), vemos que existem algumas possibilidades para uso.</text:p>
      <text:p text:style-name="P31"><text:span text:style-name="T32"><draw:frame draw:style-name="a0" draw:name="Picture 1" text:anchor-type="as-char" svg:x="0in" svg:y="0in" svg:width="4.79969in" svg:height="3.17421in" style:rel-width="scale" style:rel-height="scale"><draw:image xlink:href="media/image1.png" xlink:type="simple" xlink:show="embed" xlink:actuate="onLoad"/><svg:title/><svg:desc>A screenshot of a computer program

Description automatically generated</svg:desc></draw:frame></text:span></text:p>
      <text:p text:style-name="P33">Figura 1 – pstree nao encontrado para baixar nos repositorios em geral.</text:p>
      <text:p text:style-name="P34"><text:line-break/><text:span text:style-name="T35"><draw:frame draw:style-name="a1" draw:name="Picture 1" text:anchor-type="as-char" svg:x="0in" svg:y="0in" svg:width="5.90556in" svg:height="0.36042in" style:rel-width="scale" style:rel-height="scale"><draw:image xlink:href="media/image2.png" xlink:type="simple" xlink:show="embed" xlink:actuate="onLoad"/><svg:title/><svg:desc/></draw:frame></text:span></text:p>
      <text:p text:style-name="P36">Figura 2 – Backups do codigo pstree.c.</text:p>
      <text:p text:style-name="Normal">Mas ao tentarmos compilar em nosso MINIX, percebemos alguns erros relacionados a biblioteca sys/ioctl.h, que por algum motivo nessa versão do MINIX e com essa do pstree que instalei, surge um erro relacionado a uma falta de definição da estrutura winsize (Figura 3). A estrutura winsize é usada para obter o tamanho da janela do terminal, e é definida no cabeçalho sys/ioctl.h. E após algumas outras pesquisas, aparentemente comentar essa linha de import poderia resolver pois assim passaria a utilizar o stdio.h, e de fato conseguimos compilar com alguns outros erros, e ao jogarmos para a pasta<text:s/><text:span text:style-name="T37">/usr/bin o nosso arquivo binario compilado e executarmos pstree no console do MINIX, nao obtivemos com êxito a instalação conforme na Figura 4.</text:span></text:p>
      <text:p text:style-name="P38"><text:span text:style-name="T39"><draw:frame draw:style-name="a2" draw:name="Picture 1" text:anchor-type="as-char" svg:x="0in" svg:y="0in" svg:width="5.32041in" svg:height="0.84899in" style:rel-width="scale" style:rel-height="scale"><draw:image xlink:href="media/image3.png" xlink:type="simple" xlink:show="embed" xlink:actuate="onLoad"/><svg:title/><svg:desc>A screen shot of a computer screen

Description automatically generated</svg:desc></draw:frame></text:span></text:p>
      <text:p text:style-name="P40"><text:span text:style-name="T41">Figura 2 – Erro 1 ao compilar o pstree.c</text:span><text:span text:style-name="T42">.</text:span></text:p>
      <text:soft-page-break/>
      <text:p text:style-name="P43"><text:span text:style-name="T44"><draw:frame draw:style-name="a3" draw:name="Picture 1" text:anchor-type="as-char" svg:x="0in" svg:y="0in" svg:width="5.64077in" svg:height="1.76241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45">Figura 3 – Erro 2 ao compilar o pstree.c e executar.</text:p>
      <text:p text:style-name="Normal">Portanto como deu erro com a instala<text:span text:style-name="T46">ção do pstree e não foi dito que era obrigatório, iremos utilizar a ferramenta<text:s/></text:span><text:span text:style-name="T47">PS</text:span><text:span text:style-name="T48"><text:s/>que ja vem no MINIX que faz a questão de visualizar os processos mas não em arvores e acrescentaremos alguns argumentos para melhorar a visualização do mesmo tal como<text:s/></text:span><text:span text:style-name="T49">lf</text:span><text:span text:style-name="T50">.</text:span></text:p>
      <text:p text:style-name="Normal"><text:span text:style-name="T51">Sendo assim,<text:s/></text:span>para demonstrar o re-parenting dos processos filhos, vamos fazer o seguinte<text:span text:style-name="T52">:</text:span></text:p>
      <text:list text:style-name="LFO10" text:continue-numbering="true">
        <text:list-item>
          <text:p text:style-name="P53">Vamos usar o comando<text:s/><text:span text:style-name="T54">ps lf</text:span><text:s/>antes de executar o codigo fork-ex-10pid.c (Codigo 1 e Figura 4);</text:p>
        </text:list-item>
        <text:list-item>
          <text:p text:style-name="P55">Ap<text:span text:style-name="T56">ó</text:span>s rodar o codigo irá criar os processos, portanto, iremos rodar o comando denovo para verificar a situação atual (Figura 5)<text:span text:style-name="T57">;</text:span></text:p>
        </text:list-item>
        <text:list-item>
          <text:p text:style-name="P58"><text:span text:style-name="T59">E no mesmo instante iremos dar um kill e o nome do processo pai e verificar o status novamente usando comando ps lf para ver se os processos filhos se tornaram-se orfãos (Figura 6);</text:span></text:p>
        </text:list-item>
        <text:list-item>
          <text:p text:style-name="P60"><text:span text:style-name="T61">E quando finalizar os processos orfãos, iremos rodar o comando para verificar o status geral (Figura 7)</text:span>.<text:s/></text:p>
        </text:list-item>
      </text:list>
      <text:p text:style-name="P62"><draw:frame draw:id="id0" draw:style-name="a4" draw:name="Text Box 2" text:anchor-type="as-char" svg:x="0in" svg:y="0in" svg:width="5.86042in" svg:height="3.825in" style:rel-width="scale" style:rel-height="scale"><draw:text-box><text:p text:style-name="P63">#include &lt;stdio.h&gt;</text:p><text:p text:style-name="P64">#include &lt;stdlib.h&gt;</text:p><text:p text:style-name="P65">#include &lt;unistd.h&gt;</text:p><text:p text:style-name="P66">#include &lt;sys/wait.h&gt;</text:p><text:p text:style-name="P67"/><text:p text:style-name="P68">#define NFORKS 10</text:p><text:p text:style-name="P69"/><text:p text:style-name="P70">/*</text:p><text:p text:style-name="P71"><text:s/>* void waitkey (void) { printf("Press |ENTER| to continue ...\n"); fflush</text:p><text:p text:style-name="P72"><text:s/>* (stdout); getchar(); }</text:p><text:p text:style-name="P73"><text:s/>*/</text:p><text:p text:style-name="P74"/><text:p text:style-name="P75">void do_nothing(void) {</text:p><text:p text:style-name="P76"><text:tab/>printf("Parent: %d || Child pid: %d\n", getppid(), getpid());</text:p><text:p text:style-name="P77"><text:tab/>sleep(10);</text:p><text:p text:style-name="P78"><text:tab/>exit(0);</text:p><text:p text:style-name="P79">}</text:p><text:p text:style-name="P80"/><text:p text:style-name="P81">int main(int argc, char *argv[]) {</text:p><text:p text:style-name="P82"><text:tab/>pid_t <text:s text:c="10"/>whichone, pid[NFORKS];</text:p><text:p text:style-name="P83"><text:tab/>int <text:s text:c="12"/>j, status, howmany;</text:p><text:p text:style-name="P84"/><text:p text:style-name="P85"><text:tab/>for (j = 0; j &lt; NFORKS; j++) {</text:p><text:p text:style-name="P86"/><text:p text:style-name="P87"><text:tab/><text:tab/>if ((pid[j] = fork()) &lt; 0) {</text:p><text:p text:style-name="P88"><text:tab/><text:tab/><text:tab/>printf("fork failed with error code= %d\n", pid[j]);</text:p><text:p text:style-name="P89"><text:tab/><text:tab/><text:tab/>exit(1);</text:p><text:p text:style-name="P90"><text:tab/><text:tab/>}</text:p><text:p text:style-name="P91"><text:tab/><text:tab/>if (pid[j] == 0) {</text:p><text:p text:style-name="P92"><text:tab/><text:tab/><text:tab/>do_nothing();</text:p><text:p text:style-name="P93"><text:tab/><text:tab/>}</text:p><text:p text:style-name="P94"><text:tab/>}</text:p><text:p text:style-name="P95"/><text:p text:style-name="P96"><text:tab/>howmany = 0;</text:p><text:p text:style-name="P97"><text:tab/>while (howmany &lt; NFORKS) {</text:p><text:p text:style-name="P98"><text:tab/><text:tab/>/*</text:p><text:p text:style-name="P99"><text:tab/><text:tab/><text:s/>* waitpid (pid[j], &amp;status, 0);</text:p><text:p text:style-name="P100"><text:tab/><text:tab/><text:s/>*/</text:p><text:p text:style-name="P101"><text:tab/><text:tab/>whichone = wait(&amp;status);</text:p><text:p text:style-name="P102"><text:tab/><text:tab/>howmany++;</text:p><text:p text:style-name="P103"/><text:p text:style-name="P104"><text:tab/><text:tab/>printf("Child exited (%d).\n", whichone);</text:p><text:p text:style-name="P105"><text:span text:style-name="T106"><text:tab/></text:span><text:span text:style-name="T107">}</text:span></text:p><text:p text:style-name="P108">}</text:p><text:p text:style-name="P109"/></draw:text-box><svg:title/><svg:desc/></draw:frame><text:soft-page-break/><draw:frame draw:id="id1" draw:style-name="a5" draw:name="Text Box 2" text:anchor-type="as-char" svg:x="0in" svg:y="0in" svg:width="5.86042in" svg:height="4.04306in" style:rel-width="scale" style:rel-height="scale"><draw:text-box><text:p text:style-name="P110"><text:tab/>for (j = 0; j &lt; NFORKS; j++) {</text:p><text:p text:style-name="P111"/><text:p text:style-name="P112"><text:tab/><text:tab/>if ((pid[j] = fork()) &lt; 0) {</text:p><text:p text:style-name="P113"><text:tab/><text:tab/><text:tab/>printf("fork failed with error code= %d\n", pid[j]);</text:p><text:p text:style-name="P114"><text:tab/><text:tab/><text:tab/>exit(1);</text:p><text:p text:style-name="P115"><text:tab/><text:tab/>}</text:p><text:p text:style-name="P116"><text:tab/><text:tab/>if (pid[j] == 0) {</text:p><text:p text:style-name="P117"><text:tab/><text:tab/><text:tab/>do_nothing();</text:p><text:p text:style-name="P118"><text:tab/><text:tab/>}</text:p><text:p text:style-name="P119"><text:tab/>}</text:p><text:p text:style-name="P120"/><text:p text:style-name="P121"><text:tab/>howmany = 0;</text:p><text:p text:style-name="P122"><text:tab/>while (howmany &lt; NFORKS) {</text:p><text:p text:style-name="P123"><text:tab/><text:tab/>/*</text:p><text:p text:style-name="P124"><text:tab/><text:tab/><text:s/>* waitpid (pid[j], &amp;status, 0);</text:p><text:p text:style-name="P125"><text:tab/><text:tab/><text:s/>*/</text:p><text:p text:style-name="P126"><text:tab/><text:tab/>whichone = wait(&amp;status);</text:p><text:p text:style-name="P127"><text:tab/><text:tab/>howmany++;</text:p><text:p text:style-name="P128"/><text:p text:style-name="P129"><text:tab/><text:tab/>printf("Child exited (%d).\n", whichone);</text:p><text:p text:style-name="P130"><text:span text:style-name="T131"><text:tab/></text:span><text:span text:style-name="T132">}</text:span></text:p><text:p text:style-name="P133">}</text:p><text:p text:style-name="P134"/></draw:text-box><svg:title/><svg:desc/></draw:frame></text:p>
      <text:p text:style-name="P135">Codigo 1 – Conteúdo do arquivo fork-ex-10pid.c.</text:p>
      <text:p text:style-name="Normal"><text:span text:style-name="T136"><draw:frame draw:style-name="a6" draw:name="Picture 1" text:anchor-type="as-char" svg:x="0in" svg:y="0in" svg:width="5.90556in" svg:height="0.84348in" style:rel-width="scale" style:rel-height="scale"><draw:image xlink:href="media/image5.png" xlink:type="simple" xlink:show="embed" xlink:actuate="onLoad"/><svg:title/><svg:desc>A screenshot of a computer

Description automatically generated</svg:desc></draw:frame></text:span></text:p>
      <text:p text:style-name="P137">Figura 4 – Analise dos processos antes da criação do processo pai no MINIX.</text:p>
      <text:p text:style-name="Normal"><text:span text:style-name="T138"><draw:frame draw:style-name="a7" draw:name="Picture 1" text:anchor-type="as-char" svg:x="0in" svg:y="0in" svg:width="5.90556in" svg:height="2.12153in" style:rel-width="scale" style:rel-height="scale"><draw:image xlink:href="media/image6.png" xlink:type="simple" xlink:show="embed" xlink:actuate="onLoad"/><svg:title/><svg:desc>A screenshot of a computer screen

Description automatically generated</svg:desc></draw:frame></text:span></text:p>
      <text:p text:style-name="P139">Figura 5 – Analise dos processos após da criação do processo pai no MINIX.</text:p>
      <text:soft-page-break/>
      <text:p text:style-name="Normal"><text:span text:style-name="T140"><draw:frame draw:style-name="a8" draw:name="Picture 1" text:anchor-type="as-char" svg:x="0in" svg:y="0in" svg:width="5.90556in" svg:height="1.61806in" style:rel-width="scale" style:rel-height="scale"><draw:image xlink:href="media/image7.png" xlink:type="simple" xlink:show="embed" xlink:actuate="onLoad"/><svg:title/><svg:desc>A screenshot of a computer screen

Description automatically generated</svg:desc></draw:frame></text:span></text:p>
      <text:p text:style-name="P141">Figura 6 – Analise dos processos após o encerramento do processo pai no MINIX.</text:p>
      <text:p text:style-name="Normal"><text:span text:style-name="T142"><draw:frame draw:style-name="a9" draw:name="Picture 1" text:anchor-type="as-char" svg:x="0in" svg:y="0in" svg:width="5.90556in" svg:height="1.5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p text:style-name="P143">Figura 7 – Analise dos processos após a finalização dos processos orfãos no MINIX.</text:p>
      <text:p text:style-name="Normal">Quando encerramos um processo pai, seus processos filhos se tornam órfãos, mas não desaparecem. Eles são adotados pelo processo init e continuam até que terminem ou sejam encerrados manualmente. Isso é chamado de "Exterminar o processo".</text:p>
      <text:p text:style-name="Normal">Nas imagens, podemos ver que é possível simular processos usando o comando ps no MINIX 3.1.8. Agora, vamos executar o mesmo no Debian Linux para comparar.</text:p>
      <text:list text:style-name="LFO8" text:continue-numbering="true">
        <text:list-item>
          <text:list>
            <text:list-item>
              <text:p text:style-name="P144">Experimento 2 – LINUX DEBIAN – Usando ps</text:p>
            </text:list-item>
          </text:list>
        </text:list-item>
      </text:list>
      <text:p text:style-name="Normal">Sendo assim, para demonstrar o<text:s/>re-parenting dos processos filhos, vamos fazer o seguinte:</text:p>
      <text:list text:style-name="LFO10" text:continue-numbering="true">
        <text:list-item>
          <text:p text:style-name="P145">Vamos usar o comando<text:s/><text:span text:style-name="T146">ps lf</text:span><text:s/>antes de executar o codigo fork-ex-10pid.c (Codigo 1 e Figura 8);</text:p>
        </text:list-item>
        <text:list-item>
          <text:p text:style-name="P147">Ap<text:span text:style-name="T148">ó</text:span>s rodar o codigo irá criar os processos, portanto, iremos rodar o comando denovo para<text:s/>verificar a situação atual (Figura 9)<text:span text:style-name="T149">;</text:span></text:p>
        </text:list-item>
        <text:list-item>
          <text:p text:style-name="P150"><text:span text:style-name="T151">E no mesmo instante iremos dar um kill e o nome do processo pai e verificar o status novamente usando comando ps lf para ver se os processos filhos se tornaram-se orfãos (Figura 10);</text:span></text:p>
        </text:list-item>
        <text:list-item>
          <text:p text:style-name="P152"><text:span text:style-name="T153">E quando finalizar os processos orfãos, iremos rodar o comando para verificar o status geral (Figura 11)</text:span>.<text:s/></text:p>
        </text:list-item>
      </text:list>
      <text:p text:style-name="Normal"><draw:frame draw:style-name="a10" draw:name="Picture 1" text:anchor-type="as-char" svg:x="0in" svg:y="0in" svg:width="5.90556in" svg:height="0.65625in" style:rel-width="scale" style:rel-height="scale"><draw:image xlink:href="media/image9.png" xlink:type="simple" xlink:show="embed" xlink:actuate="onLoad"/><svg:title/><svg:desc/></draw:frame></text:p>
      <text:p text:style-name="P154">Figura 8 – Analise dos processos antes da criação do processo pai no Debian.</text:p>
      <text:soft-page-break/>
      <text:p text:style-name="Normal"><draw:frame draw:style-name="a11" draw:name="Picture 1" text:anchor-type="as-char" svg:x="0in" svg:y="0in" svg:width="5.90556in" svg:height="1.22917in" style:rel-width="scale" style:rel-height="scale"><draw:image xlink:href="media/image10.png" xlink:type="simple" xlink:show="embed" xlink:actuate="onLoad"/><svg:title/><svg:desc>A screenshot of a computer

Description automatically generated</svg:desc></draw:frame></text:p>
      <text:p text:style-name="P155">Figura 9 – Analise dos processos após da criação do processo pai no Debian.</text:p>
      <text:p text:style-name="Normal"><draw:frame draw:style-name="a12" draw:name="Picture 1" text:anchor-type="as-char" svg:x="0in" svg:y="0in" svg:width="5.90556in" svg:height="1.21875in" style:rel-width="scale" style:rel-height="scale"><draw:image xlink:href="media/image11.png" xlink:type="simple" xlink:show="embed" xlink:actuate="onLoad"/><svg:title/><svg:desc>A screenshot of a computer

Description automatically generated</svg:desc></draw:frame></text:p>
      <text:p text:style-name="P156">Figura 10 – Analise dos processos após o encerramento do processo pai no Debian.</text:p>
      <text:p text:style-name="Normal"><draw:frame draw:style-name="a13" draw:name="Picture 1" text:anchor-type="as-char" svg:x="0in" svg:y="0in" svg:width="5.90556in" svg:height="0.91319in" style:rel-width="scale" style:rel-height="scale"><draw:image xlink:href="media/image12.png" xlink:type="simple" xlink:show="embed" xlink:actuate="onLoad"/><svg:title/><svg:desc>A screen shot of a computer

Description automatically generated</svg:desc></draw:frame></text:p>
      <text:p text:style-name="P157">Figura 11 – Analise dos processos após a finalização dos processos orfãos no Debian.</text:p>
      <text:p text:style-name="Normal">Como podemos observar, houve uma diferença gritante entre o Linux e o Minix. No Linux, sem precisar usar o pstree, conseguimos visualizar parcialmente uma árvore hierárquica do processo pai, enquanto no Minix conseguimos ver apenas via processos. Agora, para completar com a dica do professor, iremos fazer outro experimento usando o pstree.</text:p>
      <text:p text:style-name="Normal">Quando encerramos um processo pai e seus processos filhos se tornam processos órfãos, eles não desaparecem imediatamente. Em vez disso, eles são adotados pelo processo init e continuam a existir até que terminem ou sejam encerrados manualmente. Portanto, o método utilizado neste código é a técnica de "Exterminar o processo", onde o processo pai espera que todos os processos filhos terminem antes de terminar. Isso garante que não haja processos órfãos.</text:p>
      <text:list text:style-name="LFO8" text:continue-numbering="true">
        <text:list-item>
          <text:list>
            <text:list-item>
              <text:p text:style-name="P158">Experimento 3 – LINUX DEBIAN – Usando pstree</text:p>
            </text:list-item>
          </text:list>
        </text:list-item>
      </text:list>
      <text:p text:style-name="Normal">Sendo assim, para demonstrar o re-parenting dos processos filhos, vamos fazer o seguinte:</text:p>
      <text:list text:style-name="LFO10" text:continue-numbering="true">
        <text:list-item>
          <text:p text:style-name="P159">Vamos usar o comando<text:s/><text:span text:style-name="T160">pstree -pl<text:s/></text:span>antes de executar o codigo fork-ex-10pid.c (Codigo 1 e Figura 12);</text:p>
        </text:list-item>
        <text:list-item>
          <text:p text:style-name="P161">Ap<text:span text:style-name="T162">ó</text:span>s rodar o codigo irá criar os processos, portanto, iremos rodar o comando denovo para verificar a situação atual (Figura 13)<text:span text:style-name="T163">;</text:span></text:p>
        </text:list-item>
        <text:list-item>
          <text:p text:style-name="P164"><text:span text:style-name="T165">E no mesmo instante iremos dar um kill e o nome do processo pai e verificar o status novamente usando comando<text:s/></text:span><text:span text:style-name="T166">pstree -pl<text:s/></text:span><text:span text:style-name="T167">para ver se os processos filhos se tornaram-se orfãos (Figura 14);</text:span></text:p>
        </text:list-item>
        <text:list-item>
          <text:p text:style-name="P168"><text:span text:style-name="T169">E quando finalizar os processos orfãos, iremos rodar o comando para verificar o status geral (Figura 15)</text:span>.<text:s/></text:p>
        </text:list-item>
      </text:list>
      <text:p text:style-name="Normal"><text:span text:style-name="T170">Obs.: para uma visualiza</text:span><text:span text:style-name="T171">ção mais organizada, foi deixado 4 arquivos LOG em txt para uma visualização detalhada da arvore completa, pois se fosse deixado como codigo aqui no relatorio, o mesmo poderia ficar muito extenso... sendo assim,<text:s/></text:span><text:span text:style-name="T172">irei deixar como Figuras e de forma resumida focando as partes importantes da arvore</text:span><text:span text:style-name="T173">.</text:span></text:p>
      <text:p text:style-name="P174"><draw:frame draw:style-name="a14" draw:name="Picture 1" text:anchor-type="as-char" svg:x="0in" svg:y="0in" svg:width="4.07418in" svg:height="3.1984in" style:rel-width="scale" style:rel-height="scale"><draw:image xlink:href="media/image13.png" xlink:type="simple" xlink:show="embed" xlink:actuate="onLoad"/><svg:title/><svg:desc/></draw:frame></text:p>
      <text:p text:style-name="P175">Figura 12 – Analise da arvore de processos antes da criação do processo pai no Debian.</text:p>
      <text:p text:style-name="P176"><text:span text:style-name="T177"><draw:frame draw:style-name="a15" draw:name="Picture 1" text:anchor-type="as-char" svg:x="0in" svg:y="0in" svg:width="5.90556in" svg:height="3.01111in" style:rel-width="scale" style:rel-height="scale"><draw:image xlink:href="media/image14.png" xlink:type="simple" xlink:show="embed" xlink:actuate="onLoad"/><svg:title/><svg:desc>A screen shot of a computer

Description automatically generated</svg:desc></draw:frame></text:span></text:p>
      <text:p text:style-name="P178">Figura 13 – Analise da arvore de<text:s/>processos após da criação do processo pai no Debian.</text:p>
      <text:p text:style-name="P179"/>
      <text:p text:style-name="P180"/>
      <text:p text:style-name="P181"/>
      <text:p text:style-name="P182"><draw:frame draw:style-name="a16" draw:name="Picture 1" text:anchor-type="as-char" svg:x="0in" svg:y="0in" svg:width="5.78206in" svg:height="7.08432in" style:rel-width="scale" style:rel-height="scale"><draw:image xlink:href="media/image15.png" xlink:type="simple" xlink:show="embed" xlink:actuate="onLoad"/><svg:title/><svg:desc>A screenshot of a computer program

Description automatically generated</svg:desc></draw:frame></text:p>
      <text:p text:style-name="P183">Figura 14 – Analise da arvore de processos após o encerramento do processo pai no Debian.</text:p>
      <text:p text:style-name="P184"/>
      <text:p text:style-name="P185"/>
      <text:soft-page-break/>
      <text:p text:style-name="P186"><draw:frame draw:style-name="a17" draw:name="Picture 1" text:anchor-type="as-char" svg:x="0in" svg:y="0in" svg:width="5.5661in" svg:height="6.39722in" style:rel-width="scale" style:rel-height="scale"><draw:image xlink:href="media/image16.png" xlink:type="simple" xlink:show="embed" xlink:actuate="onLoad"/><svg:title/><svg:desc>A screen shot of a computer

Description automatically generated</svg:desc></draw:frame></text:p>
      <text:p text:style-name="P187">Figura 15 – Analise da arvore de processos após a finalização dos processos orfãos no Debian.</text:p>
      <text:p text:style-name="P188">Para a<text:s/>exportação dos logs foi realizada conforme a Figura 16.<text:s/>Vale ressaltar que, essa captura foi feita novamente (outro teste), logo o PID do pai não é mais o 4934 e sim o 5194.</text:p>
      <text:p text:style-name="P189"><text:span text:style-name="T190"><draw:frame draw:style-name="a18" draw:name="Picture 1" text:anchor-type="as-char" svg:x="0in" svg:y="0in" svg:width="5.90556in" svg:height="1.12083in" style:rel-width="scale" style:rel-height="scale"><draw:image xlink:href="media/image17.png" xlink:type="simple" xlink:show="embed" xlink:actuate="onLoad"/><svg:title/><svg:desc>A screenshot of a computer screen

Description automatically generated</svg:desc></draw:frame></text:span></text:p>
      <text:p text:style-name="P191">Figura 16 – Backend dos comandos realizados no Debian.</text:p>
      <text:p text:style-name="Normal">Como podemos observar, com o uso de pstree, conseguimos analisar de forma mais<text:s/><text:soft-page-break/>completa a quest<text:span text:style-name="T192">ão da arvore dos processos</text:span>.</text:p>
      <text:p text:style-name="Normal">Quando encerramos um processo pai e seus processos filhos se tornam processos órfãos, eles não desaparecem imediatamente. Em vez disso, eles são adotados pelo processo init e continuam a existir até que terminem ou sejam encerrados manualmente. Portanto, o método utilizado neste código é a técnica de "Exterminar o processo", onde o processo pai espera que todos os processos filhos terminem antes de terminar. Isso garante que não haja processos órfãos.</text:p>
      <text:p text:style-name="Normal"/>
      <text:list text:style-name="LFO8" text:continue-numbering="true">
        <text:list-item>
          <text:p text:style-name="P193">Referências</text:p>
        </text:list-item>
      </text:list>
      <text:list text:style-name="LFO11" text:continue-numbering="true">
        <text:list-item>
          <text:p text:style-name="P194"><text:bookmark-start text:name="_Ref153130300"/><text:span text:style-name="T195">Dalton Matsuo Tavares, (2024) “PROJETO 4 – MINIX”, material disponibilizado no google classroom e SIGAA, Janeiro.</text:span><text:bookmark-end text:name="_Ref153130300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BCparagraph" style:default-outline-level="1">
      <style:paragraph-properties fo:text-align="center"/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1" style:next-style-name="SBCparagraph" style:default-outline-level="2">
      <style:paragraph-properties fo:margin-top="0.1666in"/>
      <style:text-properties fo:font-variant="small-caps" fo:font-size="13pt" style:font-size-asian="13pt" fo:hyphenate="false"/>
    </style:style>
    <style:style style:name="Heading3" style:display-name="Heading 3" style:family="paragraph" style:parent-style-name="Standard" style:next-style-name="SBCparagraph" style:default-outline-level="3">
      <style:paragraph-properties fo:keep-with-next="always" fo:margin-top="0.166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BCparagraph" style:default-outline-level="4">
      <style:paragraph-properties fo:keep-with-next="always" fo:text-align="justify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BCparagraph" style:default-outline-level="5">
      <style:paragraph-properties fo:keep-with-next="always"/>
      <style:text-properties style:font-name="TimesNewRoman,Bold" style:font-name-asian="TimesNewRoman,Bold" style:font-name-complex="TimesNewRoman,Bold" fo:font-weight="bold" style:font-weight-asian="bold" fo:color="#000000" fo:hyphenate="false"/>
    </style:style>
    <style:style style:name="Heading6" style:display-name="Heading 6" style:family="paragraph" style:parent-style-name="Standard" style:next-style-name="SBCparagraph" style:default-outline-level="6">
      <style:paragraph-properties fo:keep-with-next="always" fo:text-align="center"/>
      <style:text-properties fo:font-weight="bold" style:font-weight-asian="bold" fo:font-style="italic" style:font-style-asian="italic" fo:color="#000000" fo:hyphenate="false"/>
    </style:style>
    <style:style style:name="Heading7" style:display-name="Heading 7" style:family="paragraph" style:parent-style-name="Standard" style:next-style-name="SBCparagraph" style:default-outline-level="7">
      <style:paragraph-properties fo:keep-with-next="always" fo:text-align="justify"/>
      <style:text-properties fo:font-weight="bold" style:font-weight-asian="bold" fo:hyphenate="false"/>
    </style:style>
    <style:style style:name="Heading8" style:display-name="Heading 8" style:family="paragraph" style:parent-style-name="Standard" style:next-style-name="SBCparagraph" style:default-outline-level="8">
      <style:paragraph-properties fo:keep-with-next="always"/>
      <style:text-properties fo:font-weight="bold" style:font-weight-asian="bold" fo:hyphenate="false"/>
    </style:style>
    <style:style style:name="Heading9" style:display-name="Heading 9" style:family="paragraph" style:parent-style-name="Standard" style:next-style-name="SBCparagraph" style:default-outline-level="9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paragraph-properties fo:text-align="justify" fo:margin-top="0.0826in" fo:text-indent="0.1972in"/>
      <style:text-properties style:font-name="Times" style:font-name-asian="Times New Roman" style:font-name-complex="Times New Roman" fo:color="#000000" style:font-size-complex="10pt" fo:hyphenate="false"/>
    </style:style>
    <style:style style:name="DefaultParagraphFont" style:display-name="Default Paragraph Font" style:family="text"/>
    <style:style style:name="SBCtitle1" style:display-name="SBC:title:1" style:family="paragraph" style:parent-style-name="Standard" style:next-style-name="SBCparagraphfirst" style:default-outline-level="1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2" style:display-name="SBC:title:2" style:family="paragraph" style:parent-style-name="Standard" style:next-style-name="SBCparagraphfirst" style:default-outline-level="2">
      <style:paragraph-properties fo:keep-with-next="always" fo:margin-top="0.1652in"/>
      <style:text-properties fo:font-weight="bold" style:font-weight-asian="bold" fo:hyphenate="false"/>
    </style:style>
    <style:style style:name="Standard" style:display-name="Standard" style:family="paragraph">
      <style:text-properties style:font-name="Times" style:font-name-asian="Times New Roman" style:font-name-complex="Times New Roman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itle" style:display-name="Title" style:family="paragraph" style:parent-style-name="Standard" style:next-style-name="SBCauthors">
      <style:paragraph-properties fo:text-align="center" fo:margin-bottom="0.1576in"/>
      <style:text-properties style:font-name-asian="Times" style:font-name-complex="Times" fo:font-weight="bold" style:font-weight-asian="bold" fo:font-variant="small-caps" fo:font-size="18pt" style:font-size-asian="18pt" fo:hyphenate="false"/>
    </style:style>
    <style:style style:name="Subtitle" style:display-name="Subtitle" style:family="paragraph" style:parent-style-name="Title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Heading10" style:display-name="Heading 10" style:family="paragraph" style:parent-style-name="Title" style:next-style-name="Textbody">
      <style:text-properties style:font-weight-complex="bold" fo:hyphenate="false"/>
    </style:style>
    <style:style style:name="List" style:display-name="List" style:family="paragraph" style:parent-style-name="Textbody">
      <style:text-properties style:font-name-complex="Lucida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/>
      <style:text-properties fo:font-weight="bold" style:font-weight-asian="bold" fo:color="#000000" fo:hyphenate="fals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fo:hyphenate="false"/>
    </style:style>
    <style:style style:name="SBCreference" style:display-name="SBC:reference" style:family="paragraph" style:parent-style-name="Standard">
      <style:paragraph-properties fo:text-align="justify" fo:margin-top="0.0826in" fo:margin-left="0.1965in" fo:text-indent="-0.1965in">
        <style:tab-stops/>
      </style:paragraph-properties>
      <style:text-properties fo:color="#000000" fo:hyphenate="false"/>
    </style:style>
    <style:style style:name="SBCparagraph" style:display-name="SBC:paragraph" style:family="paragraph" style:parent-style-name="Standard">
      <style:paragraph-properties fo:text-align="justify" fo:margin-top="0.0826in" fo:text-indent="0.4923in"/>
      <style:text-properties fo:color="#000000" fo:hyphenate="fals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/>
      <style:text-properties fo:hyphenate="fals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hyphenate="fals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false"/>
    </style:style>
    <style:style style:name="SBClist" style:display-name="SBC:list" style:family="paragraph" style:parent-style-name="Standard" style:list-style-name="SBCnumberlist">
      <style:paragraph-properties fo:text-align="justify">
        <style:tab-stops>
          <style:tab-stop style:type="left" style:position="-5.6in"/>
        </style:tab-stops>
      </style:paragraph-properties>
      <style:text-properties fo:hyphenate="false"/>
    </style:style>
    <style:style style:name="SBCfigure" style:display-name="SBC:figure" style:family="paragraph" style:parent-style-name="Standard" style:next-style-name="SBCcaption">
      <style:paragraph-properties fo:keep-with-next="always" fo:widows="2" fo:orphans="2" fo:text-align="center" fo:margin-top="0.0826in"/>
      <style:text-properties fo:hyphenate="false"/>
    </style:style>
    <style:style style:name="SBCcaption" style:display-name="SBC:caption" style:family="paragraph" style:parent-style-name="Standard" style:next-style-name="SBCparagraph">
      <style:paragraph-properties fo:widows="2" fo:orphans="2" fo:text-align="center" fo:margin-top="0.0826in" fo:margin-bottom="0.0826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" style:display-name="SBC:title" style:family="paragraph" style:parent-style-name="Standard" style:next-style-name="SBCauthors">
      <style:paragraph-properties fo:text-align="center" fo:margin-top="0.1652in"/>
      <style:text-properties fo:font-weight="bold" style:font-weight-asian="bold" fo:font-size="16pt" style:font-size-asian="16pt" fo:hyphenate="false"/>
    </style:style>
    <style:style style:name="SBCtitle3" style:display-name="SBC:title:3" style:family="paragraph" style:parent-style-name="Standard" style:next-style-name="SBCparagraphfirst">
      <style:paragraph-properties fo:keep-with-next="always" fo:margin-top="0.0784in"/>
      <style:text-properties fo:hyphenate="false"/>
    </style:style>
    <style:style style:name="SBClistnumbered" style:display-name="SBC:list:numbered" style:family="paragraph" style:parent-style-name="Standard" style:list-style-name="SBCnumberlistnumbered">
      <style:paragraph-properties fo:text-align="justify">
        <style:tab-stops>
          <style:tab-stop style:type="left" style:position="-22.7875in"/>
        </style:tab-stops>
      </style:paragraph-properties>
      <style:text-properties fo:hyphenate="false"/>
    </style:style>
    <style:style style:name="SBCfootnote" style:display-name="SBC:footnote" style:family="paragraph" style:parent-style-name="Standard">
      <style:paragraph-properties fo:margin-top="0.043in" fo:margin-left="0.1965in" fo:text-indent="-0.1965in">
        <style:tab-stops/>
      </style:paragraph-properties>
      <style:text-properties fo:font-size="10pt" style:font-size-asian="10pt" fo:hyphenate="fals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PageNumber" style:display-name="Page Number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Zeichenformat" style:display-name="Zeichenformat" style:family="text"/>
    <style:style style:name="Endnoteanchor" style:display-name="Endnote anchor" style:family="text">
      <style:text-properties style:text-position="super 66.6%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true"/>
    </style:style>
    <style:style style:name="PlaceholderText" style:display-name="Placeholder Text" style:family="text" style:parent-style-name="DefaultParagraphFont">
      <style:text-properties fo:color="#666666"/>
    </style:style>
    <style:style style:name="NoSpacing" style:display-name="No Spacing" style:family="paragraph">
      <style:paragraph-properties fo:text-align="justify" fo:text-indent="0.2958in"/>
      <style:text-properties style:font-name="Times" style:font-name-asian="Times New Roman" style:font-name-complex="Times New Roman" fo:color="#000000" style:font-size-complex="10pt" fo:hyphenate="false"/>
    </style:style>
    <style:style style:name="HeaderChar" style:display-name="Header Char" style:family="text" style:parent-style-name="DefaultParagraphFont">
      <style:text-properties style:font-name="Times" style:font-name-asian="Times New Roman" style:font-name-complex="Times New Roman" style:font-size-complex="10pt"/>
    </style:style>
    <style:style style:name="Style1" style:display-name="Style1" style:family="paragraph" style:parent-style-name="Normal">
      <style:paragraph-properties fo:text-align="center"/>
      <style:text-properties fo:font-weight="bold" style:font-weight-asian="bold" style:font-weight-complex="bold" fo:hyphenate="false"/>
    </style:style>
    <style:style style:name="Style1Char" style:display-name="Style1 Char" style:family="text" style:parent-style-name="DefaultParagraphFont">
      <style:text-properties style:font-name="Times" style:font-name-asian="Times New Roman" style:font-name-complex="Times New Roman" fo:font-weight="bold" style:font-weight-asian="bold" style:font-weight-complex="bold" fo:color="#000000" style:font-size-complex="10pt"/>
    </style:style>
    <style:style style:name="Style2" style:display-name="Style2" style:family="paragraph" style:parent-style-name="Normal">
      <style:text-properties fo:hyphenate="false"/>
    </style:style>
    <style:style style:name="Style2Char" style:display-name="Style2 Char" style:family="text" style:parent-style-name="DefaultParagraphFont">
      <style:text-properties style:font-name="Times" style:font-name-asian="Times New Roman" style:font-name-complex="Times New Roman" fo:color="#000000" style:font-size-complex="10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2.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SBCnumberlist" style:display-name="SBC:number:list">
      <text:list-level-style-bullet text:level="1" text:style-name="WW_CharLFO5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SBCnumberlistnumbered" style:display-name="SBC:number:list:numbered">
      <text:list-level-style-number text:level="1" style:num-suffix="." style:num-format="1">
        <style:list-level-properties text:space-before="0.4923in" text:min-label-width="0.2951in" text:list-level-position-and-space-mode="label-alignment">
          <style:list-level-label-alignment text:label-followed-by="listtab" fo:margin-left="0.7875in" fo:text-indent="-0.2951in"/>
        </style:list-level-properties>
      </text:list-level-style-number>
      <text:list-level-style-number text:level="2" style:num-suffix="." style:num-format="1">
        <style:list-level-properties text:space-before="1.2798in" text:min-label-width="0.2951in" text:list-level-position-and-space-mode="label-alignment">
          <style:list-level-label-alignment text:label-followed-by="listtab" fo:margin-left="1.575in" fo:text-indent="-0.2951in"/>
        </style:list-level-properties>
      </text:list-level-style-number>
      <text:list-level-style-number text:level="3" style:num-suffix="." style:num-format="1">
        <style:list-level-properties text:space-before="2.0673in" text:min-label-width="0.2951in" text:list-level-position-and-space-mode="label-alignment">
          <style:list-level-label-alignment text:label-followed-by="listtab" fo:margin-left="2.3625in" fo:text-indent="-0.2951in"/>
        </style:list-level-properties>
      </text:list-level-style-number>
      <text:list-level-style-number text:level="4" style:num-suffix="." style:num-format="1">
        <style:list-level-properties text:space-before="2.8548in" text:min-label-width="0.2951in" text:list-level-position-and-space-mode="label-alignment">
          <style:list-level-label-alignment text:label-followed-by="listtab" fo:margin-left="3.15in" fo:text-indent="-0.2951in"/>
        </style:list-level-properties>
      </text:list-level-style-number>
      <text:list-level-style-number text:level="5" style:num-suffix="." style:num-format="1">
        <style:list-level-properties text:space-before="3.6423in" text:min-label-width="0.2951in" text:list-level-position-and-space-mode="label-alignment">
          <style:list-level-label-alignment text:label-followed-by="listtab" fo:margin-left="3.9375in" fo:text-indent="-0.2951in"/>
        </style:list-level-properties>
      </text:list-level-style-number>
      <text:list-level-style-number text:level="6" style:num-suffix="." style:num-format="1">
        <style:list-level-properties text:space-before="4.4298in" text:min-label-width="0.2951in" text:list-level-position-and-space-mode="label-alignment">
          <style:list-level-label-alignment text:label-followed-by="listtab" fo:margin-left="4.725in" fo:text-indent="-0.2951in"/>
        </style:list-level-properties>
      </text:list-level-style-number>
      <text:list-level-style-number text:level="7" style:num-suffix="." style:num-format="1">
        <style:list-level-properties text:space-before="5.2173in" text:min-label-width="0.2951in" text:list-level-position-and-space-mode="label-alignment">
          <style:list-level-label-alignment text:label-followed-by="listtab" fo:margin-left="5.5125in" fo:text-indent="-0.2951in"/>
        </style:list-level-properties>
      </text:list-level-style-number>
      <text:list-level-style-number text:level="8" style:num-suffix="." style:num-format="1">
        <style:list-level-properties text:space-before="6.0048in" text:min-label-width="0.2951in" text:list-level-position-and-space-mode="label-alignment">
          <style:list-level-label-alignment text:label-followed-by="listtab" fo:margin-left="6.3in" fo:text-indent="-0.2951in"/>
        </style:list-level-properties>
      </text:list-level-style-number>
      <text:list-level-style-number text:level="9" style:num-suffix="." style:num-format="1">
        <style:list-level-properties text:space-before="6.7923in" text:min-label-width="0.2951in" text:list-level-position-and-space-mode="label-alignment">
          <style:list-level-label-alignment text:label-followed-by="listtab" fo:margin-left="7.0875in" fo:text-indent="-0.295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77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Gustavo Borges</meta:initial-creator>
    <dc:creator>Gustavo Borges</dc:creator>
    <meta:creation-date>2024-02-11T22:39:00Z</meta:creation-date>
    <dc:date>2024-02-19T02:13:00Z</dc:date>
    <meta:template xlink:href="Normal.dotm" xlink:type="simple"/>
    <meta:editing-cycles>73</meta:editing-cycles>
    <meta:editing-duration>PT34080S</meta:editing-duration>
    <meta:user-defined meta:name="Info 1"/>
    <meta:user-defined meta:name="Info 2"/>
    <meta:user-defined meta:name="Info 3"/>
    <meta:user-defined meta:name="Info 4"/>
    <meta:document-statistic meta:page-count="10" meta:paragraph-count="18" meta:word-count="1460" meta:character-count="9328" meta:row-count="65" meta:non-whitespace-character-count="7886"/>
  </office:meta>
</office:document-meta>
</file>