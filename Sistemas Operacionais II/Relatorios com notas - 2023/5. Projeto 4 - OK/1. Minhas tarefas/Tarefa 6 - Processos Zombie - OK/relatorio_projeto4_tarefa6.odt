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10">
      <text:list-level-style-bullet text:level="1" text:style-name="WW_CharLFO10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10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0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0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0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0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0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0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0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1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BCtitle" style:master-page-name="MP0" style:family="paragraph">
      <style:paragraph-properties fo:break-before="page"/>
      <style:text-properties style:font-name="Times New Roman"/>
    </style:style>
    <style:style style:name="T2" style:parent-style-name="DefaultParagraphFont" style:family="text">
      <style:text-properties style:font-name="Times New Roman"/>
    </style:style>
    <style:style style:name="T3" style:parent-style-name="DefaultParagraphFont" style:family="text">
      <style:text-properties style:font-name="Times New Roman" style:text-position="super 66.6%"/>
    </style:style>
    <style:style style:name="T4" style:parent-style-name="DefaultParagraphFont" style:family="text">
      <style:text-properties style:font-name="Times New Roman" style:text-position="super 66.6%"/>
    </style:style>
    <style:style style:name="T5" style:parent-style-name="DefaultParagraphFont" style:family="text">
      <style:text-properties style:font-name="Times New Roman"/>
    </style:style>
    <style:style style:name="P6" style:parent-style-name="SBCemail" style:family="paragraph">
      <style:text-properties style:font-name="Times New Roman" style:font-name-complex="Times New Roman"/>
    </style:style>
    <style:style style:name="P7" style:parent-style-name="SBCresumo" style:family="paragraph">
      <style:text-properties style:font-name="Times New Roman"/>
    </style:style>
    <style:style style:name="P8" style:parent-style-name="ListParagraph" style:list-style-name="LFO7" style:family="paragraph"/>
    <style:style style:name="P9" style:parent-style-name="ListParagraph" style:list-style-name="LFO7" style:family="paragraph"/>
    <style:style style:name="P10" style:parent-style-name="SBCtitle1" style:list-style-name="LFO8" style:family="paragraph"/>
    <style:style style:name="P11" style:parent-style-name="Normal" style:family="paragraph">
      <style:paragraph-properties fo:text-align="center"/>
    </style:style>
    <style:style style:name="P12" style:parent-style-name="Normal" style:family="paragraph">
      <style:paragraph-properties fo:text-align="center"/>
      <style:text-properties fo:font-weight="bold" style:font-weight-asian="bold" style:font-weight-complex="bold"/>
    </style:style>
    <style:style style:name="P13" style:parent-style-name="Normal" style:family="paragraph">
      <style:paragraph-properties fo:text-align="center"/>
    </style:style>
    <style:style style:name="T14" style:parent-style-name="DefaultParagraphFont" style:family="text">
      <style:text-properties fo:font-weight="bold" style:font-weight-asian="bold" style:font-weight-complex="bold"/>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T34" style:parent-style-name="DefaultParagraphFont" style:family="text">
      <style:text-properties fo:language="en" fo:country="US"/>
    </style:style>
    <style:style style:name="P35" style:parent-style-name="Normal" style:family="paragraph">
      <style:paragraph-properties fo:text-align="center"/>
      <style:text-properties fo:font-weight="bold" style:font-weight-asian="bold" style:font-weight-complex="bold"/>
    </style:style>
    <style:style style:name="P36" style:parent-style-name="SBCtitle1" style:list-style-name="LFO8" style:family="paragraph"/>
    <style:style style:name="T37" style:parent-style-name="DefaultParagraphFont" style:family="text">
      <style:text-properties fo:font-weight="bold" style:font-weight-asian="bold" style:font-weight-complex="bold" fo:color="#FF0000"/>
    </style:style>
    <style:style style:name="T38" style:parent-style-name="DefaultParagraphFont" style:family="text">
      <style:text-properties fo:color="#FF0000"/>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style:font-name="Calibri" fo:font-weight="bold" style:font-weight-asian="bold" style:font-weight-complex="bold" fo:color="#FF0000"/>
    </style:style>
    <style:style style:name="T43" style:parent-style-name="DefaultParagraphFont" style:family="text">
      <style:text-properties style:font-name="Calibri" style:use-window-font-color="true"/>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DefaultParagraphFont" style:family="text">
      <style:text-properties style:font-name="Calibri" fo:font-weight="bold" style:font-weight-asian="bold" style:font-weight-complex="bold"/>
    </style:style>
    <style:style style:name="T47" style:parent-style-name="DefaultParagraphFont" style:family="text">
      <style:text-properties style:font-name="Calibri"/>
    </style:style>
    <style:style style:name="P48" style:parent-style-name="Normal" style:family="paragraph">
      <style:paragraph-properties fo:text-align="center"/>
    </style:style>
    <style:style style:name="T49" style:parent-style-name="DefaultParagraphFont" style:family="text">
      <style:text-properties fo:font-weight="bold" style:font-weight-asian="bold" style:font-weight-complex="bold"/>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T67" style:parent-style-name="DefaultParagraphFont" style:family="text">
      <style:text-properties fo:font-weight="bold" style:font-weight-asian="bold" style:font-weight-complex="bold" fo:color="#FF0000"/>
    </style:style>
    <style:style style:name="P68" style:parent-style-name="Normal" style:family="paragraph">
      <style:paragraph-properties fo:text-align="center"/>
      <style:text-properties fo:font-weight="bold" style:font-weight-asian="bold" style:font-weight-complex="bold"/>
    </style:style>
    <style:style style:name="P69" style:parent-style-name="Normal" style:family="paragraph">
      <style:text-properties style:font-name="Calibri" fo:font-weight="bold" style:font-weight-asian="bold" style:font-weight-complex="bold" fo:color="#FF0000"/>
    </style:style>
    <style:style style:name="P70" style:parent-style-name="Normal" style:family="paragraph">
      <style:paragraph-properties fo:text-align="center"/>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T84" style:parent-style-name="DefaultParagraphFont" style:family="text">
      <style:text-properties fo:language="en" fo:country="US"/>
    </style:style>
    <style:style style:name="T85" style:parent-style-name="DefaultParagraphFont" style:family="text">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P92" style:parent-style-name="Normal" style:family="paragraph">
      <style:text-properties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P98" style:parent-style-name="Normal" style:family="paragraph">
      <style:text-properties fo:language="en" fo:country="US"/>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text-properties fo:language="en" fo:country="US"/>
    </style:style>
    <style:style style:name="T102" style:parent-style-name="DefaultParagraphFont" style:family="text">
      <style:text-properties fo:language="en" fo:country="US"/>
    </style:style>
    <style:style style:name="T103" style:parent-style-name="DefaultParagraphFont" style:family="text">
      <style:text-properties fo:font-weight="bold" style:font-weight-asian="bold" style:font-weight-complex="bold"/>
    </style:style>
    <style:style style:name="P104" style:parent-style-name="Normal" style:family="paragraph">
      <style:text-properties fo:language="en" fo:country="US"/>
    </style:style>
    <style:style style:name="T105" style:parent-style-name="DefaultParagraphFont" style:family="text">
      <style:text-properties fo:language="en" fo:country="US"/>
    </style:style>
    <style:style style:name="T106" style:parent-style-name="DefaultParagraphFont" style:family="text">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T111" style:parent-style-name="DefaultParagraphFont" style:family="text">
      <style:text-properties fo:language="en" fo:country="US"/>
    </style:style>
    <style:style style:name="T112" style:parent-style-name="DefaultParagraphFont" style:family="text">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T117" style:parent-style-name="DefaultParagraphFont" style:family="text">
      <style:text-properties fo:language="en" fo:country="US"/>
    </style:style>
    <style:style style:name="T118" style:parent-style-name="DefaultParagraphFont" style:family="text">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T123" style:parent-style-name="DefaultParagraphFont" style:family="text">
      <style:text-properties fo:language="en" fo:country="US"/>
    </style:style>
    <style:style style:name="P124" style:parent-style-name="Normal" style:family="paragraph">
      <style:paragraph-properties fo:text-align="center"/>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P131" style:parent-style-name="Normal" style:family="paragraph">
      <style:paragraph-properties fo:text-align="center"/>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P136" style:parent-style-name="SBCtitle1" style:list-style-name="LFO8" style:family="paragraph"/>
    <style:style style:name="T137" style:parent-style-name="DefaultParagraphFont" style:family="text">
      <style:text-properties style:font-name="Calibri"/>
    </style:style>
    <style:style style:name="T138" style:parent-style-name="DefaultParagraphFont" style:family="text">
      <style:text-properties style:font-name="Calibri" fo:font-weight="bold" style:font-weight-asian="bold" style:font-weight-complex="bold"/>
    </style:style>
    <style:style style:name="T139" style:parent-style-name="DefaultParagraphFont" style:family="text">
      <style:text-properties style:font-name="Calibri"/>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style:font-name="Calibri"/>
    </style:style>
    <style:style style:name="T144" style:parent-style-name="DefaultParagraphFont" style:family="text">
      <style:text-properties style:font-name="Calibri" fo:font-weight="bold" style:font-weight-asian="bold" style:font-weight-complex="bold"/>
    </style:style>
    <style:style style:name="T145" style:parent-style-name="DefaultParagraphFont" style:family="text">
      <style:text-properties style:font-name="Calibri"/>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P148" style:parent-style-name="ListParagraph" style:list-style-name="LFO8" style:family="paragraph">
      <style:text-properties fo:font-weight="bold" style:font-weight-asian="bold" style:font-weight-complex="bold"/>
    </style:style>
    <style:style style:name="P149" style:parent-style-name="SBCparagraph" style:list-style-name="LFO11" style:family="paragraph"/>
    <style:style style:name="T150" style:parent-style-name="DefaultParagraphFont" style:family="text">
      <style:text-properties style:font-name="Times New Roman"/>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office:automatic-styles>
  <office:body>
    <office:text text:use-soft-page-breaks="true">
      <text:p text:style-name="P1">PROJETO 4: MINIX</text:p>
      <text:p text:style-name="SBCauthors"><text:span text:style-name="T2">Gustavo Borges Peres da Silva</text:span><text:span text:style-name="T3">1</text:span></text:p>
      <text:p text:style-name="SBCinstitution"><text:span text:style-name="T4">1</text:span><text:span text:style-name="T5">Departamento de Ciência da Computação – Universidade Federal de Catalão (UFCAT)</text:span></text:p>
      <text:p text:style-name="P6">gustavo.silva@discente.ufcat.edu.br</text:p>
      <text:p text:style-name="P7"/>
      <text:p text:style-name="SBCtitle1">Objetivos</text:p>
      <text:list text:style-name="LFO7" text:continue-numbering="true">
        <text:list-item>
          <text:p text:style-name="P8">Familiarizar o aluno com o SO MINIX e testes em<text:s/>ambiente de máquina virtual.</text:p>
        </text:list-item>
        <text:list-item>
          <text:p text:style-name="P9">Processos órfãos e zumbis.</text:p>
        </text:list-item>
      </text:list>
      <text:list text:style-name="LFO8" text:continue-numbering="true">
        <text:list-item>
          <text:p text:style-name="P10">TAREFA 6 (gerenciamento de processos): Processos zumbis (zombie.c) (de 19/02/2024 a 22/02/2024)</text:p>
        </text:list-item>
      </text:list>
      <text:p text:style-name="Normal">No Unix e SOs Unix-like, um processo zumbi ou defunto<text:s/>é<text:s/>um processo que completou sua execução mas ainda possui uma entrada na tabela de processos. Esta entrada ainda<text:s/>é<text:s/>necessária para permitir ao processo que iniciou o processo (agora zumbi) a leitura de seu status de saída. O termo processo zumbi deriva da definição comum de zumbi - uma pessoa não morta.</text:p>
      <text:p text:style-name="Normal">Nos termos desta metáfora, o processo filho já<text:s/>morreu, mas ainda não foi enterrado.</text:p>
      <text:p text:style-name="Normal">Quando um processo termina, toda a memória e recursos associados a ele são desalocados de modo que possam ser usados por outros processos. Entretanto, a entrada do processo na tabela de processo ainda perdura. O pai pode ler o status de saída do filho pela execução da chamada de sistema wait, momento no qual o zumbi<text:s/>é<text:s/>removido. A chamada wait pode ser executada em código sequencial, mas<text:s/>é<text:s/>comumente executada em um handler pelo sinal SIGHLD, o qual o pai recebe sempre que um filho morre.</text:p>
      <text:p text:style-name="Normal">Após a remoção do zumbi, seu ID de processo e entrada na tabela de processo pode então ser reutilizado. Entretanto, se um pai falha na chamada wait, o zumbi será<text:s/>deixado na tabela de processo. Em algumas situações, isto pode ser desejado, por exemplo, se o pai cria outro processo filho, ele se assegura que não irá<text:s/>alocar o mesmo ID de processo.</text:p>
      <text:p text:style-name="Normal">Um processo zumbi não<text:s/>é<text:s/>o mesmo que um processo<text:s/>órfão. Um processo<text:s/>órfão<text:s/>é<text:s/>um processo que ainda está<text:s/>executando, mas cujos pais já<text:s/>morreram. Eles não se tornam processos filhos; ao invés disso, eles são adotados pelo init (ID de processo 1), o qual espera por seus filhos.<text:s/></text:p>
      <text:p text:style-name="Normal">Zumbis podem ser identificados na saída do comando Unix 'ps' pela presença de um<text:s/>“z”<text:s/>na coluna STAT. Zumbis que existem por mais do que um pequeno intervalo de tempo, tipicamente indicam um bug no programa do processo pai, ou apenas uma decisão incomum ao sepultar filhos (veja o exemplo Figura 1). A presença de uns poucos zumbis não<text:s/>é<text:s/>algo preocupante em si, mas pode indicar um problema que se tornaria sério sob cargas excessivas. Como não existe memória alocada a processos zumbis, exceto para a tabela de processo, a preocupação primária com muitos zumbis não<text:s/>é<text:s/>ficar sem memória, mas ao invés disso, ficar sem números para o ID do processo.</text:p>
      <text:soft-page-break/>
      <text:p text:style-name="Normal">Para remover zumbis de um sistema, o sinal SIGCHLD pode ser enviado ao pai manualmente, usando o comando kill. Se o processo pai ainda se recusa a encerrar o zumbi, o próximo passo seria remover o processo pai. Quando um processo perder o seu pai, o init se torna o seu novo pai. O init periodicamente executa a chamada de sistema wait enterrando quaisquer zumbis que o possuam como pai.</text:p>
      <text:p text:style-name="P11"><draw:frame draw:style-name="a0" draw:name="Picture 1" text:anchor-type="as-char" svg:x="0in" svg:y="0in" svg:width="1.61564in" svg:height="1.34011in" style:rel-width="scale" style:rel-height="scale"><draw:image xlink:href="media/image1.png" xlink:type="simple" xlink:show="embed" xlink:actuate="onLoad"/><svg:title/><svg:desc>A screenshot of a computer program

Description automatically generated</svg:desc></draw:frame></text:p>
      <text:p text:style-name="P12">Figura 1: exemplo processos<text:s/>zumbi.</text:p>
      <text:p text:style-name="P13"><text:span text:style-name="T14"><draw:frame draw:id="id0" draw:style-name="a1" draw:name="Text Box 2" text:anchor-type="as-char" svg:x="0in" svg:y="0in" svg:width="5.65556in" svg:height="5.8875in" style:rel-width="scale" style:rel-height="scale"><draw:text-box><text:p text:style-name="P15">#include &lt;sys/wait.h&gt;</text:p><text:p text:style-name="P16">#include &lt;stdlib.h&gt;</text:p><text:p text:style-name="P17">#include &lt;stdio.h&gt;</text:p><text:p text:style-name="P18">#include &lt;unistd.h&gt;</text:p><text:p text:style-name="P19"><text:s/></text:p><text:p text:style-name="P20">int main(void)<text:s/>{</text:p><text:p text:style-name="P21"><text:s text:c="8"/>pid_t pids[5];</text:p><text:p text:style-name="Normal"><text:span text:style-name="T22"><text:s text:c="8"/></text:span>int i;</text:p><text:p text:style-name="Normal"><text:s text:c="8"/>printf("PAI: Aqui esta meu PID: %d\n", getpid());</text:p><text:p text:style-name="Normal"><text:s text:c="8"/><text:span text:style-name="T23">for (i = 4; i &gt;= 0; --i) {</text:span></text:p><text:p text:style-name="P24"><text:s text:c="16"/>pids[i] = fork();</text:p><text:p text:style-name="P25"><text:s text:c="16"/>if (pids[i] == 0) {</text:p><text:p text:style-name="Normal"><text:span text:style-name="T26"><text:s text:c="12"/></text:span><text:span text:style-name="T27"><text:tab/></text:span><text:span text:style-name="T28"><text:tab/></text:span>printf("FILHO: O PID do meu PAI eh: %d\n", getppid());</text:p><text:p text:style-name="Normal"><text:s text:c="12"/><text:tab/><text:tab/>printf("FILHO: Meu PID eh: %d\n", getpid());</text:p><text:p text:style-name="Normal"><text:s text:c="24"/><text:span text:style-name="T29">_exit(0);</text:span></text:p><text:p text:style-name="P30"><text:s text:c="16"/>}</text:p><text:p text:style-name="P31"><text:s text:c="8"/>}</text:p><text:p text:style-name="P32"><text:s text:c="8"/>for (i = 4; i &gt;= 0; --i)</text:p><text:p text:style-name="P33"><text:s text:c="16"/>waitpid(pids[i], NULL, 0);</text:p><text:p text:style-name="Normal"><text:span text:style-name="T34"><text:s text:c="8"/></text:span>return 0;</text:p><text:p text:style-name="Normal">}</text:p></draw:text-box><svg:title/><svg:desc/></draw:frame></text:span></text:p>
      <text:p text:style-name="P35">Codigo 1: conteudo do arquivo zombie.c</text:p>
      <text:p text:style-name="Normal">Sendo assim, nessa tarefa, foi socilitado pelo professor,<text:s/>de<text:s/>realizarmos modificações<text:s/><text:soft-page-break/>no arquivo<text:s/>zombie.c (Codigo 1) de modo que este forneça uma saída similar a apresentada para o comando ps de acordo com a Figura 1 na qual são apresentada apenas as entradas de interesse.</text:p>
      <text:p text:style-name="Normal">Além disso, foi solicitado também para explicarmos as relações de parentesco entre os processos 311,312,313,314,315 e 316, e quem é o pai de zombie.</text:p>
      <text:list text:style-name="LFO8" text:continue-numbering="true">
        <text:list-item>
          <text:list>
            <text:list-item>
              <text:p text:style-name="P36">Solicitação 1: modificação no arquivo zombie.c</text:p>
            </text:list-item>
          </text:list>
        </text:list-item>
      </text:list>
      <text:p text:style-name="Normal">Para este experimento, substituímos o laço for no final do código que antes servia para esperar que todos os processos filhos terminassem por uma linha que realiza uma pausa de 10 segundos antes de terminar o processo pai. Isso significa que o processo pai permanecerá<text:s/>ativo por 10 segundos após a conclusão de todos os processos filhos antes de terminar, permitindo-nos usar o comando<text:s/><text:span text:style-name="T37">ps -f</text:span><text:span text:style-name="T38"><text:s/></text:span>e ver os processos (<text:span text:style-name="T39">C</text:span><text:span text:style-name="T40">ó</text:span><text:span text:style-name="T41">digo 2</text:span>).</text:p>
      <text:p text:style-name="Normal">Além disso, para uma visualização mais especifica ainda, usamos o seguinte comando:</text:p>
      <text:p text:style-name="Normal"><text:span text:style-name="T42">ps -f | grep -E "defunct|zombie"</text:span><text:span text:style-name="T43">, i</text:span><text:span text:style-name="T44">sso</text:span><text:span text:style-name="T45"><text:s/>serve para listar apenas o que o professor solicitou (</text:span><text:span text:style-name="T46">Figura 2</text:span><text:span text:style-name="T47">).</text:span></text:p>
      <text:p text:style-name="P48"><text:span text:style-name="T49"><draw:frame draw:id="id1" draw:style-name="a2" draw:name="Text Box 2" text:anchor-type="as-char" svg:x="0in" svg:y="0in" svg:width="5.65556in" svg:height="5.60347in" style:rel-width="scale" style:rel-height="scale"><draw:text-box><text:p text:style-name="P50">#include &lt;sys/wait.h&gt;</text:p><text:p text:style-name="P51">#include &lt;stdlib.h&gt;</text:p><text:p text:style-name="P52">#include &lt;stdio.h&gt;</text:p><text:p text:style-name="P53">#include &lt;unistd.h&gt;</text:p><text:p text:style-name="P54"/><text:p text:style-name="P55">int main(void)<text:s/>{</text:p><text:p text:style-name="P56"><text:s text:c="8"/>pid_t pids[5];</text:p><text:p text:style-name="Normal"><text:span text:style-name="T57"><text:s text:c="8"/></text:span>int i;</text:p><text:p text:style-name="Normal"><text:s text:c="8"/>printf("PAI: Aqui esta meu PID: %d\n", getpid());</text:p><text:p text:style-name="Normal"><text:s text:c="8"/><text:span text:style-name="T58">for (i = 4; i &gt;= 0; --i) {</text:span></text:p><text:p text:style-name="P59"><text:s text:c="16"/>pids[i] = fork();</text:p><text:p text:style-name="P60"><text:s text:c="16"/>if (pids[i] == 0) {</text:p><text:p text:style-name="Normal"><text:span text:style-name="T61"><text:s text:c="12"/></text:span><text:span text:style-name="T62"><text:tab/></text:span><text:span text:style-name="T63"><text:tab/></text:span>printf("FILHO: O PID do meu PAI eh: %d\n", getppid());</text:p><text:p text:style-name="Normal"><text:s text:c="12"/><text:tab/><text:tab/>printf("FILHO: Meu PID eh: %d\n", getpid());</text:p><text:p text:style-name="Normal"><text:s text:c="24"/><text:span text:style-name="T64">_exit(0);</text:span></text:p><text:p text:style-name="P65"><text:s text:c="16"/>}</text:p><text:p text:style-name="P66"><text:s text:c="8"/>}</text:p><text:p text:style-name="Normal"><text:s text:c="8"/><text:span text:style-name="T67">sleep(10); // Pausa de 10 segundos</text:span></text:p><text:p text:style-name="Normal"><text:s text:c="8"/>return 0;</text:p><text:p text:style-name="Normal">}</text:p></draw:text-box><svg:title/><svg:desc/></draw:frame></text:span></text:p>
      <text:p text:style-name="P68">Codigo<text:s/>2:<text:s/>Atualização<text:s/>do arquivo zombie.c</text:p>
      <text:p text:style-name="P69"/>
      <text:p text:style-name="Normal"><draw:frame draw:style-name="a3" draw:name="Picture 1" text:anchor-type="as-char" svg:x="0in" svg:y="0in" svg:width="5.90556in" svg:height="1.89792in" style:rel-width="scale" style:rel-height="scale"><draw:image xlink:href="media/image2.png" xlink:type="simple" xlink:show="embed" xlink:actuate="onLoad"/><svg:title/><svg:desc>A screen shot of a computer

Description automatically generated</svg:desc></draw:frame></text:p>
      <text:p text:style-name="P70"><text:span text:style-name="T71">Figura 2: resultado do experimento com processos zombies no MINIX</text:span>.</text:p>
      <text:p text:style-name="Normal">O comando<text:s/><text:span text:style-name="T72">ps -f</text:span><text:s/>mostra que temos cinco processos zumbis (defuntos) com PIDs 408, 409, 410, 411, 412, todos com PPID 407 (o processo pai que terminou).</text:p>
      <text:p text:style-name="Normal">Os processos zumbis são processos que terminaram, mas ainda têm uma entrada na tabela de processos. Eles não estão mais em execução, mas ainda têm um status de "defunto" até<text:s/>que o processo pai leia seu status de saída. Como o processo pai terminou, esses processos zumbis foram adotados pelo processo init (com PID 1), que está<text:s/>esperando por eles.</text:p>
      <text:p text:style-name="Normal">Se a gente quiser se livrar desses processos zumbis, fizemos um arquivo<text:s/>sigchld.c (Codigo 3) no qual<text:s/>usamos o sinal SIGCHLD para lidar com o término dos processos filhos. O sinal SIGCHLD<text:s/>é<text:s/>enviado para o processo pai quando um dos seus processos filhos termina ou<text:s/>é<text:s/>interrompido. O processo pai usa a função signal() para configurar um manipulador de sinal para o sinal SIGCHLD. O manipulador de sinal<text:s/>é<text:s/>uma função chamada handle_sigchld() que<text:s/>é<text:s/>chamada quando o sinal SIGCHLD<text:s/>é<text:s/>recebido. A função handle_sigchld() chama a função waitpid() para esperar que um processo filho termine e imprime uma mensagem indicando que o processo filho terminou.</text:p>
      <text:p text:style-name="Normal">O uso do sinal SIGCHLD<text:s/>é<text:s/>útil porque permite que o processo pai seja notificado quando um processo filho termina, sem precisar esperar ativamente pelo término de cada processo filho. Isso<text:s/>é<text:s/>especialmente<text:s/>útil quando o processo pai precisa lidar com um grande número de processos filhos ou quando os processos filhos podem terminar em momentos diferentes.</text:p>
      <text:p text:style-name="Normal"><text:span text:style-name="T73"><draw:frame draw:id="id2" draw:style-name="a4" draw:name="Text Box 2" text:anchor-type="as-char" svg:x="0in" svg:y="0in" svg:width="5.65556in" svg:height="2.58194in" style:rel-width="scale" style:rel-height="scale"><draw:text-box><text:p text:style-name="P74">#include &lt;sys/wait.h&gt;</text:p><text:p text:style-name="P75">#include &lt;stdlib.h&gt;</text:p><text:p text:style-name="P76">#include &lt;stdio.h&gt;</text:p><text:p text:style-name="P77">#include &lt;unistd.h&gt;</text:p><text:p text:style-name="P78">#include &lt;signal.h&gt;</text:p><text:p text:style-name="P79"/><text:p text:style-name="P80">void handle_sigchld(int sig) {</text:p><text:p text:style-name="P81"><text:s text:c="4"/>pid_t pid;</text:p><text:p text:style-name="P82"><text:s text:c="4"/>int status;</text:p><text:p text:style-name="P83"><text:s text:c="4"/>while ((pid = waitpid(-1, &amp;status, WNOHANG)) &gt; 0) {</text:p><text:p text:style-name="Normal"><text:span text:style-name="T84"><text:s text:c="8"/></text:span>printf("PAI: Processo filho com PID %d terminou.\n", pid);</text:p><text:p text:style-name="Normal"><text:s text:c="4"/><text:span text:style-name="T85">}</text:span></text:p><text:p text:style-name="P86">}</text:p><text:p text:style-name="P87"/><text:p text:style-name="P88">int main(void) {</text:p><text:p text:style-name="P89"><text:s text:c="4"/>pid_t pids[5];</text:p><text:p text:style-name="Normal"><text:span text:style-name="T90"><text:s text:c="4"/></text:span>int i;</text:p><text:p text:style-name="Normal"><text:s text:c="4"/>printf("PAI: Aqui esta meu PID: %d\n", getpid());</text:p><text:p text:style-name="Normal"/><text:p text:style-name="Normal"><text:s text:c="4"/>// Configura o sinal SIGCHLD para ser tratado pela função handle_sigchld</text:p><text:p text:style-name="Normal"><text:s text:c="4"/><text:span text:style-name="T91">signal(SIGCHLD, handle_sigchld);</text:span></text:p><text:p text:style-name="P92"/><text:p text:style-name="P93"><text:s text:c="4"/>for (i = 4; i &gt;= 0; --i) {</text:p><text:p text:style-name="P94"><text:s text:c="8"/>pids[i] = fork();</text:p><text:p text:style-name="P95"><text:s text:c="8"/>if (pids[i] == 0) {</text:p><text:p text:style-name="Normal"><text:span text:style-name="T96"><text:s text:c="12"/></text:span>sleep(2); // Pausa de 2 segundos</text:p><text:p text:style-name="Normal"><text:s text:c="12"/>printf("FILHO: O PID do meu PAI eh: %d\n", getppid());</text:p><text:p text:style-name="Normal"><text:s text:c="12"/>printf("FILHO: Meu PID eh: %d\n", getpid());</text:p><text:p text:style-name="Normal"><text:s text:c="12"/>_exit(0);</text:p><text:p text:style-name="Normal"><text:s text:c="8"/>}</text:p><text:p text:style-name="Normal"><text:s text:c="4"/>}</text:p><text:p text:style-name="Normal"/><text:p text:style-name="Normal"><text:s text:c="4"/>// Espera pelos processos filhos antes de terminar</text:p><text:p text:style-name="Normal"><text:s text:c="4"/><text:span text:style-name="T97">for (i = 4; i &gt;= 0; --i) {</text:span></text:p><text:p text:style-name="P98"><text:s text:c="8"/>waitpid(pids[i], NULL, 0);</text:p><text:p text:style-name="P99"><text:s text:c="4"/>}</text:p><text:p text:style-name="P100"/><text:p text:style-name="P101"><text:s text:c="4"/>return 0;</text:p><text:p text:style-name="Normal"><text:span text:style-name="T102">}</text:span></text:p></draw:text-box><svg:title/><svg:desc/></draw:frame></text:span><text:soft-page-break/><text:span text:style-name="T103"><draw:frame draw:id="id3" draw:style-name="a5" draw:name="Text Box 2" text:anchor-type="as-char" svg:x="0in" svg:y="0in" svg:width="5.65556in" svg:height="8.37708in" style:rel-width="scale" style:rel-height="scale"><draw:text-box><text:p text:style-name="P104"><text:s text:c="4"/>while ((pid = waitpid(-1, &amp;status, WNOHANG)) &gt; 0) {</text:p><text:p text:style-name="Normal"><text:span text:style-name="T105"><text:s text:c="8"/></text:span>printf("PAI: Processo filho com PID %d terminou.\n", pid);</text:p><text:p text:style-name="Normal"><text:s text:c="4"/><text:span text:style-name="T106">}</text:span></text:p><text:p text:style-name="P107">}</text:p><text:p text:style-name="P108"/><text:p text:style-name="P109">int main(void) {</text:p><text:p text:style-name="P110"><text:s text:c="4"/>pid_t pids[5];</text:p><text:p text:style-name="Normal"><text:span text:style-name="T111"><text:s text:c="4"/></text:span>int i;</text:p><text:p text:style-name="Normal"><text:s text:c="4"/>printf("PAI: Aqui esta meu PID: %d\n", getpid());</text:p><text:p text:style-name="Normal"/><text:p text:style-name="Normal"><text:s text:c="4"/>// Configura o sinal SIGCHLD para ser tratado pela função handle_sigchld</text:p><text:p text:style-name="Normal"><text:s text:c="4"/><text:span text:style-name="T112">signal(SIGCHLD, handle_sigchld);</text:span></text:p><text:p text:style-name="P113"/><text:p text:style-name="P114"><text:s text:c="4"/>for (i = 4; i &gt;= 0; --i) {</text:p><text:p text:style-name="P115"><text:s text:c="8"/>pids[i] = fork();</text:p><text:p text:style-name="P116"><text:s text:c="8"/>if (pids[i] == 0) {</text:p><text:p text:style-name="Normal"><text:span text:style-name="T117"><text:s text:c="12"/></text:span>sleep(2); // Pausa de 2 segundos</text:p><text:p text:style-name="Normal"><text:s text:c="12"/>printf("FILHO: O PID do meu PAI eh: %d\n", getppid());</text:p><text:p text:style-name="Normal"><text:s text:c="12"/>printf("FILHO: Meu PID eh: %d\n", getpid());</text:p><text:p text:style-name="Normal"><text:s text:c="12"/>_exit(0);</text:p><text:p text:style-name="Normal"><text:s text:c="8"/>}</text:p><text:p text:style-name="Normal"><text:s text:c="4"/>}</text:p><text:p text:style-name="Normal"/><text:p text:style-name="Normal"><text:s text:c="4"/>// Espera pelos processos filhos antes de terminar</text:p><text:p text:style-name="Normal"><text:s text:c="4"/><text:span text:style-name="T118">for (i = 4; i &gt;= 0; --i) {</text:span></text:p><text:p text:style-name="P119"><text:s text:c="8"/>waitpid(pids[i], NULL, 0);</text:p><text:p text:style-name="P120"><text:s text:c="4"/>}</text:p><text:p text:style-name="P121"/><text:p text:style-name="P122"><text:s text:c="4"/>return 0;</text:p><text:p text:style-name="Normal"><text:span text:style-name="T123">}</text:span></text:p></draw:text-box><svg:title/><svg:desc/></draw:frame></text:span></text:p>
      <text:p text:style-name="P124"><text:span text:style-name="T125">Codigo<text:s/></text:span><text:span text:style-name="T126">3</text:span><text:span text:style-name="T127">:<text:s/></text:span><text:span text:style-name="T128">Conteudo do arquivo<text:s/></text:span><text:span text:style-name="T129">sigchld</text:span><text:span text:style-name="T130">.c.</text:span><text:s/></text:p>
      <text:soft-page-break/>
      <text:p text:style-name="Normal"><draw:frame draw:style-name="a6" draw:name="Picture 1" text:anchor-type="as-char" svg:x="0in" svg:y="0in" svg:width="5.90556in" svg:height="2.95556in" style:rel-width="scale" style:rel-height="scale"><draw:image xlink:href="media/image3.png" xlink:type="simple" xlink:show="embed" xlink:actuate="onLoad"/><svg:title/><svg:desc>A screenshot of a computer screen

Description automatically generated</svg:desc></draw:frame></text:p>
      <text:p text:style-name="P131"><text:span text:style-name="T132">Figura<text:s/></text:span><text:span text:style-name="T133">3</text:span><text:span text:style-name="T134">: resultado do experimento com<text:s/></text:span><text:span text:style-name="T135">uso de SIGCHLD.</text:span></text:p>
      <text:p text:style-name="Normal">Nesse codigo 3, o processo pai cria cinco processos filhos e, em seguida, entra em um loop que chama a função waitpid() para esperar que cada processo filho termine. O processo pai continua a executar outras tarefas enquanto espera que os processos filhos terminem. Quando um processo filho termina, o processo pai<text:s/>é<text:s/>notificado pelo sinal SIGCHLD e o manipulador de sinal handle_sigchld()<text:s/>é<text:s/>chamado. O manipulador de sinal chama a função waitpid() para esperar que o processo filho termine e imprime uma mensagem indicando que o processo filho terminou.</text:p>
      <text:p text:style-name="Normal">O uso do sinal SIGCHLD permite que o processo pai seja notificado quando um processo filho termina, sem precisar esperar ativamente pelo término de cada processo filho. Isso permite que o processo pai continue a executar outras tarefas enquanto espera que os processos filhos terminem.</text:p>
      <text:list text:style-name="LFO8" text:continue-numbering="true">
        <text:list-item>
          <text:list>
            <text:list-item>
              <text:p text:style-name="P136">Solicitação 2: explicação de relação parentesco</text:p>
            </text:list-item>
          </text:list>
        </text:list-item>
      </text:list>
      <text:p text:style-name="Normal">Em rela<text:span text:style-name="T137">ção a<text:s/></text:span><text:span text:style-name="T138">Figura 1</text:span><text:span text:style-name="T139">,<text:s/></text:span>o comando ps -f fornecido, os processos 312, 313, 314, 315 e 316 são processos zumbis, como indicado pelo estado Z na coluna S. O processo<text:s/>311<text:s/>é<text:s/>o<text:s/><text:span text:style-name="T140">processo pai</text:span><text:s/>desses processos zumbis, como indicado pelo número 311 na coluna PPID (Parent Process ID). Portanto, o processo 311<text:s/>é<text:s/>o pai de zombie.</text:p>
      <text:p text:style-name="Normal">Em nossos experimentos, em relação a<text:s/><text:span text:style-name="T141">Figura 2</text:span>, a<text:s/>saída do comando ps -f mostra que o processo 407<text:s/>é<text:s/>o<text:s/><text:span text:style-name="T142">pai do processo zombie</text:span><text:s/>e que os processos 408, 409, 410, 411 e 412 são filhos do processo zombie. Isso significa que o processo zombie<text:s/>é<text:s/>o pai desses processos defunct.</text:p>
      <text:p text:style-name="Normal">Por outro lado, em rela<text:span text:style-name="T143">çaão a<text:s/></text:span><text:span text:style-name="T144">Figura 3</text:span><text:span text:style-name="T145">,<text:s/></text:span>no experimento com SIGCHLD, cinco processos filhos são criados e o processo pai aguarda cada um deles antes de encerrar, evitando que se tornem zumbis. A saída do comando ps -f revela que o processo pai (PID 833) possui cinco processos filhos (PIDs 834, 835, 836, 837 e 838), todos com o nome sigchld. Isso ocorre porque o sinal<text:s/><text:span text:style-name="T146">SIGCHLD</text:span><text:s/>é<text:s/>tratado pela função<text:s/><text:span text:style-name="T147">handle_sigchld</text:span>, que imprime uma mensagem quando um processo filho termina. A saída do programa também mostra que os processos filhos imprimem corretamente o PID do pai e seu próprio PID. Além disso, a mensagem "PAI: Processo filho com PID XXX terminou."<text:s/>é<text:s/>exibida<text:s/><text:soft-page-break/>quando cada processo filho termina, indicando que o processo pai está<text:s/>aguardando corretamente pelos processos filhos.</text:p>
      <text:list text:style-name="LFO8" text:continue-numbering="true">
        <text:list-item>
          <text:p text:style-name="P148">Referências</text:p>
        </text:list-item>
      </text:list>
      <text:list text:style-name="LFO11" text:continue-numbering="true">
        <text:list-item>
          <text:p text:style-name="P149"><text:bookmark-start text:name="_Ref153130300"/><text:span text:style-name="T150">Dalton Matsuo Tavares, (2024) “PROJETO 4 – MINIX”, material disponibilizado no google classroom e SIGAA, Janeiro.</text:span><text:bookmark-end text:name="_Ref153130300"/></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Normal" style:next-style-name="SBCparagraph" style:default-outline-level="1">
      <style:paragraph-properties fo:text-align="center"/>
      <style:text-properties fo:font-weight="bold" style:font-weight-asian="bold" style:font-weight-complex="bold" fo:hyphenate="false"/>
    </style:style>
    <style:style style:name="Heading2" style:display-name="Heading 2" style:family="paragraph" style:parent-style-name="Heading1" style:next-style-name="SBCparagraph" style:default-outline-level="2">
      <style:paragraph-properties fo:margin-top="0.1666in"/>
      <style:text-properties fo:font-variant="small-caps" fo:font-size="13pt" style:font-size-asian="13pt" fo:hyphenate="false"/>
    </style:style>
    <style:style style:name="Heading3" style:display-name="Heading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Heading4" style:display-name="Heading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Heading5" style:display-name="Heading 5" style:family="paragraph" style:parent-style-name="Standard" style:next-style-name="SBCparagraph" style:default-outline-level="5">
      <style:paragraph-properties fo:keep-with-next="always"/>
      <style:text-properties style:font-name="TimesNewRoman,Bold" style:font-name-asian="TimesNewRoman,Bold" style:font-name-complex="TimesNewRoman,Bold" fo:font-weight="bold" style:font-weight-asian="bold" fo:color="#000000" fo:hyphenate="false"/>
    </style:style>
    <style:style style:name="Heading6" style:display-name="Heading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Heading7" style:display-name="Heading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Heading8" style:display-name="Heading 8" style:family="paragraph" style:parent-style-name="Standard" style:next-style-name="SBCparagraph" style:default-outline-level="8">
      <style:paragraph-properties fo:keep-with-next="always"/>
      <style:text-properties fo:font-weight="bold" style:font-weight-asian="bold" fo:hyphenate="false"/>
    </style:style>
    <style:style style:name="Heading9" style:display-name="Heading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Normal" style:display-name="Normal" style:family="paragraph">
      <style:paragraph-properties fo:text-align="justify" fo:margin-top="0.0826in" fo:text-indent="0.1972in"/>
      <style:text-properties style:font-name="Times" style:font-name-asian="Times New Roman" style:font-name-complex="Times New Roman" fo:color="#000000" style:font-size-complex="10pt" fo:hyphenate="false"/>
    </style:style>
    <style:style style:name="DefaultParagraphFont" style:display-name="Default Paragraph Font" style:family="text"/>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default-outline-level="2">
      <style:paragraph-properties fo:keep-with-next="always" fo:margin-top="0.1652in"/>
      <style:text-properties fo:font-weight="bold" style:font-weight-asian="bold" fo:hyphenate="false"/>
    </style:style>
    <style:style style:name="Standard" style:display-name="Standard" style:family="paragraph">
      <style:text-properties style:font-name="Times" style:font-name-asian="Times New Roman" style:font-name-complex="Times New Roman" style:font-size-complex="10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itle" style:display-name="Title"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itle" style:display-name="Subtitle" style:family="paragraph" style:parent-style-name="Title"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itle" style:next-style-name="Textbody">
      <style:text-properties style:font-weight-complex="bold" fo:hyphenate="false"/>
    </style:style>
    <style:style style:name="List" style:display-name="List" style:family="paragraph" style:parent-style-name="Textbody">
      <style:text-properties style:font-name-complex="Lucidasans" fo:hyphenate="false"/>
    </style:style>
    <style:style style:name="Header" style:display-name="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Footer" style:display-name="Foot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5.7965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22.78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noteSymbol" style:display-name="Footnote Symbol" style:family="text"/>
    <style:style style:name="PageNumber" style:display-name="Page Number"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Endnoteanchor" style:display-name="Endnote anchor" style:family="text">
      <style:text-properties style:text-position="super 66.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style:style style:name="PlaceholderText" style:display-name="Placeholder Text" style:family="text" style:parent-style-name="DefaultParagraphFont">
      <style:text-properties fo:color="#666666"/>
    </style:style>
    <style:style style:name="NoSpacing" style:display-name="No Spacing" style:family="paragraph">
      <style:paragraph-properties fo:text-align="justify" fo:text-indent="0.2958in"/>
      <style:text-properties style:font-name="Times" style:font-name-asian="Times New Roman" style:font-name-complex="Times New Roman" fo:color="#000000" style:font-size-complex="10pt" fo:hyphenate="false"/>
    </style:style>
    <style:style style:name="HeaderChar" style:display-name="Header Char" style:family="text" style:parent-style-name="DefaultParagraphFont">
      <style:text-properties style:font-name="Times" style:font-name-asian="Times New Roman" style:font-name-complex="Times New Roman" style:font-size-complex="10pt"/>
    </style:style>
    <style:style style:name="Style1" style:display-name="Style1" style:family="paragraph" style:parent-style-name="Normal">
      <style:paragraph-properties fo:text-align="center"/>
      <style:text-properties fo:font-weight="bold" style:font-weight-asian="bold" style:font-weight-complex="bold" fo:hyphenate="false"/>
    </style:style>
    <style:style style:name="Style1Char" style:display-name="Style1 Char" style:family="text" style:parent-style-name="DefaultParagraphFont">
      <style:text-properties style:font-name="Times" style:font-name-asian="Times New Roman" style:font-name-complex="Times New Roman" fo:font-weight="bold" style:font-weight-asian="bold" style:font-weight-complex="bold" fo:color="#000000" style:font-size-complex="10pt"/>
    </style:style>
    <style:style style:name="Style2" style:display-name="Style2" style:family="paragraph" style:parent-style-name="Normal">
      <style:text-properties fo:hyphenate="false"/>
    </style:style>
    <style:style style:name="Style2Char" style:display-name="Style2 Char" style:family="text" style:parent-style-name="DefaultParagraphFont">
      <style:text-properties style:font-name="Times" style:font-name-asian="Times New Roman" style:font-name-complex="Times New Roman" fo:color="#000000" style:font-size-complex="10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2" style:display-name="WW_OutlineListStyle_2">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2.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SBCnumberlist" style:display-name="SBC:number:list">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5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5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5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5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5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5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5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5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_3">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bullet text:level="1" text:style-name="WW_CharLFO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10">
      <text:list-level-style-bullet text:level="1" text:style-name="WW_CharLFO10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10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0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0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0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0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0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0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0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1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office:automatic-styles>
  <office:master-styles>
    <style:master-page style:name="MP0" style:page-layout-name="PL0">
      <style:header>
        <text:p text:style-nam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Gustavo Borges</meta:initial-creator>
    <dc:creator>Gustavo Borges</dc:creator>
    <meta:creation-date>2024-02-11T22:39:00Z</meta:creation-date>
    <dc:date>2024-02-23T00:26:00Z</dc:date>
    <meta:template xlink:href="Normal.dotm" xlink:type="simple"/>
    <meta:editing-cycles>82</meta:editing-cycles>
    <meta:editing-duration>PT42360S</meta:editing-duration>
    <meta:user-defined meta:name="Info 1"/>
    <meta:user-defined meta:name="Info 2"/>
    <meta:user-defined meta:name="Info 3"/>
    <meta:user-defined meta:name="Info 4"/>
    <meta:document-statistic meta:page-count="7" meta:paragraph-count="16" meta:word-count="1285" meta:character-count="8213" meta:row-count="57" meta:non-whitespace-character-count="6944"/>
  </office:meta>
</office:document-meta>
</file>