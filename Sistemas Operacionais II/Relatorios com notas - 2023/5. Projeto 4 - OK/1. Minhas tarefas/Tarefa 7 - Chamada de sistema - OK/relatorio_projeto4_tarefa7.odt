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1">
      <text:list-level-style-bullet text:level="1" text:style-name="WW_CharLFO1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SBCtitle" style:master-page-name="MP0" style:family="paragraph">
      <style:paragraph-properties fo:break-before="page"/>
      <style:text-properties style:font-name="Times New Roman"/>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text-position="super 66.6%"/>
    </style:style>
    <style:style style:name="T4" style:parent-style-name="DefaultParagraphFont" style:family="text">
      <style:text-properties style:font-name="Times New Roman" style:text-position="super 66.6%"/>
    </style:style>
    <style:style style:name="T5" style:parent-style-name="DefaultParagraphFont" style:family="text">
      <style:text-properties style:font-name="Times New Roman"/>
    </style:style>
    <style:style style:name="P6" style:parent-style-name="SBCemail" style:family="paragraph">
      <style:text-properties style:font-name="Times New Roman" style:font-name-complex="Times New Roman"/>
    </style:style>
    <style:style style:name="P7" style:parent-style-name="SBCresumo" style:family="paragraph">
      <style:text-properties style:font-name="Times New Roman"/>
    </style:style>
    <style:style style:name="P8" style:parent-style-name="ListParagraph" style:list-style-name="LFO7" style:family="paragraph"/>
    <style:style style:name="P9" style:parent-style-name="ListParagraph" style:list-style-name="LFO7" style:family="paragraph"/>
    <style:style style:name="P10" style:parent-style-name="SBCtitle1" style:list-style-name="LFO8" style:family="paragraph"/>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BCtitle1" style:list-style-name="LFO8" style:family="paragraph"/>
    <style:style style:name="P15" style:parent-style-name="ListParagraph" style:list-style-name="LFO10"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ListParagraph" style:list-style-name="LFO10" style:family="paragraph"/>
    <style:style style:name="T36" style:parent-style-name="DefaultParagraphFont" style:family="text">
      <style:text-properties fo:font-weight="bold" style:font-weight-asian="bold" style:font-weight-complex="bold"/>
    </style:style>
    <style:style style:name="P37" style:parent-style-name="ListParagraph" style:family="paragraph">
      <style:paragraph-properties fo:margin-left="0.6972in" fo:text-indent="0in">
        <style:tab-stops/>
      </style:paragraph-properties>
    </style:style>
    <style:style style:name="P38" style:parent-style-name="ListParagraph" style:family="paragraph">
      <style:paragraph-properties fo:margin-left="0.6972in" fo:text-indent="0in">
        <style:tab-stops/>
      </style:paragraph-properties>
    </style:style>
    <style:style style:name="P39" style:parent-style-name="ListParagraph" style:list-style-name="LFO10" style:family="paragraph"/>
    <style:style style:name="T40" style:parent-style-name="DefaultParagraphFont" style:family="text">
      <style:text-properties fo:font-weight="bold" style:font-weight-asian="bold" style:font-weight-complex="bold"/>
    </style:style>
    <style:style style:name="P41" style:parent-style-name="ListParagraph" style:list-style-name="LFO10" style:family="paragraph"/>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P44" style:parent-style-name="ListParagraph" style:list-style-name="LFO10" style:family="paragraph"/>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margin-left="0.6972in" fo:text-indent="0in">
        <style:tab-stops/>
      </style:paragraph-properties>
      <style:text-properties fo:language="en" fo:country="US"/>
    </style:style>
    <style:style style:name="P52" style:parent-style-name="Normal" style:family="paragraph">
      <style:paragraph-properties fo:margin-left="0.6972in" fo:text-indent="0in">
        <style:tab-stops/>
      </style:paragraph-properties>
      <style:text-properties fo:language="en" fo:country="US"/>
    </style:style>
    <style:style style:name="P53" style:parent-style-name="Normal" style:family="paragraph">
      <style:paragraph-properties fo:margin-left="0.6972in" fo:text-indent="0in">
        <style:tab-stops/>
      </style:paragraph-properties>
    </style:style>
    <style:style style:name="P54" style:parent-style-name="Normal" style:family="paragraph">
      <style:paragraph-properties fo:margin-left="0.6972in" fo:text-indent="0in">
        <style:tab-stops/>
      </style:paragraph-properties>
    </style:style>
    <style:style style:name="P55" style:parent-style-name="Normal" style:family="paragraph">
      <style:paragraph-properties fo:margin-left="0.6972in" fo:text-indent="0in">
        <style:tab-stops/>
      </style:paragraph-properties>
      <style:text-properties fo:language="en" fo:country="US"/>
    </style:style>
    <style:style style:name="P56" style:parent-style-name="Normal" style:family="paragraph">
      <style:paragraph-properties fo:margin-left="0.6972in" fo:text-indent="0in">
        <style:tab-stops/>
      </style:paragraph-properties>
      <style:text-properties fo:language="en" fo:country="US"/>
    </style:style>
    <style:style style:name="P57" style:parent-style-name="Normal" style:family="paragraph">
      <style:paragraph-properties fo:margin-left="0.6972in" fo:text-indent="0in">
        <style:tab-stops/>
      </style:paragraph-properties>
      <style:text-properties fo:language="en" fo:country="US"/>
    </style:style>
    <style:style style:name="P58" style:parent-style-name="Normal" style:family="paragraph">
      <style:paragraph-properties fo:margin-left="0.6972in" fo:text-indent="0in">
        <style:tab-stops/>
      </style:paragraph-properties>
    </style:style>
    <style:style style:name="P59" style:parent-style-name="Normal" style:family="paragraph">
      <style:paragraph-properties fo:margin-left="0.6972in" fo:text-indent="0in">
        <style:tab-stops/>
      </style:paragraph-properties>
    </style:style>
    <style:style style:name="P60" style:parent-style-name="ListParagraph" style:list-style-name="LFO10" style:family="paragraph"/>
    <style:style style:name="P61" style:parent-style-name="ListParagraph" style:list-style-name="LFO10" style:family="paragraph"/>
    <style:style style:name="P62" style:parent-style-name="ListParagraph" style:list-style-name="LFO10" style:family="paragraph"/>
    <style:style style:name="P63" style:parent-style-name="SBCtitle1" style:list-style-name="LFO8" style:family="paragraph"/>
    <style:style style:name="T64" style:parent-style-name="DefaultParagraphFont" style:family="text">
      <style:text-properties style:font-name="Calibri"/>
    </style:style>
    <style:style style:name="P65" style:parent-style-name="Normal" style:family="paragraph">
      <style:paragraph-properties fo:text-align="center" fo:text-indent="0in"/>
    </style:style>
    <style:style style:name="T66" style:parent-style-name="DefaultParagraphFont" style:family="text">
      <style:text-properties style:font-name="Calibri"/>
    </style:style>
    <style:style style:name="P67" style:parent-style-name="Normal" style:family="paragraph">
      <style:paragraph-properties fo:text-align="center" fo:text-indent="0in"/>
      <style:text-properties style:font-name="Calibri" fo:font-weight="bold" style:font-weight-asian="bold" style:font-weight-complex="bold"/>
    </style:style>
    <style:style style:name="P68" style:parent-style-name="Normal" style:family="paragraph">
      <style:text-properties style:font-name="Calibri"/>
    </style:style>
    <style:style style:name="P69" style:parent-style-name="Normal" style:family="paragraph">
      <style:paragraph-properties fo:text-align="center" fo:text-indent="0in"/>
    </style:style>
    <style:style style:name="T70" style:parent-style-name="DefaultParagraphFont" style:family="text">
      <style:text-properties style:font-name="Calibri"/>
    </style:style>
    <style:style style:name="P71" style:parent-style-name="Normal" style:family="paragraph">
      <style:paragraph-properties fo:text-align="center"/>
      <style:text-properties style:font-name="Calibri" fo:font-weight="bold" style:font-weight-asian="bold" style:font-weight-complex="bold"/>
    </style:style>
    <style:style style:name="T72" style:parent-style-name="DefaultParagraphFont" style:family="text">
      <style:text-properties style:font-name="Calibri"/>
    </style:style>
    <style:style style:name="P73" style:parent-style-name="Normal" style:master-page-name="MP1" style:family="paragraph">
      <style:paragraph-properties fo:break-before="page"/>
      <style:text-properties style:font-name="Calibri"/>
    </style:style>
    <style:style style:name="P74" style:parent-style-name="Normal" style:family="paragraph">
      <style:paragraph-properties fo:text-align="center" fo:text-indent="0in"/>
    </style:style>
    <style:style style:name="T75" style:parent-style-name="DefaultParagraphFont" style:family="text">
      <style:text-properties style:font-name="Calibri"/>
    </style:style>
    <style:style style:name="P76" style:parent-style-name="Normal" style:family="paragraph">
      <style:paragraph-properties fo:text-align="center"/>
      <style:text-properties style:font-name="Calibri" fo:font-weight="bold" style:font-weight-asian="bold" style:font-weight-complex="bold"/>
    </style:style>
    <style:style style:name="P77" style:parent-style-name="Normal" style:family="paragraph">
      <style:text-properties style:font-name="Calibri"/>
    </style:style>
    <style:style style:name="P78" style:parent-style-name="Normal" style:family="paragraph">
      <style:paragraph-properties fo:text-align="center"/>
    </style:style>
    <style:style style:name="T79" style:parent-style-name="DefaultParagraphFont" style:family="text">
      <style:text-properties style:font-name="Calibri"/>
    </style:style>
    <style:style style:name="P80" style:parent-style-name="Normal" style:family="paragraph">
      <style:paragraph-properties fo:text-align="center"/>
      <style:text-properties style:font-name="Calibri" fo:font-weight="bold" style:font-weight-asian="bold" style:font-weight-complex="bold"/>
    </style:style>
    <style:style style:name="T81" style:parent-style-name="DefaultParagraphFont" style:family="text">
      <style:text-properties style:font-name="Calibri"/>
    </style:style>
    <style:style style:name="P82" style:parent-style-name="Normal" style:family="paragraph">
      <style:paragraph-properties fo:text-align="center"/>
    </style:style>
    <style:style style:name="T83" style:parent-style-name="DefaultParagraphFont" style:family="text">
      <style:text-properties style:font-name="Calibri"/>
    </style:style>
    <style:style style:name="P84" style:parent-style-name="Normal" style:family="paragraph">
      <style:paragraph-properties fo:text-align="center"/>
      <style:text-properties style:font-name="Calibri"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style:font-name="Calibri"/>
    </style:style>
    <style:style style:name="T87" style:parent-style-name="DefaultParagraphFont" style:family="text">
      <style:text-properties style:font-name="Calibri"/>
    </style:style>
    <style:style style:name="T88" style:parent-style-name="DefaultParagraphFont" style:family="text">
      <style:text-properties style:font-name="Calibri"/>
    </style:style>
    <style:style style:name="T89" style:parent-style-name="DefaultParagraphFont" style:family="text">
      <style:text-properties style:font-name="Calibri"/>
    </style:style>
    <style:style style:name="P90" style:parent-style-name="Normal" style:family="paragraph">
      <style:paragraph-properties fo:text-align="center"/>
    </style:style>
    <style:style style:name="T91" style:parent-style-name="DefaultParagraphFont" style:family="text">
      <style:text-properties style:font-name="Calibri"/>
    </style:style>
    <style:style style:name="P92" style:parent-style-name="Normal" style:family="paragraph">
      <style:paragraph-properties fo:text-align="center"/>
      <style:text-properties style:font-name="Calibri" fo:font-weight="bold" style:font-weight-asian="bold" style:font-weight-complex="bold"/>
    </style:style>
    <style:style style:name="T93" style:parent-style-name="DefaultParagraphFont" style:family="text">
      <style:text-properties style:font-name="Calibri"/>
    </style:style>
    <style:style style:name="P94" style:parent-style-name="Normal" style:family="paragraph">
      <style:paragraph-properties fo:text-align="center"/>
    </style:style>
    <style:style style:name="T95" style:parent-style-name="DefaultParagraphFont" style:family="text">
      <style:text-properties style:font-name="Calibri"/>
    </style:style>
    <style:style style:name="P96" style:parent-style-name="Normal" style:family="paragraph">
      <style:paragraph-properties fo:text-align="center"/>
      <style:text-properties style:font-name="Calibri" fo:font-weight="bold" style:font-weight-asian="bold" style:font-weight-complex="bold"/>
    </style:style>
    <style:style style:name="T97" style:parent-style-name="DefaultParagraphFont" style:family="text">
      <style:text-properties style:font-name="Calibri"/>
    </style:style>
    <style:style style:name="T98" style:parent-style-name="DefaultParagraphFont" style:family="text">
      <style:text-properties style:font-name="Calibri"/>
    </style:style>
    <style:style style:name="T99" style:parent-style-name="DefaultParagraphFont" style:family="text">
      <style:text-properties style:font-name="Calibri"/>
    </style:style>
    <style:style style:name="T100" style:parent-style-name="DefaultParagraphFont" style:family="text">
      <style:text-properties style:font-name="Calibri"/>
    </style:style>
    <style:style style:name="T101" style:parent-style-name="DefaultParagraphFont" style:family="text">
      <style:text-properties style:font-name="Calibri"/>
    </style:style>
    <style:style style:name="T102" style:parent-style-name="DefaultParagraphFont" style:family="text">
      <style:text-properties style:font-name="Calibri"/>
    </style:style>
    <style:style style:name="T103" style:parent-style-name="DefaultParagraphFont" style:family="text">
      <style:text-properties style:font-name="Calibri" fo:font-weight="bold" style:font-weight-asian="bold" style:font-weight-complex="bold"/>
    </style:style>
    <style:style style:name="T104" style:parent-style-name="DefaultParagraphFont" style:family="text">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style:style>
    <style:style style:name="P107" style:parent-style-name="ListParagraph" style:list-style-name="LFO11" style:family="paragraph">
      <style:text-properties style:font-name="Calibri"/>
    </style:style>
    <style:style style:name="P108" style:parent-style-name="ListParagraph" style:list-style-name="LFO11" style:family="paragraph">
      <style:text-properties style:font-name="Calibri"/>
    </style:style>
    <style:style style:name="P109" style:parent-style-name="ListParagraph" style:list-style-name="LFO11" style:family="paragraph">
      <style:text-properties style:font-name="Calibri"/>
    </style:style>
    <style:style style:name="T110" style:parent-style-name="DefaultParagraphFont" style:family="text">
      <style:text-properties style:font-name="Calibri"/>
    </style:style>
    <style:style style:name="T111" style:parent-style-name="DefaultParagraphFont" style:family="text">
      <style:text-properties style:font-name="Calibri"/>
    </style:style>
    <style:style style:name="T112" style:parent-style-name="DefaultParagraphFont" style:family="text">
      <style:text-properties style:font-name="Calibri"/>
    </style:style>
    <style:style style:name="T113" style:parent-style-name="DefaultParagraphFont" style:family="text">
      <style:text-properties style:font-name="Calibri"/>
    </style:style>
    <style:style style:name="T114" style:parent-style-name="DefaultParagraphFont" style:family="text">
      <style:text-properties style:font-name="Calibri" fo:font-weight="bold" style:font-weight-asian="bold" style:font-weight-complex="bold"/>
    </style:style>
    <style:style style:name="T115" style:parent-style-name="DefaultParagraphFont" style:family="text">
      <style:text-properties style:font-name="Calibri"/>
    </style:style>
    <style:style style:name="T116" style:parent-style-name="DefaultParagraphFont" style:family="text">
      <style:text-properties style:font-name="Calibri"/>
    </style:style>
    <style:style style:name="T117" style:parent-style-name="DefaultParagraphFont" style:family="text">
      <style:text-properties style:font-name="Calibri"/>
    </style:style>
    <style:style style:name="P118" style:parent-style-name="Normal" style:family="paragraph">
      <style:text-properties style:font-name="Calibri"/>
    </style:style>
    <style:style style:name="P119" style:parent-style-name="Normal" style:family="paragraph">
      <style:paragraph-properties fo:text-align="center"/>
    </style:style>
    <style:style style:name="T120" style:parent-style-name="DefaultParagraphFont" style:family="text">
      <style:text-properties style:font-name="Calibri"/>
    </style:style>
    <style:style style:name="P121" style:parent-style-name="Normal" style:family="paragraph">
      <style:paragraph-properties fo:text-align="center"/>
      <style:text-properties style:font-name="Calibri" fo:font-weight="bold" style:font-weight-asian="bold" style:font-weight-complex="bold"/>
    </style:style>
    <style:style style:name="T122" style:parent-style-name="DefaultParagraphFont" style:family="text">
      <style:text-properties style:font-name="Calibri"/>
    </style:style>
    <style:style style:name="T123" style:parent-style-name="DefaultParagraphFont" style:family="text">
      <style:text-properties style:font-name="Calibri"/>
    </style:style>
    <style:style style:name="T124" style:parent-style-name="DefaultParagraphFont" style:family="text">
      <style:text-properties style:font-name="Calibri"/>
    </style:style>
    <style:style style:name="P125" style:parent-style-name="Normal" style:family="paragraph">
      <style:text-properties style:font-name="Calibri"/>
    </style:style>
    <style:style style:name="P126" style:parent-style-name="ListParagraph" style:list-style-name="LFO12" style:family="paragraph">
      <style:text-properties style:font-name="Calibri"/>
    </style:style>
    <style:style style:name="P127" style:parent-style-name="ListParagraph" style:list-style-name="LFO12" style:family="paragraph">
      <style:text-properties style:font-name="Calibri"/>
    </style:style>
    <style:style style:name="P128" style:parent-style-name="ListParagraph" style:list-style-name="LFO12" style:family="paragraph">
      <style:text-properties style:font-name="Calibri"/>
    </style:style>
    <style:style style:name="P129" style:parent-style-name="ListParagraph" style:list-style-name="LFO12" style:family="paragraph">
      <style:text-properties style:font-name="Calibri"/>
    </style:style>
    <style:style style:name="P130" style:parent-style-name="ListParagraph" style:list-style-name="LFO12" style:family="paragraph">
      <style:text-properties style:font-name="Calibri"/>
    </style:style>
    <style:style style:name="P131" style:parent-style-name="Normal" style:family="paragraph">
      <style:paragraph-properties fo:text-align="center"/>
    </style:style>
    <style:style style:name="T132" style:parent-style-name="DefaultParagraphFont" style:family="text">
      <style:text-properties style:font-name="Calibri"/>
    </style:style>
    <style:style style:name="P133" style:parent-style-name="Normal" style:family="paragraph">
      <style:paragraph-properties fo:text-align="center"/>
      <style:text-properties style:font-name="Calibri" fo:font-weight="bold" style:font-weight-asian="bold" style:font-weight-complex="bold"/>
    </style:style>
    <style:style style:name="P134" style:parent-style-name="Normal" style:family="paragraph">
      <style:paragraph-properties fo:text-align="center"/>
    </style:style>
    <style:style style:name="T135" style:parent-style-name="DefaultParagraphFont" style:family="text">
      <style:text-properties style:font-name="Calibri"/>
    </style:style>
    <style:style style:name="P136" style:parent-style-name="Normal" style:family="paragraph">
      <style:paragraph-properties fo:text-align="center"/>
      <style:text-properties style:font-name="Calibri" fo:font-weight="bold" style:font-weight-asian="bold" style:font-weight-complex="bold"/>
    </style:style>
    <style:style style:name="T137" style:parent-style-name="DefaultParagraphFont" style:family="text">
      <style:text-properties style:font-name="Calibri"/>
    </style:style>
    <style:style style:name="P138" style:parent-style-name="Normal" style:family="paragraph">
      <style:paragraph-properties fo:text-align="center"/>
    </style:style>
    <style:style style:name="T139" style:parent-style-name="DefaultParagraphFont" style:family="text">
      <style:text-properties style:font-name="Calibri"/>
    </style:style>
    <style:style style:name="P140" style:parent-style-name="Normal" style:family="paragraph">
      <style:paragraph-properties fo:text-align="center"/>
      <style:text-properties style:font-name="Calibri" fo:font-weight="bold" style:font-weight-asian="bold" style:font-weight-complex="bold"/>
    </style:style>
    <style:style style:name="T141" style:parent-style-name="DefaultParagraphFont" style:family="text">
      <style:text-properties style:font-name="Calibri"/>
    </style:style>
    <style:style style:name="T142" style:parent-style-name="DefaultParagraphFont" style:family="text">
      <style:text-properties style:font-name="Calibri" fo:font-weight="bold" style:font-weight-asian="bold" style:font-weight-complex="bold"/>
    </style:style>
    <style:style style:name="T143" style:parent-style-name="DefaultParagraphFont" style:family="text">
      <style:text-properties style:font-name="Calibri"/>
    </style:style>
    <style:style style:name="T144" style:parent-style-name="DefaultParagraphFont" style:family="text">
      <style:text-properties style:font-name="Calibri" fo:font-weight="bold" style:font-weight-asian="bold" style:font-weight-complex="bold"/>
    </style:style>
    <style:style style:name="T145" style:parent-style-name="DefaultParagraphFont" style:family="text">
      <style:text-properties style:font-name="Calibri" fo:font-weight="bold" style:font-weight-asian="bold" style:font-weight-complex="bold"/>
    </style:style>
    <style:style style:name="T146" style:parent-style-name="DefaultParagraphFont" style:family="text">
      <style:text-properties style:font-name="Calibri"/>
    </style:style>
    <style:style style:name="T147" style:parent-style-name="DefaultParagraphFont" style:family="text">
      <style:text-properties style:font-name="Calibri"/>
    </style:style>
    <style:style style:name="P148" style:parent-style-name="Normal" style:family="paragraph">
      <style:paragraph-properties fo:text-indent="0in"/>
      <style:text-properties fo:language="en" fo:country="US"/>
    </style:style>
    <style:style style:name="P149" style:parent-style-name="Normal" style:family="paragraph">
      <style:paragraph-properties fo:text-indent="0in"/>
      <style:text-properties fo:language="en" fo:country="US"/>
    </style:style>
    <style:style style:name="P150" style:parent-style-name="Normal" style:family="paragraph">
      <style:paragraph-properties fo:text-indent="0in"/>
      <style:text-properties fo:language="en" fo:country="US"/>
    </style:style>
    <style:style style:name="P151" style:parent-style-name="Normal" style:family="paragraph">
      <style:paragraph-properties fo:text-indent="0in"/>
      <style:text-properties fo:language="en" fo:country="US"/>
    </style:style>
    <style:style style:name="P152" style:parent-style-name="Normal" style:family="paragraph">
      <style:paragraph-properties fo:text-indent="0in"/>
      <style:text-properties fo:language="en" fo:country="US"/>
    </style:style>
    <style:style style:name="P153" style:parent-style-name="Normal" style:family="paragraph">
      <style:paragraph-properties fo:text-indent="0in"/>
      <style:text-properties fo:language="en" fo:country="US"/>
    </style:style>
    <style:style style:name="P154" style:parent-style-name="Normal" style:family="paragraph">
      <style:paragraph-properties fo:text-indent="0in"/>
      <style:text-properties fo:language="en" fo:country="US"/>
    </style:style>
    <style:style style:name="P155" style:parent-style-name="Normal" style:family="paragraph">
      <style:paragraph-properties fo:text-indent="0in"/>
    </style:style>
    <style:style style:name="T156" style:parent-style-name="DefaultParagraphFont" style:family="text">
      <style:text-properties fo:language="en" fo:country="US"/>
    </style:style>
    <style:style style:name="P157" style:parent-style-name="Normal" style:family="paragraph">
      <style:paragraph-properties fo:text-indent="0in"/>
    </style:style>
    <style:style style:name="P158" style:parent-style-name="Normal" style:family="paragraph">
      <style:paragraph-properties fo:text-indent="0in"/>
    </style:style>
    <style:style style:name="P159" style:parent-style-name="Normal" style:family="paragraph">
      <style:paragraph-properties fo:text-indent="0in"/>
    </style:style>
    <style:style style:name="P160" style:parent-style-name="Normal" style:family="paragraph">
      <style:paragraph-properties fo:text-indent="0in"/>
    </style:style>
    <style:style style:name="P161" style:parent-style-name="Normal" style:family="paragraph">
      <style:paragraph-properties fo:text-indent="0in"/>
    </style:style>
    <style:style style:name="P162" style:parent-style-name="Normal" style:family="paragraph">
      <style:paragraph-properties fo:text-align="center"/>
      <style:text-properties style:font-name="Calibri" fo:font-weight="bold" style:font-weight-asian="bold" style:font-weight-complex="bold"/>
    </style:style>
    <style:style style:name="P163" style:parent-style-name="Normal" style:family="paragraph">
      <style:text-properties style:font-name="Calibri"/>
    </style:style>
    <style:style style:name="P164" style:parent-style-name="Normal" style:family="paragraph">
      <style:paragraph-properties fo:text-align="center"/>
    </style:style>
    <style:style style:name="T165" style:parent-style-name="DefaultParagraphFont" style:family="text">
      <style:text-properties style:font-name="Calibri"/>
    </style:style>
    <style:style style:name="P166" style:parent-style-name="Normal" style:family="paragraph">
      <style:paragraph-properties fo:text-align="center"/>
      <style:text-properties style:font-name="Calibri" fo:font-weight="bold" style:font-weight-asian="bold" style:font-weight-complex="bold"/>
    </style:style>
    <style:style style:name="T167" style:parent-style-name="DefaultParagraphFont" style:family="text">
      <style:text-properties style:font-name="Calibri"/>
    </style:style>
    <style:style style:name="P168" style:parent-style-name="Normal" style:family="paragraph">
      <style:paragraph-properties fo:text-align="center"/>
    </style:style>
    <style:style style:name="P169" style:parent-style-name="Normal" style:family="paragraph">
      <style:paragraph-properties fo:text-align="center"/>
      <style:text-properties style:font-name="Calibri"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P171" style:parent-style-name="Normal" style:family="paragraph">
      <style:paragraph-properties fo:text-align="center"/>
      <style:text-properties style:font-name="Calibri" fo:font-weight="bold" style:font-weight-asian="bold" style:font-weight-complex="bold"/>
    </style:style>
    <style:style style:name="P172" style:parent-style-name="SBCtitle1" style:list-style-name="LFO8" style:family="paragraph"/>
    <style:style style:name="T173" style:parent-style-name="DefaultParagraphFont" style:family="text">
      <style:text-properties style:font-name="Calibri"/>
    </style:style>
    <style:style style:name="T174" style:parent-style-name="DefaultParagraphFont" style:family="text">
      <style:text-properties style:font-name="Calibri"/>
    </style:style>
    <style:style style:name="P175" style:parent-style-name="Normal" style:family="paragraph">
      <style:text-properties style:font-name="Calibri"/>
    </style:style>
    <style:style style:name="P176" style:parent-style-name="Normal" style:family="paragraph">
      <style:paragraph-properties fo:text-align="center" fo:text-indent="0in"/>
    </style:style>
    <style:style style:name="T177" style:parent-style-name="DefaultParagraphFont" style:family="text">
      <style:text-properties style:font-name="Calibri"/>
    </style:style>
    <style:style style:name="P178" style:parent-style-name="Normal" style:family="paragraph">
      <style:text-properties style:font-name="Calibri" fo:font-size="11pt" style:font-size-asian="11pt" style:font-size-complex="9pt" fo:language="en" fo:country="US"/>
    </style:style>
    <style:style style:name="P179" style:parent-style-name="Normal" style:family="paragraph">
      <style:text-properties style:font-name="Calibri" fo:font-size="11pt" style:font-size-asian="11pt" style:font-size-complex="9pt" fo:language="en" fo:country="US"/>
    </style:style>
    <style:style style:name="P180" style:parent-style-name="Normal" style:family="paragraph">
      <style:text-properties style:font-name="Calibri" fo:font-size="11pt" style:font-size-asian="11pt" style:font-size-complex="9pt" fo:language="en" fo:country="US"/>
    </style:style>
    <style:style style:name="P181" style:parent-style-name="Normal" style:family="paragraph">
      <style:text-properties style:font-name="Calibri" fo:font-size="11pt" style:font-size-asian="11pt" style:font-size-complex="9pt" fo:language="en" fo:country="US"/>
    </style:style>
    <style:style style:name="P182" style:parent-style-name="Normal" style:family="paragraph">
      <style:text-properties style:font-name="Calibri" fo:font-size="11pt" style:font-size-asian="11pt" style:font-size-complex="9pt" fo:language="en" fo:country="US"/>
    </style:style>
    <style:style style:name="P183" style:parent-style-name="Normal" style:family="paragraph">
      <style:text-properties fo:language="en" fo:country="US"/>
    </style:style>
    <style:style style:name="P184" style:parent-style-name="Normal" style:family="paragraph">
      <style:paragraph-properties fo:text-align="center" fo:text-indent="0in"/>
      <style:text-properties style:font-name="Calibri" fo:font-weight="bold" style:font-weight-asian="bold" style:font-weight-complex="bold"/>
    </style:style>
    <style:style style:name="T185" style:parent-style-name="DefaultParagraphFont" style:family="text">
      <style:text-properties style:font-name="Calibri"/>
    </style:style>
    <style:style style:name="P186" style:parent-style-name="Normal" style:family="paragraph">
      <style:text-properties style:font-name="Calibri"/>
    </style:style>
    <style:style style:name="P187" style:parent-style-name="Normal" style:family="paragraph">
      <style:paragraph-properties fo:text-align="center" fo:text-indent="0in"/>
    </style:style>
    <style:style style:name="T188" style:parent-style-name="DefaultParagraphFont" style:family="text">
      <style:text-properties style:font-name="Calibri"/>
    </style:style>
    <style:style style:name="P189" style:parent-style-name="Normal" style:family="paragraph">
      <style:text-properties fo:language="en" fo:country="US"/>
    </style:style>
    <style:style style:name="P190" style:parent-style-name="Normal" style:family="paragraph">
      <style:paragraph-properties fo:text-align="center" fo:text-indent="0in"/>
      <style:text-properties style:font-name="Calibri" fo:font-weight="bold" style:font-weight-asian="bold" style:font-weight-complex="bold"/>
    </style:style>
    <style:style style:name="P191" style:parent-style-name="Normal" style:family="paragraph">
      <style:paragraph-properties fo:text-align="center"/>
    </style:style>
    <style:style style:name="T192" style:parent-style-name="DefaultParagraphFont" style:family="text">
      <style:text-properties style:font-name="Calibri"/>
    </style:style>
    <style:style style:name="P193" style:parent-style-name="Normal" style:family="paragraph">
      <style:paragraph-properties fo:text-align="center"/>
      <style:text-properties style:font-name="Calibri" fo:font-weight="bold" style:font-weight-asian="bold" style:font-weight-complex="bold"/>
    </style:style>
    <style:style style:name="T194" style:parent-style-name="DefaultParagraphFont" style:family="text">
      <style:text-properties style:font-name="Calibri"/>
    </style:style>
    <style:style style:name="T195" style:parent-style-name="DefaultParagraphFont" style:family="text">
      <style:text-properties style:font-name="Calibri" fo:font-weight="bold" style:font-weight-asian="bold" style:font-weight-complex="bold"/>
    </style:style>
    <style:style style:name="T196" style:parent-style-name="DefaultParagraphFont" style:family="text">
      <style:text-properties style:font-name="Calibri" fo:font-weight="bold" style:font-weight-asian="bold" style:font-weight-complex="bold"/>
    </style:style>
    <style:style style:name="T197" style:parent-style-name="DefaultParagraphFont" style:family="text">
      <style:text-properties style:font-name="Calibri"/>
    </style:style>
    <style:style style:name="T198" style:parent-style-name="DefaultParagraphFont" style:family="text">
      <style:text-properties style:font-name="Calibri" fo:font-weight="bold" style:font-weight-asian="bold" style:font-weight-complex="bold"/>
    </style:style>
    <style:style style:name="T199" style:parent-style-name="DefaultParagraphFont" style:family="text">
      <style:text-properties style:font-name="Calibri"/>
    </style:style>
    <style:style style:name="P200" style:parent-style-name="Normal" style:family="paragraph">
      <style:text-properties fo:color="#FF0000"/>
    </style:style>
    <style:style style:name="T201" style:parent-style-name="DefaultParagraphFont" style:family="text">
      <style:text-properties style:font-name="Calibri"/>
    </style:style>
    <style:style style:name="P202" style:parent-style-name="Normal" style:family="paragraph">
      <style:paragraph-properties fo:text-align="center"/>
    </style:style>
    <style:style style:name="P203" style:parent-style-name="Normal" style:family="paragraph">
      <style:paragraph-properties fo:text-align="center"/>
      <style:text-properties style:font-name="Calibri" fo:font-weight="bold" style:font-weight-asian="bold" style:font-weight-complex="bold"/>
    </style:style>
    <style:style style:name="T204" style:parent-style-name="DefaultParagraphFont" style:family="text">
      <style:text-properties style:font-name="Calibri"/>
    </style:style>
    <style:style style:name="T205" style:parent-style-name="DefaultParagraphFont" style:family="text">
      <style:text-properties style:font-name="Calibri"/>
    </style:style>
    <style:style style:name="T206" style:parent-style-name="DefaultParagraphFont" style:family="text">
      <style:text-properties style:font-name="Calibri" fo:font-weight="bold" style:font-weight-asian="bold" style:font-weight-complex="bold"/>
    </style:style>
    <style:style style:name="T207" style:parent-style-name="DefaultParagraphFont" style:family="text">
      <style:text-properties style:font-name="Calibri" fo:font-weight="bold" style:font-weight-asian="bold" style:font-weight-complex="bold"/>
    </style:style>
    <style:style style:name="T208" style:parent-style-name="DefaultParagraphFont" style:family="text">
      <style:text-properties style:font-name="Calibri"/>
    </style:style>
    <style:style style:name="T209" style:parent-style-name="DefaultParagraphFont" style:family="text">
      <style:text-properties style:font-name="Calibri"/>
    </style:style>
    <style:style style:name="T210" style:parent-style-name="DefaultParagraphFont" style:family="text">
      <style:text-properties style:font-name="Calibri"/>
    </style:style>
    <style:style style:name="T211" style:parent-style-name="DefaultParagraphFont" style:family="text">
      <style:text-properties style:font-name="Calibri" fo:font-weight="bold" style:font-weight-asian="bold" style:font-weight-complex="bold"/>
    </style:style>
    <style:style style:name="T212" style:parent-style-name="DefaultParagraphFont" style:family="text">
      <style:text-properties style:font-name="Calibri"/>
    </style:style>
    <style:style style:name="T213" style:parent-style-name="DefaultParagraphFont" style:family="text">
      <style:text-properties style:font-name="Calibri"/>
    </style:style>
    <style:style style:name="T214" style:parent-style-name="DefaultParagraphFont" style:family="text">
      <style:text-properties style:font-name="Calibri"/>
    </style:style>
    <style:style style:name="T215" style:parent-style-name="DefaultParagraphFont" style:family="text">
      <style:text-properties style:font-name="Calibri" fo:font-weight="bold" style:font-weight-asian="bold" style:font-weight-complex="bold"/>
    </style:style>
    <style:style style:name="T216" style:parent-style-name="DefaultParagraphFont" style:family="text">
      <style:text-properties style:font-name="Calibri"/>
    </style:style>
    <style:style style:name="T217" style:parent-style-name="DefaultParagraphFont" style:family="text">
      <style:text-properties style:font-name="Calibri" fo:font-weight="bold" style:font-weight-asian="bold" style:font-weight-complex="bold"/>
    </style:style>
    <style:style style:name="T218" style:parent-style-name="DefaultParagraphFont" style:family="text">
      <style:text-properties style:font-name="Calibri"/>
    </style:style>
    <style:style style:name="T219" style:parent-style-name="DefaultParagraphFont" style:family="text">
      <style:text-properties style:font-name="Calibri" fo:font-weight="bold" style:font-weight-asian="bold" style:font-weight-complex="bold"/>
    </style:style>
    <style:style style:name="P220" style:parent-style-name="Normal" style:family="paragraph">
      <style:text-properties style:font-name="Calibri"/>
    </style:style>
    <style:style style:name="P221" style:parent-style-name="Normal" style:family="paragraph">
      <style:paragraph-properties fo:text-align="center"/>
    </style:style>
    <style:style style:name="T222" style:parent-style-name="DefaultParagraphFont" style:family="text">
      <style:text-properties style:font-name="Calibri"/>
    </style:style>
    <style:style style:name="P223" style:parent-style-name="Normal" style:family="paragraph">
      <style:paragraph-properties fo:text-align="center"/>
      <style:text-properties style:font-name="Calibri" fo:font-weight="bold" style:font-weight-asian="bold" style:font-weight-complex="bold"/>
    </style:style>
    <style:style style:name="P224" style:parent-style-name="ListParagraph" style:list-style-name="LFO8" style:family="paragraph">
      <style:text-properties fo:font-weight="bold" style:font-weight-asian="bold" style:font-weight-complex="bold"/>
    </style:style>
    <style:style style:name="P225" style:parent-style-name="SBCparagraph" style:list-style-name="LFO9" style:family="paragraph"/>
    <style:style style:name="T226" style:parent-style-name="DefaultParagraphFont" style:family="text">
      <style:text-properties style:font-name="Times New Roman"/>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PROJETO 4: MINIX</text:p>
      <text:p text:style-name="SBCauthors"><text:span text:style-name="T2">Gustavo Borges Peres da Silva</text:span><text:span text:style-name="T3">1</text:span></text:p>
      <text:p text:style-name="SBCinstitution"><text:span text:style-name="T4">1</text:span><text:span text:style-name="T5">Departamento de Ciência da Computação – Universidade Federal de Catalão (UFCAT)</text:span></text:p>
      <text:p text:style-name="P6">gustavo.silva@discente.ufcat.edu.br</text:p>
      <text:p text:style-name="P7"/>
      <text:p text:style-name="SBCtitle1">Objetivos</text:p>
      <text:list text:style-name="LFO7" text:continue-numbering="true">
        <text:list-item>
          <text:p text:style-name="P8">Familiarizar o aluno com o SO MINIX e testes em<text:s/>ambiente de máquina virtual;</text:p>
        </text:list-item>
        <text:list-item>
          <text:p text:style-name="P9">Criar uma chamada de sistema.</text:p>
        </text:list-item>
      </text:list>
      <text:list text:style-name="LFO8" text:continue-numbering="true">
        <text:list-item>
          <text:p text:style-name="P10">TAREFA<text:s/>7<text:s/>criando uma chamada de sistema (de 22/02/2024 a 25/02/2024)</text:p>
        </text:list-item>
      </text:list>
      <text:p text:style-name="Normal">No MINIX 3 servidores tratam as chamadas de sistema. Conforme visto na unidade 1.1 (Introdução ao MINIX), existem servidores para lidar com diversos aspectos do sistema operacional (gerenciamento de processos, gerenciamento de sistema de arquivos, gerenciamento conexões de rede etc). Para adicionar uma nova chamada de sistema são necessárias duas etapas: escrever um manipulador (handler) de chamada de sistema e escrever uma biblioteca de usuário.<text:s/></text:p>
      <text:p text:style-name="Normal">O manipulador de chamada de sistema<text:s/>é<text:s/>uma função que<text:s/>é<text:s/>chamada em resposta a um usuário solicitando uma chamada de sistema. Cada chamada de sistema tem um manipulador. Uma biblioteca do usuário empacota os parâmetros para a chamada de sistema e chama o manipulador no servidor apropriado. Um usuário sempre invoca uma chamada de sistema usando a biblioteca de usuário.</text:p>
      <text:p text:style-name="Normal">O manipulador de chamadas do sistema deve ser colocado em um servidor apropriado, que por sua vez irá<text:s/>processar uma solicitação do usuário, invocando o manipulador correspondente.<text:s/>É<text:s/>importante escolher o servidor correto para a inclusão da chamada de sistema. Por exemplo, se a chamada de sistema deve atualizar o sistema de arquivo ou estruturas de dados fproc, então o manipulador de chamada de sistema deve ser colocado no servidor FS (no MFS, para sistema de arquivos).</text:p>
      <text:p text:style-name="Normal"><text:span text:style-name="T11">Para esta pr</text:span><text:span text:style-name="T12">á</text:span><text:span text:style-name="T13">tica</text:span>, o professor solicitou para adicionarmos uma chamada de sistema simples no MINIX 3, no servidor PM (gerenciador de processo), a qual irá<text:s/>imprimir a seguinte mensagem:<text:s/>“Eu sou uma chamada de sistema!”.</text:p>
      <text:list text:style-name="LFO8" text:continue-numbering="true">
        <text:list-item>
          <text:list>
            <text:list-item>
              <text:p text:style-name="P14">Conteúdo de auxilio</text:p>
            </text:list-item>
          </text:list>
        </text:list-item>
      </text:list>
      <text:p text:style-name="Normal">Para auxiliar o aluno, esta prática será<text:s/>dividida em algumas etapas<text:s/>–<text:s/>estas etapas devem constar no relatório:</text:p>
      <text:list text:style-name="LFO10" text:continue-numbering="true">
        <text:list-item>
          <text:p text:style-name="P15">O código fonte para todos os servidores está<text:s/>localizado em /usr/src/servers. Cada servidor possui um diretório separado. O gerenciador de processos (PM) está<text:s/>localizado em /usr/src/servers/pm. Cada diretório de servidor possui dois arquivos chave: table.c e proto.h. Estes arquivos contém a definição para a tabela call_vec. A tabela call_vec<text:s/>é<text:s/>um vetor de ponteiros de função que<text:s/>é<text:s/><text:soft-page-break/>indexado pelo número da chamada de sistema. Em cada linha, o endereço de um manipulador de chamada de sistema<text:s/>é<text:s/>atribuído para uma entrada na tabela e o<text:s/>índice da entrada<text:s/>é<text:s/>o número da chamada de sistema.<text:s/><text:span text:style-name="T16">Modifique os arquivos table.c e proto.h de modo a incluir o manipulador do_mycall. Deduza como as entradas para a cria</text:span><text:span text:style-name="T17">çã</text:span><text:span text:style-name="T18">o deste manipulador devem ser inseridas nos arquivos mencionados. Use a entrada de n</text:span><text:span text:style-name="T19">ú</text:span><text:span text:style-name="T20">mero 70 para identificar esta chamada de sistema. Observe que do_mycall n</text:span><text:span text:style-name="T21">ã</text:span><text:span text:style-name="T22">o recebe par</text:span><text:span text:style-name="T23">â</text:span><text:span text:style-name="T24">metros de entrada. Esta chamada ir</text:span><text:span text:style-name="T25">á</text:span><text:span text:style-name="T26"><text:s/>apenas imprimir a mensagem:<text:s/></text:span><text:span text:style-name="T27">“</text:span><text:span text:style-name="T28">Eu sou uma chamada de sistema!</text:span><text:span text:style-name="T29">”</text:span><text:span text:style-name="T30">. Em proto.h, insira o prot</text:span><text:span text:style-name="T31">ó</text:span><text:span text:style-name="T32">tipo de sua chamada de sistema na se</text:span><text:span text:style-name="T33">çã</text:span><text:span text:style-name="T34">o destinada ao arquivo misc.c.</text:span></text:p>
        </text:list-item>
        <text:list-item>
          <text:p text:style-name="P35"><text:bookmark-start text:name="_Hlk159691619"/>A implementação<text:s/><text:bookmark-end text:name="_Hlk159691619"/>da chamada de sistema deve aparecer em /usr/src/servers/pm. Esta pode ser implementada em um arquivo<text:s/>“.c”<text:s/>a parte, porém, para simplificar o processo, iremos inserir sua implementação em<text:s/><text:span text:style-name="T36">/usr/src/servers/pm/misc.c</text:span>. O corpo da chamada deverá<text:s/>conter apenas: printf(“Eu sou uma chamada de sistema!”);<text:s/></text:p>
        </text:list-item>
      </text:list>
      <text:p text:style-name="P37">return(OK);<text:s/></text:p>
      <text:p text:style-name="P38">Para definir o cabeçalho da chamada de sistema, observe o cabeçalho da funçã<text:s/>do_procstat. Ambos são similares.</text:p>
      <text:list text:style-name="LFO10" text:continue-numbering="true">
        <text:list-item>
          <text:p text:style-name="P39">Vá<text:s/>ao diretório<text:s/><text:span text:style-name="T40">/usr/src/servers</text:span><text:s/>e faça um make. Isso deverá<text:s/>mostrar erros de compilação caso você<text:s/>tenha realizado alguma alteração incorretamente. Corrija seus erros caso seja necessário.</text:p>
        </text:list-item>
        <text:list-item>
          <text:p text:style-name="P41">É<text:s/>hora de mapear a chamada de sistema e seu número (70). Para tanto, você<text:s/>deve ir para o diretório<text:s/><text:span text:style-name="T42">/usr/src/include/minix</text:span><text:s/>e editar o arquivo<text:s/><text:span text:style-name="T43">callnr.h</text:span><text:s/>de modo a inserir o mapeamento para a sua chamada de sistema. Chame-a de MYCALL no contexto desse arquivo.</text:p>
        </text:list-item>
        <text:list-item>
          <text:p text:style-name="P44"><text:span text:style-name="T45">Para simplificar o procedimento de cria</text:span><text:span text:style-name="T46">çã</text:span><text:span text:style-name="T47">o da biblioteca de usu</text:span><text:span text:style-name="T48">á</text:span><text:span text:style-name="T49">rio, crie em /usr/src/include<text:s/></text:span>o arquivo<text:span text:style-name="T50"><text:s/>mylib.h</text:span>. Este arquivo irá<text:s/>executar efetivamente a chamada de sistema criada. O código a ser inserido nessa biblioteca<text:s/>é</text:p>
        </text:list-item>
      </text:list>
      <text:p text:style-name="P51">#include&lt;lib.h&gt;</text:p>
      <text:p text:style-name="P52">#define mycall _mycall</text:p>
      <text:p text:style-name="P53">#include&lt;unistd.h&gt;</text:p>
      <text:p text:style-name="P54">&lt;&lt;similar ao cabeçalho disponível em (b)&gt;&gt;</text:p>
      <text:p text:style-name="P55">{</text:p>
      <text:p text:style-name="P56">message m;</text:p>
      <text:p text:style-name="P57">return (_syscall(PM_PROC_NR, MYCALL, &amp;m));</text:p>
      <text:p text:style-name="P58">}</text:p>
      <text:p text:style-name="P59">Não se esqueça de incluir uma entrada para mylib.h em /usr/src/include/Makefile.</text:p>
      <text:list text:style-name="LFO10" text:continue-numbering="true">
        <text:list-item>
          <text:p text:style-name="P60">Você<text:s/>observou no código da questão anterior a seguinte declaração:<text:s/>“messagem”. Explique em que consiste esse tipo de dado. Explique também o papel da chamada de sistema _syscall() (obs. Os slides da unidade 2 possuem uma referência a esta questão. Para maiores detalhes consulte o livro Projeto de Sistemas Operacionais que consta na referência do curso).</text:p>
        </text:list-item>
        <text:list-item>
          <text:p text:style-name="P61">Para finalizar o processo de criação de sua chamada de sistema, vá<text:s/>ao diretório<text:s/><text:soft-page-break/>/usr/src/tools compile o kernel, bibliotecas e includes e instale no HD.</text:p>
        </text:list-item>
        <text:list-item>
          <text:p text:style-name="P62">Crie um programa de teste para sua nova chamada de sistema. Dica: você<text:s/>teria dificuldade em demonstrar a chamada de sistema printf()? O raciocínio<text:s/>é<text:s/>análogo.</text:p>
        </text:list-item>
      </text:list>
      <text:list text:style-name="LFO8" text:continue-numbering="true">
        <text:list-item>
          <text:list>
            <text:list-item>
              <text:p text:style-name="P63">Relat<text:span text:style-name="T64">ório Tarefa 7</text:span></text:p>
            </text:list-item>
          </text:list>
        </text:list-item>
      </text:list>
      <text:p text:style-name="Normal">Para esta tarefa, iremos seguir os passos descritos no Topico 1.1 Conteudo de Auxilio, sendo assim, primeiramente iremos editar o arquivo<text:s/>proto.h<text:s/>localizado em<text:s/>/usr/src/servers/pm<text:s/>no qual iremos adicionar um prototipo de função na seção destinada ao arquivo misc.c<text:s/>conforme a figura 1.</text:p>
      <text:p text:style-name="P65"><text:span text:style-name="T66"><draw:frame draw:style-name="a0" draw:name="Picture 1" text:anchor-type="as-char" svg:x="0in" svg:y="0in" svg:width="4.39159in" svg:height="1.99181in" style:rel-width="scale" style:rel-height="scale"><draw:image xlink:href="media/image1.png" xlink:type="simple" xlink:show="embed" xlink:actuate="onLoad"/><svg:title/><svg:desc>A screen shot of a computer

Description automatically generated</svg:desc></draw:frame></text:span></text:p>
      <text:p text:style-name="P67">Figura 1: alteração no arquivo de cabeçalho proto.h.</text:p>
      <text:p text:style-name="P68">Agora que temos o prototipo no cabeçalho, iremos editar o misc.c a fins de adicionarmos a implementação da função do_mycall<text:s/>conforme a figura 2.</text:p>
      <text:p text:style-name="P69"><text:span text:style-name="T70"><draw:frame draw:style-name="a1" draw:name="Picture 1" text:anchor-type="as-char" svg:x="0in" svg:y="0in" svg:width="5.45177in" svg:height="2.15148in" style:rel-width="scale" style:rel-height="scale"><draw:image xlink:href="media/image2.png" xlink:type="simple" xlink:show="embed" xlink:actuate="onLoad"/><svg:title/><svg:desc>A screen shot of a computer

Description automatically generated</svg:desc></draw:frame></text:span></text:p>
      <text:p text:style-name="P71">Figura<text:s/>2: alteração no arquivo<text:s/>misc.c.</text:p>
      <text:p text:style-name="Normal">Agora iremos<text:s/>editar o table.c a fins de adicionar a entrada da tabela call_vec que ser<text:span text:style-name="T72">á a chamada de sistema do_mycall. No minix existem algumas tabelas que não estão sendo utilizadas, e uma delas seria essa da posição 70, portanto, iremos<text:s/></text:span></text:p>
      <text:soft-page-break/>
      <text:p text:style-name="P73">adicionar a entrada na posição 70 da tabela conforme a Figura 3.</text:p>
      <text:p text:style-name="P74"><text:span text:style-name="T75"><draw:frame draw:style-name="a2" draw:name="Picture 1" text:anchor-type="as-char" svg:x="0in" svg:y="0in" svg:width="4.41728in" svg:height="1.0939in" style:rel-width="scale" style:rel-height="scale"><draw:image xlink:href="media/image3.png" xlink:type="simple" xlink:show="embed" xlink:actuate="onLoad"/><svg:title/><svg:desc>A screen shot of a computer

Description automatically generated</svg:desc></draw:frame></text:span></text:p>
      <text:p text:style-name="P76">Figura<text:s/>3: alteração no arquivo<text:s/>table.c.</text:p>
      <text:p text:style-name="P77">E agora para confirmar que as linhas inseridas em cada documento não deu nenhum problema, iremos usar make no diretorio /usr/src/servers conforme a Figura 4<text:s/>para compilarmos as nossas alterações.</text:p>
      <text:p text:style-name="P78"><text:span text:style-name="T79"><draw:frame draw:style-name="a3" draw:name="Picture 1" text:anchor-type="as-char" svg:x="0in" svg:y="0in" svg:width="2.09176in" svg:height="2.78902in" style:rel-width="scale" style:rel-height="scale"><draw:image xlink:href="media/image4.png" xlink:type="simple" xlink:show="embed" xlink:actuate="onLoad"/><svg:title/><svg:desc>A screen shot of a computer

Description automatically generated</svg:desc></draw:frame></text:span></text:p>
      <text:p text:style-name="P80">Figura<text:s/>4:<text:s/>verificando integridade dos arquivos usando make e compilando.</text:p>
      <text:p text:style-name="Normal">Tudo certo, sendo assim, iremos avançar para o proximo passo, que será o mapeamento da chamada do_mycall com numero 70 no arquivo callnr.h conforme a figura 5, onde o <text:s/>mesmo est<text:span text:style-name="T81">á l</text:span>ocalizado no diretorio<text:s/>/usr/src/include/minix.</text:p>
      <text:p text:style-name="P82"><text:span text:style-name="T83"><draw:frame draw:style-name="a4" draw:name="Picture 1" text:anchor-type="as-char" svg:x="0in" svg:y="0in" svg:width="2.21596in" svg:height="1.39337in" style:rel-width="scale" style:rel-height="scale"><draw:image xlink:href="media/image5.png" xlink:type="simple" xlink:show="embed" xlink:actuate="onLoad"/><svg:title/><svg:desc>A screen shot of a computer

Description automatically generated</svg:desc></draw:frame></text:span></text:p>
      <text:p text:style-name="P84">Figura<text:s/>4: alteração no<text:s/>cabeçalho do<text:s/>arquivo<text:s/>callnr.h.</text:p>
      <text:p text:style-name="Normal">Agora iremos executar o procedimento para criar uma biblioteca de usuário que<text:s/>irá<text:s/>encapsular<text:s/>a nossa chamada de<text:s/>sistema personalizada. Isso<text:s/>é<text:s/>útil<text:s/>para<text:s/>fornecer uma interface mais amigável e abstrata para os usuários do sistema operacional, em vez de exigir que eles chamem diretamente a chamada de sistema subjacente.</text:p>
      <text:p text:style-name="Normal">Sendo assim, iremos criar um arquivo chamado<text:s/><text:span text:style-name="T85">mylib.h</text:span><text:s/>em<text:s/><text:span text:style-name="T86">/usr/src/include e iremos<text:s/></text:span><text:soft-page-break/><text:span text:style-name="T87">inserir o conteudo fornecido pelo professor como podemos observar na Figura</text:span><text:span text:style-name="T88"><text:s/>5</text:span><text:span text:style-name="T89"><text:s/>abaixo.</text:span></text:p>
      <text:p text:style-name="P90"><text:span text:style-name="T91"><draw:frame draw:style-name="a5" draw:name="Picture 1" text:anchor-type="as-char" svg:x="0in" svg:y="0in" svg:width="3.43846in" svg:height="1.76287in" style:rel-width="scale" style:rel-height="scale"><draw:image xlink:href="media/image6.png" xlink:type="simple" xlink:show="embed" xlink:actuate="onLoad"/><svg:title/><svg:desc>A screen shot of a computer

Description automatically generated</svg:desc></draw:frame></text:span></text:p>
      <text:p text:style-name="P92">Figura<text:s/>5:<text:s/>Conteúdo do arquivo mylib.h.</text:p>
      <text:p text:style-name="Normal">Al<text:span text:style-name="T93">ém disso, para conseguir compilar, iremos adicionar o mylib.h no arquivo Makefile conforme a Figura 6.</text:span></text:p>
      <text:p text:style-name="P94"><text:span text:style-name="T95"><draw:frame draw:style-name="a6" draw:name="Picture 1" text:anchor-type="as-char" svg:x="0in" svg:y="0in" svg:width="4.21151in" svg:height="1.35795in" style:rel-width="scale" style:rel-height="scale"><draw:image xlink:href="media/image7.png" xlink:type="simple" xlink:show="embed" xlink:actuate="onLoad"/><svg:title/><svg:desc>A screen shot of a computer screen

Description automatically generated</svg:desc></draw:frame></text:span></text:p>
      <text:p text:style-name="P96">Figura<text:s/>6:<text:s/>Alteração do arquivo Makefile da pasta<text:s/>/usr/src/include.</text:p>
      <text:p text:style-name="Normal">Agora em resposta da pergunta (f), iremos explicar no que se consiste o uso da delcara<text:span text:style-name="T97">ção “message” no codigo anterior.<text:s/></text:span></text:p>
      <text:p text:style-name="Normal"><text:span text:style-name="T98">Sendo assim, de acordo com o slide de Introdução ao MINIX, vemos que o MINIX é estruturado em 4 camadas</text:span><text:span text:style-name="T99"><text:s/>(Figura<text:s/></text:span><text:span text:style-name="T100">7</text:span><text:span text:style-name="T101">)</text:span><text:span text:style-name="T102">, mas a questão é que, a camada 1 que é realizado o escalonamento dos processos e gerenciamento de transições entre o estados pronto, executando e bloqueado. Além disso, nessa camada o<text:s/></text:span><text:span text:style-name="T103">kernel lida com todas as mensagens entre processos</text:span><text:span text:style-name="T104"><text:s/>e controla acesso a portas de I/O e interrupções, tarefas de relogio e tarefas de sistema.</text:span></text:p>
      <text:p text:style-name="P105">A declaração message no código<text:s/>é<text:s/>um tipo de dado definido no sistema operacional MINIX. Especificamente,<text:s/>é<text:s/>um tipo de dado usado para representar mensagens que são passadas entre processos no sistema operacional.</text:p>
      <text:p text:style-name="P106">No contexto do MINIX,<text:s/>a comunicação interprocessos existem três primitivas para enviar e receber mensagens:</text:p>
      <text:list text:style-name="LFO11" text:continue-numbering="true">
        <text:list-item>
          <text:p text:style-name="P107">send(dest, &amp;message);</text:p>
        </text:list-item>
        <text:list-item>
          <text:p text:style-name="P108">receive(source, &amp;message);</text:p>
        </text:list-item>
        <text:list-item>
          <text:p text:style-name="P109">sendrec(src_dst, &amp;message);</text:p>
        </text:list-item>
      </text:list>
      <text:p text:style-name="Normal"><text:span text:style-name="T110">Ou seja,<text:s/></text:span><text:span text:style-name="T111">um processo pode enviar uma mensagem para outro processo usando uma chamada de sistema espec</text:span><text:span text:style-name="T112">í</text:span><text:span text:style-name="T113">fica, como<text:s/></text:span><text:span text:style-name="T114">sendrec</text:span><text:span text:style-name="T115">. A mensagem pode conter informa</text:span><text:span text:style-name="T116">çõ</text:span><text:span text:style-name="T117">es como o tipo de mensagem, o processo de origem, o processo de destino e os dados da mensagem propriamente dita.</text:span></text:p>
      <text:soft-page-break/>
      <text:p text:style-name="P118">A chamada de sistema _syscall<text:s/>é<text:s/>uma função que permite que um processo faça uma chamada de sistema para o kernel do sistema operacional. Ela<text:s/>é<text:s/>usada para chamar funções do kernel que não estão disponíveis diretamente para o processo de usuário. A chamada de sistema _syscall recebe como argumentos o número da chamada de sistema, os parâmetros da chamada de sistema e um ponteiro para uma estrutura de mensagem que contém os dados da chamada de sistema.</text:p>
      <text:p text:style-name="P119"><text:span text:style-name="T120"><draw:frame draw:style-name="a7" draw:name="Picture 1" text:anchor-type="as-char" svg:x="0in" svg:y="0in" svg:width="4.53164in" svg:height="1.76864in" style:rel-width="scale" style:rel-height="scale"><draw:image xlink:href="media/image8.png" xlink:type="simple" xlink:show="embed" xlink:actuate="onLoad"/><svg:title/><svg:desc>A diagram of a computer process

Description automatically generated</svg:desc></draw:frame></text:span></text:p>
      <text:p text:style-name="P121">Figura<text:s/>7:<text:s/>Estrutura interna do MINIX.</text:p>
      <text:p text:style-name="Normal">Agora que realizamos as explica<text:span text:style-name="T122">ções, vamos prosseguir. Iremos compilar e instalar o kernel, bibliotecas e includes no MINIX, sendo assim, iremos dividir em<text:s/></text:span><text:span text:style-name="T123">algumas</text:span><text:span text:style-name="T124"><text:s/>etapas.</text:span></text:p>
      <text:p text:style-name="P125">Na etapa 1, vamos no diretorio<text:s/>/usr/src/tools,<text:s/>e iremos compilar o kernel, bibliotecas e includes usando os comandos abaixo:</text:p>
      <text:list text:style-name="LFO12" text:continue-numbering="true">
        <text:list-item>
          <text:p text:style-name="P126">make includes <text:s text:c="2"/># Instala os arquivos de inclusão</text:p>
        </text:list-item>
        <text:list-item>
          <text:p text:style-name="P127">make depend <text:s text:c="4"/># Gera arquivos de dependência</text:p>
        </text:list-item>
        <text:list-item>
          <text:p text:style-name="P128">make libraries <text:s/># Compila as bibliotecas do sistema</text:p>
        </text:list-item>
        <text:list-item>
          <text:p text:style-name="P129">make services <text:s text:c="2"/># Compila e instala todos os serviços</text:p>
        </text:list-item>
        <text:list-item>
          <text:p text:style-name="P130">make image <text:s text:c="5"/># Cria a imagem de boot</text:p>
        </text:list-item>
      </text:list>
      <text:p text:style-name="P131"><text:span text:style-name="T132"><draw:frame draw:style-name="a8" draw:name="Picture 1" text:anchor-type="as-char" svg:x="0in" svg:y="0in" svg:width="2.16182in" svg:height="2.22339in" style:rel-width="scale" style:rel-height="scale"><draw:image xlink:href="media/image9.png" xlink:type="simple" xlink:show="embed" xlink:actuate="onLoad"/><svg:title/><svg:desc>A screen shot of a computer program

Description automatically generated</svg:desc></draw:frame></text:span></text:p>
      <text:p text:style-name="P133">Figura<text:s/>8:<text:s/>Trecho onde mostra que mylib.h foi instalado.</text:p>
      <text:soft-page-break/>
      <text:p text:style-name="P134"><text:span text:style-name="T135"><draw:frame draw:style-name="a9" draw:name="Picture 1" text:anchor-type="as-char" svg:x="0in" svg:y="0in" svg:width="3.26412in" svg:height="1.66929in" style:rel-width="scale" style:rel-height="scale"><draw:image xlink:href="media/image10.png" xlink:type="simple" xlink:show="embed" xlink:actuate="onLoad"/><svg:title/><svg:desc>A screenshot of a computer

Description automatically generated</svg:desc></draw:frame></text:span></text:p>
      <text:p text:style-name="P136">Figura<text:s/>9:<text:s/>Imagem criada.</text:p>
      <text:p text:style-name="Normal">Agora na etapa 2, iremos instalar no HD usando o comando make install, isso ir<text:span text:style-name="T137">á criar a imagem de boot e instalará no disco rígido.</text:span></text:p>
      <text:p text:style-name="P138"><text:span text:style-name="T139"><draw:frame draw:style-name="a10" draw:name="Picture 1" text:anchor-type="as-char" svg:x="0in" svg:y="0in" svg:width="4.13952in" svg:height="0.69304in" style:rel-width="scale" style:rel-height="scale"><draw:image xlink:href="media/image11.png" xlink:type="simple" xlink:show="embed" xlink:actuate="onLoad"/><svg:title/><svg:desc>A screen shot of a computer

Description automatically generated</svg:desc></draw:frame></text:span></text:p>
      <text:p text:style-name="P140">Figura<text:s/>10:<text:s/>Alterações instaladas no disco rígido.</text:p>
      <text:p text:style-name="Normal">Agora iremos reiniciar e executar o nosso boot 2.</text:p>
      <text:p text:style-name="Normal">Feito a renicializa<text:span text:style-name="T141">ção criamos esse codigo<text:s/></text:span><text:span text:style-name="T142">teste_mycall.c</text:span><text:span text:style-name="T143"><text:s/>para testarmos a chamada de sistema que configuramos. Fizemos um<text:s/></text:span><text:span text:style-name="T144">Make</text:span><text:span text:style-name="T145">file</text:span><text:span text:style-name="T146"><text:s/>também para compilar o mesmo conforme podemos verificar na Figura 11.</text:span></text:p>
      <text:p text:style-name="Normal"><text:span text:style-name="T147"><draw:frame draw:id="id0" draw:style-name="a11" draw:name="Text Box 2" text:anchor-type="as-char" svg:x="0in" svg:y="0in" svg:width="5.69514in" svg:height="1.53611in" style:rel-width="scale" style:rel-height="scale"><draw:text-box><text:p text:style-name="P148">#include &lt;stdio.h&gt;</text:p><text:p text:style-name="P149">#include &lt;unistd.h&gt;</text:p><text:p text:style-name="P150">#include &lt;mylib.h&gt;</text:p><text:p text:style-name="P151"/><text:p text:style-name="P152">int main() {</text:p><text:p text:style-name="P153"><text:s text:c="4"/>int call = mycall();</text:p><text:p text:style-name="P154"><text:s text:c="4"/>if (call == 0) {</text:p><text:p text:style-name="P155"><text:span text:style-name="T156"><text:s text:c="8"/></text:span>printf("Chamada de sistema executada com sucesso!\n");</text:p><text:p text:style-name="P157"><text:s text:c="4"/>} else {</text:p><text:p text:style-name="P158"><text:s text:c="8"/>printf("Erro ao executar a chamada de sistema.\n");</text:p><text:p text:style-name="P159"><text:s text:c="4"/>}</text:p><text:p text:style-name="P160"><text:s text:c="4"/>return 0;</text:p><text:p text:style-name="P161">}</text:p></draw:text-box><svg:title/><svg:desc/></draw:frame></text:span></text:p>
      <text:p text:style-name="P162">Codigo 1:<text:s/>Conteúdo do arquivo teste.mycall.c.</text:p>
      <text:p text:style-name="P163"/>
      <text:soft-page-break/>
      <text:p text:style-name="P164"><text:span text:style-name="T165"><draw:frame draw:style-name="a12" draw:name="Picture 1" text:anchor-type="as-char" svg:x="0in" svg:y="0in" svg:width="5.33065in" svg:height="1.58215in" style:rel-width="scale" style:rel-height="scale"><draw:image xlink:href="media/image12.png" xlink:type="simple" xlink:show="embed" xlink:actuate="onLoad"/><svg:title/><svg:desc>A screen shot of a computer

Description automatically generated</svg:desc></draw:frame></text:span></text:p>
      <text:p text:style-name="P166">Figura<text:s/>11:<text:s/>Compilando o codigo e testando.</text:p>
      <text:p text:style-name="Normal">Parece que o nosso programa test_mycall está<text:s/>executando corretamente e a chamada de sistema do_mycall está<text:s/>sendo chamada com sucesso. O aviso sobre a definição de função antiga (old-fashioned function definition)<text:s/>é<text:s/>apenas um aviso e não afeta a execução do programa. Mas ap<text:span text:style-name="T167">ós algumas pesquisas, descobrimos que para</text:span><text:s/>se livrar desse aviso, podemos atualizar a definição da função do_mycall para seguir o estilo de definição de função mais moderno:</text:p>
      <text:p text:style-name="P168"><draw:frame draw:style-name="a13" draw:name="Picture 1" text:anchor-type="as-char" svg:x="0in" svg:y="0in" svg:width="4.22754in" svg:height="0.7775in" style:rel-width="scale" style:rel-height="scale"><draw:image xlink:href="media/image13.png" xlink:type="simple" xlink:show="embed" xlink:actuate="onLoad"/><svg:title/><svg:desc>A screen shot of a computer

Description automatically generated</svg:desc></draw:frame></text:p>
      <text:p text:style-name="P169">Figura<text:s/>12:<text:s/>possível solução para os avisos.</text:p>
      <text:p text:style-name="Normal">Mas infelizmente, devido o nosso tempo não conseguimos testar essa possível solução para os avisos, mas dando continuidade, iremos mostrar a<text:s/><text:span text:style-name="T170">ANALOGIA</text:span>.</text:p>
      <text:p text:style-name="Normal">Agora que realizamos os testes finais, podemos dizer que a chamada de sistema mycall foi testada com<text:s/>êxito. O programa de teste simplesmente chama a função mycall e imprime uma mensagem dependendo do resultado da chamada.</text:p>
      <text:p text:style-name="Normal">No nosso codigo a gente colocou para imprimir uma mensagem usando printf apenas para mostrar que houve um retorno igual a zero da nossa chamada de sistema, mas como estamos usando o nosso prompt de comando no windows e acessando o MINIX via SSH, precisamos ficar de olho no Sistema do MINIX pois é justamente lá que irá aparecer as mensagens da nossa chamada de sistema.</text:p>
      <text:p text:style-name="Normal">Assim como a chamada de sistema printf, que<text:s/>é<text:s/>uma chamada de sistema para imprimir texto na tela, a chamada de sistema mycall também<text:s/>é<text:s/>uma chamada de sistema personalizada que criamos<text:s/>para realizar uma tarefa específica. O raciocínio para testar ambas<text:s/>é<text:s/>análogo:<text:s/>chamamos<text:s/>a função correspondente<text:s/>mycall()<text:s/>e<text:s/>verificamos<text:s/>se ela executa a tarefa esperada<text:s/>conforme a Figura 13.</text:p>
      <text:p text:style-name="Normal"><draw:frame draw:style-name="a14" draw:name="Picture 1" text:anchor-type="as-char" svg:x="0in" svg:y="0in" svg:width="5.90556in" svg:height="0.77083in" style:rel-width="scale" style:rel-height="scale"><draw:image xlink:href="media/image14.png" xlink:type="simple" xlink:show="embed" xlink:actuate="onLoad"/><svg:title/><svg:desc>A screenshot of a computer

Description automatically generated</svg:desc></draw:frame></text:p>
      <text:p text:style-name="P171">Figura<text:s/>13:<text:s/>teste finalizado com sucesso.</text:p>
      <text:p text:style-name="Normal">Portanto, podemos concluir que a chamada de sistema mycall foi criada e testada com sucesso.</text:p>
      <text:soft-page-break/>
      <text:list text:style-name="LFO8" text:continue-numbering="true">
        <text:list-item>
          <text:list>
            <text:list-item>
              <text:p text:style-name="P172">Salvando os patchs da tarefa<text:s/><text:span text:style-name="T173">7</text:span></text:p>
            </text:list-item>
          </text:list>
        </text:list-item>
      </text:list>
      <text:p text:style-name="Normal">Para envio da atividade no sigaa, iremos fazer o patch das altera<text:span text:style-name="T174">ções que realizamos.</text:span></text:p>
      <text:p text:style-name="P175">Para os arquivos modificados usaremos os seguintes comandos para compararmos os arquivos:</text:p>
      <text:p text:style-name="P176"><text:span text:style-name="T177"><draw:frame draw:id="id1" draw:style-name="a15" draw:name="Text Box 2" text:anchor-type="as-char" svg:x="0in" svg:y="0in" svg:width="5.90556in" svg:height="1.5in" style:rel-width="scale" style:rel-height="scale"><draw:text-box><text:p text:style-name="P178">diff -c src.clean/servers/pm/proto.h /usr/src/servers/pm/proto.h &gt; Tarefa7.patch</text:p><text:p text:style-name="P179">diff -c src.clean/servers/pm/misc.c /usr/src/servers/pm/misc.c &gt;&gt; Tarefa7.patch</text:p><text:p text:style-name="P180">diff -c src.clean/servers/pm/table.c /usr/src/servers/pm/table.c &gt;&gt; Tarefa7.patch</text:p><text:p text:style-name="P181">diff -c src.clean/include/minix/callnr.h /usr/src/include/minix/callnr.h &gt;&gt; Tarefa7.patch</text:p><text:p text:style-name="P182">diff -c src.clean/include/Makefile /usr/src/include/Makefile &gt;&gt; Tarefa7.patch</text:p><text:p text:style-name="P183"/></draw:text-box><svg:title/><svg:desc/></draw:frame></text:span></text:p>
      <text:p text:style-name="P184">Codigo 2: geração de patchs parte 1</text:p>
      <text:p text:style-name="Normal">E para os arquivos que criamos e nao existem no src.clean infelizmente nao podemos fazer o patch para eles pois afinal nao tem como fazer um patch de um arquivo que n<text:span text:style-name="T185">ão existe no diretório.</text:span></text:p>
      <text:p text:style-name="P186">Sendo assim, para mostrar as diferenças de arquivos basta usar esse codigo abaixo, e o resultado será de acordo com a Figura 14.</text:p>
      <text:p text:style-name="P187"><text:span text:style-name="T188"><draw:frame draw:id="id2" draw:style-name="a16" draw:name="Text Box 2" text:anchor-type="as-char" svg:x="0in" svg:y="0in" svg:width="5.90556in" svg:height="0.43472in" style:rel-width="scale" style:rel-height="scale"><draw:text-box><text:p text:style-name="P189">diff -r src.clean/include /usr/src/include</text:p></draw:text-box><svg:title/><svg:desc/></draw:frame></text:span></text:p>
      <text:p text:style-name="P190">Codigo<text:s/>3: geração de patchs parte<text:s/>2</text:p>
      <text:p text:style-name="P191"><text:span text:style-name="T192"><draw:frame draw:style-name="a17" draw:name="Picture 1" text:anchor-type="as-char" svg:x="0in" svg:y="0in" svg:width="5.18975in" svg:height="1.48235in" style:rel-width="scale" style:rel-height="scale"><draw:image xlink:href="media/image15.png" xlink:type="simple" xlink:show="embed" xlink:actuate="onLoad"/><svg:title/><svg:desc>A screen shot of a computer

Description automatically generated</svg:desc></draw:frame></text:span></text:p>
      <text:p text:style-name="P193">Figura<text:s/>14:<text:s/>Diferença de arquivos.</text:p>
      <text:p text:style-name="Normal">Como podemos observar, o arquivo mylib.h somente existe no diretório<text:s/><text:span text:style-name="T194">/usr/src/include, então<text:s/></text:span><text:span text:style-name="T195">ANTES de</text:span><text:span text:style-name="T196"><text:s/>fazer o patch</text:span><text:span text:style-name="T197"><text:s/>tem que<text:s/></text:span><text:span text:style-name="T198">copia-lo para src.test/include</text:span><text:span text:style-name="T199">.</text:span></text:p>
      <text:p text:style-name="P200">Curiosidade, o uso de &gt;&gt; duplicado é para nao substituirmos o conteudo do patch, então isso faz com que usamos apenas um patch para tudo.</text:p>
      <text:p text:style-name="Normal">Agora que fizemos o patch, iremos fazer uma instala<text:span text:style-name="T201">ção limpa d</text:span>o nosso kernel<text:s/>através da pasta src.test que copiamos da src.clean,<text:s/>e<text:s/>ao tentarmos executar o nosso codigo<text:s/>novamente, obtivemos o seguinte status de acordo com a Figura 15.</text:p>
      <text:soft-page-break/>
      <text:p text:style-name="P202"><draw:frame draw:style-name="a18" draw:name="Picture 1" text:anchor-type="as-char" svg:x="0in" svg:y="0in" svg:width="3.98666in" svg:height="1.17727in" style:rel-width="scale" style:rel-height="scale"><draw:image xlink:href="media/image16.png" xlink:type="simple" xlink:show="embed" xlink:actuate="onLoad"/><svg:title/><svg:desc>A screen shot of a computer program

Description automatically generated</svg:desc></draw:frame></text:p>
      <text:p text:style-name="P203">Figura<text:s/>15:<text:s/>kernel clean nao roda o nosso codigo - OK.</text:p>
      <text:p text:style-name="Normal">Isso significa que a instal<text:span text:style-name="T204">ação está limpa, e de fato o nosso codigo não vai funcionar no kernel limpo do MINIX.</text:span></text:p>
      <text:p text:style-name="Normal">Agora para confirmar que o patch<text:s/>das alterações<text:s/>vai funcionar,<text:s/>vamos mover o nosso patch para dentro de<text:span text:style-name="T205"><text:s/></text:span><text:span text:style-name="T206">/usr/src.teste</text:span><text:span text:style-name="T207">,<text:s/></text:span><text:span text:style-name="T208">e</text:span><text:s/>iremos aplicar as configura<text:span text:style-name="T209">ções</text:span><text:span text:style-name="T210"><text:s/>usando<text:s/></text:span><text:span text:style-name="T211">patch -p1 &lt; Tarefa7.patch</text:span><text:span text:style-name="T212">.</text:span></text:p>
      <text:p text:style-name="Normal"><text:span text:style-name="T213">Caso deia tudo certo não deverá apresentar erros, sendo assim, basta<text:s/></text:span><text:span text:style-name="T214">rodar</text:span><text:span text:style-name="T215"><text:s/>make clean install</text:span><text:span text:style-name="T216"><text:s/>dentro da pasta<text:s/></text:span><text:span text:style-name="T217">/usr/src.teste</text:span><text:span text:style-name="T218"><text:s/>e uma vez finalizado basta reiniciar o MINIX</text:span><text:span text:style-name="T219">.</text:span></text:p>
      <text:p text:style-name="P220">Após reiniciado iremos testar o nosso codigo test_mycall.c novamente.</text:p>
      <text:p text:style-name="P221"><text:span text:style-name="T222"><draw:frame draw:style-name="a19" draw:name="Picture 1" text:anchor-type="as-char" svg:x="0in" svg:y="0in" svg:width="3.80216in" svg:height="1.0346in" style:rel-width="scale" style:rel-height="scale"><draw:image xlink:href="media/image17.png" xlink:type="simple" xlink:show="embed" xlink:actuate="onLoad"/><svg:title/><svg:desc>A computer screen with white text

Description automatically generated</svg:desc></draw:frame></text:span></text:p>
      <text:p text:style-name="P223">Figura<text:s/>16:<text:s/>patch<text:s/>instalado e<text:s/>funcionando normalmente.</text:p>
      <text:p text:style-name="Normal">E como podemos observar, o patch funcionou corretamente sem erros.</text:p>
      <text:p text:style-name="Normal"/>
      <text:list text:style-name="LFO8" text:continue-numbering="true">
        <text:list-item>
          <text:p text:style-name="P224">Referências</text:p>
        </text:list-item>
      </text:list>
      <text:list text:style-name="LFO9" text:continue-numbering="true">
        <text:list-item>
          <text:p text:style-name="P225"><text:bookmark-start text:name="_Ref153130300"/><text:span text:style-name="T226">Dalton Matsuo Tavares, (2024) “PROJETO 4 – MINIX”, material disponibilizado no google classroom e SIGAA, Janeiro.</text:span><text:bookmark-end text:name="_Ref153130300"/></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Normal" style:next-style-name="SBCparagraph" style:default-outline-level="1">
      <style:paragraph-properties fo:text-align="center"/>
      <style:text-properties fo:font-weight="bold" style:font-weight-asian="bold" style:font-weight-complex="bold" fo:hyphenate="false"/>
    </style:style>
    <style:style style:name="Heading2" style:display-name="Heading 2" style:family="paragraph" style:parent-style-name="Heading1" style:next-style-name="SBCparagraph" style:default-outline-level="2">
      <style:paragraph-properties fo:margin-top="0.1666in"/>
      <style:text-properties fo:font-variant="small-caps"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paragraph-properties fo:text-align="justify" fo:margin-top="0.0826in" fo:text-indent="0.1972in"/>
      <style:text-properties style:font-name="Times" style:font-name-asian="Times New Roman" style:font-name-complex="Times New Roman" fo:color="#000000" style:font-size-complex="10pt" fo:hyphenate="false"/>
    </style:style>
    <style:style style:name="DefaultParagraphFont" style:display-name="Default Paragraph Font" style:family="text"/>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5.993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22.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PlaceholderText" style:display-name="Placeholder Text" style:family="text" style:parent-style-name="DefaultParagraphFont">
      <style:text-properties fo:color="#666666"/>
    </style:style>
    <style:style style:name="NoSpacing" style:display-name="No Spacing" style:family="paragraph">
      <style:paragraph-properties fo:text-align="justify" fo:text-indent="0.2958in"/>
      <style:text-properties style:font-name="Times" style:font-name-asian="Times New Roman" style:font-name-complex="Times New Roman" fo:color="#000000" style:font-size-complex="10pt" fo:hyphenate="false"/>
    </style:style>
    <style:style style:name="HeaderChar" style:display-name="Header Char" style:family="text" style:parent-style-name="DefaultParagraphFont">
      <style:text-properties style:font-name="Times" style:font-name-asian="Times New Roman" style:font-name-complex="Times New Roman" style:font-size-complex="10pt"/>
    </style:style>
    <style:style style:name="Style1" style:display-name="Style1" style:family="paragraph" style:parent-style-name="Normal">
      <style:paragraph-properties fo:text-align="center"/>
      <style:text-properties fo:font-weight="bold" style:font-weight-asian="bold" style:font-weight-complex="bold" fo:hyphenate="false"/>
    </style:style>
    <style:style style:name="Style1Char" style:display-name="Style1 Char" style:family="text" style:parent-style-name="DefaultParagraphFont">
      <style:text-properties style:font-name="Times" style:font-name-asian="Times New Roman" style:font-name-complex="Times New Roman" fo:font-weight="bold" style:font-weight-asian="bold" style:font-weight-complex="bold" fo:color="#000000" style:font-size-complex="10pt"/>
    </style:style>
    <style:style style:name="Style2" style:display-name="Style2" style:family="paragraph" style:parent-style-name="Normal">
      <style:text-properties fo:hyphenate="false"/>
    </style:style>
    <style:style style:name="Style2Char" style:display-name="Style2 Char" style:family="text" style:parent-style-name="DefaultParagraphFont">
      <style:text-properties style:font-name="Times" style:font-name-asian="Times New Roman" style:font-name-complex="Times New Roman" fo:color="#000000"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2.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1">
      <text:list-level-style-bullet text:level="1" text:style-name="WW_CharLFO1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1">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header>
        <text:p text:style-name="Header"/>
        <text:p text:style-name="Header"/>
      </style:header>
    </style:master-page>
    <style:master-page style:name="MP1" style:page-layout-name="PL1">
      <styl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Gustavo Borges</meta:initial-creator>
    <dc:creator>Gustavo Borges</dc:creator>
    <meta:creation-date>2024-02-11T22:39:00Z</meta:creation-date>
    <dc:date>2024-02-25T06:58:00Z</dc:date>
    <meta:print-date>2024-02-25T04:50:00Z</meta:print-date>
    <meta:template xlink:href="Normal.dotm" xlink:type="simple"/>
    <meta:editing-cycles>134</meta:editing-cycles>
    <meta:editing-duration>PT76380S</meta:editing-duration>
    <meta:user-defined meta:name="Info 1"/>
    <meta:user-defined meta:name="Info 2"/>
    <meta:user-defined meta:name="Info 3"/>
    <meta:user-defined meta:name="Info 4"/>
    <meta:document-statistic meta:page-count="10" meta:paragraph-count="27" meta:word-count="2167" meta:character-count="13848" meta:row-count="97" meta:non-whitespace-character-count="11708"/>
  </office:meta>
</office:document-meta>
</file>