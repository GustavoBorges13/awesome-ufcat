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pitch="variable"/>
    <style:font-face style:name="Roboto" svg:font-family="Robot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break-before="auto" fo:break-after="auto" fo:keep-with-next="auto"/>
    </style:style>
    <style:style style:name="P2" style:family="paragraph" style:parent-style-name="Standard">
      <style:paragraph-properties fo:margin-left="0in" fo:margin-right="0in" fo:margin-top="0.1654in" fo:margin-bottom="0in" loext:contextual-spacing="false" fo:line-height="100%" fo:text-align="start" style:justify-single-word="false" fo:keep-together="auto" fo:orphans="0" fo:widows="0" fo:text-indent="0in" style:auto-text-indent="false" fo:break-before="auto" fo:break-after="auto" fo:keep-with-next="always"/>
    </style:style>
    <style:style style:name="P3"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keep-with-next="auto"/>
    </style:style>
    <style:style style:name="P4" style:family="paragraph" style:parent-style-name="Standard" style:master-pag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style:page-number="1" fo:break-before="auto" fo:break-after="auto" fo:keep-with-next="auto"/>
    </style:style>
    <style:style style:name="P5" style:family="paragraph" style:parent-style-name="Standard">
      <style:paragraph-properties fo:margin-left="0in" fo:margin-right="0in" fo:margin-top="0.0827in" fo:margin-bottom="0.0827in" loext:contextual-spacing="false" fo:line-height="100%" fo:text-align="center" style:justify-single-word="false" fo:keep-together="auto" fo:orphans="0" fo:widows="0" fo:text-indent="0in" style:auto-text-indent="false" fo:break-before="auto" fo:break-after="auto" fo:keep-with-next="auto"/>
    </style:style>
    <style:style style:name="P6" style:family="paragraph" style:parent-style-name="Standard">
      <style:paragraph-properties fo:margin-left="0.3154in" fo:margin-right="0.3154in" fo:margin-top="0.0827in" fo:margin-bottom="0.0827in" loext:contextual-spacing="false" fo:line-height="100%" fo:text-align="justify" style:justify-single-word="false" fo:keep-together="auto" fo:orphans="0" fo:widows="0" fo:text-indent="0in" style:auto-text-indent="false" fo:break-before="auto" fo:break-after="auto" fo:keep-with-next="auto"/>
    </style:style>
    <style:style style:name="P7" style:family="paragraph" style:parent-style-name="Standard" style:list-style-name="WWNum2">
      <style:paragraph-properties fo:margin-left="0.2953in" fo:margin-right="0in" fo:margin-top="0.1654in" fo:margin-bottom="0in" loext:contextual-spacing="false" fo:line-height="100%" fo:text-align="start" style:justify-single-word="false" fo:keep-together="auto" fo:orphans="0" fo:widows="0" fo:text-indent="-0.2953in" style:auto-text-indent="false" fo:break-before="auto" fo:break-after="auto" fo:keep-with-next="always"/>
    </style:style>
    <style:style style:name="P8"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keep-with-next="auto"/>
    </style:style>
    <style:style style:name="P9"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keep-with-next="auto"/>
      <style:text-properties fo:color="#242424" style:font-name="Roboto" fo:font-size="10.5pt" style:font-name-asian="Roboto1" style:font-size-asian="10.5pt" style:font-name-complex="Roboto1" style:font-size-complex="10.5pt" fo:background-color="#ffffff"/>
    </style:style>
    <style:style style:name="P10" style:family="paragraph" style:parent-style-name="Standard" style:list-style-name="WWNum2">
      <style:paragraph-properties fo:margin-top="0.1654in" fo:margin-bottom="0in" loext:contextual-spacing="false" fo:line-height="100%" fo:keep-with-next="always"/>
    </style:style>
    <style:style style:name="P11" style:family="paragraph" style:parent-style-name="Standard">
      <style:paragraph-properties fo:margin-left="0in" fo:margin-right="0in" fo:margin-top="0.1654in" fo:margin-bottom="0in" loext:contextual-spacing="false" fo:line-height="100%" fo:text-indent="0in" style:auto-text-indent="false" fo:keep-with-next="always"/>
    </style:style>
    <style:style style:name="P12" style:family="paragraph" style:parent-style-name="Standard" style:list-style-name="WWNum1">
      <style:paragraph-properties fo:margin-left="0.5in" fo:margin-right="0in" fo:margin-top="0.1654in" fo:margin-bottom="0in" loext:contextual-spacing="false" fo:line-height="100%" fo:text-indent="-0.25in" style:auto-text-indent="false" fo:keep-with-next="always"/>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fo:keep-with-next="always"/>
    </style:style>
    <style:style style:name="P14" style:family="paragraph" style:parent-style-name="Standard" style:list-style-name="WWNum1">
      <style:paragraph-properties fo:margin-left="0.5in" fo:margin-right="0in" fo:margin-top="0in" fo:margin-bottom="0in" loext:contextual-spacing="false" fo:line-height="100%" fo:text-indent="-0.25in" style:auto-text-indent="false" fo:keep-with-next="always"/>
    </style:style>
    <style:style style:name="P15" style:family="paragraph" style:parent-style-name="Standard" style:list-style-name="WWNum1">
      <style:paragraph-properties fo:margin-left="1in" fo:margin-right="0in" fo:margin-top="0in" fo:margin-bottom="0in" loext:contextual-spacing="false" fo:line-height="100%" fo:text-indent="-0.25in" style:auto-text-indent="false" fo:keep-with-next="always"/>
    </style:style>
    <style:style style:name="P16" style:family="paragraph" style:parent-style-name="Standard">
      <style:paragraph-properties fo:margin-left="0.1965in" fo:margin-right="0in" fo:margin-top="0.0827in" fo:margin-bottom="0in" loext:contextual-spacing="false" fo:line-height="100%" fo:text-align="justify" style:justify-single-word="false" fo:text-indent="0in" style:auto-text-indent="false"/>
    </style:style>
    <style:style style:name="P17" style:family="paragraph" style:parent-style-name="Standard">
      <style:paragraph-properties fo:margin-left="0.1965in" fo:margin-right="0in" fo:margin-top="0.0827in" fo:margin-bottom="0in" loext:contextual-spacing="false" fo:line-height="100%" fo:text-align="justify" style:justify-single-word="false" fo:keep-together="auto" fo:orphans="0" fo:widows="0" fo:text-indent="-0.1965in" style:auto-text-indent="false" fo:break-before="auto" fo:break-after="auto" fo:keep-with-next="auto"/>
    </style:style>
    <style:style style:name="T1"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2" style:family="text">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style:style>
    <style:style style:name="T3" style:family="text">
      <style:text-properties fo:font-variant="normal" fo:text-transform="none" fo:color="#000000" style:text-line-through-style="none" style:text-line-through-type="none" style:text-position="0% 100%" style:font-name="Times" fo:font-size="13pt" fo:font-style="normal" style:text-underline-style="none" fo:font-weight="bold" style:font-name-asian="Times1" style:font-size-asian="13pt" style:font-style-asian="normal" style:font-weight-asian="bold" style:font-name-complex="Times1" style:font-size-complex="13pt"/>
    </style:style>
    <style:style style:name="T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fo:font-size="12pt" fo:font-style="italic" style:text-underline-style="none" fo:font-weight="bold" style:font-size-asian="12pt" style:font-style-asian="italic" style:font-weight-asian="bold" style:font-size-complex="12pt"/>
    </style:style>
    <style:style style:name="T7"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8"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9" style:family="text">
      <style:text-properties fo:font-variant="normal" fo:text-transform="none" fo:color="#0000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10"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11" style:family="text">
      <style:text-properties fo:font-variant="normal" fo:text-transform="none" fo:color="#000000" style:text-line-through-style="none" style:text-line-through-type="none" style:text-position="super 58%" fo:font-size="13pt" fo:font-style="normal" style:text-underline-style="none" fo:font-weight="bold" style:font-size-asian="13pt" style:font-style-asian="normal" style:font-weight-asian="bold" style:font-size-complex="13pt"/>
    </style:style>
    <style:style style:name="T12" style:family="text">
      <style:text-properties fo:font-variant="normal" fo:text-transform="none" fo:color="#000000" style:text-line-through-style="none" style:text-line-through-type="none" style:text-position="super 58%" fo:font-size="13pt" fo:font-style="normal" style:text-underline-style="none" fo:font-weight="normal" style:font-size-asian="13pt" style:font-style-asian="normal" style:font-weight-asian="normal" style:font-size-complex="13pt"/>
    </style:style>
    <style:style style:name="T13" style:family="text">
      <style:text-properties fo:color="#242424" fo:background-color="#ffffff"/>
    </style:style>
    <style:style style:name="T14" style:family="text">
      <style:text-properties fo:color="#ff0000" fo:font-weight="bold" style:font-weight-asian="bold"/>
    </style:style>
    <style:style style:name="T15" style:family="text">
      <style:text-properties fo:font-weight="bold" style:font-weight-asian="bold"/>
    </style:style>
    <style:style style:name="T16" style:family="text">
      <style:text-properties style:text-underline-style="none"/>
    </style:style>
    <style:style style:name="T17" style:family="text">
      <style:text-properties fo:font-style="italic" fo:font-weight="bold" style:font-style-asian="italic" style:font-weight-asian="bold"/>
    </style:style>
    <style:style style:name="T18"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wapAdvisor: Push Deep Learning Beyond the GPU Memory Limit via Smart Swapping</text:span></text:p>
      <text:p text:style-name="P1"><text:span text:style-name="T4">Gustavo B. P. Silva</text:span><text:span text:style-name="T11">1</text:span><text:span text:style-name="T4">, Michael P. C. Silva</text:span><text:span text:style-name="T11">1</text:span><text:span text:style-name="T4">, Rafael S. Melo</text:span><text:span text:style-name="T11">1</text:span></text:p>
      <text:p text:style-name="P3"><text:span text:style-name="T12">1</text:span><text:span text:style-name="T5">Departamento de Ciência da Computação – Universidade Federal de Catalão (UFCAT)</text:span></text:p>
      <text:p text:style-name="P5"><text:span text:style-name="T8">{gustavo.silva, </text:span><text:a xlink:type="simple" xlink:href="mailto:michael.silva%7D@discente.ufcat.edu.br" text:style-name="ListLabel_20_10" text:visited-style-name="ListLabel_20_10"><text:span text:style-name="T9">michael.silva</text:span></text:a><text:a xlink:type="simple" xlink:href="mailto:michael.silva%7D@discente.ufcat.edu.br" text:style-name="ListLabel_20_11" text:visited-style-name="ListLabel_20_11"><text:span text:style-name="T8">}@discente.ufcat.edu.br</text:span></text:a><text:span text:style-name="T8">, </text:span><text:span text:style-name="T9">rafinhalelograma@hotmail.com </text:span></text:p>
      <text:p text:style-name="P6"><text:span text:style-name="T6">Resumo.</text:span><text:span text:style-name="T7"> Breve resumo do tema do trabalho.</text:span></text:p>
      <text:list xml:id="list1642223589" text:style-name="WWNum2">
        <text:list-item>
          <text:p text:style-name="P7"><text:span text:style-name="T10">Introdução</text:span></text:p>
        </text:list-item>
      </text:list>
      <text:p text:style-name="P8"><text:span text:style-name="T13">A questão de pesquisa do artigo é como superar a limitação de memória da GPU para treinar e inferir modelos de redes neurais profundas (DNNs) maiores e mais precisos. A hipótese é que a troca de dados entre a memória da GPU e da CPU pode resolver essa limitação sem comprometer a precisão do modelo.</text:span></text:p>
      <text:p text:style-name="P8"><text:span text:style-name="T13">A lacuna de pesquisa identificada é a incapacidade dos métodos existentes de troca de dados de suportar modelos grandes de DNNs de forma eficiente. Os métodos atuais lidam apenas com certos modelos e não alcançam um desempenho satisfatório. O artigo propõe resolver essa limitação através de uma abordagem otimizada de troca de dados, o SwapAdvisor. </text:span></text:p>
      <text:p text:style-name="P8"><text:span text:style-name="T13">Nos últimos anos, a comunidade de aprendizado profundo tem utilizado redes neurais profundas (DNNs) maiores para melhorar a precisão em tarefas complexas, com um aumento constante no número de parâmetros das redes, que dobra a cada 2,4 anos desde os anos 80, impulsionado por melhorias em hardware e dados (Goodfellow et al. 2016). No entanto, a memória da GPU limita o tamanho de modelos DNN, com abordagens existentes buscando reduzir o consumo de memória através de técnicas como menor precisão em pontos flutuantes, quantização e esparsificação, mas estas podem afetar a precisão e exigem ajustes complexos de hiperparâmetros (Gupta et al. 2015, Judd et al. 2016). Outra solução é recalcular dados intermediários, mas não suporta modelos grandes (Chen et al. 2016, Martens e Sutskever 2012).</text:span></text:p>
      <text:p text:style-name="P8"><text:span text:style-name="T13">Uma abordagem promissora é a troca de dados entre a memória da GPU e da CPU, aproveitando a maior capacidade e custo mais baixo da memória da CPU, além da melhoria na comunicação entre GPU e CPU com tecnologias como PCIe 5.0 e NVLink (Le et al. 2018, Meng et al. 2017, Rhu et al. 2016, Wang et al. 2018). No entanto, muitas abordagens atuais utilizam informações limitadas do gráfico de fluxo de dados para planejar a troca, prejudicando o desempenho (Yu et al. 2018, Le et al. 2018).</text:span></text:p>
      <text:p text:style-name="P8"><text:span text:style-name="T13">Neste artigo, os pesquisadores </text:span>Huang, Jin e Li (2020), propuseram o<text:span text:style-name="T13"> SwapAdvisor, que se trata de um sistema para otimizar a troca de dados em DNNs, planejando precisamente o que e quando trocar para maximizar a sobreposição de computação e comunicação. Ele usa um algoritmo genético para otimizar a alocação de memória e o agendamento de operadores, permitindo o treinamento de modelos até 12 vezes o limite da memória da GPU, com taxas de transferência entre 53% e 99% da linha de base ideal. O SwapAdvisor também é útil para inferência, permitindo a utilização de múltiplos modelos em uma única GPU com latência reduzida em até quatro vezes em comparação com a abordagem de compartilhamento de tempo (Le et al. 2018, Meng et al. 2017).</text:span></text:p>
      <text:p text:style-name="P8"><text:span text:style-name="T13">O SwapAdvisor é o primeiro sistema geral de troca para modelos DNN grandes, mas possui limitações, como a necessidade de um gráfico de fluxo de dados estático e a limitação a uma única GPU, exigindo mais pesquisas para superar essas restrições.</text:span></text:p>
      <text:p text:style-name="P9"/>
      <text:list xml:id="list24858514559242" text:continue-numbering="true" text:style-name="WWNum2">
        <text:list-item>
          <text:list>
            <text:list-item>
              <text:p text:style-name="P10"><text:span text:style-name="T14">Observações (ISSO É TEMPORÁRIO, APENAS PARA LEMBRARMOS)</text:span></text:p>
            </text:list-item>
          </text:list>
        </text:list-item>
      </text:list>
      <text:p text:style-name="P11">Por se tratar de artigo acadêmico, teríamos que listar todos os autores para dar o devido crédito a cada um. No entanto, tem algumas referências que possuem muitos autores participantes no artigo original que estamos analisando, portanto, para reduzir texto, usaremos a seguinte terminologia:</text:p>
      <text:list xml:id="list185867913" text:style-name="WWNum1">
        <text:list-item>
          <text:p text:style-name="P12"><text:span text:style-name="T15">Primeiro autor seguido de "et al."</text:span>: quando houver muitos autores, iremos listar apenas o primeiro autor seguido de "et al." (abreviação de "et alii", que significa "e outros" em latim). Por exemplo:</text:p>
          <text:list>
            <text:list-item>
              <text:p text:style-name="P15">Em vez de [He, Zhang, Ren, e Sun 2016], podemos usar [He et al. 2016].</text:p>
            </text:list-item>
          </text:list>
        </text:list-item>
        <text:list-item>
          <text:p text:style-name="P13"><text:span text:style-name="T15">Número máximo de autores</text:span>: no modelo apresentado pelo professor, não foi dito em lugar algum a quantidade máxima de autores que pode colocar, portanto, iremos adicionar 2 autores no máximo, passou disso vamos usar "et al." para os autores restantes. Por exemplo:</text:p>
          <text:list>
            <text:list-item>
              <text:p text:style-name="P15">[He, Zhang, Ren, and Sun 2016] pode ser reduzido para [He, Zhang, et al. 2016].<text:span text:style-name="T5"> </text:span></text:p>
            </text:list-item>
          </text:list>
        </text:list-item>
        <text:list-item>
          <text:p text:style-name="P13"><text:span text:style-name="T15">As referências</text:span>: consideramos copiar todas as referências do artigo original para darmos créditos, <text:span text:style-name="T17">mas iremos verificar ainda</text:span> se podemos excluir as referências que não forem utilizadas (citadas de forma direta ou indireta) para economizar espaço.</text:p>
        </text:list-item>
      </text:list>
      <text:p text:style-name="P2"><text:span text:style-name="T10">References</text:span></text:p>
      <text:p text:style-name="P16">CC. Huang, G. Jin, J. Li (2020) “SwapAdvisor: Push Deep Learning Beyond the GPU Memory Limit via Smart Swapping”, In: 2020 ASPLOS '20, https://dl.acm.org/doi/abs/10.1145/3373376.3378530.</text:p>
      <text:p text:style-name="P17">Bastem, B., Unat, D., Zhang, W., Almgren, A., and Shalf, J. (2017) “Overlapping Data Transfers with Computation on GPU with Tiles”, In: 2020,17 ASPLOS</text:p>
      <text:p text:style-name="P17">Chen, T., Xu, B., Zhang, C., and Guestrin, C. (2016) “Training deep nets with sublinear memory cost”, arXiv preprint arXiv:1604.06174.</text:p>
      <text:p text:style-name="P17">Courbariaux, M., Bengio, Y., and David, J.-P. (2015) “BinaryConnect: Training Deep Neural Networks with Binary Weights during Propagations”, In: Proceedings of the 28th International Conference on Neural Information Processing Systems - Volume 2 (NIPS’15), MIT Press, pp. 3123–3131.</text:p>
      <text:p text:style-name="P17"><text:soft-page-break/>Cui, H., Cipar, J., Ho, Q., Kim, J. K., Lee, S., Kumar, A., Wei, J., Dai, W., Ganger, G. R., Gibbons, P. B., and et al. (2014) “Exploiting Bounded Staleness to Speed up Big Data Analytics”, In: Proceedings of the 2014 USENIX Conference on USENIX Annual Technical Conference (USENIX ATC’14), USENIX Association, pp. 37–48.</text:p>
      <text:p text:style-name="P17">Davis, L. (1991) Handbook of genetic algorithms.</text:p>
      <text:p text:style-name="P17">Dean, J., Corrado, G. S., Monga, R., Chen, K., Devin, M., Le, Q. V., Mao, M. Z., Ranzato, M. A., Senior, A., Tucker, P., and et al. (2012) “Large Scale Distributed Deep Networks”, In: Proceedings of the 25th International Conference on Neural Information Processing Systems - Volume 1 (NIPS’12), Curran Associates Inc., pp. 1223–1231.</text:p>
      <text:p text:style-name="P17">Gai, K., Qiu, M., and Zhao, H. (2016) “Cost-Aware Multimedia Data Allocation for Heterogeneous Memory Using Genetic Algorithm in Cloud Computing”, IEEE Transactions on Cloud Computing, pp. 1–1.</text:p>
      <text:p text:style-name="P17">Goldberg, D. E., and Holland, J. H. (1988) “Genetic algorithms and machine learning”, Machine Learning, 3(2).</text:p>
      <text:p text:style-name="P17">Gong, Y., Liu, L., Yang, M., and Bourdev, L. (2014) “Compressing deep convolutional networks using vector quantization”, arXiv preprint arXiv:1412.6115.</text:p>
      <text:p text:style-name="P17">Goodfellow, I., Bengio, Y., and Courville, A. (2016) Deep Learning, MIT Press. http://www.deeplearningbook.org.</text:p>
      <text:p text:style-name="P17">Gruslys, A., Munos, R., Danihelka, I., Lanctot, M., and Graves, A. (2016) “Memory-Efficient Backpropagation through Time”, In: Proceedings of the 30th International Conference on Neural Information Processing Systems (NIPS’16), Curran Associates Inc., pp. 4132–4140.</text:p>
      <text:p text:style-name="P17">Gupta, S., Agrawal, A., Gopalakrishnan, K., and Narayanan, P. (2015) “Deep Learning with Limited Numerical Precision”, In: Proceedings of the 32nd International Conference on International Conference on Machine Learning - Volume 37 (ICML’15), JMLR.org, pp. 1737–1746.</text:p>
      <text:p text:style-name="P17">Han, S., Liu, X., Mao, H., Pu, J., Pedram, A., Horowitz, M. A., and Dally, W. J. (2016) “EIE: Efficient Inference Engine on Compressed Deep Neural Network”, SIGARCH Comput. Archit. News, 44(3), pp. 243–254.</text:p>
      <text:p text:style-name="P17">Han, S., Mao, H., and Dally, W. J. (2015) “Deep compression: Compressing deep neural networks with pruning, trained quantization and huffman coding”, arXiv preprint arXiv:1510.00149.</text:p>
      <text:p text:style-name="P17">Han, S., Pool, J., Tran, J., and Dally, W. J. (2015) “Learning Both Weights and Connections for Efficient Neural Networks”, In: Proceedings of the 28th International Conference on Neural Information Processing Systems - Volume 1 (NIPS’15), MIT Press, pp. 1135–1143.</text:p>
      <text:p text:style-name="P17">He, K., Zhang, X., Ren, S., and Sun, J. (2016) “Deep Residual Learning for Image Recognition”, In: 2016 IEEE Conference on Computer Vision and Pattern Recognition (CVPR), pp. 770–778.</text:p>
      <text:p text:style-name="P17">Hochreiter, S., and Schmidhuber, J. (1997) “Long Short-Term Memory”, Neural Computation, 9(8), pp. 1735–1780.</text:p>
      <text:p text:style-name="P17">Holland, J. H., et al. (1992) Adaptation in natural and artificial systems: an introductory analysis with applications to biology, control, and artificial intelligence, MIT Press.</text:p>
      <text:p text:style-name="P17">Hou, E. S. H., Ansari, N., and Ren, H. (1994) “A genetic algorithm for multiprocessor scheduling”, IEEE Transactions on Parallel and Distributed Systems, 5(2), pp. 113–120.</text:p>
      <text:p text:style-name="P17">Hubara, I., Courbariaux, M., Soudry, D., El-Yaniv, R., and Bengio, Y. (2016) “Binarized Neural Networks”, In: Proceedings of the 30th International Conference on Neural Information Processing Systems (NIPS’16), Curran Associates Inc., pp. 4114–4122.</text:p>
      <text:p text:style-name="P17">Jeong, E., Cho, S., Yu, G.-I., Jeong, J. S., Shin, D.-J., and Chun, B.-G. (2019) “JANUS: Fast and Flexible Deep Learning via Symbolic Graph Execution of Imperative Programs”, In: 16th USENIX Symposium on Networked Systems Design and Implementation (NSDI 19), USENIX Association, pp. 453–468.</text:p>
      <text:p text:style-name="P17">Jia, Z., Lin, S., Qi, C. R., and Aiken, A. (2018) “Exploring Hidden Dimensions in Parallelizing Convolutional Neural Networks”, In: International Conference on Machine Learning.</text:p>
      <text:p text:style-name="P17">Jia, Z., Zaharia, M., and Aiken, A. (2018) “Beyond data and model parallelism for deep neural networks”, arXiv preprint arXiv:1807.05358.</text:p>
      <text:p text:style-name="P17">Judd, P., Albericio, J., Hetherington, T., Aamodt, T. M., Jerger, N. E., and Moshovos, A. (2016) “Proteus: Exploiting Numerical Precision Variability in Deep Neural Networks”, In: Proceedings of the 2016 International Conference on Supercomputing (ICS’16), Association for Computing Machinery, Article 23.</text:p>
      <text:p text:style-name="P17">Krizhevsky, A. (2014) “One weird trick for parallelizing convolutional neural networks”, arXiv preprint arXiv:1404.5997.</text:p>
      <text:p text:style-name="P17">Le, T. D., Imai, H., Negishi, Y., and Kawachiya, K. (2018) “Tflms: Large model support in tensorflow by graph rewriting”, arXiv preprint arXiv:1807.02037.</text:p>
      <text:p text:style-name="P17">Li, M., Andersen, D. G., Park, J. W., Smola, A. J., Ahmed, A., Josifovski, V., Long, J., Shekita, E. J., and Su, B.-Y. (2014) “Scaling Distributed Machine Learning with the Parameter Server”, In: Proceedings of the 11th USENIX Conference on Operating Systems Design and Implementation (OSDI’14), USENIX Association, pp. 583–598.</text:p>
      <text:p text:style-name="P17">Man, K.-F., Tang, K. S., and Kwong, S. (2001) Genetic algorithms: concepts and designs, Springer Science &amp; Business Media.</text:p>
      <text:p text:style-name="P17">Martens, J., and Sutskever, I. (2012) “Training deep and recurrent networks with hessian-free optimization”, In: Neural Networks: Tricks of the Trade, Springer.</text:p>
      <text:p text:style-name="P17"><text:soft-page-break/>Meng, C., Sun, M., Yang, J., Qiu, M., and Gu, Y. (2017) “Training deeper models by GPU memory optimization on TensorFlow”, In: Proc. of ML Systems Workshop in NIPS.</text:p>
      <text:p text:style-name="P17">Mirhoseini, A., Goldie, A., Pham, H., Steiner, B., Le, Q. V., and Dean, J. (2018) “A hierarchical model for device placement”.</text:p>
      <text:p text:style-name="P17">Mirhoseini, A., Pham, H., Le, Q. V., Steiner, B., Larsen, R., Zhou, Y., Kumar, N., Norouzi, M., Bengio, S., and Dean, J. (2017) “Device Placement Optimization with Reinforcement Learning”, In: Proceedings of the 34th International Conference on Machine Learning - Volume 70 (ICML’17), JMLR.org, pp. 2430–2439.</text:p>
      <text:p text:style-name="P17">Ning, L., and Shen, X. (2019) “Deep Reuse: Streamline CNN Inference on the Fly via Coarse-Grained Computation Reuse”, In: Proceedings of the ACM International Conference on Supercomputing (ICS’19), Association for Computing Machinery, pp. 438–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roman" style:font-pitch="variable"/>
    <style:font-face style:name="Roboto" svg:font-family="Robot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small-caps"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3pt" fo:font-style="normal" style:text-underline-style="none" fo:font-weight="bold" style:font-name-asian="Times1" style:font-family-asian="Times" style:font-family-generic-asian="system" style:font-pitch-asian="variable" style:font-size-asian="13pt" style:font-style-asian="normal" style:font-weight-asian="bold" style:font-name-complex="Times1" style:font-family-complex="Time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text-align="start" style:justify-single-word="false" fo:keep-together="auto" fo:orphans="2" fo:widows="2" fo:text-indent="-0.4925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in" fo:margin-bottom="0in" loext:contextual-spacing="false" fo:line-height="100%" fo:text-align="justify" style:justify-single-word="false" fo:keep-together="auto" fo:orphans="2" fo:widows="2" fo:text-indent="-0.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normal" style:font-name-asian="Times1" style:font-family-asian="Times" style:font-family-generic-asian="system" style:font-pitch-asian="variable" style:font-size-asian="12pt" style:font-style-asian="italic" style:font-weight-asian="normal"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in" fo:margin-bottom="0in" loext:contextual-spacing="false" fo:line-height="100%" fo:text-align="start" style:justify-single-word="false" fo:keep-together="auto" fo:orphans="2" fo:widows="2" fo:text-indent="-0.7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in" fo:margin-bottom="0in" loext:contextual-spacing="false" fo:line-height="100%" fo:text-align="center" style:justify-single-word="false" fo:keep-together="auto" fo:orphans="2" fo:widows="2" fo:text-indent="-0.8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bold" style:font-name-asian="Times1" style:font-family-asian="Times" style:font-family-generic-asian="system" style:font-pitch-asian="variable" style:font-size-asian="12pt" style:font-style-asian="italic" style:font-weight-asian="bold" style:font-name-complex="Times1" style:font-family-complex="Time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4pt" fo:font-style="italic" style:text-underline-style="none" fo:font-weight="bold" style:font-name-asian="Times1" style:font-family-asian="Times" style:font-family-generic-asian="system" style:font-pitch-asian="variable" style:font-size-asian="14pt" style:font-style-asian="italic" style:font-weight-asian="bold" style:font-name-complex="Times1" style:font-family-complex="Times" style:font-family-generic-complex="system" style:font-pitch-complex="variable"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italic" style:text-underline-style="none" fo:font-weight="normal" style:font-name-asian="Courier1" style:font-family-asian="Courier" style:font-family-generic-asian="system" style:font-pitch-asian="variable" style:font-size-asian="10pt" style:font-style-asian="italic" style:font-weight-asian="normal" style:font-name-complex="Courier1" style:font-family-complex="Courier"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normal" style:text-underline-style="none" fo:font-weight="normal" style:font-name-asian="Courier1" style:font-family-asian="Courier" style:font-family-generic-asian="system" style:font-pitch-asian="variable" style:font-size-asian="10pt" style:font-style-asian="normal" style:font-weight-asian="normal" style:font-name-complex="Courier1" style:font-family-complex="Courier"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23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4" meta:word-count="1730" meta:character-count="11220" meta:non-whitespace-character-count="9563"/>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