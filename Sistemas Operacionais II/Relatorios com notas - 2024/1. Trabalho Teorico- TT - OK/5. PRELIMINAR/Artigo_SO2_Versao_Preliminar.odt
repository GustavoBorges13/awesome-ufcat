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42000001F20337C4855EADA7F5.png" manifest:media-type="image/png"/>
  <manifest:file-entry manifest:full-path="Pictures/10000000000004260000016C4178C132EF0EFEB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" svg:font-family="Courier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1" svg:font-family="Courier" style:font-family-generic="system" style:font-pitch="variable"/>
    <style:font-face style:name="Linux Libertine G" svg:font-family="'Linux Libertine G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875in" fo:margin-top="0in" fo:margin-bottom="0in" table:align="center"/>
    </style:style>
    <style:style style:name="Table1.A" style:family="table-column">
      <style:table-column-properties style:column-width="1.4688in"/>
    </style:style>
    <style:style style:name="Table1.D" style:family="table-column">
      <style:table-column-properties style:column-width="1.4681in"/>
    </style:style>
    <style:style style:name="Table1.1" style:family="table-row">
      <style:table-row-properties style:min-row-height="0.5354in" fo:keep-together="auto"/>
    </style:style>
    <style:style style:name="Table1.A1" style:family="table-cell">
      <style:table-cell-properties style:vertical-align="middle" fo:padding-left="0.0813in" fo:padding-right="0.075in" fo:padding-top="0in" fo:padding-bottom="0in" fo:border-left="none" fo:border-right="1pt solid #000000" fo:border-top="none" fo:border-bottom="1pt solid #000000"/>
    </style:style>
    <style:style style:name="Table1.B1" style:family="table-cell">
      <style:table-cell-properties style:vertical-align="middle" fo:padding-left="0.0813in" fo:padding-right="0.075in" fo:padding-top="0in" fo:padding-bottom="0in" fo:border-left="1pt solid #000000" fo:border-right="1pt solid #000000" fo:border-top="none" fo:border-bottom="1pt solid #000000"/>
    </style:style>
    <style:style style:name="Table1.D1" style:family="table-cell">
      <style:table-cell-properties style:vertical-align="middle" fo:padding-left="0.0813in" fo:padding-right="0.075in" fo:padding-top="0in" fo:padding-bottom="0in" fo:border-left="1pt solid #000000" fo:border-right="none" fo:border-top="none" fo:border-bottom="1pt solid #000000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-left="0.0813in" fo:padding-right="0.075in" fo:padding-top="0in" fo:padding-bottom="0in" fo:border-left="none" fo:border-right="1pt solid #000000" fo:border-top="1pt solid #000000" fo:border-bottom="1pt solid #000000"/>
    </style:style>
    <style:style style:name="Table1.B2" style:family="table-cell">
      <style:table-cell-properties style:vertical-align="middle" fo:padding-left="0.0813in" fo:padding-right="0.075in" fo:padding-top="0in" fo:padding-bottom="0in" fo:border="1pt solid #000000"/>
    </style:style>
    <style:style style:name="Table1.D2" style:family="table-cell">
      <style:table-cell-properties style:vertical-align="middle" fo:padding-left="0.0813in" fo:padding-right="0.075in" fo:padding-top="0in" fo:padding-bottom="0in" fo:border-left="1pt solid #000000" fo:border-right="none" fo:border-top="1pt solid #000000" fo:border-bottom="1pt solid #000000"/>
    </style:style>
    <style:style style:name="Table1.3" style:family="table-row">
      <style:table-row-properties style:min-row-height="0.3354in"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A6" style:family="table-cell">
      <style:table-cell-properties style:vertical-align="middle" fo:padding-left="0.0813in" fo:padding-right="0.075in" fo:padding-top="0in" fo:padding-bottom="0in" fo:border-left="none" fo:border-right="1pt solid #000000" fo:border-top="1pt solid #000000" fo:border-bottom="none"/>
    </style:style>
    <style:style style:name="Table1.B6" style:family="table-cell">
      <style:table-cell-properties style:vertical-align="middle" fo:padding-left="0.0813in" fo:padding-right="0.075in" fo:padding-top="0in" fo:padding-bottom="0in" fo:border-left="1pt solid #000000" fo:border-right="1pt solid #000000" fo:border-top="1pt solid #000000" fo:border-bottom="none"/>
    </style:style>
    <style:style style:name="Table1.D6" style:family="table-cell">
      <style:table-cell-properties style:vertical-align="middle" fo:padding-left="0.0813in" fo:padding-right="0.075in" fo:padding-top="0in" fo:padding-bottom="0in" fo:border-left="1pt solid #000000" fo:border-right="none" fo:border-top="1pt solid #000000" fo:border-bottom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in" fo:margin-right="0in" fo:margin-top="0.1654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keep-with-next="auto"/>
    </style:style>
    <style:style style:name="P3" style:family="paragraph" style:parent-style-name="Standard">
      <style:paragraph-properties fo:margin-left="0in" fo:margin-right="0in" fo:margin-top="0.165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keep-with-next="auto"/>
    </style:style>
    <style:style style:name="P4" style:family="paragraph" style:parent-style-name="Standard">
      <style:paragraph-properties fo:margin-left="0in" fo:margin-right="0in" fo:margin-top="0.1654in" fo:margin-bottom="0in" loext:contextual-spacing="false" fo:line-height="100%" fo:text-align="center" style:justify-single-word="false" fo:keep-together="auto" fo:orphans="0" fo:widows="0" fo:text-indent="0in" style:auto-text-indent="false" fo:keep-with-next="auto"/>
    </style:style>
    <style:style style:name="P5" style:family="paragraph" style:parent-style-name="Standard" style:master-page-name="Standard">
      <style:paragraph-properties fo:margin-left="0in" fo:margin-right="0in" fo:margin-top="0.1654in" fo:margin-bottom="0in" loext:contextual-spacing="false" fo:line-height="100%" fo:text-align="center" style:justify-single-word="false" fo:keep-together="auto" fo:orphans="0" fo:widows="0" fo:text-indent="0in" style:auto-text-indent="false" style:page-number="1" fo:break-before="auto" fo:break-after="auto" fo:keep-with-next="auto"/>
    </style:style>
    <style:style style:name="P6" style:family="paragraph" style:parent-style-name="Standard">
      <style:paragraph-properties fo:margin-left="0in" fo:margin-right="0in" fo:margin-top="0.0827in" fo:margin-bottom="0.0827in" loext:contextual-spacing="false" fo:line-height="100%" fo:text-align="center" style:justify-single-word="false" fo:keep-together="auto" fo:orphans="0" fo:widows="0" fo:text-indent="0in" style:auto-text-indent="false" fo:break-before="auto" fo:break-after="auto" fo:keep-with-next="auto"/>
    </style:style>
    <style:style style:name="P7" style:family="paragraph" style:parent-style-name="Standard">
      <style:paragraph-properties fo:margin-left="0.3154in" fo:margin-right="0.3154in" fo:margin-top="0.0827in" fo:margin-bottom="0.0827in" loext:contextual-spacing="false" fo:line-height="100%" fo:text-align="justify" style:justify-single-word="false" fo:keep-together="auto" fo:orphans="0" fo:widows="0" fo:text-indent="0in" style:auto-text-indent="false" fo:break-before="auto" fo:break-after="auto" fo:keep-with-next="auto"/>
    </style:style>
    <style:style style:name="P8" style:family="paragraph" style:parent-style-name="Standard" style:list-style-name="WWNum3">
      <style:paragraph-properties fo:margin-left="0.2953in" fo:margin-right="0in" fo:margin-top="0.1654in" fo:margin-bottom="0in" loext:contextual-spacing="false" fo:line-height="100%" fo:text-align="start" style:justify-single-word="false" fo:keep-together="auto" fo:orphans="0" fo:widows="0" fo:text-indent="-0.2953in" style:auto-text-indent="false" fo:break-before="auto" fo:break-after="auto" fo:keep-with-next="auto"/>
    </style:style>
    <style:style style:name="P9" style:family="paragraph" style:parent-style-name="Standard">
      <style:paragraph-properties fo:margin-left="0in" fo:margin-right="0in" fo:margin-top="0.0827in" fo:margin-bottom="0in" loext:contextual-spacing="false" fo:line-height="100%" fo:text-align="justify" style:justify-single-word="false" fo:keep-together="auto" fo:orphans="0" fo:widows="0" fo:text-indent="0.4925in" style:auto-text-indent="false" fo:break-before="auto" fo:break-after="auto" fo:keep-with-next="auto"/>
    </style:style>
    <style:style style:name="P10" style:family="paragraph" style:parent-style-name="Standard">
      <style:paragraph-properties fo:margin-left="0in" fo:margin-right="0in" fo:margin-top="0.0827in" fo:margin-bottom="0in" loext:contextual-spacing="false" fo:line-height="100%" fo:text-align="justify" style:justify-single-word="false" fo:text-indent="0.4925in" style:auto-text-indent="false" fo:keep-with-next="auto"/>
    </style:style>
    <style:style style:name="P11" style:family="paragraph" style:parent-style-name="Standard">
      <style:paragraph-properties fo:margin-left="0in" fo:margin-right="0in" fo:margin-top="0.1654in" fo:margin-bottom="0in" loext:contextual-spacing="false" fo:line-height="100%" fo:text-align="justify" style:justify-single-word="false" fo:text-indent="0.4917in" style:auto-text-indent="false" fo:keep-with-next="auto"/>
    </style:style>
    <style:style style:name="P12" style:family="paragraph" style:parent-style-name="Standard">
      <style:paragraph-properties fo:margin-left="0in" fo:margin-right="0in" fo:margin-top="0.1665in" fo:margin-bottom="0.1665in" loext:contextual-spacing="false" fo:line-height="100%" fo:text-align="justify" style:justify-single-word="false" fo:text-indent="0.4917in" style:auto-text-indent="false"/>
    </style:style>
    <style:style style:name="P13" style:family="paragraph" style:parent-style-name="Standard" style:list-style-name="WWNum2">
      <style:paragraph-properties fo:margin-left="0.5in" fo:margin-right="0in" fo:margin-top="0.1654in" fo:margin-bottom="0in" loext:contextual-spacing="false" fo:line-height="100%" fo:text-align="justify" style:justify-single-word="false" fo:text-indent="-0.25in" style:auto-text-indent="false" fo:keep-with-next="auto"/>
    </style:style>
    <style:style style:name="P14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keep-with-next="auto"/>
    </style:style>
    <style:style style:name="P15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keep-with-next="auto"/>
    </style:style>
    <style:style style:name="P16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keep-with-next="auto"/>
    </style:style>
    <style:style style:name="P17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justify" style:justify-single-word="false" fo:text-indent="-0.25in" style:auto-text-indent="false" fo:keep-with-next="auto"/>
    </style:style>
    <style:style style:name="P18" style:family="paragraph" style:parent-style-name="Standard" style:list-style-name="WWNum3">
      <style:paragraph-properties fo:margin-top="0.1654in" fo:margin-bottom="0.139in" loext:contextual-spacing="false" fo:line-height="100%" fo:keep-with-next="auto"/>
    </style:style>
    <style:style style:name="P19" style:family="paragraph" style:parent-style-name="Standard">
      <style:paragraph-properties fo:margin-top="0.1654in" fo:margin-bottom="0.139in" loext:contextual-spacing="false" fo:line-height="100%" fo:text-align="center" style:justify-single-word="false"/>
    </style:style>
    <style:style style:name="P20" style:family="paragraph" style:parent-style-name="Standard">
      <style:paragraph-properties fo:margin-left="0in" fo:margin-right="0in" fo:margin-top="0.1654in" fo:margin-bottom="0in" loext:contextual-spacing="false" fo:line-height="100%" fo:text-align="justify" style:justify-single-word="false" fo:text-indent="0.4917in" style:auto-text-indent="false" fo:keep-with-next="auto"/>
    </style:style>
    <style:style style:name="P21" style:family="paragraph" style:parent-style-name="Standard">
      <style:paragraph-properties fo:margin-left="0in" fo:margin-right="0in" fo:margin-top="0.1654in" fo:margin-bottom="0.139in" loext:contextual-spacing="false" fo:line-height="100%" fo:text-align="justify" style:justify-single-word="false" fo:text-indent="0.4917in" style:auto-text-indent="false" fo:keep-with-next="auto"/>
    </style:style>
    <style:style style:name="P22" style:family="paragraph" style:parent-style-name="Standard" style:list-style-name="WWNum3">
      <style:paragraph-properties fo:margin-top="0.1654in" fo:margin-bottom="0in" loext:contextual-spacing="false" fo:line-height="100%" fo:keep-with-next="auto"/>
    </style:style>
    <style:style style:name="P23" style:family="paragraph" style:parent-style-name="Standard">
      <style:paragraph-properties fo:margin-left="0in" fo:margin-right="0in" fo:margin-top="0.1654in" fo:margin-bottom="0in" loext:contextual-spacing="false" fo:line-height="100%" fo:text-align="justify" style:justify-single-word="false" fo:text-indent="0.1965in" style:auto-text-indent="false" fo:keep-with-next="auto"/>
    </style:style>
    <style:style style:name="P24" style:family="paragraph" style:parent-style-name="Standard">
      <style:paragraph-properties fo:margin-left="0in" fo:margin-right="0in" fo:margin-top="0.1654in" fo:margin-bottom="0in" loext:contextual-spacing="false" fo:line-height="100%" fo:text-align="center" style:justify-single-word="false" fo:text-indent="0.1965in" style:auto-text-indent="false" fo:keep-with-next="auto"/>
    </style:style>
    <style:style style:name="P25" style:family="paragraph" style:parent-style-name="Standard">
      <style:paragraph-properties fo:margin-left="0in" fo:margin-right="0in" fo:margin-top="0.1654in" fo:margin-bottom="0in" loext:contextual-spacing="false" fo:line-height="100%" fo:text-align="justify" style:justify-single-word="false" fo:text-indent="0.5in" style:auto-text-indent="false" fo:keep-with-next="auto"/>
    </style:style>
    <style:style style:name="P26" style:family="paragraph" style:parent-style-name="Standard">
      <style:paragraph-properties fo:margin-left="0in" fo:margin-right="0in" fo:margin-top="0.1665in" fo:margin-bottom="0.1665in" loext:contextual-spacing="false" fo:line-height="100%" fo:text-align="justify" style:justify-single-word="false" fo:text-indent="0.5in" style:auto-text-indent="false" fo:keep-with-next="auto"/>
    </style:style>
    <style:style style:name="P27" style:family="paragraph" style:parent-style-name="Standard">
      <style:paragraph-properties fo:margin-left="0in" fo:margin-right="0in" fo:margin-top="0.1654in" fo:margin-bottom="0in" loext:contextual-spacing="false" fo:line-height="100%" fo:text-align="center" style:justify-single-word="false" fo:text-indent="0in" style:auto-text-indent="false" fo:keep-with-next="auto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.1965in" style:auto-text-indent="false" fo:break-before="auto" fo:break-after="auto" fo:padding="0in" fo:border="none" fo:keep-with-next="auto"/>
    </style:style>
    <style:style style:name="P29" style:family="paragraph" style:parent-style-name="Standard">
      <style:paragraph-properties fo:margin-left="0.1965in" fo:margin-right="0in" fo:margin-top="0.0827in" fo:margin-bottom="0in" loext:contextual-spacing="false" fo:line-height="100%" fo:text-align="justify" style:justify-single-word="false" fo:text-indent="0in" style:auto-text-indent="false" fo:keep-with-next="auto"/>
    </style:style>
    <style:style style:name="P30" style:family="paragraph" style:parent-style-name="Standard">
      <style:paragraph-properties fo:margin-left="0.1965in" fo:margin-right="0in" fo:margin-top="0.0827in" fo:margin-bottom="0in" loext:contextual-spacing="false" fo:line-height="100%" fo:text-align="justify" style:justify-single-word="false" fo:keep-together="auto" fo:orphans="0" fo:widows="0" fo:text-indent="-0.1965in" style:auto-text-indent="false" fo:break-before="auto" fo:break-after="auto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size="16pt" fo:font-style="normal" style:text-underline-style="none" fo:font-weight="bold" style:font-size-asian="16pt" style:font-style-asian="normal" style:font-weight-asian="bold" style:font-size-complex="16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ize="12pt" fo:font-style="italic" style:text-underline-style="none" fo:font-weight="bold" style:font-size-asian="12pt" style:font-style-asian="italic" style:font-weight-asian="bold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urier" fo:font-size="10pt" fo:font-style="normal" style:text-underline-style="none" fo:font-weight="normal" style:font-name-asian="Courier1" style:font-size-asian="10pt" style:font-style-asian="normal" style:font-weight-asian="normal" style:font-name-complex="Courier1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urier" fo:font-size="10pt" fo:font-style="italic" style:text-underline-style="none" fo:font-weight="normal" style:font-name-asian="Courier1" style:font-size-asian="10pt" style:font-style-asian="italic" style:font-weight-asian="normal" style:font-name-complex="Courier1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style:font-style-asian="normal" style:font-weight-asian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" fo:font-style="normal" fo:font-weight="bold" style:font-name-asian="Times1" style:font-style-asian="normal" style:font-weight-asian="bold" style:font-name-complex="Times1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3pt" fo:font-style="normal" style:text-underline-style="none" fo:font-weight="bold" style:font-size-asian="13pt" style:font-style-asian="normal" style:font-weight-asian="bold" style:font-size-complex="13pt"/>
    </style:style>
    <style:style style:name="T10" style:family="text">
      <style:text-properties fo:font-variant="normal" fo:text-transform="none" fo:color="#000000" style:text-line-through-style="none" style:text-line-through-type="none" style:text-position="super 58%" fo:font-size="13pt" fo:font-style="normal" style:text-underline-style="none" fo:font-weight="bold" style:font-size-asian="13pt" style:font-style-asian="normal" style:font-weight-asian="bold" style:font-size-complex="13pt"/>
    </style:style>
    <style:style style:name="T11" style:family="text">
      <style:text-properties fo:font-variant="normal" fo:text-transform="none" fo:color="#000000" style:text-line-through-style="none" style:text-line-through-type="none" style:text-position="super 58%" fo:font-size="13pt" fo:font-style="normal" style:text-underline-style="none" fo:font-weight="normal" style:font-size-asian="13pt" style:font-style-asian="normal" style:font-weight-asian="normal" style:font-size-complex="13pt"/>
    </style:style>
    <style:style style:name="T12" style:family="text">
      <style:text-properties fo:font-size="16pt" fo:font-weight="bold" style:font-size-asian="16pt" style:font-weight-asian="bold" style:font-size-complex="16pt"/>
    </style:style>
    <style:style style:name="T13" style:family="text">
      <style:text-properties fo:font-style="italic" fo:font-weight="bold" style:font-style-asian="italic" style:font-weight-asian="bold"/>
    </style:style>
    <style:style style:name="T14" style:family="text">
      <style:text-properties fo:font-style="italic" style:font-style-asian="italic"/>
    </style:style>
    <style:style style:name="T15" style:family="text">
      <style:text-properties fo:color="#242424" fo:background-color="#ffffff"/>
    </style:style>
    <style:style style:name="T16" style:family="text">
      <style:text-properties fo:color="#242424"/>
    </style:style>
    <style:style style:name="T17" style:family="text">
      <style:text-properties fo:font-weight="bold" style:font-weight-asian="bold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font-weight="bold" style:font-weight-asian="bold"/>
    </style:style>
    <style:style style:name="T20" style:family="text">
      <style:text-properties fo:font-size="13pt" fo:font-weight="bold" style:font-size-asian="13pt" style:font-weight-asian="bold" style:font-size-complex="13pt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1583in, 0in, 0.4634in, 1.613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SwapAdvisor: Push Deep Learning Beyond the GPU Memory Limit via Smart Swapping</text:span></text:p>
      <text:p text:style-name="P2"><text:span text:style-name="T2">Gustavo B. P. Silva</text:span><text:span text:style-name="T10">1</text:span><text:span text:style-name="T2">, Michael P. C. Silva</text:span><text:span text:style-name="T10">1</text:span><text:span text:style-name="T2">, Rafael S. Melo</text:span><text:span text:style-name="T10">1</text:span></text:p>
      <text:p text:style-name="P4"><text:span text:style-name="T11">1</text:span><text:span text:style-name="T3">Departamento de Ciência da Computação – Universidade Federal de Catalão (UFCAT)</text:span></text:p>
      <text:p text:style-name="P6"><text:span text:style-name="T5">{gustavo.silva, </text:span><text:a xlink:type="simple" xlink:href="mailto:michael.silva%7D@discente.ufcat.edu.br" text:style-name="ListLabel_20_19" text:visited-style-name="ListLabel_20_19"><text:span text:style-name="T6">michael.silva</text:span></text:a><text:a xlink:type="simple" xlink:href="mailto:michael.silva%7D@discente.ufcat.edu.br" text:style-name="ListLabel_20_20" text:visited-style-name="ListLabel_20_20"><text:span text:style-name="T5">}@discente.ufcat.edu.br</text:span></text:a><text:span text:style-name="T5">, </text:span><text:span text:style-name="T6">rafinhalelograma@hotmail.com </text:span></text:p>
      <text:p text:style-name="P7"><text:span text:style-name="T4">Resumo.</text:span><text:span text:style-name="T13"> </text:span><text:span text:style-name="T14">Com o crescimento das Redes Neurais Profundas (DNNs), surgiram desafios significativos em relação ao uso de memória das GPUs, o que limita a capacidade de treinar e executar modelos maiores e mais precisos. A falta de memória adequada se torna um obstáculo importante no treinamento e na inferência de modelos de grande escala. Este estudo propõe o SwapAdvisor, um sistema inteligente que otimiza a troca de dados entre a memória da GPU e da CPU, visando maximizar a eficiência do uso da memória sem comprometer a precisão ou o desempenho dos modelos.</text:span></text:p>
      <text:p text:style-name="P7"><text:span text:style-name="T14">O SwapAdvisor utiliza algoritmos genéticos para determinar de forma precisa o que e quando trocar entre as memórias, aproveitando a sobreposição entre comunicação e computação para melhorar o desempenho. A avaliação do sistema demonstrou que ele pode treinar modelos até 12 vezes maiores do que o limite da memória da GPU, mantendo entre 53% e 99% da eficiência de um sistema ideal. Além disso, durante a inferência, o sistema foi capaz de reduzir a latência em até quatro vezes, mostrando eficácia mesmo em dispositivos com memória limitada, como GPUs de 128MB, e mantendo um desempenho próximo ao de sistemas com 16GB de memória.</text:span></text:p>
      <text:p text:style-name="P7"><text:span text:style-name="T14">O SwapAdvisor representa um avanço significativo no uso eficiente de memória para DNNs, permitindo o treinamento de modelos complexos em hardware comum, como GPUs de baixo custo. No entanto, a dependência de gráficos estáticos e o uso de uma única GPU indicam que há espaço para melhorias, sugerindo que mais pesquisas são necessárias para ampliar a aplicabilidade do sistema em diferentes configurações de hardware e arquiteturas.</text:span></text:p>
      <text:list xml:id="list1107875112" text:style-name="WWNum3">
        <text:list-item>
          <text:p text:style-name="P8"><text:span text:style-name="T7">Introdução</text:span></text:p>
        </text:list-item>
      </text:list>
      <text:p text:style-name="P9"><text:span text:style-name="T15">Nos últimos anos, a comunidade de aprendizado profundo tem utiliz</text:span><text:span text:style-name="T16">ado redes neurais profundas (DNNs) maiores para melhorar a precisão em tarefas complexas (</text:span><text:span text:style-name="T16"><office:annotation office:name="__Annotation__30_1320090156"><dc:date>2024-11-24T14:58:18</dc:date><text:p><text:span text:style-name="T21">Uma reação no total.</text:span></text:p><text:p><text:span text:style-name="T21">Gustavo Borges reagiu com 🚥: 2024-11-24 06:58 AM.</text:span></text:p></office:annotation></text:span><text:span text:style-name="T16">He et al. 2016</text:span><office:annotation-end office:name="__Annotation__30_1320090156"/><text:span text:style-name="T16">, </text:span><text:span text:style-name="T16"><office:annotation office:name="__Annotation__35_1320090156"><dc:date>2024-11-24T14:58:27</dc:date><text:p><text:span text:style-name="T21">Uma reação no total.</text:span></text:p><text:p><text:span text:style-name="T21">Gustavo Borges reagiu com 😆: 2024-11-24 06:58 AM.</text:span></text:p></office:annotation></text:span><text:span text:style-name="T16">Szegedy et al. 2017</text:span><office:annotation-end office:name="__Annotation__35_1320090156"/><text:span text:style-name="T16">, </text:span><text:span text:style-name="T16"><office:annotation office:name="__Annotation__40_1320090156"><dc:date>2024-11-24T14:59:00</dc:date><text:p><text:span text:style-name="T21">Uma reação no total.</text:span></text:p><text:p><text:span text:style-name="T21">Gustavo Borges reagiu com 😶‍🌫️: 2024-11-24 06:59 AM.</text:span></text:p></office:annotation></text:span><text:span text:style-name="T16">Wu et al. 2016</text:span><office:annotation-end office:name="__Annotation__40_1320090156"/><text:span text:style-name="T16">, </text:span><text:span text:style-name="T16"><office:annotation office:name="__Annotation__45_1320090156"><dc:date>2024-11-24T14:59:33</dc:date><text:p><text:span text:style-name="T21">Uma reação no total.</text:span></text:p><text:p><text:span text:style-name="T21">Gustavo Borges reagiu com 🫂: 2024-11-24 06:59 AM.</text:span></text:p></office:annotation></text:span><text:span text:style-name="T16">Zagoruyko and Komodakis 2016</text:span><office:annotation-end office:name="__Annotation__45_1320090156"/><text:span text:style-name="T16">, </text:span><text:span text:style-name="T16"><office:annotation office:name="__Annotation__50_1320090156"><dc:date>2024-11-24T14:59:58</dc:date><text:p><text:span text:style-name="T21">Uma reação no total.</text:span></text:p><text:p><text:span text:style-name="T21">Gustavo Borges reagiu com 🪂: 2024-11-24 06:59 AM.</text:span></text:p></office:annotation></text:span><text:span text:style-name="T16">Zoph et al. 2018</text:span><office:annotation-end office:name="__Annotation__50_1320090156"/><text:span text:style-name="T16">), </text:span><text:span text:style-name="T15">com um aumento constante no número de parâmetros das redes, que dobra a cada 2,4 anos desde os anos 80, impulsionado por melhorias em hardware e dados </text:span><text:span text:style-name="T15"><office:annotation office:name="__Annotation__57_1320090156"><dc:date>2024-11-24T14:33:41</dc:date><text:p><text:span text:style-name="T21">Uma reação no total.</text:span></text:p><text:p><text:span text:style-name="T21">Gustavo Borges reagiu com ⚽: 2024-11-24 06:33 AM.</text:span></text:p></office:annotation></text:span><text:span text:style-name="T15">(Goodfellow et al. 2016)</text:span><office:annotation-end office:name="__Annotation__57_1320090156"/><text:span text:style-name="T15">. No entanto, a memória da GPU limita o tamanho de modelos DNN, com abordagens existentes buscando reduzir o consumo de memória através de técnicas como menor precisão em pontos flutuantes, quantização e esparsificação, mas estas podem afetar a precisão e exigem ajustes complexos de hiperparâmetros (</text:span><text:span text:style-name="T15"><office:annotation office:name="__Annotation__62_1320090156"><dc:date>2024-11-24T14:34:13</dc:date><text:p><text:span text:style-name="T21">Uma reação no total.</text:span></text:p><text:p><text:span text:style-name="T21">Gustavo Borges reagiu com 📘: 2024-11-24 06:34 AM.</text:span></text:p></office:annotation></text:span><text:span text:style-name="T15">Gupta et al. 2015</text:span><office:annotation-end office:name="__Annotation__62_1320090156"/><text:span text:style-name="T15">, </text:span><text:span text:style-name="T15"><office:annotation office:name="__Annotation__67_1320090156"><dc:date>2024-11-24T14:34:30</dc:date><text:p><text:span text:style-name="T21">Uma reação no total.</text:span></text:p><text:p><text:span text:style-name="T21">Gustavo Borges reagiu com 📗: 2024-11-24 06:34 AM.</text:span></text:p></office:annotation></text:span><text:span text:style-name="T15">Judd et al. 2016)</text:span><office:annotation-end office:name="__Annotation__67_1320090156"/><text:span text:style-name="T15">. Outra solução é recalcular dados intermediários, mas não suporta modelos grandes (</text:span><text:span text:style-name="T15"><office:annotation office:name="__Annotation__72_1320090156"><dc:date>2024-11-24T14:34:47</dc:date><text:p><text:span text:style-name="T21">Uma reação no total.</text:span></text:p><text:p><text:span text:style-name="T21">Gustavo Borges reagiu com 📕: 2024-11-24 06:34 AM.</text:span></text:p></office:annotation></text:span><text:span text:style-name="T15">Chen et al. 2016</text:span><office:annotation-end office:name="__Annotation__72_1320090156"/><text:span text:style-name="T15">, </text:span><text:span text:style-name="T15"><office:annotation office:name="__Annotation__77_1320090156"><dc:date>2024-11-24T14:35:11</dc:date><text:p><text:span text:style-name="T21">Uma reação no total.</text:span></text:p><text:p><text:span text:style-name="T21">Gustavo Borges reagiu com 📙: 2024-11-24 06:35 AM.</text:span></text:p></office:annotation></text:span><text:span text:style-name="T15">Martens e Sutskever 2012</text:span><office:annotation-end office:name="__Annotation__77_1320090156"/><text:span text:style-name="T15">).</text:span></text:p>
      <text:p text:style-name="P9"><text:span text:style-name="T15">Uma abordagem promissora é a troca de dados entre a memória da GPU e da CPU, aproveitando a maior capacidade e custo mais baixo da memória da CPU, além da melhoria na comunicação entre GPU e CPU com tecnologias como PCIe 5.0 (</text:span><text:span text:style-name="T15"><office:annotation office:name="__Annotation__83_1320090156"><dc:date>2024-11-24T14:47:15</dc:date><text:p><text:span text:style-name="T21">Uma reação no total.</text:span></text:p><text:p><text:span text:style-name="T21">Gustavo Borges reagiu com 🧭: 2024-11-24 06:47 AM.</text:span></text:p></office:annotation></text:span><text:span text:style-name="T15">PCI-SIG 2019</text:span><office:annotation-end office:name="__Annotation__83_1320090156"/><text:span text:style-name="T15">) e NVLink (</text:span><text:span text:style-name="T15"><office:annotation office:name="__Annotation__88_1320090156"><dc:date>2024-11-24T14:36:09</dc:date><text:p><text:span text:style-name="T21">Uma reação no total.</text:span></text:p><text:p><text:span text:style-name="T21">Gustavo Borges reagiu com 🇨🇳: 2024-11-24 06:36 AM.</text:span></text:p></office:annotation></text:span><text:span text:style-name="T15">Le et al. 2018</text:span><office:annotation-end office:name="__Annotation__88_1320090156"/><text:span text:style-name="T15">, </text:span><text:span text:style-name="T15"><office:annotation office:name="__Annotation__93_1320090156"><dc:date>2024-11-24T14:36:51</dc:date><text:p><text:span text:style-name="T21">Uma reação no total.</text:span></text:p><text:p><text:span text:style-name="T21">Gustavo Borges reagiu com 👲: 2024-11-24 06:36 AM.</text:span></text:p></office:annotation></text:span><text:span text:style-name="T15">Meng et al. 2017</text:span><office:annotation-end office:name="__Annotation__93_1320090156"/><text:span text:style-name="T15">, </text:span><text:span text:style-name="T15"><office:annotation office:name="__Annotation__98_1320090156"><dc:date>2024-11-24T14:49:45</dc:date><text:p><text:span text:style-name="T21">Uma reação no total.</text:span></text:p><text:p><text:span text:style-name="T21">Gustavo Borges reagiu com 👽: 2024-11-24 06:49 AM.</text:span></text:p></office:annotation></text:span><text:span text:style-name="T15">Rhu et al. 2016</text:span><office:annotation-end office:name="__Annotation__98_1320090156"/><text:span text:style-name="T15">,</text:span><text:span text:style-name="T15"><office:annotation office:name="__Annotation__104_1320090156"><dc:date>2024-11-24T14:49:23</dc:date><text:p><text:span text:style-name="T21">Uma reação no total.</text:span></text:p><text:p><text:span text:style-name="T21">Gustavo Borges reagiu com ⚙️: 2024-11-24 06:49 AM.</text:span></text:p></office:annotation></text:span><text:span text:style-name="T15"> Wang et al. 2018</text:span><office:annotation-end office:name="__Annotation__104_1320090156"/><text:span text:style-name="T15">, </text:span><text:span text:style-name="T15"><office:annotation office:name="__Annotation__110_1320090156"><dc:date>2024-11-24T14:46:30</dc:date><text:p><text:span text:style-name="T21">Uma reação no total.</text:span></text:p><text:p><text:span text:style-name="T21">Gustavo Borges reagiu com 🫀: 2024-11-24 06:46 AM.</text:span></text:p></office:annotation></text:span><text:span text:style-name="T15">NVIDIA 2018</text:span><office:annotation-end office:name="__Annotation__110_1320090156"/><text:span text:style-name="T15">). No entanto, muitas abordagens atuais utilizam informações limitadas do gráfico de fluxo de dados para planejar a troca, prejudicando o desempenho (</text:span><text:span text:style-name="T15"><office:annotation office:name="__Annotation__115_1320090156"><dc:date>2024-11-24T14:48:43</dc:date><text:p><text:span text:style-name="T21">Uma reação no total.</text:span></text:p><text:p><text:span text:style-name="T21">Gustavo Borges reagiu com 🪬: 2024-11-24 06:48 AM.</text:span></text:p></office:annotation></text:span><text:span text:style-name="T15">Yu et al. 2018</text:span><office:annotation-end office:name="__Annotation__115_1320090156"/><text:span text:style-name="T15">, </text:span><text:span text:style-name="T15"><office:annotation office:name="__Annotation__120_1320090156"><dc:date>2024-11-24T14:38:49</dc:date><text:p><text:span text:style-name="T21">Uma reação no total.</text:span></text:p><text:p><text:span text:style-name="T21">Gustavo Borges reagiu com 🇨🇳: 2024-11-24 06:38 AM.</text:span></text:p></office:annotation></text:span><text:span text:style-name="T15">Le et al. 2018</text:span><office:annotation-end office:name="__Annotation__120_1320090156"/><text:span text:style-name="T15">).</text:span></text:p>
      <text:p text:style-name="P9"><text:span text:style-name="T15">Neste artigo, os pesquisadores </text:span><office:annotation office:name="__Annotation__126_1320090156"><dc:date>2024-11-24T14:39:31</dc:date><text:p><text:span text:style-name="T21">Uma reação no total.</text:span></text:p><text:p><text:span text:style-name="T21">Gustavo Borges reagiu com 🌟: 2024-11-24 06:39 AM.</text:span></text:p></office:annotation>Huang, Jin e Li (2020)<office:annotation-end office:name="__Annotation__126_1320090156"/>, propuseram o<text:span text:style-name="T15"> SwapAdvisor, que se trata de um sistema para otimizar a troca de dados em DNNs, planejando precisamente o que e quando trocar para maximizar a sobreposição de computação e comunicação. Ele usa um algoritmo genético para otimizar a alocação de memória e o agendamento de operadores, permitindo o treinamento de modelos até 12 vezes o limite da memória da GPU, com taxas de transferência entre 53% e 99% da linha de base ideal. O SwapAdvisor também é útil para inferência, permitindo a utilização de múltiplos modelos em uma única GPU com latência reduzida em até quatro vezes em comparação com a abordagem de compartilhamento de tempo (</text:span><text:span text:style-name="T15"><office:annotation office:name="__Annotation__132_1320090156"><dc:date>2024-11-24T14:39:16</dc:date><text:p><text:span text:style-name="T21">Uma reação no total.</text:span></text:p><text:p><text:span text:style-name="T21">Gustavo Borges reagiu com 🇨🇳: 2024-11-24 06:39 AM.</text:span></text:p></office:annotation></text:span><text:span text:style-name="T15">Le et al. 2018</text:span><office:annotation-end office:name="__Annotation__132_1320090156"/><text:span text:style-name="T15">,</text:span><text:span text:style-name="T15"><office:annotation office:name="__Annotation__137_1320090156"><dc:date>2024-11-24T14:39:07</dc:date><text:p><text:span text:style-name="T21">Uma reação no total.</text:span></text:p><text:p><text:span text:style-name="T21">Gustavo Borges reagiu com 👲: 2024-11-24 06:39 AM.</text:span></text:p></office:annotation></text:span><text:span text:style-name="T15"> Meng et al. 2017</text:span><office:annotation-end office:name="__Annotation__137_1320090156"/><text:span text:style-name="T15">).</text:span></text:p>
      <text:p text:style-name="P9"><text:span text:style-name="T15">O SwapAdvisor é o primeiro sistema geral de troca para modelos DNN grandes, mas possui limitações, como a necessidade de um gráfico de fluxo de dados estático e a limitação a uma única GPU, exigindo mais pesquisas para superar essas restrições.</text:span></text:p>
      <text:p text:style-name="P10"><text:span text:style-name="T15">A questão de pesquisa do artigo é como superar a limitação de memória da GPU para treinar e inferir modelos de redes neurais profundas (DNNs) maiores e mais precisos. A hipótese é que a troca de dados entre a memória da GPU e da CPU pode resolver essa limitação sem comprometer a precisão do modelo.</text:span></text:p>
      <text:p text:style-name="P10"><text:span text:style-name="T15">A lacuna de pesquisa identificada é a incapacidade dos métodos existentes de troca de dados de suportar modelos grandes de DNNs de forma eficiente. Os métodos atuais lidam apenas com certos modelos e não alcançam um desempenho satisfatório. O artigo propõe resolver essa limitação através de uma abordagem otimizada de troca de dados, o SwapAdvisor. </text:span></text:p>
      <text:p text:style-name="P11">O objetivo geral deste trabalho é investigar e propor uma solução para o problema do uso eficiente da memória em Redes Neurais Profundas (DNNs), particularmente em ambientes com restrições de memória, como GPUs. Os objetivos específicos incluem: </text:p>
      <text:list xml:id="list705445988" text:style-name="WWNum2">
        <text:list-item>
          <text:p text:style-name="P13">Revisar a literatura existente sobre técnicas de otimização de memória em DNNs.</text:p>
        </text:list-item>
        <text:list-item>
          <text:p text:style-name="P14">Identificar as limitações das abordagens atuais de troca de dados entre GPU e CPU.</text:p>
        </text:list-item>
        <text:list-item>
          <text:p text:style-name="P14">Desenvolver um sistema que otimiza a troca de dados e a sobreposição de comunicação e computação.</text:p>
        </text:list-item>
        <text:list-item>
          <text:p text:style-name="P14">Avaliar a eficácia do SwapAdvisor em diferentes cenários de uso.</text:p>
        </text:list-item>
      </text:list>
      <text:list xml:id="list115620606350821" text:continue-list="list1107875112" text:style-name="WWNum3">
        <text:list-item>
          <text:p text:style-name="P18"><text:span text:style-name="T17">Metodologia</text:span></text:p>
        </text:list-item>
      </text:list>
      <text:p text:style-name="P11"><text:soft-page-break/>A metodologia empregada neste trabalho visa a integração de múltiplas abordagens de otimização para lidar com as limitações de memória ao executar Redes Neurais Profundas (DNNs) em GPUs. A pesquisa explora e avalia diferentes estratégias para a troca (<text:span text:style-name="T14">swapping</text:span>) de <text:span text:style-name="T14">tensores </text:span>(estruturas de dados multidimensionais usadas para armazenar entradas, saídas e parâmetros em modelos de aprendizado de máquina) e parâmetros entre a memória da GPU e da CPU. O objetivo é permitir a execução de modelos mais profundos e maiores, sem comprometer o desempenho e a precisão.</text:p>
      <text:p text:style-name="P11">Como objetivo geral do trabalho, pretende-se desenvolver e implementar uma solução, o SwapAdvisor, que combina técnicas de troca eficiente de <text:span text:style-name="T14">tensores </text:span>e parâmetros entre a memória da GPU e da CPU. Além disso, o SwapAdvisor incorpora técnicas de sobreposição de comunicação e computação para maximizar a eficiência do uso da GPU durante o processo de treinamento e inferência de DNNs. Essas estratégias de sobreposição visam maximizar a utilização da GPU, garantindo que a comunicação e a computação ocorram simultaneamente, reduzindo assim o tempo ocioso e melhorando o <text:span text:style-name="T14">throughput </text:span>geral do sistema. Os passos da metodologia incluem:</text:p>
      <text:list xml:id="list2399912583" text:style-name="WWNum1">
        <text:list-item>
          <text:p text:style-name="P17">Análise dos sistemas existentes: revisar e entender os sistemas de troca de memória e paralelismo de modelos existentes, como vDNN, TFLMS e SuperNeurons, para identificar suas limitações e pontos fortes. Este estudo serve como base para a criação do SwapAdvisor, buscando a superação das limitações observadas em sistemas anteriores, como a incapacidade de suportar grandes parâmetros ou modelos RNNs.</text:p>
        </text:list-item>
        <text:list-item>
          <text:p text:style-name="P16">Desenvolvimento do sistema SwapAdvisor: combinar estratégias de troca de <text:span text:style-name="T14">tensores </text:span>com sobreposição de comunicação e computação, o que permite otimizar o uso de memória da GPU sem comprometer o tempo de execução. A troca de <text:span text:style-name="T14">tensores </text:span>é feita de forma inteligente, levando em consideração os <text:span text:style-name="T14">tensores </text:span>mais críticos e as iterações anteriores. Além disso, o sistema é projetado para suportar modelos DNN de diferentes tamanhos e complexidades, como redes convolucionais (CNNs) e redes recorrentes (RNNs).</text:p>
        </text:list-item>
        <text:list-item>
          <text:p text:style-name="P16">Avaliação da abordagem SwapAdvisor: avaliar a eficácia do SwapAdvisor em termos de redução do consumo de memória e aumento do desempenho (tempo de execução). A solução foi testada em diferentes modelos DNN, desde redes mais profundas e largas até RNNs com grandes parâmetros. A avaliação comparou o SwapAdvisor com outras abordagens existentes, como recomputação, paralelismo de dados e paralelismo de modelo, para determinar suas vantagens em termos de eficiência de memória e desempenho.</text:p>
        </text:list-item>
        <text:list-item>
          <text:p text:style-name="P16">Sobreposição de comunicação e computação: implementar técnicas de sobreposição de comunicação e computação. Diferente de abordagens anteriores que dividem os kernels DNN de grão grosso em sub-kernels finos, que resultam em uma sobrecarga de desempenho, o SwapAdvisor utiliza uma abordagem de pré-busca, permitindo a sobreposição de comunicação e computação dentro de um gráfico de fluxo de dados de muitos kernels de grão grosso. Isso visa minimizar a latência e melhorar a utilização da GPU.</text:p>
        </text:list-item>
      </text:list>
      <text:list xml:id="list115620363022749" text:continue-list="list115620606350821" text:style-name="WWNum3">
        <text:list-item>
          <text:p text:style-name="P22"><text:span text:style-name="T17">Resultados</text:span></text:p>
        </text:list-item>
      </text:list>
      <text:p text:style-name="P23"><text:span text:style-name="T17"><text:tab/></text:span>O SwapAdvisor foi desenvolvido para superar a limitação de memória nas GPUs durante o treinamento e inferência de modelos de <text:span text:style-name="T14">deep learning</text:span>. Utilizando uma abordagem inteligente de troca de dados entre a memória da GPU e da CPU (Figura 1), o SwapAdvisor demonstrou resultados significativos mediante o uso de algoritmos genéticos.</text:p>
      <text:p text:style-name="P24"><draw:frame draw:style-name="fr1" draw:name="image2.png" text:anchor-type="as-char" svg:width="5.9075in" svg:height="2.0311in" draw:z-index="0"><draw:image xlink:href="Pictures/10000000000004260000016C4178C132EF0EFEB5.png" xlink:type="simple" xlink:show="embed" xlink:actuate="onLoad" loext:mime-type="image/png"/></draw:frame><text:line-break/><text:span text:style-name="T17">Figura 1. Visão geral do sistema SwapAdvisor (Baseado em Huang, Jin e Li, 2020).</text:span></text:p>
      <text:p text:style-name="P25">Primeiramente, o SwapAdvisor conseguiu treinar modelos até 12 vezes maiores que o limite de memória da GPU, mantendo-se entre 53% a 99% (Figura 2) do <text:span text:style-name="T14">throughput</text:span> (transferência de dados) de um sistema ideal com memória infinita com base nos dados obtidos pelos pesquisadores Huang, Jin e Li (2020). Isso mostra que é possível utilizar GPUs existentes para treinar modelos maiores sem necessidade de investir em hardware mais caro ou em soluções de múltiplas GPUs, que podem ser complexas e difíceis de gerenciar. Em vez de adicionar mais GPUs (escalonamento horizontal), o SwapAdvisor otimiza o uso da memória da GPU, permitindo que modelos maiores sejam treinados em uma única GPU, reduzindo custos e simplificando a infraestrutura.</text:p>
      <text:p text:style-name="P27"><draw:frame draw:style-name="fr2" draw:name="image1.png" text:anchor-type="as-char" svg:width="5.0626in" svg:height="2.3744in" draw:z-index="0"><draw:image xlink:href="Pictures/1000000000000442000001F20337C4855EADA7F5.png" xlink:type="simple" xlink:show="embed" xlink:actuate="onLoad" loext:mime-type="image/png"/></draw:frame></text:p>
      <text:p text:style-name="P28"><text:span text:style-name="T17">Figura 2. Latência de percentil 99 versus taxa de transferência para servir vários modelos ResNet-152 (Baseado em Huang, Jin e Li, 2020).</text:span></text:p>
      <text:p text:style-name="P25">Além disso, o SwapAdvisor demonstrou um desempenho superior em cenários de inferência, reduzindo a latência em até 4 vezes em comparação com abordagens tradicionais de compartilhamento de tempo da memória GPU. A solução também mostrou uma melhoria na taxa de transferência de treinamento com troca de 20% a 1100% em comparação com a busca apenas de alocação de memória ou apenas de agendamento, baseados em estudos empíricos que mostram que o SwapAdvisor alcança uma taxa de <text:span text:style-name="T14">throughput </text:span>ideal muito maior do que outras abordagens. Esses resultados são especialmente notáveis em modelos mais complexos, onde a otimização conjunta de alocação de memória e agendamento de operações pelo SwapAdvisor minimiza o tempo gasto na troca de <text:span text:style-name="T14">tensores </text:span>entre as memórias da GPU e da CPU.</text:p>
      <text:p text:style-name="P19"><text:span text:style-name="T17">Tabela 1. Estatísticas dos modelos DNN. O tamanho do lote é 64 para CNN, 256 para RNN e 128 para BRNN. (Baseado em Huang, Jin e Li (2020)).</text:span></text:p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1"><text:span text:style-name="T17">Modelo</text:span></text:p>
          </table:table-cell>
          <table:table-cell table:style-name="Table1.B1" office:value-type="string">
            <text:p text:style-name="P1"><text:span text:style-name="T17">Utilização de memória</text:span></text:p>
          </table:table-cell>
          <table:table-cell table:style-name="Table1.B1" office:value-type="string">
            <text:p text:style-name="P1"><text:span text:style-name="T17">Operações</text:span></text:p>
          </table:table-cell>
          <table:table-cell table:style-name="Table1.D1" office:value-type="string">
            <text:p text:style-name="P1"><text:span text:style-name="T17">Tamanho de tensores</text:span></text:p>
          </table:table-cell>
        </table:table-row>
        <table:table-row table:style-name="Table1.2">
          <table:table-cell table:style-name="Table1.A2" office:value-type="string">
            <text:p text:style-name="P1">WResNet-152-10</text:p>
          </table:table-cell>
          <table:table-cell table:style-name="Table1.B2" office:value-type="string">
            <text:p text:style-name="P1">180GB</text:p>
          </table:table-cell>
          <table:table-cell table:style-name="Table1.B2" office:value-type="string">
            <text:p text:style-name="P1">882</text:p>
          </table:table-cell>
          <table:table-cell table:style-name="Table1.D2" office:value-type="string">
            <text:p text:style-name="P1">26</text:p>
          </table:table-cell>
        </table:table-row>
        <table:table-row table:style-name="Table1.3">
          <table:table-cell table:style-name="Table1.A2" office:value-type="string">
            <text:p text:style-name="P1">Inception-4</text:p>
          </table:table-cell>
          <table:table-cell table:style-name="Table1.B2" office:value-type="string">
            <text:p text:style-name="P1">71GB</text:p>
          </table:table-cell>
          <table:table-cell table:style-name="Table1.B2" office:value-type="string">
            <text:p text:style-name="P1">830</text:p>
          </table:table-cell>
          <table:table-cell table:style-name="Table1.D2" office:value-type="string">
            <text:p text:style-name="P1">64</text:p>
          </table:table-cell>
        </table:table-row>
        <table:table-row table:style-name="Table1.3">
          <table:table-cell table:style-name="Table1.A2" office:value-type="string">
            <text:p text:style-name="P1">NasNet-25</text:p>
          </table:table-cell>
          <table:table-cell table:style-name="Table1.B2" office:value-type="string">
            <text:p text:style-name="P1">193GB</text:p>
          </table:table-cell>
          <table:table-cell table:style-name="Table1.B2" office:value-type="string">
            <text:p text:style-name="P1">5533</text:p>
          </table:table-cell>
          <table:table-cell table:style-name="Table1.D2" office:value-type="string">
            <text:p text:style-name="P1">65</text:p>
          </table:table-cell>
        </table:table-row>
        <table:table-row table:style-name="Table1.5">
          <table:table-cell table:style-name="Table1.A2" office:value-type="string">
            <text:p text:style-name="P1">RNN-8-8K</text:p>
          </table:table-cell>
          <table:table-cell table:style-name="Table1.B2" office:value-type="string">
            <text:p text:style-name="P1">118GB</text:p>
          </table:table-cell>
          <table:table-cell table:style-name="Table1.B2" office:value-type="string">
            <text:p text:style-name="P1">8594</text:p>
          </table:table-cell>
          <table:table-cell table:style-name="Table1.D2" office:value-type="string">
            <text:p text:style-name="P1">7</text:p>
          </table:table-cell>
        </table:table-row>
        <table:table-row table:style-name="Table1.6">
          <table:table-cell table:style-name="Table1.A6" office:value-type="string">
            <text:p text:style-name="P1">BRNN-4-8K</text:p>
          </table:table-cell>
          <table:table-cell table:style-name="Table1.B6" office:value-type="string">
            <text:p text:style-name="P1">99GB</text:p>
          </table:table-cell>
          <table:table-cell table:style-name="Table1.B6" office:value-type="string">
            <text:p text:style-name="P1">9034</text:p>
          </table:table-cell>
          <table:table-cell table:style-name="Table1.D6" office:value-type="string">
            <text:p text:style-name="P1">9</text:p>
          </table:table-cell>
        </table:table-row>
      </table:table>
      <text:p text:style-name="P11">A Tabela 1 apresenta as estatísticas dos modelos DNN avaliados. Modelos como o WResNet-152-10 utilizam 180GB de memória, com 882 operações e 26 tamanhos de <text:span text:style-name="T14">tensores</text:span>. Este modelo tem uma complexidade moderada em termos de tamanhos de <text:span text:style-name="T14">tensores</text:span>. Em contraste, o Inception-4, que utiliza 71GB de memória com 830 operações, possui 64 tamanhos de <text:span text:style-name="T14">tensores</text:span>, indicando uma maior complexidade devido ao maior número de tamanhos de <text:span text:style-name="T14">tensores</text:span>. O NasNet-25, com 193GB de memória, 5533 operações e 65 tamanhos de <text:span text:style-name="T14">tensores</text:span>, é altamente complexo tanto em termos de operações quanto de tamanhos de <text:span text:style-name="T14">tensores</text:span>. Já os modelos RNN-8-8K e BRNN-4-8K, apesar de terem muitas operações (8594 e 9034, respectivamente), possuem uma baixa complexidade nos tamanhos de <text:span text:style-name="T14">tensores</text:span>, com apenas 7 e 9 tamanhos de <text:span text:style-name="T14">tensores</text:span>, respectivamente.</text:p>
      <text:p text:style-name="P11"><text:soft-page-break/>A eficiência do SwapAdvisor é particularmente evidente em modelos com maior complexidade de <text:span text:style-name="T14">tensores</text:span>, como o Inception-4 e o NasNet-25. A capacidade do SwapAdvisor de gerenciar a complexidade dos tamanhos de <text:span text:style-name="T14">tensores </text:span>permite otimizar tanto a alocação de memória quanto o agendamento de operações, minimizando o tempo gasto na troca de <text:span text:style-name="T14">tensores </text:span>entre as memórias da GPU e da CPU. Isso resulta em melhorias de desempenho significativas. Em modelos com menos variabilidade nos tamanhos de <text:span text:style-name="T14">tensores</text:span>, como o RNN-8-8K e o BRNN-4-8K, a eficiência do SwapAdvisor é menos impactada pela complexidade dos tamanhos de <text:span text:style-name="T14">tensores</text:span>, mas ainda se beneficia da otimização de agendamento devido à alta quantidade de operações.</text:p>
      <text:p text:style-name="P21">Por fim, o SwapAdvisor foi eficaz em ambientes com memória extremamente limitada, como dispositivos com GPUs menores, funcionando com apenas 128MB de memória disponível para inferência em um modelo ResNet-152, mantendo um desempenho quase equivalente a um sistema com 16GB de memória.</text:p>
      <text:p text:style-name="P11">Em resumo, o SwapAdvisor atingiu plenamente seus objetivos ao permitir o treinamento e inferência de modelos grandes em GPUs com memória limitada, utilizando uma abordagem de otimização automática que supera as soluções baseadas em heurísticas manuais. Ele representa um avanço significativo para a área de <text:span text:style-name="T14">deep learning</text:span>, especialmente em cenários onde a capacidade de memória é um fator crítico. No entanto, algumas limitações permanecem, como a dependência de um gráfico de fluxo de dados estático e a restrição ao uso de uma única GPU. A escolha do Algoritmo Genético (GA), baseado em sua eficácia empírica e desempenho superior em comparação a alternativas como o recozimento simulado, também impôs certas simplificações no design, como a adoção de uma alocação baseada em conjuntos de memória, devido à dificuldade de integrar um alocador dinâmico na pesquisa do GA. Além disso, outros métodos de busca promissores, como a aprendizagem por reforço [Mirhoseini et al. 2018, Mirhoseini et al. 2017], ainda não foram explorados e poderiam superar essas limitações, oferecendo melhores resultados. Tais avanços poderiam expandir o SwapAdvisor para gráficos dinâmicos e ambientes com múltiplas GPUs, ampliando ainda mais sua eficácia e aplicabilidade.</text:p>
      <text:list xml:id="list115620219291988" text:continue-numbering="true" text:style-name="WWNum3">
        <text:list-item>
          <text:list>
            <text:list-item>
              <text:p text:style-name="P22"><text:span text:style-name="T17">Relação resultados e objetivos</text:span></text:p>
            </text:list-item>
          </text:list>
        </text:list-item>
      </text:list>
      <text:p text:style-name="P25">Os resultados alcançados pelo SwapAdvisor estão diretamente alinhados com os objetivos gerais e específicos do trabalho. O objetivo geral de investigar e propor uma solução para o uso eficiente da memória em DNNs foi plenamente atingido, com o SwapAdvisor permitindo o treinamento e a inferência de modelos significativamente maiores do que o limite de memória da GPU, sem comprometer o desempenho e a precisão.</text:p>
      <text:p text:style-name="P25">Em relação aos objetivos específicos, o SwapAdvisor analisou sistemas existentes como vDNN, TFLMS e <text:span text:style-name="T14">SuperNeurons</text:span>, identificando suas limitações, como a incapacidade de suportar grandes parâmetros ou modelos RNNs. Além disso, o SwapAdvisor investigou abordagens alternativas para otimizar o uso de memória sem afetar a precisão do modelo, explorando técnicas como recomputação, paralelismo de dados e paralelismo de modelo. A solução desenvolvida combinou técnicas de troca de <text:span text:style-name="T14">tensores </text:span>e sobreposição de comunicação e computação, otimizando o uso da memória da GPU sem comprometer o tempo de execução.</text:p>
      <text:p text:style-name="P25">Finalmente, o SwapAdvisor foi implementado e avaliado em termos de eficiência de memória e desempenho em modelos DNN de diferentes profundidades e larguras. A avaliação detalhada mostrou a eficácia do SwapAdvisor na redução do consumo de memória e no aumento do desempenho em diversos modelos DNN, incluindo redes convolucionais (CNNs) e redes recorrentes (RNNs). Esses resultados demonstram que o SwapAdvisor não só atende aos objetivos gerais e específicos do trabalho, mas também oferece uma solução robusta e eficiente para os desafios de memória em DNNs.</text:p>
      <text:list xml:id="list115620555713091" text:continue-numbering="true" text:style-name="WWNum3">
        <text:list-item>
          <text:p text:style-name="P22"><text:span text:style-name="T17">Conclusão</text:span></text:p>
        </text:list-item>
      </text:list>
      <text:p text:style-name="P26"><text:s/>O SwapAdvisor demonstrou ser uma solução eficiente para superar a limitação de memória das GPUs no treinamento e inferência de modelos de redes neurais profundas (DNNs). A pesquisa revelou que o sistema proposto consegue treinar modelos até 12 vezes maiores do que o limite de memória da GPU, mantendo taxas de transferência entre 53% e 99% de um sistema ideal. Adicionalmente, no contexto de inferência, o SwapAdvisor reduziu a latência em até quatro vezes em comparação com abordagens de compartilhamento de tempo tradicionais, além de melhorar significativamente a taxa de transferência de treinamento, com ganhos entre 20% e 1100%.</text:p>
      <text:p text:style-name="P12">Outro resultado notável foi a capacidade do SwapAdvisor de operar eficientemente em dispositivos com memória extremamente limitada, como GPUs com apenas 128MB disponíveis, atingindo um desempenho próximo ao de sistemas com 16GB. Esses avanços reforçam a aplicabilidade do SwapAdvisor tanto em cenários de alto desempenho quanto em ambientes mais restritivos, sem comprometer a precisão dos modelos. </text:p>
      <text:p text:style-name="P12">Com base nos resultados apresentados, conclui-se que o SwapAdvisor atingiu plenamente seu objetivo de propor uma solução eficaz para o uso eficiente da memória em DNNs, resolvendo desafios enfrentados por abordagens anteriores e permitindo o treinamento e a inferência de modelos maiores e mais complexos. O artigo conseguiu expressar integralmente sua proposta e demonstrar, por meio de experimentos, a viabilidade e as vantagens do sistema desenvolvido. </text:p>
      <text:p text:style-name="P12">Entretanto, algumas limitações permanecem, como a dependência de um gráfico de fluxo de dados estático e a restrição ao uso de uma única GPU. Essas limitações abrem espaço para estudos futuros, que poderão explorar a expansão do SwapAdvisor para gráficos dinâmicos e ambientes com múltiplas GPUs, ampliando ainda mais sua eficácia e aplicabilidade. </text:p>
      <text:p text:style-name="P12">Em suma, o trabalho alcançou seus objetivos, oferecendo uma contribuição valiosa para a área de aprendizado profundo e estabelecendo uma base sólida para o desenvolvimento de novas soluções que continuem a otimizar o uso de memória em DNNs.</text:p>
      <text:p text:style-name="P3"><text:span text:style-name="T9">Refer</text:span><text:span text:style-name="T20">ências</text:span></text:p>
      <text:p text:style-name="P29"><office:annotation office:name="__Annotation__316_1320090156"><dc:date>2024-11-24T14:39:39</dc:date><text:p><text:span text:style-name="T21">Uma reação no total.</text:span></text:p><text:p><text:span text:style-name="T21">Gustavo Borges reagiu com 🌟: 2024-11-24 06:39 AM.</text:span></text:p></office:annotation>CC. Huang, G. Jin, J. Li (2020) “SwapAdvisor: Push Deep Learning Beyond the GPU Memory Limit via Smart Swapping”, In: 2020 ASPLOS '20, https://dl.acm.org/doi/abs/10.1145/3373376.3378530.<office:annotation-end office:name="__Annotation__316_1320090156"/></text:p>
      <text:p text:style-name="P30"><office:annotation office:name="__Annotation__320_1320090156"><dc:date>2024-11-24T14:25:07</dc:date><text:p><text:span text:style-name="T21">Uma reação no total.</text:span></text:p><text:p><text:span text:style-name="T21">Gustavo Borges reagiu com 📕: 2024-11-24 06:25 AM.</text:span></text:p></office:annotation>Chen, T., Xu, B., Zhang, C., and Guestrin, C. (2016) “Training deep nets with sublinear memory cost”, arXiv preprint arXiv:1604.06174.<office:annotation-end office:name="__Annotation__320_1320090156"/></text:p>
      <text:p text:style-name="P30"><office:annotation office:name="__Annotation__324_1320090156"><dc:date>2024-11-24T14:24:05</dc:date><text:p><text:span text:style-name="T21">Uma reação no total.</text:span></text:p><text:p><text:span text:style-name="T21">Gustavo Borges reagiu com ⚽: 2024-11-24 06:33 AM.</text:span></text:p></office:annotation>Goodfellow, I., Bengio, Y., and Courville, A. (2016) Deep Learning, MIT Press. http://www.deeplearningbook.org.<office:annotation-end office:name="__Annotation__324_1320090156"/></text:p>
      <text:p text:style-name="P30"><office:annotation office:name="__Annotation__328_1320090156"><dc:date>2024-11-24T14:22:10</dc:date><text:p><text:span text:style-name="T21">Uma reação no total.</text:span></text:p><text:p><text:span text:style-name="T21">Gustavo Borges reagiu com 📘: 2024-11-24 06:23 AM.</text:span></text:p></office:annotation>Gupta, S., Agrawal, A., Gopalakrishnan, K., and Narayanan, P. (2015) “Deep Learning with Limited Numerical Precision”, In: Proceedings of the 32nd International Conference on International Conference on Machine Learning - Volume 37 (ICML’15), JMLR.org, pp. 1737–1746.<office:annotation-end office:name="__Annotation__328_1320090156"/></text:p>
      <text:p text:style-name="P30"><office:annotation office:name="__Annotation__332_1320090156"><dc:date>2024-11-24T14:58:00</dc:date><text:p><text:span text:style-name="T21">Uma reação no total.</text:span></text:p><text:p><text:span text:style-name="T21">Gustavo Borges reagiu com 🚥: 2024-11-24 06:58 AM.</text:span></text:p></office:annotation>He, K., Zhang, X., Ren, S., and Sun, J. (2016) “Deep Residual Learning for Image Recognition”, In: 2016 IEEE Conference on Computer Vision and Pattern Recognition (CVPR), pp. 770–778.<office:annotation-end office:name="__Annotation__332_1320090156"/></text:p>
      <text:p text:style-name="P30"><office:annotation office:name="__Annotation__336_1320090156"><dc:date>2024-11-24T14:23:43</dc:date><text:p><text:span text:style-name="T21">Uma reação no total.</text:span></text:p><text:p><text:span text:style-name="T21">Gustavo Borges reagiu com 📗: 2024-11-24 06:23 AM.</text:span></text:p></office:annotation>Judd, P., Albericio, J., Hetherington, T., Aamodt, T. M., Jerger, N. E., and Moshovos, A. (2016) “Proteus: Exploiting Numerical Precision Variability in Deep Neural Networks”, In: Proceedings of the 2016 International Conference on Supercomputing (ICS’16), Association for Computing Machinery, Article 23.<office:annotation-end office:name="__Annotation__336_1320090156"/></text:p>
      <text:p text:style-name="P30"><office:annotation office:name="__Annotation__340_1320090156"><dc:date>2024-11-24T14:35:53</dc:date><text:p><text:span text:style-name="T21">Uma reação no total.</text:span></text:p><text:p><text:span text:style-name="T21">Gustavo Borges reagiu com 🇨🇳: 2024-11-24 06:35 AM.</text:span></text:p></office:annotation>Le, T. D., Imai, H., Negishi, Y., and Kawachiya, K. (2018) “Tflms: Large model support in tensorflow by graph rewriting”, arXiv preprint arXiv:1807.02037.<office:annotation-end office:name="__Annotation__340_1320090156"/></text:p>
      <text:p text:style-name="P30"><text:soft-page-break/><office:annotation office:name="__Annotation__344_1320090156"><dc:date>2024-11-24T14:25:25</dc:date><text:p><text:span text:style-name="T21">Uma reação no total.</text:span></text:p><text:p><text:span text:style-name="T21">Gustavo Borges reagiu com 📙: 2024-11-24 06:25 AM.</text:span></text:p></office:annotation>Martens, J., and Sutskever, I. (2012) “Training deep and recurrent networks with hessian-free optimization”, In: Neural Networks: Tricks of the Trade, Springer.<office:annotation-end office:name="__Annotation__344_1320090156"/></text:p>
      <text:p text:style-name="P30"><office:annotation office:name="__Annotation__348_1320090156"><dc:date>2024-11-24T14:36:41</dc:date><text:p><text:span text:style-name="T21">Uma reação no total.</text:span></text:p><text:p><text:span text:style-name="T21">Gustavo Borges reagiu com 👲: 2024-11-24 06:36 AM.</text:span></text:p></office:annotation>Meng, C., Sun, M., Yang, J., Qiu, M., and Gu, Y. (2017) “Training deeper models by GPU memory optimization on TensorFlow”, In: Proc. of ML Systems Workshop in NIPS.<office:annotation-end office:name="__Annotation__348_1320090156"/></text:p>
      <text:p text:style-name="P30"><office:annotation office:name="__Annotation__352_1320090156"><dc:date>2024-12-01T18:23:32</dc:date><text:p><text:span text:style-name="T21">Uma reação no total.</text:span></text:p><text:p><text:span text:style-name="T21">Gustavo Borges reagiu com 🧠: 2024-12-01 10:23 AM.</text:span></text:p></office:annotation>Mirhoseini, A., Goldie, A., Pham, H., Steiner, B., Le, Q. V., and Dean, J. (2018) “A hierarchical model for device placement”.<office:annotation-end office:name="__Annotation__352_1320090156"/></text:p>
      <text:p text:style-name="P30"><office:annotation office:name="__Annotation__356_1320090156"><dc:date>2024-12-01T18:23:55</dc:date><text:p><text:span text:style-name="T21">Uma reação no total.</text:span></text:p><text:p><text:span text:style-name="T21">Gustavo Borges reagiu com 👁️: 2024-12-01 10:23 AM.</text:span></text:p></office:annotation>Mirhoseini, A., Pham, H., Le, Q. V., Steiner, B., Larsen, R., Zhou, Y., Kumar, N., Norouzi, M., Bengio, S., and Dean, J. (2017) “Device Placement Optimization with Reinforcement Learning”, In: Proceedings of the 34th International Conference on Machine Learning - Volume 70 (ICML’17), JMLR.org, pp. 2430–2439.<office:annotation-end office:name="__Annotation__356_1320090156"/></text:p>
      <text:p text:style-name="P30"><office:annotation office:name="__Annotation__360_1320090156"><dc:date>2024-11-24T14:46:06</dc:date><text:p><text:span text:style-name="T21">Uma reação no total.</text:span></text:p><text:p><text:span text:style-name="T21">Gustavo Borges reagiu com 🫀: 2024-11-24 06:46 AM.</text:span></text:p></office:annotation>NVIDIA. (2018) “NVIDIA TensorRT”, https://developer.nvidia.com/tensorrt.<office:annotation-end office:name="__Annotation__360_1320090156"/></text:p>
      <text:p text:style-name="P30"><office:annotation office:name="__Annotation__364_1320090156"><dc:date>2024-11-24T14:46:54</dc:date><text:p><text:span text:style-name="T21">Uma reação no total.</text:span></text:p><text:p><text:span text:style-name="T21">Gustavo Borges reagiu com 🧭: 2024-11-24 06:46 AM.</text:span></text:p></office:annotation>PCI-SIG. (2019) “PCI Express Base Specification Revision 5.0”, https://pcisig.com/specifications.<office:annotation-end office:name="__Annotation__364_1320090156"/></text:p>
      <text:p text:style-name="P30"><office:annotation office:name="__Annotation__368_1320090156"><dc:date>2024-11-24T14:49:38</dc:date><text:p><text:span text:style-name="T21">Uma reação no total.</text:span></text:p><text:p><text:span text:style-name="T21">Gustavo Borges reagiu com 👽: 2024-11-24 06:49 AM.</text:span></text:p></office:annotation>Rhu, M., Gimelshein, N., Clemons, J., Zulfiqar, A., and Keckler, S. W. (2016) “vDNN: Virtualized Deep Neural Networks for Scalable, Memory-Efficient Neural Network Design”, In: The 49th Annual IEEE/ACM International Symposium on Microarchitecture (MICRO’49), IEEE Press, Article 18.<office:annotation-end office:name="__Annotation__368_1320090156"/></text:p>
      <text:p text:style-name="P30"><office:annotation office:name="__Annotation__372_1320090156"><dc:date>2024-11-24T14:58:47</dc:date><text:p><text:span text:style-name="T21">Uma reação no total.</text:span></text:p><text:p><text:span text:style-name="T21">Gustavo Borges reagiu com 😆: 2024-11-24 06:58 AM.</text:span></text:p></office:annotation>Szegedy, C., Ioffe, S., Vanhoucke, V., and Alemi, A. A. (2017) “Inception-v4, Inception-ResNet and the Impact of Residual Connections on Learning”, In: Proceedings of the Thirty-First AAAI Conference on Artificial Intelligence (AAAI’17), AAAI Press, pp. 4278–4284.<office:annotation-end office:name="__Annotation__372_1320090156"/></text:p>
      <text:p text:style-name="P30"><office:annotation office:name="__Annotation__376_1320090156"><dc:date>2024-11-24T14:49:13</dc:date><text:p><text:span text:style-name="T21">Uma reação no total.</text:span></text:p><text:p><text:span text:style-name="T21">Gustavo Borges reagiu com ⚙️: 2024-11-24 06:49 AM.</text:span></text:p></office:annotation>Wang, L., Ye, J., Zhao, Y., Wu, W., Li, A., Song, S. L., Xu, Z., and Kraska, T. (2018) “Superneurons: Dynamic GPU Memory Management for Training Deep Neural Networks”, In: Proceedings of the 23rd ACM SIGPLAN Symposium on Principles and Practice of Parallel Programming (PPoPP’18).<office:annotation-end office:name="__Annotation__376_1320090156"/></text:p>
      <text:p text:style-name="P30"><office:annotation office:name="__Annotation__380_1320090156"><dc:date>2024-11-24T14:59:17</dc:date><text:p><text:span text:style-name="T21">Uma reação no total.</text:span></text:p><text:p><text:span text:style-name="T21">Gustavo Borges reagiu com 😶‍🌫️: 2024-11-24 06:59 AM.</text:span></text:p></office:annotation>Wu, Y., Schuster, M., Chen, Z., Le, Q. V., and Norouzi, M. (2016) “Google’s Neural Machine Translation System: Bridging the Gap between Human and Machine Translation”, arXiv preprint arXiv:1609.08144.<office:annotation-end office:name="__Annotation__380_1320090156"/></text:p>
      <text:p text:style-name="P30"><office:annotation office:name="__Annotation__384_1320090156"><dc:date>2024-11-24T14:48:15</dc:date><text:p><text:span text:style-name="T21">Uma reação no total.</text:span></text:p><text:p><text:span text:style-name="T21">Gustavo Borges reagiu com 🪬: 2024-11-24 06:48 AM.</text:span></text:p></office:annotation>Yu, Y., Abadi, M., Barham, P., Brevdo, E., Burrows, M., Davis, A., Dean, J., Ghemawat, S., Harley, T., Hawkins, P., and et al. (2018) “Dynamic Control Flow in Large-Scale Machine Learning”, In: Proceedings of the Thirteenth EuroSys Conference (EuroSys’18), Association for Computing Machinery, Article 18.<office:annotation-end office:name="__Annotation__384_1320090156"/></text:p>
      <text:p text:style-name="P30"><office:annotation office:name="__Annotation__388_1320090156"><dc:date>2024-11-24T14:59:47</dc:date><text:p><text:span text:style-name="T21">Uma reação no total.</text:span></text:p><text:p><text:span text:style-name="T21">Gustavo Borges reagiu com 🫂: 2024-11-24 06:59 AM.</text:span></text:p></office:annotation>Zagoruyko, S., and Komodakis, N. (2016) “Wide residual networks”, arXiv preprint arXiv:1605.07146.<office:annotation-end office:name="__Annotation__388_1320090156"/></text:p>
      <text:p text:style-name="P30"><office:annotation office:name="__Annotation__392_1320090156"><dc:date>2024-11-24T15:00:17</dc:date><text:p><text:span text:style-name="T21">Uma reação no total.</text:span></text:p><text:p><text:span text:style-name="T21">Gustavo Borges reagiu com 🪂: 2024-11-24 07:00 AM.</text:span></text:p></office:annotation>Zoph, B., Vasudevan, V., Shlens, J., and Le, Q. V. (2018) “Learning Transferable Architectures for Scalable Image Recognition”, In: 2018 IEEE/CVF Conference on Computer Vision and Pattern Recognition, pp. 8697–8710<office:annotation-end office:name="__Annotation__392_1320090156"/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" svg:font-family="Courier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1" svg:font-family="Courier" style:font-family-generic="system" style:font-pitch="variable"/>
    <style:font-face style:name="Linux Libertine G" svg:font-family="'Linux Libertine G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" fo:font-size="12pt" fo:language="en" fo:country="US" style:letter-kerning="false" style:font-name-asian="Times1" style:font-size-asian="12pt" style:language-asian="zh" style:country-asian="CN" style:font-name-complex="Time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" fo:font-size="12pt" fo:language="en" fo:country="US" style:letter-kerning="false" style:font-name-asian="Times1" style:font-size-asian="12pt" style:language-asian="zh" style:country-asian="CN" style:font-name-complex="Time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5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lways"/>
      <style:text-properties fo:font-variant="small-caps" fo:color="#000000" style:text-line-through-style="none" style:text-line-through-type="none" style:text-position="0% 100%" style:font-name="Times" fo:font-family="Times" style:font-family-generic="roman" style:font-pitch="variable" fo:font-size="14pt" fo:font-style="normal" style:text-underline-style="none" fo:font-weight="bold" style:font-name-asian="Times1" style:font-family-asian="Times" style:font-family-generic-asian="system" style:font-pitch-asian="variable" style:font-size-asian="14pt" style:font-style-asian="normal" style:font-weight-asian="bold" style:font-name-complex="Times1" style:font-family-complex="Times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665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Times" fo:font-family="Times" style:font-family-generic="roman" style:font-pitch="variable" fo:font-size="13pt" fo:font-style="normal" style:text-underline-style="none" fo:font-weight="bold" style:font-name-asian="Times1" style:font-family-asian="Times" style:font-family-generic-asian="system" style:font-pitch-asian="variable" style:font-size-asian="13pt" style:font-style-asian="normal" style:font-weight-asian="bold" style:font-name-complex="Times1" style:font-family-complex="Times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4925in" fo:margin-right="0in" fo:margin-top="0.1665in" fo:margin-bottom="0in" loext:contextual-spacing="false" fo:line-height="100%" fo:text-align="start" style:justify-single-word="false" fo:keep-together="auto" fo:orphans="2" fo:widows="2" fo:text-indent="-0.4925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Times" fo:font-family="Times" style:font-family-generic="roman" style:font-pitch="variable" fo:font-size="12pt" fo:font-style="normal" style:text-underline-style="none" fo:font-weight="bold" style:font-name-asian="Times1" style:font-family-asian="Times" style:font-family-generic-asian="system" style:font-pitch-asian="variable" style:font-size-asian="12pt" style:font-style-asian="normal" style:font-weight-asian="bold" style:font-name-complex="Times1" style:font-family-complex="Times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in" fo:margin-bottom="0in" loext:contextual-spacing="false" fo:line-height="100%" fo:text-align="justify" style:justify-single-word="false" fo:keep-together="auto" fo:orphans="2" fo:widows="2" fo:text-indent="-0.6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Times" fo:font-family="Times" style:font-family-generic="roman" style:font-pitch="variable" fo:font-size="12pt" fo:font-style="italic" style:text-underline-style="none" fo:font-weight="normal" style:font-name-asian="Times1" style:font-family-asian="Times" style:font-family-generic-asian="system" style:font-pitch-asian="variable" style:font-size-asian="12pt" style:font-style-asian="italic" style:font-weight-asian="normal" style:font-name-complex="Times1" style:font-family-complex="Times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in" fo:margin-bottom="0in" loext:contextual-spacing="false" fo:line-height="100%" fo:text-align="start" style:justify-single-word="false" fo:keep-together="auto" fo:orphans="2" fo:widows="2" fo:text-indent="-0.7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.8in" fo:margin-right="0in" fo:margin-top="0in" fo:margin-bottom="0in" loext:contextual-spacing="false" fo:line-height="100%" fo:text-align="center" style:justify-single-word="false" fo:keep-together="auto" fo:orphans="2" fo:widows="2" fo:text-indent="-0.8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Times" fo:font-family="Times" style:font-family-generic="roman" style:font-pitch="variable" fo:font-size="12pt" fo:font-style="italic" style:text-underline-style="none" fo:font-weight="bold" style:font-name-asian="Times1" style:font-family-asian="Times" style:font-family-generic-asian="system" style:font-pitch-asian="variable" style:font-size-asian="12pt" style:font-style-asian="italic" style:font-weight-asian="bold" style:font-name-complex="Times1" style:font-family-complex="Times" style:font-family-generic-complex="system" style:font-pitch-complex="variable" style:font-size-complex="12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1575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small-caps" fo:color="#000000" style:text-line-through-style="none" style:text-line-through-type="none" style:text-position="0% 100%" style:font-name="Times" fo:font-family="Times" style:font-family-generic="roman" style:font-pitch="variable" fo:font-size="18pt" fo:font-style="normal" style:text-underline-style="none" fo:font-weight="bold" style:font-name-asian="Times1" style:font-family-asian="Times" style:font-family-generic-asian="system" style:font-pitch-asian="variable" style:font-size-asian="18pt" style:font-style-asian="normal" style:font-weight-asian="bold" style:font-name-complex="Times1" style:font-family-complex="Times" style:font-family-generic-complex="system" style:font-pitch-complex="variable" style:font-size-complex="18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1575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small-caps" fo:color="#000000" style:text-line-through-style="none" style:text-line-through-type="none" style:text-position="0% 100%" style:font-name="Times" fo:font-family="Times" style:font-family-generic="roman" style:font-pitch="variable" fo:font-size="14pt" fo:font-style="italic" style:text-underline-style="none" fo:font-weight="bold" style:font-name-asian="Times1" style:font-family-asian="Times" style:font-family-generic-asian="system" style:font-pitch-asian="variable" style:font-size-asian="14pt" style:font-style-asian="italic" style:font-weight-asian="bold" style:font-name-complex="Times1" style:font-family-complex="Times" style:font-family-generic-complex="system" style:font-pitch-complex="variable" style:font-size-complex="14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style:font-name="Courier" fo:font-family="Courier" style:font-family-generic="roman" style:font-pitch="variable" fo:font-size="10pt" fo:font-style="italic" style:text-underline-style="none" fo:font-weight="normal" style:font-name-asian="Courier1" style:font-family-asian="Courier" style:font-family-generic-asian="system" style:font-pitch-asian="variable" style:font-size-asian="10pt" style:font-style-asian="italic" style:font-weight-asian="normal" style:font-name-complex="Courier1" style:font-family-complex="Courier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style:font-name="Courier" fo:font-family="Courier" style:font-family-generic="roman" style:font-pitch="variable" fo:font-size="10pt" fo:font-style="normal" style:text-underline-style="none" fo:font-weight="normal" style:font-name-asian="Courier1" style:font-family-asian="Courier" style:font-family-generic-asian="system" style:font-pitch-asian="variable" style:font-size-asian="10pt" style:font-style-asian="normal" style:font-weight-asian="normal" style:font-name-complex="Courier1" style:font-family-complex="Courier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953in" fo:margin-left="0.295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4925in" fo:margin-left="0.49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in" fo:margin-bottom="0.9839in" fo:margin-left="1.1807in" fo:margin-right="1.1811in" style:writing-mode="lr-tb" style:layout-grid-color="#c0c0c0" style:layout-grid-lines="2370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378in" fo:margin-left="0in" fo:margin-right="0in" fo:margin-bottom="1.339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  <style:master-page style:name="Converted15" style:page-layout-name="Mpm2"/>
    <style:master-page style:name="Converted16" style:page-layout-name="Mpm2"/>
    <style:master-page style:name="Converted17" style:page-layout-name="Mpm2"/>
    <style:master-page style:name="Converted18" style:page-layout-name="Mpm2"/>
    <style:master-page style:name="Converted19" style:page-layout-name="Mpm2"/>
    <style:master-page style:name="Converted20" style:page-layout-name="Mpm2"/>
    <style:master-page style:name="Converted21" style:page-layout-name="Mpm2"/>
    <style:master-page style:name="Converted22" style:page-layout-name="Mpm2"/>
    <style:master-page style:name="Converted23" style:page-layout-name="Mpm2"/>
    <style:master-page style:name="Converted24" style:page-layout-name="Mpm2"/>
    <style:master-page style:name="Converted25" style:page-layout-name="Mpm2"/>
    <style:master-page style:name="Converted26" style:page-layout-name="Mpm2"/>
    <style:master-page style:name="Converted27" style:page-layout-name="Mpm2"/>
    <style:master-page style:name="Converted28" style:page-layout-name="Mpm2"/>
    <style:master-page style:name="Converted29" style:page-layout-name="Mpm2"/>
    <style:master-page style:name="Converted30" style:page-layout-name="Mpm2"/>
    <style:master-page style:name="Converted31" style:page-layout-name="Mpm2"/>
    <style:master-page style:name="Converted32" style:page-layout-name="Mpm2"/>
    <style:master-page style:name="Converted33" style:page-layout-name="Mpm2"/>
    <style:master-page style:name="Converted34" style:page-layout-name="Mpm2"/>
    <style:master-page style:name="Converted35" style:page-layout-name="Mpm2"/>
    <style:master-page style:name="Converted36" style:page-layout-name="Mpm2"/>
    <style:master-page style:name="Converted37" style:page-layout-name="Mpm2"/>
    <style:master-page style:name="Converted38" style:page-layout-name="Mpm2"/>
    <style:master-page style:name="Converted39" style:page-layout-name="Mpm2"/>
    <style:master-page style:name="Converted40" style:page-layout-name="Mpm2"/>
    <style:master-page style:name="Converted4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2" meta:object-count="0" meta:page-count="4" meta:paragraph-count="93" meta:word-count="3337" meta:character-count="21658" meta:non-whitespace-character-count="18421"/>
    <meta:generator>LibreOfficeDev/6.0.5.2$Linux_X86_64 LibreOffice_project/</meta:generator>
    <meta:user-defined meta:name="Info 1">Info 1</meta:user-defined>
    <meta:user-defined meta:name="Info 2">Info 2</meta:user-defined>
    <meta:user-defined meta:name="Info 3">Info 3</meta:user-defined>
    <meta:user-defined meta:name="Info 4">Info 4</meta:user-defined>
  </office:meta>
</office:document-meta>
</file>