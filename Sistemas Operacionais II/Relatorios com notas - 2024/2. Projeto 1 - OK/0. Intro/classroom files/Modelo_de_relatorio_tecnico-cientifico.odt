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1405C1FF311C5C0917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title" style:master-page-name="Standard">
      <style:paragraph-properties style:page-number="auto"/>
      <style:text-properties officeooo:rsid="00195d0b" officeooo:paragraph-rsid="00195d0b"/>
    </style:style>
    <style:style style:name="P3" style:family="paragraph" style:parent-style-name="SBC_3a_title_3a_1">
      <style:text-properties officeooo:rsid="00195d0b" officeooo:paragraph-rsid="001b1e7a"/>
    </style:style>
    <style:style style:name="P4" style:family="paragraph" style:parent-style-name="SBC_3a_title_3a_1">
      <style:text-properties officeooo:rsid="00195d0b" officeooo:paragraph-rsid="00195d0b"/>
    </style:style>
    <style:style style:name="T1" style:family="text">
      <style:text-properties style:text-position="super 58%"/>
    </style:style>
    <style:style style:name="T2" style:family="text">
      <style:text-properties style:text-position="super 58%" officeooo:rsid="00195d0b"/>
    </style:style>
    <style:style style:name="T3" style:family="text">
      <style:text-properties fo:font-style="italic" style:font-style-asian="italic" style:font-style-complex="italic"/>
    </style:style>
    <style:style style:name="T4" style:family="text">
      <style:text-properties officeooo:rsid="00195d0b"/>
    </style:style>
    <style:style style:name="T5" style:family="text">
      <style:text-properties officeooo:rsid="001b1e7a"/>
    </style:style>
    <style:style style:name="T6" style:family="text">
      <style:text-properties officeooo:rsid="001d2a7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TRABALHO</text:span> XX: TÍTULO DO <text:span text:style-name="T6">TRABALHO</text:span></text:p>
      <text:p text:style-name="SBC_3a_author_28_s_29_">Luciana P. Nedel<text:span text:style-name="T1">1</text:span>, Rafael H. Bordini<text:span text:style-name="T2">1</text:span>, Flávio Rech Wagner<text:span text:style-name="T1">1</text:span>, Jomi F. Hübner<text:span text:style-name="T2">1</text:span></text:p>
      <text:p text:style-name="SBC_3a_institution"><text:span text:style-name="T1">1</text:span><text:span text:style-name="T4">Departamento de Ciência da Computação</text:span> – Universidade Federal d<text:span text:style-name="T4">e Goiás</text:span> (UFG)</text:p>
      <text:p text:style-name="SBC_3a_email">{nedel,flavio}@inf.ufrgs.br, R.Bordini@durham.ac.uk, jomi@inf.furb.br</text:p>
      <text:p text:style-name="SBC_3a_resumo"/>
      <text:h text:style-name="P3" text:outline-level="1">Tarefa 1</text:h>
      <text:p text:style-name="SBC_3a_paragraph">...</text:p>
      <text:h text:style-name="P3" text:outline-level="1">Tarefa 2</text:h>
      <text:p text:style-name="SBC_3a_paragraph">...</text:p>
      <text:h text:style-name="P3" text:outline-level="1">Tarefa <text:span text:style-name="T5">3</text:span></text:h>
      <text:p text:style-name="SBC_3a_paragraph_3a_first"><text:tab/>...</text:p>
      <text:h text:style-name="P4" text:outline-level="1">Etc</text:h>
      <text:p text:style-name="SBC_3a_paragraph_3a_first"><text:tab/>...</text:p>
      <text:h text:style-name="SBC_3a_title_3a_1" text:outline-level="1">Figur<text:span text:style-name="T4">a</text:span>s <text:span text:style-name="T4">e</text:span> <text:span text:style-name="T4">Citações</text:span></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5C1FF311C5C09177.png" xlink:type="simple" xlink:show="embed" xlink:actuate="onLoad" loext:mime-type="image/png"/></draw:frame></text:p>
      <text:p text:style-name="P1">Figure 1. A typical figure</text:p>
      <text:h text:style-name="SBC_3a_title_3a_1" text:outline-level="1">References</text:h>
      <text:p text:style-name="SBC_3a_paragraph_3a_first">Bibliographic references must be unambiguous and uniform. <text:s/>We recommend giving the <text:soft-page-break/>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3">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MacOSX_X86_64 LibreOffice_project/2b840030fec2aae0fd2658d8d4f9548af4e3518d</meta:generator>
    <meta:creation-date>2010-08-03T10:11:27.48</meta:creation-date>
    <dc:language>pt-BR</dc:language>
    <meta:editing-cycles>6</meta:editing-cycles>
    <meta:editing-duration>PT1M43S</meta:editing-duration>
    <dc:date>2019-04-16T10:19:00.096134672</dc:date>
    <dc:creator>NONE</dc:creator>
    <meta:document-statistic meta:table-count="0" meta:image-count="1" meta:object-count="0" meta:page-count="2" meta:paragraph-count="25" meta:word-count="285" meta:character-count="1864" meta:non-whitespace-character-count="1606"/>
    <meta:user-defined meta:name="Info 1"/>
    <meta:user-defined meta:name="Info 2"/>
    <meta:user-defined meta:name="Info 3"/>
    <meta:user-defined meta:name="Info 4"/>
  </office:meta>
</office:document-meta>
</file>