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92C3BDD4F2E7ECEEF0.png" manifest:media-type="image/png"/>
  <manifest:file-entry manifest:full-path="Pictures/10000201000003C5000001C554DEB1F60F1574EF.png" manifest:media-type="image/png"/>
  <manifest:file-entry manifest:full-path="Pictures/10000201000004E6000002293A852825067C59BB.png" manifest:media-type="image/png"/>
  <manifest:file-entry manifest:full-path="Pictures/10000201000004F200000187B635AB09C16D8AC2.png" manifest:media-type="image/png"/>
  <manifest:file-entry manifest:full-path="Pictures/10000201000004ED00000139FD9832AE8E82580A.png" manifest:media-type="image/png"/>
  <manifest:file-entry manifest:full-path="Pictures/10000201000002DC00000187F8E0D049C1158FB6.png" manifest:media-type="image/png"/>
  <manifest:file-entry manifest:full-path="Pictures/10000000000002CA000001CA318842CC09C0C3CC.png" manifest:media-type="image/png"/>
  <manifest:file-entry manifest:full-path="Pictures/10000201000004F2000000E36F7E00DF4C108880.png" manifest:media-type="image/png"/>
  <manifest:file-entry manifest:full-path="Pictures/10000000000002C700000192E6FF7535FA386403.png" manifest:media-type="image/png"/>
  <manifest:file-entry manifest:full-path="Pictures/10000000000002C700000192C3847827421D3FB0.png" manifest:media-type="image/png"/>
  <manifest:file-entry manifest:full-path="Pictures/10000201000003540000018DAA2F52D35C95A759.png" manifest:media-type="image/png"/>
  <manifest:file-entry manifest:full-path="Pictures/10000000000005030000035E366D394F87E79B6A.png" manifest:media-type="image/png"/>
  <manifest:file-entry manifest:full-path="Pictures/1000020100000274000001EEB9850E71D8442390.png" manifest:media-type="image/png"/>
  <manifest:file-entry manifest:full-path="Pictures/10000000000002C400000192B3A34382052F681D.png" manifest:media-type="image/png"/>
  <manifest:file-entry manifest:full-path="Pictures/100002010000077C000004371B28F5CEE6DA16BD.png" manifest:media-type="image/png"/>
  <manifest:file-entry manifest:full-path="Pictures/10000000000002C50000019223B15DD4A1ED30D0.png" manifest:media-type="image/png"/>
  <manifest:file-entry manifest:full-path="Pictures/10000201000004F1000001A8A5B1AF4FD5B04C48.png" manifest:media-type="image/png"/>
  <manifest:file-entry manifest:full-path="Pictures/10000201000004EB00000233B8E84A7DCE9D104E.png" manifest:media-type="image/png"/>
  <manifest:file-entry manifest:full-path="Pictures/1000000000000227000001005EA8E1BA80BC19CE.png" manifest:media-type="image/png"/>
  <manifest:file-entry manifest:full-path="Pictures/10000201000001FD00000213AEB2960AD6D4D446.png" manifest:media-type="image/png"/>
  <manifest:file-entry manifest:full-path="Pictures/10000201000003380000019872AFEEF64B1103E8.png" manifest:media-type="image/png"/>
  <manifest:file-entry manifest:full-path="Pictures/1000000000000508000002F68002E0D1510DDE18.png" manifest:media-type="image/png"/>
  <manifest:file-entry manifest:full-path="Pictures/100002010000032C0000018B8ACE5E9EF708B2AC.png" manifest:media-type="image/png"/>
  <manifest:file-entry manifest:full-path="Pictures/100002010000077F00000437250514ECF3E1987C.png" manifest:media-type="image/png"/>
  <manifest:file-entry manifest:full-path="Pictures/10000201000004ED00000137048E7332B33BE848.png" manifest:media-type="image/png"/>
  <manifest:file-entry manifest:full-path="Pictures/1000020100000722000002412EA37ACEFB47E3C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1654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1654in" fo:margin-bottom="0in" loext:contextual-spacing="false" fo:line-height="100%" fo:text-align="center" style:justify-single-word="false" fo:keep-together="auto" fo:orphans="0" fo:widows="0" fo:text-indent="0in" style:auto-text-indent="false" style:page-number="1" fo:break-before="auto" fo:break-after="auto" fo:padding="0in" fo:border="none" fo:keep-with-next="auto"/>
    </style:style>
    <style:style style:name="P3" style:family="paragraph" style:parent-style-name="Standard">
      <style:paragraph-properties fo:margin-left="0in" fo:margin-right="0in" fo:margin-top="0.0827in" fo:margin-bottom="0.0827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in" fo:margin-right="0in" fo:margin-top="0.0827in" fo:margin-bottom="0.0827in" loext:contextual-spacing="false" fo:line-height="200%" fo:text-align="center"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0827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6" style:family="paragraph" style:parent-style-name="Standard">
      <style:paragraph-properties fo:margin-left="0in" fo:margin-right="0in" fo:margin-top="0.0827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7" style:family="paragraph" style:parent-style-name="Standard">
      <style:paragraph-properties fo:margin-left="0in" fo:margin-right="0in" fo:margin-top="0.0827in" fo:margin-bottom="0in" loext:contextual-spacing="false" fo:line-height="150%" fo:text-align="center" style:justify-single-word="false" fo:keep-together="auto" fo:orphans="0" fo:widows="0" fo:text-indent="0in" style:auto-text-indent="false" fo:break-before="auto" fo:break-after="auto" fo:padding="0in" fo:border="none" fo:keep-with-next="auto"/>
    </style:style>
    <style:style style:name="P8" style:family="paragraph" style:parent-style-name="Standard" style:list-style-name="WWNum2">
      <style:paragraph-properties fo:margin-left="0.2953in" fo:margin-right="0in" fo:margin-top="0.1654in" fo:margin-bottom="0in" loext:contextual-spacing="false" fo:line-height="100%" fo:text-align="start" style:justify-single-word="false" fo:keep-together="auto" fo:orphans="0" fo:widows="0" fo:text-indent="-0.2953in" style:auto-text-indent="false" fo:break-before="auto" fo:break-after="auto" fo:padding="0in" fo:border="none" fo:keep-with-next="always"/>
    </style:style>
    <style:style style:name="P9" style:family="paragraph" style:parent-style-name="Standard" style:list-style-name="WWNum2">
      <style:paragraph-properties fo:margin-left="0.3937in" fo:margin-right="0in" fo:margin-top="0.1654in" fo:margin-bottom="0in" loext:contextual-spacing="false" fo:line-height="100%" fo:text-align="start" style:justify-single-word="false" fo:keep-together="auto" fo:orphans="0" fo:widows="0" fo:text-indent="-0.3937in" style:auto-text-indent="false" fo:break-before="auto" fo:break-after="auto" fo:padding="0in" fo:border="none" fo:keep-with-next="always"/>
    </style:style>
    <style:style style:name="P10" style:family="paragraph" style:parent-style-name="Standard" style:list-style-name="WWNum2" style:master-page-name="Converted1">
      <style:paragraph-properties fo:margin-left="0.3937in" fo:margin-right="0in" fo:margin-top="0.1654in" fo:margin-bottom="0in" loext:contextual-spacing="false" fo:line-height="100%" fo:text-align="start" style:justify-single-word="false" fo:keep-together="auto" fo:orphans="0" fo:widows="0" fo:text-indent="-0.3937in" style:auto-text-indent="false" style:page-number="auto" fo:break-before="auto" fo:break-after="auto" fo:padding="0in" fo:border="none" fo:keep-with-next="always"/>
    </style:style>
    <style:style style:name="P11" style:family="paragraph" style:parent-style-name="Standard">
      <style:paragraph-properties fo:margin-left="0in" fo:margin-right="0in" fo:margin-top="0.0827in" fo:margin-bottom="0in" loext:contextual-spacing="false" fo:line-height="100%" fo:text-align="justify" style:justify-single-word="false" fo:keep-together="auto" fo:orphans="0" fo:widows="0" fo:text-indent="0.2957in" style:auto-text-indent="false" fo:break-before="auto" fo:break-after="auto" fo:padding="0in" fo:border="none" fo:keep-with-next="auto"/>
    </style:style>
    <style:style style:name="P12" style:family="paragraph" style:parent-style-name="Standard">
      <style:paragraph-properties fo:margin-left="0in" fo:margin-right="0in" fo:margin-top="0.0827in" fo:margin-bottom="0in" loext:contextual-spacing="false" fo:line-height="100%" fo:text-align="center" style:justify-single-word="false" fo:keep-together="auto" fo:orphans="0" fo:widows="0" fo:text-indent="0.2957in" style:auto-text-indent="false" fo:break-before="auto" fo:break-after="auto" fo:padding="0in" fo:border="none" fo:keep-with-next="auto"/>
    </style:style>
    <style:style style:name="P13" style:family="paragraph" style:parent-style-name="Standard">
      <style:paragraph-properties fo:margin-left="0in" fo:margin-right="0in" fo:margin-top="0.0827in" fo:margin-bottom="0in" loext:contextual-spacing="false" fo:line-height="150%" fo:text-align="center" style:justify-single-word="false" fo:keep-together="auto" fo:orphans="0" fo:widows="0" fo:text-indent="0.2957in" style:auto-text-indent="false" fo:break-before="auto" fo:break-after="auto" fo:padding="0in" fo:border="none" fo:keep-with-next="auto"/>
    </style:style>
    <style:style style:name="P14" style:family="paragraph" style:parent-style-name="Standard">
      <style:paragraph-properties fo:margin-left="0in" fo:margin-right="0in" fo:margin-top="0in" fo:margin-bottom="0.1665in" loext:contextual-spacing="false" fo:line-height="100%" fo:text-align="justify" style:justify-single-word="false" fo:keep-together="auto" fo:orphans="0" fo:widows="0" fo:text-indent="0.2957in" style:auto-text-indent="false" fo:break-before="auto" fo:break-after="auto" fo:padding="0in" fo:border="none" fo:keep-with-next="auto"/>
    </style:style>
    <style:style style:name="P15" style:family="paragraph" style:parent-style-name="Standard">
      <style:paragraph-properties fo:margin-left="0.3154in" fo:margin-right="0.3154in" fo:margin-top="0.0827in" fo:margin-bottom="0.0827in" loext:contextual-spacing="false" fo:line-height="200%" fo:text-align="center" style:justify-single-word="false" fo:keep-together="auto" fo:orphans="2" fo:widows="2" fo:text-indent="0in" style:auto-text-indent="false" fo:break-before="auto" fo:break-after="auto" fo:padding="0in" fo:border="none" fo:keep-with-next="auto"/>
    </style:style>
    <style:style style:name="P16" style:family="paragraph" style:parent-style-name="Standard">
      <style:paragraph-properties fo:margin-left="0.3154in" fo:margin-right="0.3154in" fo:margin-top="0.0827in" fo:margin-bottom="0.0827in" loext:contextual-spacing="false" fo:line-height="200%" fo:text-align="center" style:justify-single-word="false" fo:orphans="2" fo:widows="2" fo:text-indent="0in" style:auto-text-indent="false"/>
    </style:style>
    <style:style style:name="P17" style:family="paragraph" style:parent-style-name="Standard">
      <style:paragraph-properties fo:margin-left="0.3154in" fo:margin-right="0.3154in" fo:margin-top="0in" fo:margin-bottom="0in" loext:contextual-spacing="false" fo:line-height="100%" fo:text-align="center" style:justify-single-word="false" fo:keep-together="always" fo:orphans="2" fo:widows="2" fo:text-indent="0in" style:auto-text-indent="false" fo:break-before="auto" fo:break-after="auto" fo:padding="0in" fo:border="none" fo:keep-with-next="auto"/>
    </style:style>
    <style:style style:name="P18" style:family="paragraph" style:parent-style-name="Standard">
      <style:paragraph-properties fo:margin-left="0.3154in" fo:margin-right="0.3154in" fo:margin-top="0.139in" fo:margin-bottom="0.139in" loext:contextual-spacing="false" fo:line-height="115%" fo:text-align="center" style:justify-single-word="false" fo:keep-together="always" fo:orphans="2" fo:widows="2" fo:text-indent="0in" style:auto-text-indent="false"/>
    </style:style>
    <style:style style:name="P19" style:family="paragraph" style:parent-style-name="Standard">
      <style:paragraph-properties fo:margin-left="0in" fo:margin-right="0.3154in" fo:margin-top="0in" fo:margin-bottom="0.0827in" loext:contextual-spacing="false" fo:line-height="200%" fo:text-align="center" style:justify-single-word="false" fo:orphans="2" fo:widows="2" fo:text-indent="0in" style:auto-text-indent="false"/>
    </style:style>
    <style:style style:name="P20" style:family="paragraph" style:parent-style-name="Standard">
      <style:paragraph-properties fo:margin-left="0in" fo:margin-right="0.3154in" fo:margin-top="0.0827in" fo:margin-bottom="0.0827in" loext:contextual-spacing="false" fo:line-height="200%" fo:text-align="center" style:justify-single-word="false" fo:keep-together="auto" fo:orphans="2" fo:widows="2" fo:text-indent="0in" style:auto-text-indent="false" fo:break-before="auto" fo:break-after="auto" fo:padding="0in" fo:border="none" fo:keep-with-next="auto"/>
    </style:style>
    <style:style style:name="P21" style:family="paragraph" style:parent-style-name="Standard">
      <style:paragraph-properties fo:margin-left="0in" fo:margin-right="0.3154in" fo:margin-top="0.0827in" fo:margin-bottom="0.0827in" loext:contextual-spacing="false" fo:line-height="200%" fo:text-align="center" style:justify-single-word="false" fo:orphans="2" fo:widows="2" fo:text-indent="0in" style:auto-text-indent="false"/>
    </style:style>
    <style:style style:name="P22" style:family="paragraph" style:parent-style-name="Standard" style:list-style-name="WWNum3">
      <style:paragraph-properties fo:margin-left="0.5in" fo:margin-right="0in" fo:margin-top="0.0827in" fo:margin-bottom="0in" loext:contextual-spacing="false" fo:line-height="100%" fo:text-align="justify" style:justify-single-word="false" fo:keep-together="auto" fo:orphans="0" fo:widows="0" fo:text-indent="-0.25in" style:auto-text-indent="false" fo:break-before="auto" fo:break-after="auto" fo:padding="0in" fo:border="none" fo:keep-with-next="auto"/>
    </style:style>
    <style:style style:name="P23" style:family="paragraph" style:parent-style-name="Standard">
      <style:paragraph-properties fo:margin-left="0.5in" fo:margin-right="0in" fo:margin-top="0.0827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5in" fo:margin-right="0in" fo:margin-top="0.0827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tyle="italic" style:font-style-asian="italic"/>
    </style:style>
    <style:style style:name="P25" style:family="paragraph" style:parent-style-name="Standard">
      <style:paragraph-properties fo:margin-left="0.5in" fo:margin-right="0in" fo:margin-top="0.0827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weight="bold" style:font-weight-asian="bold"/>
    </style:style>
    <style:style style:name="P26" style:family="paragraph" style:parent-style-name="Standard">
      <style:paragraph-properties fo:margin-left="0.5in" fo:margin-right="0in" fo:margin-top="0.0827in" fo:margin-bottom="0in" loext:contextual-spacing="false" fo:line-height="100%" fo:text-align="justify" style:justify-single-word="false" fo:text-indent="0in" style:auto-text-indent="false"/>
    </style:style>
    <style:style style:name="P27" style:family="paragraph" style:parent-style-name="Standard">
      <style:paragraph-properties fo:margin-left="0.5in" fo:margin-right="0in" fo:margin-top="0.0827in" fo:margin-bottom="0in" loext:contextual-spacing="false" fo:line-height="100%" fo:text-align="justify" style:justify-single-word="false" fo:text-indent="0in" style:auto-text-indent="false"/>
      <style:text-properties fo:font-style="italic" style:font-style-asian="italic"/>
    </style:style>
    <style:style style:name="P28" style:family="paragraph" style:parent-style-name="Standard">
      <style:paragraph-properties fo:margin-left="0.5in" fo:margin-right="0in" fo:margin-top="0.0827in" fo:margin-bottom="0in" loext:contextual-spacing="false" fo:line-height="100%" fo:text-align="justify" style:justify-single-word="false" fo:text-indent="0in" style:auto-text-indent="false"/>
      <style:text-properties fo:font-weight="bold" style:font-weight-asian="bold"/>
    </style:style>
    <style:style style:name="P29" style:family="paragraph" style:parent-style-name="Standard">
      <style:paragraph-properties fo:margin-left="0.5in" fo:margin-right="0in" fo:margin-top="0in" fo:margin-bottom="0.1665in" loext:contextual-spacing="false" fo:line-height="100%" fo:text-align="justify" style:justify-single-word="false" fo:text-indent="0in" style:auto-text-indent="false"/>
    </style:style>
    <style:style style:name="P30" style:family="paragraph" style:parent-style-name="Standard" style:list-style-name="WWNum3">
      <style:paragraph-properties fo:margin-left="0.5in" fo:margin-right="0in" fo:margin-top="0.0827in" fo:margin-bottom="0in" loext:contextual-spacing="false" fo:line-height="100%" fo:text-align="justify" style:justify-single-word="false" fo:text-indent="-0.25in" style:auto-text-indent="false"/>
    </style:style>
    <style:style style:name="P31" style:family="paragraph" style:parent-style-name="Standard" style:list-style-name="WWNum1">
      <style:paragraph-properties fo:margin-left="0.5in" fo:margin-right="0in" fo:margin-top="0.0827in" fo:margin-bottom="0in" loext:contextual-spacing="false" fo:line-height="100%" fo:text-align="justify" style:justify-single-word="false" fo:text-indent="-0.25in" style:auto-text-indent="false"/>
    </style:style>
    <style:style style:name="P32" style:family="paragraph" style:parent-style-name="Standard">
      <style:paragraph-properties fo:margin-left="0in" fo:margin-right="0in" fo:margin-top="0.0827in" fo:margin-bottom="0in" loext:contextual-spacing="false" fo:line-height="100%" fo:text-align="justify" style:justify-single-word="false" fo:text-indent="0.2953in" style:auto-text-indent="false"/>
    </style:style>
    <style:style style:name="P33" style:family="paragraph" style:parent-style-name="Standard">
      <style:paragraph-properties fo:margin-left="0in" fo:margin-right="0in" fo:margin-top="0.0827in" fo:margin-bottom="0in" loext:contextual-spacing="false" fo:line-height="100%" fo:text-align="center" style:justify-single-word="false" fo:text-indent="0.2957in" style:auto-text-indent="false"/>
    </style:style>
    <style:style style:name="P34" style:family="paragraph" style:parent-style-name="Standard">
      <style:paragraph-properties fo:margin-left="0in" fo:margin-right="0in" fo:margin-top="0.0827in" fo:margin-bottom="0in" loext:contextual-spacing="false" fo:line-height="100%" fo:text-align="justify" style:justify-single-word="false" fo:text-indent="0.2957in" style:auto-text-indent="false"/>
    </style:style>
    <style:style style:name="P35" style:family="paragraph" style:parent-style-name="Standard">
      <style:paragraph-properties fo:margin-left="0in" fo:margin-right="0in" fo:margin-top="0in" fo:margin-bottom="0.1665in" loext:contextual-spacing="false" fo:line-height="100%" fo:text-align="justify" style:justify-single-word="false" fo:text-indent="0in" style:auto-text-indent="false"/>
    </style:style>
    <style:style style:name="P36" style:family="paragraph" style:parent-style-name="Standard">
      <style:paragraph-properties fo:margin-left="0in" fo:margin-right="0in" fo:margin-top="0.0827in" fo:margin-bottom="0in" loext:contextual-spacing="false" fo:line-height="100%" fo:text-align="justify" style:justify-single-word="false" fo:text-indent="0in" style:auto-text-indent="false"/>
      <style:text-properties fo:font-weight="bold" style:font-weight-asian="bold"/>
    </style:style>
    <style:style style:name="P37" style:family="paragraph" style:parent-style-name="Standard">
      <style:paragraph-properties fo:margin-left="0in" fo:margin-right="0in" fo:margin-top="0.0827in" fo:margin-bottom="0in" loext:contextual-spacing="false" fo:line-height="100%" fo:text-align="justify" style:justify-single-word="false" fo:text-indent="0in" style:auto-text-indent="false"/>
    </style:style>
    <style:style style:name="P38" style:family="paragraph" style:parent-style-name="Standard">
      <style:paragraph-properties fo:margin-left="0in" fo:margin-right="0in" fo:margin-top="0.0827in" fo:margin-bottom="0in" loext:contextual-spacing="false" fo:line-height="100%" fo:text-align="justify" style:justify-single-word="false" fo:keep-together="auto" fo:orphans="0" fo:widows="0" fo:text-indent="0.4925in" style:auto-text-indent="false" fo:break-before="auto" fo:break-after="auto" fo:padding="0in" fo:border="none" fo:keep-with-next="auto"/>
    </style:style>
    <style:style style:name="P39" style:family="paragraph" style:parent-style-name="Standard">
      <style:paragraph-properties fo:margin-left="0in" fo:margin-right="0in" fo:margin-top="0.0827in" fo:margin-bottom="0in" loext:contextual-spacing="false" fo:line-height="100%" fo:text-align="justify" style:justify-single-word="false" fo:keep-together="auto" fo:orphans="0" fo:widows="0" fo:text-indent="0.4925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40" style:family="paragraph" style:parent-style-name="Standard">
      <style:paragraph-properties fo:margin-left="0in" fo:margin-right="0in" fo:margin-top="0in" fo:margin-bottom="0.1665in" loext:contextual-spacing="false" fo:line-height="100%" fo:text-align="justify" style:justify-single-word="false" fo:keep-together="auto" fo:orphans="0" fo:widows="0" fo:text-indent="0.4925in" style:auto-text-indent="false" fo:break-before="auto" fo:break-after="auto" fo:padding="0in" fo:border="none" fo:keep-with-next="auto"/>
    </style:style>
    <style:style style:name="P41" style:family="paragraph" style:parent-style-name="Standard">
      <style:paragraph-properties fo:margin-left="0.7957in" fo:margin-right="0in" fo:margin-top="0.0827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42" style:family="paragraph" style:parent-style-name="Standard">
      <style:paragraph-properties fo:margin-left="0.7957in" fo:margin-right="0in" fo:margin-top="0.0827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tyle="italic" style:font-style-asian="italic"/>
    </style:style>
    <style:style style:name="P43" style:family="paragraph" style:parent-style-name="Standard">
      <style:paragraph-properties fo:margin-left="0in" fo:margin-right="0.3154in" fo:margin-top="0.0827in" fo:margin-bottom="0.0827in" loext:contextual-spacing="false" fo:line-height="200%" fo:text-align="center" style:justify-single-word="false" fo:orphans="2" fo:widows="2" fo:text-indent="0in" style:auto-text-indent="false"/>
    </style:style>
    <style:style style:name="P44" style:family="paragraph" style:parent-style-name="Standard">
      <style:paragraph-properties fo:margin-left="0in" fo:margin-right="0in" fo:margin-top="0.0827in" fo:margin-bottom="0in" loext:contextual-spacing="false" fo:line-height="100%" fo:text-align="justify" style:justify-single-word="false" fo:keep-together="auto" fo:orphans="0" fo:widows="0" fo:text-indent="0.2953in" style:auto-text-indent="false" fo:break-before="auto" fo:break-after="auto" fo:padding="0in" fo:border="none" fo:keep-with-next="auto"/>
    </style:style>
    <style:style style:name="P45" style:family="paragraph" style:parent-style-name="Standard">
      <style:paragraph-properties fo:margin-left="0in" fo:margin-right="0in" fo:margin-top="0.0827in" fo:margin-bottom="0in" loext:contextual-spacing="false" fo:line-height="100%" fo:text-align="justify" style:justify-single-word="false" fo:text-indent="0.4925in" style:auto-text-indent="false"/>
    </style:style>
    <style:style style:name="P46" style:family="paragraph" style:parent-style-name="Standard">
      <style:paragraph-properties fo:margin-top="0.0827in" fo:margin-bottom="0in" loext:contextual-spacing="false" fo:line-height="100%" fo:text-align="justify" style:justify-single-word="false"/>
    </style:style>
    <style:style style:name="T1" style:family="text">
      <style:text-properties fo:font-variant="normal" fo:text-transform="none" fo:color="#000000" style:text-line-through-style="none" style:text-line-through-type="none" style:text-position="0% 100%" style:font-name="Times" fo:font-size="16pt" fo:font-style="normal" style:text-underline-style="none" fo:font-weight="bold" style:font-name-asian="Times1" style:font-size-asian="16pt" style:font-style-asian="normal" style:font-weight-asian="bold" style:font-name-complex="Times1" style:font-size-complex="16pt"/>
    </style:style>
    <style:style style:name="T2" style:family="text">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T3" style:family="text">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4" style:family="text">
      <style:text-properties fo:font-variant="normal" fo:text-transform="none" fo:color="#000000" style:text-line-through-style="none" style:text-line-through-type="none" style:text-position="0% 100%" style:font-name="Times" fo:font-size="12pt" fo:font-style="normal" style:text-underline-style="none" style:font-name-asian="Times1" style:font-size-asian="12pt" style:font-style-asian="normal" style:font-name-complex="Times1" style:font-size-complex="12pt"/>
    </style:style>
    <style:style style:name="T5" style:family="text">
      <style:text-properties fo:font-variant="normal" fo:text-transform="none" fo:color="#000000" style:text-line-through-style="none" style:text-line-through-type="none" style:text-position="0% 100%" style:font-name="Times" fo:font-size="13pt" fo:font-style="normal" style:text-underline-style="none" fo:font-weight="bold" style:font-name-asian="Times1" style:font-size-asian="13pt" style:font-style-asian="normal" style:font-weight-asian="bold" style:font-name-complex="Times1" style:font-size-complex="13pt"/>
    </style:style>
    <style:style style:name="T6" style:family="text">
      <style:text-properties fo:font-variant="normal" fo:text-transform="none" fo:color="#0000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T7" style:family="text">
      <style:text-properties fo:font-variant="normal" fo:text-transform="none" fo:color="#000000" style:text-line-through-style="none" style:text-line-through-type="none" style:text-position="0% 100%" fo:font-size="13pt" fo:font-style="normal" style:text-underline-style="none" fo:font-weight="bold" style:font-size-asian="13pt" style:font-style-asian="normal" style:font-weight-asian="bold" style:font-size-complex="13pt"/>
    </style:style>
    <style:style style:name="T8" style:family="text">
      <style:text-properties fo:font-variant="normal" fo:text-transform="none" fo:color="#000000" style:text-line-through-style="none" style:text-line-through-type="none" style:text-position="0% 100%" fo:font-size="13pt" fo:font-style="normal" fo:font-weight="bold" style:font-size-asian="13pt" style:font-style-asian="normal" style:font-weight-asian="bold" style:font-size-complex="13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1" style:family="text">
      <style:text-properties fo:font-variant="normal" fo:text-transform="none" fo:color="#000000" style:text-line-through-style="none" style:text-line-through-type="none" style:text-position="0% 100%" fo:font-size="12pt" fo:font-style="normal" fo:font-weight="bold" style:font-size-asian="12pt" style:font-style-asian="normal" style:font-weight-asian="bold" style:font-size-complex="12pt"/>
    </style:style>
    <style:style style:name="T12" style:family="text">
      <style:text-properties fo:font-variant="normal" fo:text-transform="none" fo:color="#000000" style:text-line-through-style="none" style:text-line-through-type="none" style:text-position="0% 100%" fo:font-size="12pt" fo:font-style="italic" style:text-underline-style="none" fo:font-weight="bold" style:font-size-asian="12pt" style:font-style-asian="italic" style:font-weight-asian="bold" style:font-size-complex="12pt"/>
    </style:style>
    <style:style style:name="T13" style:family="text">
      <style:text-properties fo:font-variant="normal" fo:text-transform="none" fo:color="#000000" style:text-line-through-style="none" style:text-line-through-type="none" style:text-position="0% 100%" fo:font-size="12pt" fo:font-style="italic" style:text-underline-style="none" style:font-size-asian="12pt" style:font-style-asian="italic" style:font-size-complex="12pt"/>
    </style:style>
    <style:style style:name="T14" style:family="text">
      <style:text-properties fo:font-variant="normal" fo:text-transform="none" fo:color="#000000" style:text-line-through-style="none" style:text-line-through-type="none" style:text-position="super 58%" style:font-name="Times" fo:font-size="13pt" fo:font-style="normal" style:text-underline-style="none" fo:font-weight="bold" style:font-name-asian="Times1" style:font-size-asian="13pt" style:font-style-asian="normal" style:font-weight-asian="bold" style:font-name-complex="Times1" style:font-size-complex="13pt"/>
    </style:style>
    <style:style style:name="T15" style:family="text">
      <style:text-properties fo:font-variant="normal" fo:text-transform="none" fo:color="#000000" style:text-line-through-style="none" style:text-line-through-type="none" style:text-position="super 58%" style:font-name="Times" fo:font-size="13pt" fo:font-style="normal" style:text-underline-style="none" fo:font-weight="normal" style:font-name-asian="Times1" style:font-size-asian="13pt" style:font-style-asian="normal" style:font-weight-asian="normal" style:font-name-complex="Times1" style:font-size-complex="13pt"/>
    </style:style>
    <style:style style:name="T16" style:family="text">
      <style:text-properties fo:font-variant="normal" fo:text-transform="none" fo:color="#000000" style:text-line-through-style="none" style:text-line-through-type="none" style:text-position="super 58%"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T17" style:family="text">
      <style:text-properties fo:font-variant="normal" fo:text-transform="none" fo:color="#0563c1" style:text-line-through-style="none" style:text-line-through-type="none" style:text-position="0% 100%" fo:font-size="12pt" fo:font-style="normal" style:text-underline-style="solid" style:text-underline-width="auto" style:text-underline-color="font-color" style:font-size-asian="12pt" style:font-style-asian="normal" style:font-size-complex="12pt"/>
    </style:style>
    <style:style style:name="T18" style:family="text">
      <style:text-properties fo:color="#1155cc" style:text-underline-style="solid" style:text-underline-width="auto" style:text-underline-color="font-color"/>
    </style:style>
    <style:style style:name="T19" style:family="text">
      <style:text-properties fo:font-weight="bold" style:font-weight-asian="bold"/>
    </style:style>
    <style:style style:name="T20" style:family="text">
      <style:text-properties fo:font-style="italic" style:font-style-asian="italic"/>
    </style:style>
    <style:style style:name="T21" style:family="text">
      <style:text-properties fo:font-style="italic" fo:font-weight="bold" style:font-style-asian="italic" style:font-weight-asian="bold"/>
    </style:style>
    <style:style style:name="T22" style:family="text">
      <style:text-properties style:text-underline-style="none"/>
    </style:style>
    <style:style style:name="T23" style:family="text">
      <style:text-properties fo:font-size="11pt" fo:font-style="italic" style:font-size-asian="11pt" style:font-style-asian="italic"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1in, 0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0.0236in)" draw:luminance="0%" draw:contrast="0%" draw:red="0%" draw:green="0%" draw:blue="0%" draw:gamma="100%" draw:color-inversion="false" draw:image-opacity="100%" draw:color-mode="standard"/>
    </style:style>
    <style:style style:name="fr4"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1535in, 0.0283in, 0in)" draw:luminance="0%" draw:contrast="0%" draw:red="0%" draw:green="0%" draw:blue="0%" draw:gamma="100%" draw:color-inversion="false" draw:image-opacity="100%" draw:color-mode="standard"/>
    </style:style>
    <style:style style:name="fr5"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102in, 0.1799in, 0in)" draw:luminance="0%" draw:contrast="0%" draw:red="0%" draw:green="0%" draw:blue="0%" draw:gamma="100%" draw:color-inversion="false" draw:image-opacity="100%" draw:color-mode="standard"/>
    </style:style>
    <style:style style:name="fr6"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178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JETO 1: FAMILIARIZAÇÃO COM MÁQUINA VIRTUAL E SINCRONIZAÇÃO DE PROCESSOS</text:span></text:p>
      <text:p text:style-name="P1"><text:span text:style-name="T2">Gustavo Borges Peres da Silva</text:span><text:span text:style-name="T14">1</text:span><text:span text:style-name="T2">, Michael P. C. Silva</text:span><text:span text:style-name="T16">1</text:span><text:span text:style-name="T2">, Rafael S. Melo</text:span><text:span text:style-name="T16">1</text:span></text:p>
      <text:p text:style-name="P1"><text:span text:style-name="T15">1</text:span><text:span text:style-name="T3">Departamento de Ciência da Computação – Universidade Federal de Catalão (UFCAT)</text:span></text:p>
      <text:p text:style-name="P3"><text:span text:style-name="T6">{gustavo.silva, michael.silva}@discente.ufcat.edu.br, rafinhalelograma@hotmail.com</text:span></text:p>
      <text:list xml:id="list1570472428" text:style-name="WWNum2">
        <text:list-item>
          <text:p text:style-name="P8"><text:span text:style-name="T7">Tarefa 1: preparação do sistema</text:span></text:p>
          <text:list>
            <text:list-item>
              <text:p text:style-name="P9"><text:span text:style-name="T9">Descrição</text:span></text:p>
            </text:list-item>
          </text:list>
        </text:list-item>
      </text:list>
      <text:p text:style-name="P11">Neste projeto, optamos por adotar um ambiente de trabalho personalizado, considerando que nossos computadores possuem configurações de hardware de alto desempenho. Com processadores avançados, placas gráficas de última geração, uma quantidade significativa de memória RAM e armazenamento SSD NVMe, nossos sistemas não apenas atendem, mas superam as demandas de desempenho exigidas por este projeto. Além disso, todos os hosts serão configurados utilizando o Windows 11 Pro, com virtualização ativada na BIOS e tecnologias que permitem a execução eficiente de máquinas virtuais, melhorando o desempenho e a eficiência do sistema<text:span text:style-name="T10">.</text:span></text:p>
      <text:p text:style-name="P11">Em contrapartida, utilizamos o Oracle VirtualBox 7.0 para criar a máquina virtualizada, denominada convidado (guest), que opera com o sistema operacional Linux Debian 12.8.0 (bookworm) que seria a versão mais recente durante a escrita deste relatório. A instalação foi realizada utilizando a imagem do instalador via rede, uma escolha estratégica que permite o download dos pacotes do sistema durante o processo de instalação. Essa opção foi especialmente vantajosa devido à alta velocidade de conexão com a internet disponível no momento da instalação.<text:span text:style-name="T10">.</text:span></text:p>
      <text:list xml:id="list222227571399818" text:continue-numbering="true" text:style-name="WWNum2">
        <text:list-item>
          <text:list>
            <text:list-item>
              <text:p text:style-name="P9"><text:span text:style-name="T9">Passo-a-passo da configuração da Máquina Virtual</text:span></text:p>
            </text:list-item>
            <text:list-item>
              <text:p text:style-name="P9"><text:span text:style-name="T9">Instalação do Linux Debian</text:span></text:p>
            </text:list-item>
          </text:list>
        </text:list-item>
      </text:list>
      <text:p text:style-name="P11">O Linux Debian 12 está disponível para download no seguinte endereço: <text:a xlink:type="simple" xlink:href="https://www.debian.org/distrib/netinst" text:style-name="ListLabel_20_19" text:visited-style-name="ListLabel_20_19"><text:span text:style-name="T18">https://www.debian.org/distrib/netinst</text:span></text:a>. Optamos por baixar a versão netinst, que é a opção "CDs pequenos ou pendrives USB". Esta escolha permite uma instalação mais leve e flexível, baixando apenas os pacotes necessários durante o processo de instalação.</text:p>
      <text:p text:style-name="P11"><text:span text:style-name="T10">Para a virtualização do Debian, escolhemos utilizar o Oracle VirtualBox como plataforma de hospedagem. Na figura 1 abaixo, compartilhamos a configuração inicial realizada por meio do assistente.</text:span></text:p>
      <text:p text:style-name="P5"><draw:frame draw:style-name="fr1" draw:name="image11.png" text:anchor-type="as-char" svg:width="5.9047in" svg:height="3.3472in" draw:z-index="0"><draw:image xlink:href="Pictures/10000000000002C50000019223B15DD4A1ED30D0.png" xlink:type="simple" xlink:show="embed" xlink:actuate="onLoad" loext:mime-type="image/png"/></draw:frame></text:p>
      <text:p text:style-name="P4"><text:span text:style-name="T9">Figura 1. Criar máquina virtual</text:span></text:p>
      <text:p text:style-name="P11"><text:span text:style-name="T10">Na implementação do projeto, foi escolhido adotar uma estratégia eficiente por meio da instalação desassistida do sistema operacional convidado, utilizando a interface de configuração disponibilizada durante o assistente de instalação. Essa abordagem simplifica e automatiza o processo, eliminando a necessidade de intervenção manual repetitiva.</text:span></text:p>
      <text:p text:style-name="P11">Durante a etapa de configuração desassistida no assistente de instalação, antecipamos a criação do usuário necessário para o sistema. Essa medida visa otimizar a eficiência do processo, garantindo padronização e consistência na implementação. Além disso, selecionamos a opção "Install in background" para evitar a necessidade de interação manual durante a instalação, simplificando o processo e reduzindo a complexidade deste relatório.</text:p>
      <text:p text:style-name="P11"><text:bookmark text:name="_gjdgxs"/><text:span text:style-name="T10">Ao definir previamente detalhes como nome de usuário e senha diretamente na interface de configuração, </text:span>asseguramos <text:span text:style-name="T10">que o sistema operacional convidado seja instalado com as configurações desejadas de forma rápida e precisa conforme a Figura 2 abaixo.</text:span></text:p>
      <text:p text:style-name="P5"><draw:frame draw:style-name="fr1" draw:name="image10.png" text:anchor-type="as-char" svg:width="5.9047in" svg:height="3.3472in" draw:z-index="0"><draw:image xlink:href="Pictures/10000000000002C400000192B3A34382052F681D.png" xlink:type="simple" xlink:show="embed" xlink:actuate="onLoad" loext:mime-type="image/png"/></draw:frame></text:p>
      <text:p text:style-name="P15"><text:span text:style-name="T9">Figura 2. Configuração de Instalação </text:span><text:span text:style-name="T19">Desassistida</text:span><text:span text:style-name="T9"> de SO guest.</text:span></text:p>
      <text:p text:style-name="P11">Sobre a definição do hardware utilizado para a máquina guest, realizamos uma configuração adequada para evitar quedas de desempenho. Optamos por utilizar uma quantidade razoável de memória RAM, como 8GB (8*1024), e quase todos os núcleos do processador (4 núcleos) conforme a figura 3 abaixo.</text:p>
      <text:p text:style-name="P5"><draw:frame draw:style-name="fr1" draw:name="image16.png" text:anchor-type="as-char" svg:width="5.9047in" svg:height="3.3335in" draw:z-index="0"><draw:image xlink:href="Pictures/10000000000002C700000192C3847827421D3FB0.png" xlink:type="simple" xlink:show="embed" xlink:actuate="onLoad" loext:mime-type="image/png"/></draw:frame></text:p>
      <text:p text:style-name="P15"><text:span text:style-name="T9"><text:s/>Figura 3. Hardware Guest.</text:span></text:p>
      <text:p text:style-name="P11">Sobre o disco rígido da máquina virtual, consideramos um tamanho adequado para garantir que não teríamos problemas com armazenamento, aproveitando o espaço livre disponível na máquina host. Assim, utilizamos 15GB de armazenamento (15*1024) pois iremos usar a interface grafica gnome, conforme a figura 4 abaixo<text:span text:style-name="T10">.</text:span></text:p>
      <text:p text:style-name="P5"><draw:frame draw:style-name="fr1" draw:name="image1.png" text:anchor-type="as-char" svg:width="5.9047in" svg:height="3.3335in" draw:z-index="0"><draw:image xlink:href="Pictures/10000000000002C700000192E6FF7535FA386403.png" xlink:type="simple" xlink:show="embed" xlink:actuate="onLoad" loext:mime-type="image/png"/></draw:frame></text:p>
      <text:p text:style-name="P15"><text:span text:style-name="T9">Figura 4. Armazenamento Guest.</text:span></text:p>
      <text:p text:style-name="P11"><text:soft-page-break/><text:span text:style-name="T10">Abaixo está o resumo da configuração da máquina.</text:span></text:p>
      <text:p text:style-name="P5"><draw:frame draw:style-name="fr1" draw:name="image12.png" text:anchor-type="as-char" svg:width="5.9047in" svg:height="3.7917in" draw:z-index="0"><draw:image xlink:href="Pictures/10000000000002CA000001CA318842CC09C0C3CC.png" xlink:type="simple" xlink:show="embed" xlink:actuate="onLoad" loext:mime-type="image/png"/></draw:frame></text:p>
      <text:p text:style-name="P15"><text:span text:style-name="T9">Figura </text:span><text:span text:style-name="T19">5</text:span><text:span text:style-name="T9">. Resumo.</text:span></text:p>
      <text:p text:style-name="P7"><draw:frame draw:style-name="fr1" draw:name="image25.png" text:anchor-type="as-char" svg:width="5.9047in" svg:height="3.472in" draw:z-index="0"><draw:image xlink:href="Pictures/1000000000000508000002F68002E0D1510DDE18.png" xlink:type="simple" xlink:show="embed" xlink:actuate="onLoad" loext:mime-type="image/png"/></draw:frame></text:p>
      <text:p text:style-name="P19"><text:span text:style-name="T19">Figura 6. Processo de instalação desassistida e segundo plano.</text:span></text:p>
      <text:p text:style-name="P13"><text:span text:style-name="T10">Com aproximadamente </text:span>8<text:span text:style-name="T10"> minutos a máquina virtual foi instalada com sucesso.<text:line-break/></text:span><draw:frame draw:style-name="fr1" draw:name="image4.png" text:anchor-type="as-char" svg:width="5.9047in" svg:height="3.972in" draw:z-index="0"><draw:image xlink:href="Pictures/10000000000005030000035E366D394F87E79B6A.png" xlink:type="simple" xlink:show="embed" xlink:actuate="onLoad" loext:mime-type="image/png"/></draw:frame></text:p>
      <text:p text:style-name="P15"><text:span text:style-name="T9">Figura </text:span><text:span text:style-name="T19">7</text:span><text:span text:style-name="T9">. </text:span><text:span text:style-name="T19">Máquina</text:span><text:span text:style-name="T9"> Virtual Instalada.</text:span></text:p>
      <text:list xml:id="list222227016013106" text:continue-numbering="true" text:style-name="WWNum2">
        <text:list-item>
          <text:list>
            <text:list-item>
              <text:p text:style-name="P10"><text:span text:style-name="T9">Configuração da Máquina Virtual</text:span></text:p>
            </text:list-item>
          </text:list>
        </text:list-item>
      </text:list>
      <text:p text:style-name="P11">Após a instalação do Debian, foi necessário atribuir o usuário vboxuser como administrador para que ele pudesse ter acesso ao root no arquivo /etc/sudoers (arquivo de permissões de usuários).</text:p>
      <text:p text:style-name="P11">Passos:</text:p>
      <text:list xml:id="list2562097971" text:style-name="WWNum3">
        <text:list-item>
          <text:p text:style-name="P22"><text:span text:style-name="T19">Entrar no usuário root</text:span>: Use o comando abaixo e digite a senha definida durante o setup do VirtualBox (neste caso, usamos a senha padrão changeme):</text:p>
        </text:list-item>
      </text:list>
      <text:p text:style-name="P23"><text:span text:style-name="T20">su</text:span></text:p>
      <text:p text:style-name="P24"/>
      <text:list xml:id="list222227555967719" text:continue-numbering="true" text:style-name="WWNum3">
        <text:list-item>
          <text:p text:style-name="P22"><text:span text:style-name="T19">Editar o arquivo de permissões (sudoers): </text:span>Abra o arquivo /etc/sudoers com o editor de texto nano:</text:p>
        </text:list-item>
      </text:list>
      <text:p text:style-name="P23"><text:span text:style-name="T20">sudo nano /etc/sudoers</text:span></text:p>
      <text:p text:style-name="P24"/>
      <text:list xml:id="list222226754573461" text:continue-numbering="true" text:style-name="WWNum3">
        <text:list-item>
          <text:p text:style-name="P22"><text:span text:style-name="T19">Adicionar permissões para o usuário</text:span>: Localize a linha que contém:</text:p>
        </text:list-item>
      </text:list>
      <text:p text:style-name="P26"><text:span text:style-name="T20">%sudo ALL=(ALL:ALL) ALL</text:span></text:p>
      <text:p text:style-name="P6"/>
      <text:p text:style-name="P23">Logo abaixo dessa linha, adicione a seguinte configuração (substitua nomeUsuario pelo nome do usuário, que no caso do projeto é vboxuser):</text:p>
      <text:p text:style-name="P26"><text:span text:style-name="T20">vboxuser ALL=(ALL) ALL</text:span></text:p>
      <text:p text:style-name="P27"/>
      <text:list xml:id="list222226782488378" text:continue-numbering="true" text:style-name="WWNum3">
        <text:list-item>
          <text:p text:style-name="P30"><text:span text:style-name="T19">Salvar e sair: </text:span>Pressione as seguintes combinações de teclas no editor nano:</text:p>
        </text:list-item>
      </text:list>
      <text:p text:style-name="P23"><text:span text:style-name="T20">Ctrl + O (Salvar alterações)</text:span></text:p>
      <text:p text:style-name="P23"><text:span text:style-name="T20">Enter (Confirmar)</text:span></text:p>
      <text:p text:style-name="P23"><text:span text:style-name="T20">Ctrl + X (Fechar o editor)</text:span></text:p>
      <text:p text:style-name="P24"/>
      <text:list xml:id="list222227199693177" text:continue-numbering="true" text:style-name="WWNum3">
        <text:list-item>
          <text:p text:style-name="P30">Sair do modo root: Após finalizar as alterações, digite:</text:p>
        </text:list-item>
      </text:list>
      <text:p text:style-name="P26"><text:span text:style-name="T20">exit</text:span></text:p>
      <text:p text:style-name="P27"/>
      <text:list xml:id="list222226163112629" text:continue-numbering="true" text:style-name="WWNum3">
        <text:list-item>
          <text:p text:style-name="P30">Alterar a senha do usuário vboxuser:</text:p>
        </text:list-item>
      </text:list>
      <text:p text:style-name="P26"><text:span text:style-name="T20">passwd vboxuser</text:span></text:p>
      <text:p text:style-name="P27"/>
      <text:p text:style-name="P32"><text:soft-page-break/>Agora, o usuário vboxuser terá permissão de administrador para usar o sudo.</text:p>
      <text:p text:style-name="P11">Adicionalmente, não foi necessário modificar o arquivo sources.list, um componente essencial na configuração do sistema Debian e suas distribuições relacionadas. Esse arquivo define os repositórios de onde o sistema obtém pacotes de software e atualizações.</text:p>
      <text:p text:style-name="P11">Como optamos por instalar o Debian com conexão à internet, <text:span text:style-name="T19">o sistema configura automaticamente o sources.list durante a instalação</text:span>, garantindo acesso às versões mais recentes disponíveis. No caso do projeto, o arquivo foi configurado para a versão Debian Bookworm, apontando para o repositório de atualizações (bookworm-updates) com os componentes main e non-free-firmware. Essa configuração atende perfeitamente às necessidades atuais, proporcionando um ambiente estável, seguro e atualizado para as operações planejadas.</text:p>
      <text:p text:style-name="P11">Ao abordar a<text:span text:style-name="T19"> configuração da rede na máquina virtual</text:span>, é importante destacar que o VirtualBox oferece uma interface intuitiva para configurar a rede. O modo NAT (Network Address Translation) é uma opção comum e simples, mas, se precisarmos configurar o SSH no futuro, será necessário realizar o <text:span text:style-name="T19">redirecionamento de portas</text:span>, o que pode ser mais complexo. No entanto, essa abordagem garante maior segurança, pois evita expor diretamente o IP da máquina virtual à rede externa.</text:p>
      <text:p text:style-name="P11">Por outro lado, o modo Bridge oferece maior simplicidade e rapidez, pois permite que a máquina virtual se comporte como um dispositivo independente na rede, com seu próprio IP. No entanto, essa configuração pode ser menos segura, já que a máquina virtual fica mais exposta à rede externa.</text:p>
      <text:p text:style-name="P11">Diante disso, a escolha mais adequada foi habilitar a comunicação entre a máquina virtual e o sistema operacional hospedeiro através da configuração da placa de rede em modo NAT (Figura 8), com redirecionamento de portas (Figura 9). Essa configuração oferece uma boa combinação de segurança e funcionalidade para o ambiente de trabalho.<text:span text:style-name="T10">.</text:span></text:p>
      <text:p text:style-name="P33"><draw:frame draw:style-name="fr1" draw:name="image21.png" text:anchor-type="as-char" svg:width="4.8661in" svg:height="3.8189in" draw:z-index="0"><draw:image xlink:href="Pictures/1000020100000274000001EEB9850E71D8442390.png" xlink:type="simple" xlink:show="embed" xlink:actuate="onLoad" loext:mime-type="image/png"/></draw:frame></text:p>
      <text:p text:style-name="P16"><text:span text:style-name="T19">Figura 8. Configurando rede - NAT.</text:span></text:p>
      <text:p text:style-name="P33"><draw:frame draw:style-name="fr1" draw:name="image7.png" text:anchor-type="as-char" svg:width="5.511in" svg:height="2.5661in" draw:z-index="0"><draw:image xlink:href="Pictures/10000201000003540000018DAA2F52D35C95A759.png" xlink:type="simple" xlink:show="embed" xlink:actuate="onLoad" loext:mime-type="image/png"/></draw:frame></text:p>
      <text:p text:style-name="P16"><text:span text:style-name="T19">Figura 9. Configurando redirecionamento de portas.</text:span></text:p>
      <text:p text:style-name="P14">Agora que a rede está configurada, vamos realizar alguns testes no Debian para verificar se tudo está funcionando corretamente. Os testes a seguir têm como objetivo confirmar a funcionalidade da rede. Vale ressaltar que antes de testarmos, precisamos instalar os seguintes pacotes:</text:p>
      <text:p text:style-name="P29"><text:span text:style-name="T20">sudo apt install speedtest-cli nload net-tools</text:span></text:p>
      <text:p text:style-name="P35"/>
      <text:p text:style-name="P14">Agora em relação aos testes, utilizando o comando “<text:span text:style-name="T21">ip a</text:span>”, podemos verificar as interfaces de rede e suas respectivas configurações. Durante o teste, obtemos o IP 10.0.2.15, conforme ilustrado na Figura 10.</text:p>
      <text:p text:style-name="P12"><draw:frame draw:style-name="fr2" draw:name="image6.png" text:anchor-type="as-char" svg:width="5.3661in" svg:height="2.9063in" draw:z-index="0"><draw:image xlink:href="Pictures/10000201000002DC00000187F8E0D049C1158FB6.png" xlink:type="simple" xlink:show="embed" xlink:actuate="onLoad" loext:mime-type="image/png"/></draw:frame></text:p>
      <text:p text:style-name="P15"><text:span text:style-name="T9">Figura </text:span><text:span text:style-name="T19">10</text:span><text:span text:style-name="T9">. Interface de rede.</text:span></text:p>
      <text:p text:style-name="P11"><text:span text:style-name="T10">Foi utilizado também ferramentas </text:span>específicas<text:span text:style-name="T10"> para medir a velocidade da internet como por exemplo o </text:span><text:span text:style-name="T12">speedtest-cli</text:span><text:span text:style-name="T13"> </text:span><text:span text:style-name="T10">conforme na Figura </text:span>11 e o <text:span text:style-name="T21">nload </text:span>na Figura 12<text:span text:style-name="T10">.</text:span></text:p>
      <text:p text:style-name="P12"><draw:frame draw:style-name="fr3" draw:name="image22.png" text:anchor-type="as-char" svg:width="4.1598in" svg:height="1.9374in" draw:z-index="0"><draw:image xlink:href="Pictures/1000000000000227000001005EA8E1BA80BC19CE.png" xlink:type="simple" xlink:show="embed" xlink:actuate="onLoad" loext:mime-type="image/png"/><svg:desc>A screenshot of a computer program

Description automatically generated</svg:desc></draw:frame></text:p>
      <text:p text:style-name="P15"><text:span text:style-name="T9">Figura </text:span><text:span text:style-name="T19">11</text:span><text:span text:style-name="T9">. Teste com speedtest-cli.</text:span></text:p>
      <text:p text:style-name="P17"><draw:frame draw:style-name="fr4" draw:name="image15.png" text:anchor-type="as-char" svg:width="2.9965in" svg:height="3.1874in" draw:z-index="0"><draw:image xlink:href="Pictures/10000201000001FD00000213AEB2960AD6D4D446.png" xlink:type="simple" xlink:show="embed" xlink:actuate="onLoad" loext:mime-type="image/png"/></draw:frame></text:p>
      <text:p text:style-name="P18"><text:span text:style-name="T19">Figura 12. Teste com nload.</text:span></text:p>
      <text:p text:style-name="P38">Adicionalmente, utilizamos o comando <text:span text:style-name="T21">traceroute </text:span>para verificar as rotas que os pacotes de dados tomam até um destino. No nosso exemplo, utilizamos o site do Google (www.google.com), conforme mostrado na Figura 13. O comando exibe os "hops" (saltos) intermediários, indicando os roteadores pelos quais os pacotes passam. Caso não haja resposta de alguns roteadores, isso pode ser devido a configurações de segurança, mas não significa necessariamente falha na conexão.</text:p>
      <text:p text:style-name="P5"><draw:frame draw:style-name="fr5" draw:name="image23.png" text:anchor-type="as-char" svg:width="5.2957in" svg:height="2.5437in" draw:z-index="0"><draw:image xlink:href="Pictures/10000201000003380000019872AFEEF64B1103E8.png" xlink:type="simple" xlink:show="embed" xlink:actuate="onLoad" loext:mime-type="image/png"/></draw:frame></text:p>
      <text:p text:style-name="P15"><text:span text:style-name="T9">Figura</text:span><text:span text:style-name="T19"> 13</text:span><text:span text:style-name="T9">. Verificando rotas dos pacotes com traceroute.</text:span></text:p>
      <text:p text:style-name="P40"><text:span text:style-name="T10">E por </text:span>último<text:span text:style-name="T10"> utilizamos o comando </text:span><text:span text:style-name="T12">netstat </text:span><text:span text:style-name="T10">para verificar as conexões de rede e o estado das portas conforme a Figura 1</text:span>4<text:span text:style-name="T10">.</text:span></text:p>
      <text:p text:style-name="P5"><draw:frame draw:style-name="fr6" draw:name="image9.png" text:anchor-type="as-char" svg:width="5.4228in" svg:height="2.6925in" draw:z-index="0"><draw:image xlink:href="Pictures/100002010000032C0000018B8ACE5E9EF708B2AC.png" xlink:type="simple" xlink:show="embed" xlink:actuate="onLoad" loext:mime-type="image/png"/></draw:frame></text:p>
      <text:p text:style-name="P15"><text:soft-page-break/><text:span text:style-name="T9">Figura 1</text:span><text:span text:style-name="T19">4</text:span><text:span text:style-name="T9">. Verificando conexões e estado das portas com netstat.</text:span></text:p>
      <text:list xml:id="list222227240189505" text:continue-list="list222227016013106" text:style-name="WWNum2">
        <text:list-item>
          <text:list>
            <text:list-item>
              <text:p text:style-name="P9"><text:span text:style-name="T9">Instalação/Configuração e acesso remoto via SSH</text:span></text:p>
            </text:list-item>
          </text:list>
        </text:list-item>
      </text:list>
      <text:p text:style-name="P11">Agora que a conexão com a rede está funcionando, o próximo passo é instalar e configurar o SSH para permitir a comunicação entre as duas máquinas. No sistema host (Windows), ativamos o OpenSSH via Recursos Opcionais do Windows, enquanto na máquina virtual (guest), utilizamos o comando:</text:p>
      <text:p text:style-name="P23"><text:span text:style-name="T20">sudo apt-get install openssh-server</text:span></text:p>
      <text:p text:style-name="P23"/>
      <text:p text:style-name="P11">Com o SSH instalado, iremos realizar o acesso remoto à máquina virtual. No entanto, como estamos utilizando o modo de rede NAT no VirtualBox, o IP da máquina virtual não é acessível diretamente pelo host. Para resolver isso, configuramos o redirecionamento de portas (Figura 9), permitindo o acesso via o seguinte comando na máquina hospedeira:</text:p>
      <text:p text:style-name="P23"><text:span text:style-name="T20">ssh vboxuser@localhost -p 22 ou ssh vboxuser@127.0.0.1 -p 22</text:span></text:p>
      <text:p text:style-name="P23"/>
      <text:p text:style-name="P11">Esse comando utiliza o redirecionamento de portas para conectar o host ao guest de maneira eficiente.</text:p>
      <text:p text:style-name="P11">Ao executar o SSH no ambiente Windows, você encontrará uma mensagem relacionada à autenticação e segurança ao tentar se conectar a um servidor. Nesse caso, o aviso indica que a autenticidade do host localhost (127.0.0.1) não pôde ser confirmada. A ED25519 Key Fingerprint, apresentada como uma sequência única (SHA256), identifica a chave pública do servidor usando o algoritmo ED25519. Essa impressão digital garante que a chave do servidor não foi alterada e é consistente em conexões futuras.</text:p>
      <text:p text:style-name="P11">A mensagem pergunta se você deseja continuar, pois o cliente SSH detectou uma nova chave para o host, que ainda não está na lista de "hosts conhecidos". Como é a primeira conexão com esse host, o cliente SSH informa que a chave será adicionada permanentemente à lista. Após aceitar (digitando "yes"), será solicitada a senha do usuário vboxuser (guest) para autenticar o acesso ao servidor, conforme mostrado nas Figura 15 e 16 abaixo.</text:p>
      <text:p text:style-name="P5"><draw:frame draw:style-name="fr1" draw:name="image17.png" text:anchor-type="as-char" svg:width="5.9047in" svg:height="3.3193in" draw:z-index="0"><draw:image xlink:href="Pictures/100002010000077F00000437250514ECF3E1987C.png" xlink:type="simple" xlink:show="embed" xlink:actuate="onLoad" loext:mime-type="image/png"/></draw:frame></text:p>
      <text:p text:style-name="P15"><text:span text:style-name="T9">Figura 1</text:span><text:span text:style-name="T19">5</text:span><text:span text:style-name="T9">. Conexão bem sucedida.</text:span></text:p>
      <text:p text:style-name="P6"><draw:frame draw:style-name="fr1" draw:name="image24.png" text:anchor-type="as-char" svg:width="5.9047in" svg:height="3.3193in" draw:z-index="0"><draw:image xlink:href="Pictures/100002010000077C000004371B28F5CEE6DA16BD.png" xlink:type="simple" xlink:show="embed" xlink:actuate="onLoad" loext:mime-type="image/png"/></draw:frame></text:p>
      <text:p text:style-name="P20"><text:span text:style-name="T9">Figura 1</text:span><text:span text:style-name="T19">6</text:span><text:span text:style-name="T9">. </text:span><text:span text:style-name="T19">Usando 3 conexões ao mesmo tempo.</text:span></text:p>
      <text:list xml:id="list222227965123631" text:continue-numbering="true" text:style-name="WWNum2">
        <text:list-item>
          <text:list>
            <text:list-item>
              <text:p text:style-name="P9"><text:span text:style-name="T9">Transferência de Arquivos</text:span></text:p>
            </text:list-item>
          </text:list>
        </text:list-item>
      </text:list>
      <text:p text:style-name="P11"><text:span text:style-name="T10">Agora que temos tudo configurado, iremos </text:span>transferir<text:span text:style-name="T10"> um <text:s/>arquivo do computador </text:span>hospedeiro<text:span text:style-name="T10"> para a nossa Máquina Virtual (guest).</text:span></text:p>
      <text:p text:style-name="P11"><text:span text:style-name="T10">Para isso, pensando numa forma bem simples e estratégica, pensamos em criar um arquivo .txt no host utilizando o CMD como administrador e salvar</text:span>emos<text:span text:style-name="T10"> ele </text:span>em uma pasta teste localizada na <text:span text:style-name="T10">raiz do disco C conforme o seguinte comando abaixo:</text:span></text:p>
      <text:p text:style-name="P41"><text:span text:style-name="T20">mkdir C:\Teste &amp;&amp; cd C:\Teste</text:span></text:p>
      <text:p text:style-name="P41"><text:span text:style-name="T13">echo "</text:span><text:span text:style-name="T20">Ola Mundo!</text:span><text:span text:style-name="T13">" &gt; teste.txt</text:span></text:p>
      <text:p text:style-name="P41"><text:span text:style-name="T20">cat .\teste.txt</text:span></text:p>
      <text:p text:style-name="P42"/>
      <text:p text:style-name="P6"><draw:frame draw:style-name="fr1" draw:name="image2.png" text:anchor-type="as-char" svg:width="5.9047in" svg:height="1.9862in" draw:z-index="0"><draw:image xlink:href="Pictures/10000201000004F1000001A8A5B1AF4FD5B04C48.png" xlink:type="simple" xlink:show="embed" xlink:actuate="onLoad" loext:mime-type="image/png"/></draw:frame></text:p>
      <text:p text:style-name="P21"><text:span text:style-name="T19">Figura 17. Preparando arquivo de transferência.</text:span></text:p>
      <text:p text:style-name="P38"><text:span text:style-name="T10">Após </text:span>criarmos <text:span text:style-name="T10">o arquivo, iremos transferi-lo para máquina virtual utilizando o servidor de SSH recém instalado e confi</text:span>gurado<text:span text:style-name="T10">.</text:span></text:p>
      <text:p text:style-name="P11"><text:span text:style-name="T10">Para isto, usaremos o protocolo de comunicação SCP (Secure Copy Protocol) que utiliza o SSH (Secure Shell) como mecanismo subjacente para autenticação e criptografia. SCP permite a transferência segura de arquivos entre hosts em uma rede.</text:span></text:p>
      <text:p text:style-name="P11"><text:soft-page-break/><text:span text:style-name="T10">Quando usamos o comando scp para copiar arquivos, ele estabelece uma conexão SSH para autenticação e, em seguida, utiliza essa conexão para transferir os dados de forma segura. Assim, a criptografia e autenticação fornecidas pelo SSH também se aplicam às transferências de arquivos SCP.</text:span></text:p>
      <text:p text:style-name="P11"><text:span text:style-name="T10">Conquanto, em uma nova janela do terminal utilizaremos o seguinte comando: </text:span></text:p>
      <text:p text:style-name="P23"><text:span text:style-name="T20">scp C:/Teste/teste.txt vboxuser@localhost:/home/vboxuser/Downloads/</text:span></text:p>
      <text:p text:style-name="P25"/>
      <text:p text:style-name="P11">Será solicitada a senha e, após a inserção, o arquivo será copiado, conforme ilustrado na Figura 18. Entretanto, para conseguirmos provar que o arquivo é o mesmo, usaremos um comando no windows para gerar a hash do mesmo e depois avaliarmos no linux:</text:p>
      <text:p text:style-name="P26"><text:span text:style-name="T20">certutil -hashfile "C:/Teste/teste.txt" SHA256</text:span></text:p>
      <text:p text:style-name="P28"/>
      <text:p text:style-name="P5"><draw:frame draw:style-name="fr1" draw:name="image5.png" text:anchor-type="as-char" svg:width="5.9047in" svg:height="1.4583in" draw:z-index="0"><draw:image xlink:href="Pictures/10000201000004ED00000137048E7332B33BE848.png" xlink:type="simple" xlink:show="embed" xlink:actuate="onLoad" loext:mime-type="image/png"/></draw:frame></text:p>
      <text:p text:style-name="P15"><text:span text:style-name="T9">Figura 1</text:span><text:span text:style-name="T19">8</text:span><text:span text:style-name="T9">. Protocolo SCP e hashfile.</text:span></text:p>
      <text:p text:style-name="P34">Agora que o arquivo foi enviado para máquina guest, iremos navegar no diretório e verificar o hash do mesmo com o seguinte comando:</text:p>
      <text:p text:style-name="P26"><text:span text:style-name="T20">sha256sum Downloads/teste.txt</text:span></text:p>
      <text:p text:style-name="P36"/>
      <text:p text:style-name="P34">E iremos copiar qualquer um dos dois hash para procurarmos com ctrl+shift+F no terminal do host e comparar se as duas strings são iguais (Figura 19). </text:p>
      <text:p text:style-name="P5"><draw:frame draw:style-name="fr1" draw:name="image13.png" text:anchor-type="as-char" svg:width="5.9047in" svg:height="1.861in" draw:z-index="0"><draw:image xlink:href="Pictures/1000020100000722000002412EA37ACEFB47E3C7.png" xlink:type="simple" xlink:show="embed" xlink:actuate="onLoad" loext:mime-type="image/png"/></draw:frame></text:p>
      <text:p text:style-name="P15"><text:span text:style-name="T9">Figura 1</text:span><text:span text:style-name="T19">9</text:span><text:span text:style-name="T9">. Protocolo SCP – Visão Geral.</text:span></text:p>
      <text:list xml:id="list222226079461604" text:continue-numbering="true" text:style-name="WWNum2">
        <text:list-item>
          <text:list>
            <text:list-item>
              <text:p text:style-name="P9"><text:span text:style-name="T9">Criação de Conta de Usuário</text:span></text:p>
            </text:list-item>
          </text:list>
        </text:list-item>
      </text:list>
      <text:p text:style-name="P44"><text:span text:style-name="T10">Agora iremos criar uma nova conta de </text:span>usuário<text:span text:style-name="T10"> sem utilizar o root. E para isto usamos o comando </text:span><text:span text:style-name="T9">sudo adduser </text:span><text:span text:style-name="T19">so2</text:span><text:span text:style-name="T9">.</text:span></text:p>
      <text:p text:style-name="P6"><draw:frame draw:style-name="fr1" draw:name="image18.png" text:anchor-type="as-char" svg:width="5.9047in" svg:height="2.639in" draw:z-index="0"><draw:image xlink:href="Pictures/10000201000004EB00000233B8E84A7DCE9D104E.png" xlink:type="simple" xlink:show="embed" xlink:actuate="onLoad" loext:mime-type="image/png"/></draw:frame></text:p>
      <text:p text:style-name="P15"><text:span text:style-name="T9">Figura </text:span><text:span text:style-name="T19">20</text:span><text:span text:style-name="T9">. Adicionando novo </text:span><text:span text:style-name="T19">usuário</text:span><text:span text:style-name="T9"> no guest.</text:span></text:p>
      <text:p text:style-name="P38"><text:span text:style-name="T10">Agora que está tudo Ok, vamos testar também a conexão SSH com novo </text:span>usuário<text:span text:style-name="T10"> na máquina hospedeira repetindo o mesmo comando da Figura </text:span>21<text:span text:style-name="T10"> porém com o novo </text:span>usuário<text:span text:style-name="T10"> “</text:span>so2<text:span text:style-name="T10">”.</text:span></text:p>
      <text:p text:style-name="P6"><draw:frame draw:style-name="fr1" draw:name="image19.png" text:anchor-type="as-char" svg:width="5.9047in" svg:height="1.472in" draw:z-index="0"><draw:image xlink:href="Pictures/10000201000004ED00000139FD9832AE8E82580A.png" xlink:type="simple" xlink:show="embed" xlink:actuate="onLoad" loext:mime-type="image/png"/></draw:frame></text:p>
      <text:p text:style-name="P15"><text:span text:style-name="T9">Figura </text:span><text:span text:style-name="T19">21</text:span><text:span text:style-name="T9">. </text:span><text:span text:style-name="T19">SSH com </text:span><text:span text:style-name="T9">novo </text:span><text:span text:style-name="T19">u</text:span><text:span text:style-name="T9">suário conectado com </text:span><text:span text:style-name="T19">sucesso.</text:span></text:p>
      <text:list xml:id="list222226355841372" text:continue-numbering="true" text:style-name="WWNum2">
        <text:list-item>
          <text:list>
            <text:list-item>
              <text:p text:style-name="P9"><text:span text:style-name="T9">Configuração do Bash</text:span><text:span text:style-name="T19"> ou </text:span><text:span text:style-name="T9">zsh</text:span></text:p>
            </text:list-item>
          </text:list>
        </text:list-item>
      </text:list>
      <text:p text:style-name="P11">Agora que criamos o usuário "so2", vamos configurar o shell padrão para esse novo usuário no sistema Linux. Essa operação é opcional, mas pode ser útil se o usuário preferir usar o Bash ou outro shell em vez do shell padrão definido durante a criação do usuário. No nosso caso, ambos os usuários parecem ter o /bin/bash configurado como shell padrão (Figura 22).</text:p>
      <text:p text:style-name="P6"><draw:frame draw:style-name="fr1" draw:name="image3.png" text:anchor-type="as-char" svg:width="5.9047in" svg:height="1.0555in" draw:z-index="0"><draw:image xlink:href="Pictures/10000201000004F2000000E36F7E00DF4C108880.png" xlink:type="simple" xlink:show="embed" xlink:actuate="onLoad" loext:mime-type="image/png"/></draw:frame></text:p>
      <text:p text:style-name="P15"><text:span text:style-name="T9">Figura </text:span><text:span text:style-name="T19">22</text:span><text:span text:style-name="T9">. </text:span><text:span text:style-name="T19">Shell atual dos usuários guest.</text:span></text:p>
      <text:p text:style-name="P45"><text:soft-page-break/>Para testar a configuração do shell, vamos alterar o shell do usuário "so2" para o zsh, com o objetivo de implementar o oh-my-zsh e o tema powerlevel10k. Para realizar essa alteração, precisaremos usar o usuário vboxuser, pois ele possui privilégios de superusuário, abaixo segue o procedimento realizado:</text:p>
      <text:p text:style-name="P26"><text:span text:style-name="T20">su vboxuser</text:span></text:p>
      <text:p text:style-name="P26"><text:span text:style-name="T20">sudo apt install zsh</text:span></text:p>
      <text:p text:style-name="P26"><text:span text:style-name="T20">sudo chsh -s /bin/zsh so2</text:span></text:p>
      <text:p text:style-name="P27"/>
      <text:p text:style-name="P32">Após isso, precisamos verificar se a alteração do shell do usuário so2 foi bem-sucedida através desse comando:</text:p>
      <text:p text:style-name="P26"><text:span text:style-name="T20">sudo grep so2 /etc/passwd</text:span></text:p>
      <text:p text:style-name="P27"/>
      <text:p text:style-name="P32">Ou simplesmente reabrindo o terminal do usuário so2 conforme a Figura 23 e executando o comando echo $SHELL.</text:p>
      <text:p text:style-name="P37"><draw:frame draw:style-name="fr1" draw:name="image14.png" text:anchor-type="as-char" svg:width="5.9047in" svg:height="1.8193in" draw:z-index="0"><draw:image xlink:href="Pictures/10000201000004F200000187B635AB09C16D8AC2.png" xlink:type="simple" xlink:show="embed" xlink:actuate="onLoad" loext:mime-type="image/png"/></draw:frame></text:p>
      <text:p text:style-name="P16"><text:span text:style-name="T19">Figura 23. Alteração do shell do usuário so2 bem-sucedida.</text:span></text:p>
      <text:p text:style-name="P34">Para tornar mais fácil compreender as próximas ações, iremos organizar em passos.</text:p>
      <text:p text:style-name="P34"/>
      <text:p text:style-name="P34">Passos:</text:p>
      <text:list xml:id="list1866045007" text:style-name="WWNum1">
        <text:list-item>
          <text:p text:style-name="P31">Antes de sair do usuário vboxuser, é interessante baixarmos as dependências necessárias para o oh-my-zsh, que no caso é curl e git:</text:p>
        </text:list-item>
      </text:list>
      <text:p text:style-name="P26"><text:span text:style-name="T20">sudo apt install curl git</text:span></text:p>
      <text:p text:style-name="P26"/>
      <text:list xml:id="list222226606248433" text:continue-numbering="true" text:style-name="WWNum1">
        <text:list-item>
          <text:p text:style-name="P31">Agora vamos voltar ao usuário so2 (usar o comando: su so2) e rodar esses comandos para baixarmos e instalarmos o tema powerlevel10k:</text:p>
        </text:list-item>
      </text:list>
      <text:p text:style-name="P26"><text:span text:style-name="T23">git clone --depth=1 https://github.com/romkatv/powerlevel10k.git ~/powerlevel10k</text:span></text:p>
      <text:p text:style-name="P26"><text:span text:style-name="T20">echo 'source ~/powerlevel10k/powerlevel10k.zsh-theme' &gt;&gt;~/.zshrc</text:span></text:p>
      <text:p text:style-name="P26"/>
      <text:list xml:id="list222226179771098" text:continue-numbering="true" text:style-name="WWNum1">
        <text:list-item>
          <text:p text:style-name="P31">Agora vamos executar mais esse comando para baixarmos e instalarmos o oh-my-zsh:</text:p>
        </text:list-item>
      </text:list>
      <text:p text:style-name="P26"><text:span text:style-name="T20">git clone --depth=1 https://github.com/romkatv/powerlevel10k.git ${ZSH_CUSTOM:-$HOME/.oh-my-zsh/custom}/themes/powerlevel10k</text:span></text:p>
      <text:p text:style-name="P27"/>
      <text:list xml:id="list222227178278754" text:continue-numbering="true" text:style-name="WWNum1">
        <text:list-item>
          <text:p text:style-name="P31">Agora acessaremos o arquivo ~/.zshrc e, se ele não existir, vamos criar um novo:</text:p>
        </text:list-item>
      </text:list>
      <text:p text:style-name="P26"><text:span text:style-name="T20">nano ~/.zshrc</text:span></text:p>
      <text:p text:style-name="P27"><text:soft-page-break/></text:p>
      <text:list xml:id="list222227840828184" text:continue-numbering="true" text:style-name="WWNum1">
        <text:list-item>
          <text:p text:style-name="P31">Dentro dele vamos procurar pela linha que contém ZSH_THEME e mudar o valor para “powerlevel10k/powerlevel10k” e se não existir a linha basta adicionar ela:</text:p>
        </text:list-item>
      </text:list>
      <text:p text:style-name="P26"><text:span text:style-name="T20">ZSH_THEME="powerlevel10k/powerlevel10k"</text:span></text:p>
      <text:p text:style-name="P27"/>
      <text:list xml:id="list222226038222758" text:continue-numbering="true" text:style-name="WWNum1">
        <text:list-item>
          <text:p text:style-name="P31">Após isso, vamos executar o comando abaixo para recarregar as configurações do zsh:</text:p>
        </text:list-item>
      </text:list>
      <text:p text:style-name="P26"><text:span text:style-name="T20">source ~/.zshrc </text:span></text:p>
      <text:p text:style-name="P27"/>
      <text:list xml:id="list222226753114097" text:continue-numbering="true" text:style-name="WWNum1">
        <text:list-item>
          <text:p text:style-name="P31">A partir desse momento, <text:span text:style-name="T19">iremos entrar na parte de configuração do powerlevel10k</text:span>, mas antes disso, tem que baixar alguma fonte que suporta simbolos da página nerd fonts (https://www.nerdfonts.com/font-downloads) e configura-la no terminal pois senão iremos ter problemas para passarmos no teste. Para o nosso teste, baixamos e instalamos a fonte “SpaceMono Nerd Font Mono” e a utilizamos no próprio terminal do windows conforme a Figura 24.</text:p>
        </text:list-item>
      </text:list>
      <text:p text:style-name="P37"><text:s/><draw:frame draw:style-name="fr1" draw:name="image26.png" text:anchor-type="as-char" svg:width="5.9047in" svg:height="2.5972in" draw:z-index="0"><draw:image xlink:href="Pictures/10000201000004E6000002293A852825067C59BB.png" xlink:type="simple" xlink:show="embed" xlink:actuate="onLoad" loext:mime-type="image/png"/></draw:frame></text:p>
      <text:p text:style-name="P21"><text:span text:style-name="T19">Figura 24. Atualização da fonte do terminal host.</text:span></text:p>
      <text:list xml:id="list222228041122580" text:continue-numbering="true" text:style-name="WWNum1">
        <text:list-item>
          <text:p text:style-name="P31">Na Figura 25, podemos observar o menu inicial, o primeiro teste pergunta se estamos observando um diamante, basta responder conforme vai progredindo. </text:p>
        </text:list-item>
      </text:list>
      <text:p text:style-name="P46"><draw:frame draw:style-name="fr1" draw:name="image8.png" text:anchor-type="as-char" svg:width="5.9047in" svg:height="2.778in" draw:z-index="0"><draw:image xlink:href="Pictures/10000201000003C5000001C554DEB1F60F1574EF.png" xlink:type="simple" xlink:show="embed" xlink:actuate="onLoad" loext:mime-type="image/png"/></draw:frame></text:p>
      <text:p text:style-name="P21"><text:span text:style-name="T19">Figura 25. Menu powerlevel10k - Setup.</text:span></text:p>
      <text:p text:style-name="P46">E ao chegar no fim, teremos na figura abaixo, o resultado final.</text:p>
      <text:p text:style-name="P46"><draw:frame draw:style-name="fr1" draw:name="image20.png" text:anchor-type="as-char" svg:width="5.9047in" svg:height="1.8752in" draw:z-index="0"><draw:image xlink:href="Pictures/10000201000004EF00000192C3BDD4F2E7ECEEF0.png" xlink:type="simple" xlink:show="embed" xlink:actuate="onLoad" loext:mime-type="image/png"/></draw:frame></text:p>
      <text:p text:style-name="P21"><text:span text:style-name="T19">Figura 26. Setup finalizado.</text:span></text:p>
      <text:list xml:id="list222227321770518" text:continue-list="list222226355841372" text:style-name="WWNum2">
        <text:list-item>
          <text:list>
            <text:list-item>
              <text:p text:style-name="P9"><text:span text:style-name="T9">Instalação de Softwares</text:span></text:p>
            </text:list-item>
          </text:list>
        </text:list-item>
      </text:list>
      <text:p text:style-name="P38"><text:span text:style-name="T10">Os softwares no Debian podem ser instalados de diversas maneiras, seja através da interface gráfica ou da linha de comando no terminal. A ferramenta principal para instalação de softwares é o apt, um poderoso sistema de gerenciamento de pacotes.</text:span></text:p>
      <text:p text:style-name="P38"><text:span text:style-name="T10">Na máquina Debian que </text:span>utilizamos<text:span text:style-name="T10">, a preferência foi pela instalação via linha de comando, utilizando o terminal. Isso proporcionou maior controle sobre o processo de instalação e permitiu uma abordagem mais personalizada para atender às necessidades específicas.</text:span></text:p>
      <text:p text:style-name="P38"><text:span text:style-name="T10">Em </text:span>nenhum momento<text:span text:style-name="T10"> foi necessário adicionar repositórios de software para viabilizar a instalação de determinados softwares, pois</text:span> o mesmo já atualizou automaticamente para gente durante a instalação<text:span text:style-name="T10">. Isso possibilitou o acesso a uma variedade mais ampla de aplicativos e versões, garantindo a flexibilidade na escolha e personalização do ambiente de trabalho.</text:span></text:p>
      <text:p text:style-name="P38"><text:span text:style-name="T10">Essa abordagem, embora </text:span>demande<text:span text:style-name="T10"> algum conhecimento adicional, revelou-se eficaz para garantir a disponibilidade e atualização dos softwares desejados, contribuindo para a estabilidade e desempenho do sistema operacional Debian.</text:span></text:p>
      <text:p text:style-name="P39"/>
      <text:list xml:id="list222226391912414" text:continue-numbering="true" text:style-name="WWNum2">
        <text:list-item>
          <text:p text:style-name="P8"><text:span text:style-name="T7">Tarefa 2</text:span></text:p>
        </text:list-item>
      </text:list>
      <text:p text:style-name="P38"><text:span text:style-name="T10">...</text:span></text:p>
      <text:p text:style-name="P38"/>
      <text:list xml:id="list222227432742169" text:continue-numbering="true" text:style-name="WWNum2">
        <text:list-item>
          <text:p text:style-name="P8"><text:span text:style-name="T7">Tarefa 3</text:span></text:p>
        </text:list-item>
      </text:list>
      <text:p text:style-name="P6"><text:soft-page-break/><text:span text:style-name="T10"><text:tab/>...</text:span></text:p>
      <text:p text:style-name="P6"/>
      <text:list xml:id="list222226285382012" text:continue-numbering="true" text:style-name="WWNum2">
        <text:list-item>
          <text:p text:style-name="P8"><text:span text:style-name="T7">Tarefa 4</text:span></text:p>
        </text:list-item>
      </text:list>
      <text:p text:style-name="P6"><text:span text:style-name="T10"><text:tab/>...</text:span></text:p>
      <text:p text:style-name="P6"/>
      <text:list xml:id="list222228058194166" text:continue-numbering="true" text:style-name="WWNum2">
        <text:list-item>
          <text:p text:style-name="P8"><text:span text:style-name="T7">Referências</text:span></text:p>
        </text:list-item>
      </text:list>
      <text:p text:style-name="P6"><text:span text:style-name="T10">Debian, (2023) “Instalando o Debian via Internet”, </text:span><text:a xlink:type="simple" xlink:href="https://www.debian.org/distrib/netinst" text:style-name="ListLabel_20_20" text:visited-style-name="ListLabel_20_20"><text:span text:style-name="T17">https://www.debian.org/distrib/netinst</text:span></text:a><text:span text:style-name="T10">, Junho.</text:span></text:p>
      <text:p text:style-name="P6"><text:span text:style-name="T10">Vinicius Andrade Ribeiro, (2019) “Instalar o Debian 10.0 no VirtualBox 5.2.22”, </text:span><text:a xlink:type="simple" xlink:href="https://eteourinhos.com.br/wp-content/uploads/2019/08/02-Instalar-o-Debian-10.pdf" text:style-name="ListLabel_20_20" text:visited-style-name="ListLabel_20_20"><text:span text:style-name="T17">https://eteourinhos.com.br/wp-content/uploads/2019/08/02-Instalar-o-Debian-10.pdf</text:span></text:a><text:span text:style-name="T10">, Agosto.</text:span></text:p>
      <text:p text:style-name="P6"><text:span text:style-name="T10">Gustavo Sobreira, Gabriel Fernandes, Fórum Alura (2022) “[Sugestão] [Resolvido] user is not in the sudoers file. this incident will be reported”, </text:span><text:a xlink:type="simple" xlink:href="https://cursos.alura.com.br/forum/topico-sugestao-resolvido-user-is-not-in-the-sudoers-file-this-incident-will-be-reported-259842" text:style-name="ListLabel_20_20" text:visited-style-name="ListLabel_20_20"><text:span text:style-name="T17">https://cursos.alura.com.br/forum/topico-sugestao-resolvido-user-is-not-in-the-sudoers-file-this-incident-will-be-reported-259842</text:span></text:a><text:span text:style-name="T10">, Dezembro.</text:span></text:p>
      <text:p text:style-name="P6">Romkatv (2024) “powerlevel10k”, <text:a xlink:type="simple" xlink:href="https://github.com/romkatv/powerlevel10k?tab=readme-ov-file#manual" text:style-name="ListLabel_20_19" text:visited-style-name="ListLabel_20_19"><text:span text:style-name="T18">https://github.com/romkatv/powerlevel10k?tab=readme-ov-file#manual</text:span></text:a>, Novembro.</text:p>
      <text:p text:style-name="P6">Ryan L McIntyre, Tim O’Brien, (2024) “”, <text:a xlink:type="simple" xlink:href="https://www.nerdfonts.com/font-downloads" text:style-name="ListLabel_20_19" text:visited-style-name="ListLabel_20_19"><text:span text:style-name="T18">https://www.nerdfonts.com/font-downloads</text:span></text:a>, Dezemb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pt" fo:country="BR"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pt" fo:country="BR"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5in" fo:margin-bottom="0in" loext:contextual-spacing="false" fo:line-height="100%" fo:orphans="2" fo:widows="2" fo:keep-with-next="always"/>
      <style:text-properties fo:font-variant="small-cap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1665in" fo:margin-bottom="0in" loext:contextual-spacing="false" fo:line-height="100%" fo:orphans="2" fo:widows="2" fo:keep-with-next="always"/>
      <style:text-properties fo:font-variant="normal" fo:text-transform="none"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left="0.4925in" fo:margin-right="0in" fo:margin-top="0.1665in" fo:margin-bottom="0in" loext:contextual-spacing="false" fo:line-height="100%" fo:text-indent="-0.4925in" style:auto-text-indent="false"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left="0.6in" fo:margin-right="0in" fo:text-align="justify" style:justify-single-word="false" fo:text-indent="-0.6in" style:auto-text-indent="false" fo:keep-with-next="alway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left="0.7in" fo:margin-right="0in" fo:text-indent="-0.7in" style:auto-text-indent="false" fo:keep-with-next="always"/>
      <style:text-properties fo:color="#0000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8in" fo:margin-right="0in" fo:text-align="center" style:justify-single-word="false" fo:text-indent="-0.8in" style:auto-text-indent="false" fo:keep-with-next="always"/>
      <style:text-properties fo:color="#000000" fo:font-style="italic" fo:font-weight="bold" style:font-style-asian="italic" style:font-weight-asian="bold"/>
    </style:style>
    <style:style style:name="Title" style:family="paragraph" style:parent-style-name="normal" style:next-style-name="Standard" style:default-outline-level="" style:class="chapter">
      <style:paragraph-properties fo:margin-top="0in" fo:margin-bottom="0.1575in" loext:contextual-spacing="false" fo:line-height="100%" fo:text-align="center" style:justify-single-word="false"/>
      <style:text-properties fo:font-variant="small-caps" fo:font-size="18pt" fo:font-weight="bold" style:font-size-asian="18pt" style:font-weight-asian="bold" style:font-size-complex="18pt"/>
    </style:style>
    <style:style style:name="Subtitle" style:family="paragraph" style:parent-style-name="normal" style:next-style-name="Standard" style:default-outline-level="" style:class="chapter">
      <style:paragraph-properties fo:margin-top="0in" fo:margin-bottom="0.1575in" loext:contextual-spacing="false" fo:line-height="100%" fo:text-align="center" style:justify-single-word="false"/>
      <style:text-properties fo:font-variant="small-caps" fo:font-size="14pt" fo:font-style="italic" fo:font-weight="bold" style:font-size-asian="14pt" style:font-style-asian="italic" style:font-weight-asian="bold" style:font-size-complex="1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fo:font-family="Time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font-variant="normal" fo:text-transform="none" fo:color="#0563c1" style:text-line-through-style="none" style:text-line-through-type="none" style:text-position="0% 100%" fo:font-size="12pt" fo:font-style="normal" style:text-underline-style="solid" style:text-underline-width="auto" style:text-underline-color="font-color" style:font-size-asian="12pt" style:font-style-asian="normal"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237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6" meta:object-count="0" meta:page-count="9" meta:paragraph-count="172" meta:word-count="2649" meta:character-count="17889" meta:non-whitespace-character-count="15405"/>
    <meta:generator>LibreOfficeDev/6.0.5.2$Linux_X86_64 LibreOffice_project/</meta:generator>
    <meta:user-defined meta:name="Info 1">Info 1</meta:user-defined>
    <meta:user-defined meta:name="Info 2">Info 2</meta:user-defined>
    <meta:user-defined meta:name="Info 3">Info 3</meta:user-defined>
    <meta:user-defined meta:name="Info 4">Info 4</meta:user-defined>
  </office:meta>
</office:document-meta>
</file>