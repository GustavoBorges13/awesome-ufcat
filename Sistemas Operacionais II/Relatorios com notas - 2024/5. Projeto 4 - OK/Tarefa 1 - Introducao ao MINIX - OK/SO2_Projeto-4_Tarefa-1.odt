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" svg:font-family="Courier" style:font-family-generic="system" style:font-pitch="variable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 fo:text-indent="0in"/>
    </style:style>
    <style:style style:name="T3" style:parent-style-name="DefaultParagraphFont" style:family="text">
      <style:text-properties fo:font-weight="bold" style:font-weight-asian="bold" fo:color="#000000"/>
    </style:style>
    <style:style style:name="T4" style:parent-style-name="DefaultParagraphFont" style:family="text">
      <style:text-properties fo:font-weight="bold" style:font-weight-asian="bold" fo:color="#000000" style:text-position="super 65.3%" fo:font-size="13pt" style:font-size-asian="13pt" style:font-size-complex="13pt"/>
    </style:style>
    <style:style style:name="T5" style:parent-style-name="DefaultParagraphFont" style:family="text">
      <style:text-properties fo:font-weight="bold" style:font-weight-asian="bold" fo:color="#000000"/>
    </style:style>
    <style:style style:name="T6" style:parent-style-name="DefaultParagraphFont" style:family="text">
      <style:text-properties fo:font-weight="bold" style:font-weight-asian="bold" fo:color="#000000" style:text-position="super 66.6%"/>
    </style:style>
    <style:style style:name="T7" style:parent-style-name="DefaultParagraphFont" style:family="text">
      <style:text-properties fo:font-weight="bold" style:font-weight-asian="bold" fo:color="#000000"/>
    </style:style>
    <style:style style:name="T8" style:parent-style-name="DefaultParagraphFont" style:family="text">
      <style:text-properties fo:font-weight="bold" style:font-weight-asian="bold" fo:color="#000000" style:text-position="super 66.6%"/>
    </style:style>
    <style:style style:name="P9" style:parent-style-name="Standard" style:family="paragraph">
      <style:paragraph-properties fo:text-align="center" fo:text-indent="0in"/>
    </style:style>
    <style:style style:name="T10" style:parent-style-name="DefaultParagraphFont" style:family="text">
      <style:text-properties fo:color="#000000" style:text-position="super 65.3%" fo:font-size="13pt" style:font-size-asian="13pt" style:font-size-complex="13pt"/>
    </style:style>
    <style:style style:name="T11" style:parent-style-name="DefaultParagraphFont" style:family="text">
      <style:text-properties fo:color="#000000"/>
    </style:style>
    <style:style style:name="P12" style:parent-style-name="Standard" style:family="paragraph">
      <style:paragraph-properties fo:text-align="center" fo:margin-top="0.0826in" fo:margin-bottom="0.0826in" fo:text-indent="0in"/>
    </style:style>
    <style:style style:name="T13" style:parent-style-name="DefaultParagraphFont" style:family="text">
      <style:text-properties style:font-name="Courier" style:font-name-asian="Courier" style:font-name-complex="Courier" fo:color="#000000" fo:font-size="10pt" style:font-size-asian="10pt" style:font-size-complex="10pt"/>
    </style:style>
    <style:style style:name="T14" style:parent-style-name="DefaultParagraphFont" style:family="text">
      <style:text-properties style:font-name="Courier" style:font-name-asian="Courier" style:font-name-complex="Courier" fo:color="#000000" fo:font-size="10pt" style:font-size-asian="10pt" style:font-size-complex="10pt"/>
    </style:style>
    <style:style style:name="TableColumn16" style:family="table-column">
      <style:table-column-properties style:column-width="5.9062in" style:use-optimal-column-width="false"/>
    </style:style>
    <style:style style:name="Table15" style:family="table">
      <style:table-properties style:width="5.9062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fo:background-color="#EFEFEF" style:writing-mode="lr-tb" fo:padding-top="0.0694in" fo:padding-left="0.0694in" fo:padding-bottom="0.0694in" fo:padding-right="0.0694in">
        <style:background-fill draw:fill="solid" draw:fill-color="#EFEFEF"/>
      </style:table-cell-properties>
    </style:style>
    <style:style style:name="P19" style:parent-style-name="Standard" style:family="paragraph">
      <style:paragraph-properties fo:text-align="start" fo:margin-top="0in" fo:text-indent="0in"/>
    </style:style>
    <style:style style:name="T20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21" style:parent-style-name="DefaultParagraphFont" style:family="text">
      <style:text-properties fo:font-size="13pt" style:font-size-asian="13pt" style:font-size-complex="13pt"/>
    </style:style>
    <style:style style:name="P22" style:parent-style-name="Standard" style:family="paragraph">
      <style:paragraph-properties fo:text-align="start" fo:margin-top="0in" fo:text-indent="0in"/>
    </style:style>
    <style:style style:name="T23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24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25" style:parent-style-name="Heading1" style:family="paragraph"/>
    <style:style style:name="T26" style:parent-style-name="DefaultParagraphFont" style:family="text">
      <style:text-properties fo:font-weight="normal" style:font-weight-asian="normal"/>
    </style:style>
    <style:style style:name="P27" style:parent-style-name="Heading1" style:family="paragraph">
      <style:paragraph-properties fo:keep-with-next="auto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Heading2" style:family="paragraph">
      <style:paragraph-properties fo:keep-with-next="auto"/>
    </style:style>
    <style:style style:name="T30" style:parent-style-name="DefaultParagraphFont" style:family="text">
      <style:text-properties fo:font-weight="normal" style:font-weight-asian="normal" fo:font-size="13pt" style:font-size-asian="13pt" style:font-size-complex="13pt"/>
    </style:style>
    <style:style style:name="T31" style:parent-style-name="DefaultParagraphFont" style:family="text">
      <style:text-properties fo:font-weight="normal" style:font-weight-asian="normal" fo:font-size="13pt" style:font-size-asian="13pt" style:font-size-complex="13pt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margin-bottom="0.1388in"/>
    </style:style>
    <style:style style:name="P34" style:parent-style-name="Standard" style:family="paragraph">
      <style:paragraph-properties fo:margin-top="0.1388in"/>
    </style:style>
    <style:style style:name="P35" style:parent-style-name="Standard" style:family="paragraph">
      <style:paragraph-properties fo:margin-top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margin-bottom="0.1388in"/>
    </style:style>
    <style:style style:name="P38" style:parent-style-name="Standard" style:family="paragraph">
      <style:paragraph-properties fo:margin-top="0.1388in"/>
    </style:style>
    <style:style style:name="P39" style:parent-style-name="Standard" style:family="paragraph">
      <style:paragraph-properties fo:margin-top="0in"/>
    </style:style>
    <style:style style:name="P40" style:parent-style-name="Standard" style:family="paragraph">
      <style:paragraph-properties fo:margin-top="0in"/>
    </style:style>
    <style:style style:name="P41" style:parent-style-name="Standard" style:family="paragraph">
      <style:paragraph-properties fo:margin-top="0in"/>
    </style:style>
    <style:style style:name="P42" style:parent-style-name="Standard" style:family="paragraph">
      <style:paragraph-properties fo:text-indent="0in"/>
    </style:style>
    <style:style style:name="P43" style:parent-style-name="Standard" style:family="paragraph">
      <style:paragraph-properties fo:margin-bottom="0.1388in"/>
    </style:style>
    <style:style style:name="P44" style:parent-style-name="Standard" style:family="paragraph">
      <style:paragraph-properties fo:margin-top="0.1388in"/>
    </style:style>
    <style:style style:name="P45" style:parent-style-name="Standard" style:family="paragraph">
      <style:paragraph-properties fo:margin-top="0in"/>
    </style:style>
    <style:style style:name="P46" style:parent-style-name="Standard" style:family="paragraph">
      <style:paragraph-properties fo:margin-top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margin-bottom="0.1388in"/>
    </style:style>
    <style:style style:name="P49" style:parent-style-name="Standard" style:family="paragraph">
      <style:paragraph-properties fo:margin-top="0.1388in"/>
    </style:style>
    <style:style style:name="P50" style:parent-style-name="Standard" style:family="paragraph">
      <style:paragraph-properties fo:margin-top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margin-bottom="0.1388in"/>
    </style:style>
    <style:style style:name="P53" style:parent-style-name="Standard" style:family="paragraph">
      <style:paragraph-properties fo:margin-left="0.6888in" fo:text-indent="-0.2083in">
        <style:tab-stops/>
      </style:paragraph-properties>
    </style:style>
    <style:style style:name="P54" style:parent-style-name="Standard" style:family="paragraph">
      <style:paragraph-properties fo:margin-top="0in" fo:margin-left="0.6888in" fo:text-indent="-0.2083in">
        <style:tab-stops/>
      </style:paragraph-properties>
    </style:style>
    <style:style style:name="P55" style:parent-style-name="Standard" style:family="paragraph">
      <style:paragraph-properties fo:margin-top="0in" fo:margin-left="0.6888in" fo:text-indent="-0.2083in">
        <style:tab-stops/>
      </style:paragraph-properties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/>
    <style:style style:name="P58" style:parent-style-name="Standard" style:family="paragraph">
      <style:paragraph-properties fo:text-indent="0in"/>
    </style:style>
    <style:style style:name="P59" style:parent-style-name="Standard" style:family="paragraph"/>
    <style:style style:name="P60" style:parent-style-name="Standard" style:family="paragraph">
      <style:paragraph-properties fo:text-indent="0in"/>
    </style:style>
    <style:style style:name="P61" style:parent-style-name="Standard" style:family="paragraph"/>
    <style:style style:name="P62" style:parent-style-name="Standard" style:family="paragraph">
      <style:paragraph-properties fo:margin-bottom="0.1388in"/>
    </style:style>
    <style:style style:name="P63" style:parent-style-name="Standard" style:family="paragraph">
      <style:paragraph-properties fo:margin-top="0.1388in"/>
    </style:style>
    <style:style style:name="P64" style:parent-style-name="Standard" style:family="paragraph">
      <style:paragraph-properties fo:margin-top="0in"/>
    </style:style>
    <style:style style:name="P65" style:parent-style-name="Standard" style:family="paragraph">
      <style:paragraph-properties fo:margin-top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/>
    <style:style style:name="P68" style:parent-style-name="Standard" style:family="paragraph">
      <style:paragraph-properties fo:text-indent="0in"/>
    </style:style>
    <style:style style:name="P69" style:parent-style-name="Standard" style:family="paragraph"/>
    <style:style style:name="P70" style:parent-style-name="Standard" style:family="paragraph">
      <style:paragraph-properties fo:margin-left="0.2951in">
        <style:tab-stops/>
      </style:paragraph-properties>
    </style:style>
    <style:style style:name="P71" style:parent-style-name="Standard" style:family="paragraph">
      <style:paragraph-properties fo:margin-top="0in" fo:margin-left="0.2951in">
        <style:tab-stops/>
      </style:paragraph-properties>
    </style:style>
    <style:style style:name="P72" style:parent-style-name="Standard" style:family="paragraph">
      <style:paragraph-properties fo:margin-top="0in" fo:margin-left="0.2951in">
        <style:tab-stops/>
      </style:paragraph-properties>
    </style:style>
    <style:style style:name="P73" style:parent-style-name="Standard" style:family="paragraph">
      <style:paragraph-properties fo:margin-top="0in" fo:margin-left="0.2951in">
        <style:tab-stops/>
      </style:paragraph-properties>
    </style:style>
    <style:style style:name="P74" style:parent-style-name="Standard" style:family="paragraph">
      <style:paragraph-properties fo:margin-top="0in" fo:margin-left="0.2951in">
        <style:tab-stops/>
      </style:paragraph-properties>
    </style:style>
    <style:style style:name="P75" style:parent-style-name="Standard" style:family="paragraph">
      <style:paragraph-properties fo:margin-top="0in" fo:margin-left="0.2951in">
        <style:tab-stops/>
      </style:paragraph-properties>
    </style:style>
    <style:style style:name="P76" style:parent-style-name="Standard" style:family="paragraph">
      <style:paragraph-properties fo:margin-top="0in" fo:margin-left="0.2951in">
        <style:tab-stops/>
      </style:paragraph-properties>
    </style:style>
    <style:style style:name="P77" style:parent-style-name="Standard" style:family="paragraph">
      <style:paragraph-properties fo:margin-left="0.2951in">
        <style:tab-stops/>
      </style:paragraph-properties>
    </style:style>
    <style:style style:name="P78" style:parent-style-name="Standard" style:family="paragraph">
      <style:paragraph-properties fo:margin-top="0in"/>
    </style:style>
    <style:style style:name="P79" style:parent-style-name="Standard" style:family="paragraph">
      <style:paragraph-properties fo:margin-top="0in"/>
    </style:style>
    <style:style style:name="P80" style:parent-style-name="Standard" style:family="paragraph">
      <style:paragraph-properties fo:margin-top="0in"/>
    </style:style>
    <style:style style:name="P81" style:parent-style-name="Standard" style:family="paragraph">
      <style:paragraph-properties fo:margin-top="0in"/>
    </style:style>
    <style:style style:name="P82" style:parent-style-name="Standard" style:family="paragraph">
      <style:paragraph-properties fo:margin-left="0.2951in">
        <style:tab-stops/>
      </style:paragraph-properties>
    </style:style>
    <style:style style:name="P83" style:parent-style-name="Standard" style:family="paragraph">
      <style:paragraph-properties fo:margin-bottom="0.1388in"/>
    </style:style>
    <style:style style:name="P84" style:parent-style-name="Standard" style:family="paragraph">
      <style:paragraph-properties fo:margin-top="0.1388in"/>
    </style:style>
    <style:style style:name="P85" style:parent-style-name="Standard" style:family="paragraph">
      <style:paragraph-properties fo:margin-top="0in"/>
    </style:style>
    <style:style style:name="P86" style:parent-style-name="Standard" style:family="paragraph">
      <style:paragraph-properties fo:text-indent="0in"/>
    </style:style>
    <style:style style:name="P87" style:parent-style-name="Standard" style:family="paragraph"/>
    <style:style style:name="P88" style:parent-style-name="Standard" style:family="paragraph">
      <style:paragraph-properties fo:margin-bottom="0.1388in"/>
    </style:style>
    <style:style style:name="P89" style:parent-style-name="Standard" style:family="paragraph">
      <style:paragraph-properties fo:margin-top="0.1388in"/>
    </style:style>
    <style:style style:name="P90" style:parent-style-name="Standard" style:family="paragraph">
      <style:paragraph-properties fo:margin-top="0in"/>
    </style:style>
    <style:style style:name="P91" style:parent-style-name="Standard" style:family="paragraph">
      <style:paragraph-properties fo:text-indent="0in"/>
    </style:style>
    <style:style style:name="P92" style:parent-style-name="Standard" style:family="paragraph"/>
    <style:style style:name="P93" style:parent-style-name="Standard" style:family="paragraph">
      <style:paragraph-properties fo:text-indent="0in"/>
    </style:style>
    <style:style style:name="P94" style:parent-style-name="Standard" style:family="paragraph">
      <style:paragraph-properties fo:margin-top="0.1666in" fo:margin-bottom="0.1666in" fo:text-indent="0in"/>
    </style:style>
    <style:style style:name="T95" style:parent-style-name="DefaultParagraphFont" style:family="text">
      <style:text-properties fo:font-weight="bold" style:font-weight-asian="bold" fo:font-style="italic" style:font-style-asian="italic"/>
    </style:style>
    <style:style style:name="P96" style:parent-style-name="Standard" style:family="paragraph"/>
    <style:style style:name="P97" style:parent-style-name="Standard" style:family="paragraph">
      <style:paragraph-properties fo:text-indent="0in"/>
    </style:style>
    <style:style style:name="P98" style:parent-style-name="Standard" style:family="paragraph"/>
    <style:style style:name="P99" style:parent-style-name="Standard" style:family="paragraph"/>
    <style:style style:name="P100" style:parent-style-name="Standard" style:family="paragraph">
      <style:paragraph-properties fo:margin-top="0in"/>
    </style:style>
    <style:style style:name="P101" style:parent-style-name="Standard" style:family="paragraph">
      <style:paragraph-properties fo:text-indent="0in"/>
    </style:style>
    <style:style style:name="P102" style:parent-style-name="Standard" style:family="paragraph"/>
    <style:style style:name="P103" style:parent-style-name="Standard" style:family="paragraph">
      <style:paragraph-properties fo:text-indent="0in"/>
    </style:style>
    <style:style style:name="P104" style:parent-style-name="Standard" style:family="paragraph"/>
    <style:style style:name="P105" style:parent-style-name="Standard" style:family="paragraph"/>
  </office:automatic-styles>
  <office:body>
    <office:text text:use-soft-page-breaks="true">
      <text:p text:style-name="P1">PROJETO 4: Tarefa 1 – Lista de Exercícios</text:p>
      <text:p text:style-name="P2"><text:span text:style-name="T3">Gustavo Borges Peres da Silva</text:span><text:span text:style-name="T4">1</text:span><text:span text:style-name="T5">, Michael P. C. Silva</text:span><text:span text:style-name="T6">1</text:span><text:span text:style-name="T7">, Rafael S. Melo</text:span><text:span text:style-name="T8">1</text:span></text:p>
      <text:p text:style-name="P9"><text:span text:style-name="T10">1</text:span><text:span text:style-name="T11">Departamento de Ciência da Computação – Universidade Federal de Catalão (UFCAT)</text:span></text:p>
      <text:p text:style-name="P12"><text:span text:style-name="T13">{gustavo.silva,<text:s/></text:span><text:span text:style-name="T14">michael.silva}@discente.ufcat.edu.br, rafinhalelograma@hotmail.com</text:span>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Informação Administrativa</text:span><text:span text:style-name="T21">: para a resolução desta lista, considera-se que o aluno possua uma distribuição MINIX funcional e que esteja realizando a prática de laboratório.</text:span></text:p>
            <text:p text:style-name="P22"><text:span text:style-name="T23">A LISTA DEVE<text:s/></text:span><text:span text:style-name="T24">SER ENTREGUE VIA SIGAA ATÉ 16/02/2025.</text:span></text:p>
          </table:table-cell>
        </table:table-row>
      </table:table>
      <text:h text:style-name="Heading1" text:outline-level="1"><text:bookmark-start text:name="_dmnhsjgy2lv5"/><text:bookmark-end text:name="_dmnhsjgy2lv5"/>Objetivos</text:h>
      <text:list text:style-name="WWNum3">
        <text:list-item text:start-value="0">
          <text:p text:style-name="P25"><text:bookmark-start text:name="_xs4i1bvmd5hh"/><text:bookmark-end text:name="_xs4i1bvmd5hh"/><text:span text:style-name="T26">Familiarizar o aluno com o SO MINIX.</text:span></text:p>
        </text:list-item>
      </text:list>
      <text:h text:style-name="P27" text:outline-level="1"><text:bookmark-start text:name="_lup8n0c3r1i8"/><text:bookmark-end text:name="_lup8n0c3r1i8"/><text:span text:style-name="T28">Perguntas específicas envolvendo o conteúdo do slide estudado sobre MINIX:</text:span></text:h>
      <text:list text:style-name="WWNum6">
        <text:list-item text:start-value="1">
          <text:p text:style-name="P29"><text:bookmark-start text:name="_4lbmmexolutu"/><text:bookmark-end text:name="_4lbmmexolutu"/><text:span text:style-name="T30">Considerando o MINIX, como as funções do sistema são distribuídas em espaço de kernel e<text:s/></text:span><text:span text:style-name="T31">espaço de usuário?</text:span></text:p>
        </text:list-item>
      </text:list>
      <text:p text:style-name="Standard">No MINIX, as funções do sistema são distribuídas entre o espaço de kernel e o espaço de usuário. O espaço de usuário atua como um sandbox, impedindo que programas causem danos à memória e a outros recursos do sistema. O kernel, que tem acesso total à memória e ao hardware, executa em espaço de kernel. Processos de usuário executam em espaço de usuário e, para interagir com o kernel, precisam usar chamadas de sistema como open, read, write, etc. O kernel gerencia a memória virtual, dividindo-a em espaço de usuário (dados, código, pilha e heap do processo) e espaço de kernel (tabela de páginas, estruturas de dados do kernel, etc.). As chamadas de sistema atuam como uma interface entre os processos de usuário e o kernel, garantindo que os processos de usuário não tenham acesso direto ao hardware ou à memória do kernel.</text:p>
      <text:p text:style-name="P32"/>
      <text:list text:style-name="WWNum6" text:continue-numbering="true">
        <text:list-item>
          <text:p text:style-name="P33">Qual é o papel da TAREFA de sistema e de clock?</text:p>
        </text:list-item>
      </text:list>
      <text:list text:style-name="WWNum1">
        <text:list-item text:start-value="0">
          <text:p text:style-name="P34">TAREFA de sistema: Gerência chamadas de sistema, como read, write, fork, etc. Ela recebe requisições para serviços do kernel e as processa.</text:p>
        </text:list-item>
        <text:list-item>
          <text:p text:style-name="P35">TAREFA de clock: Controla o tempo do sistema, gerando interrupções periódicas para sincronização e escalonamento. Ela interage com o hardware que gera sinais de temporização e não é acessível diretamente por processos de usuário.</text:p>
        </text:list-item>
      </text:list>
      <text:p text:style-name="P36"/>
      <text:list text:style-name="WWNum6" text:continue-numbering="true">
        <text:list-item>
          <text:p text:style-name="P37">Qual é a relação de privilégios entre as camadas 1 (kernel), 2 (device drivers), 3 (servidores) e 4 (processos de usuário) no MINIX?</text:p>
        </text:list-item>
      </text:list>
      <text:soft-page-break/>
      <text:list text:style-name="WWNum5">
        <text:list-item text:start-value="0">
          <text:p text:style-name="P38">Camada 1 (Kernel): Máximo privilégio, com acesso total ao hardware e memória do sistema.</text:p>
        </text:list-item>
        <text:list-item>
          <text:p text:style-name="P39">Camada 2 (Device Drivers): Privilégio intermediário, interage com hardware específico, mas com acesso limitado em comparação ao kernel.</text:p>
        </text:list-item>
        <text:list-item>
          <text:p text:style-name="P40">Camada 3 (Servidores): Privilégio reduzido, fornece serviços como gerenciamento de arquivos e sistema de janelas.</text:p>
        </text:list-item>
        <text:list-item>
          <text:p text:style-name="P41">Camada 4 (Processos de Usuário): Mínimo privilégio, executa aplicações de usuário com acesso restrito ao hardware e ao kernel.</text:p>
        </text:list-item>
      </text:list>
      <text:p text:style-name="P42"/>
      <text:list text:style-name="WWNum6" text:continue-numbering="true">
        <text:list-item>
          <text:p text:style-name="P43">Forneça 3 exemplos de chamadas de sistema no MINIX, incluindo a descrição funcional e a especificação dos parâmetros de entrada e saída.</text:p>
        </text:list-item>
      </text:list>
      <text:list text:style-name="WWNum7">
        <text:list-item text:start-value="0">
          <text:p text:style-name="P44">fork(): Cria um novo processo<text:s/>duplicando o processo existente. Parâmetros: nenhum. Retorno: PID do processo filho.</text:p>
        </text:list-item>
        <text:list-item>
          <text:p text:style-name="P45">read(fd, buffer, nbytes): Lê dados de um arquivo ou dispositivo. Parâmetros: fd (descritor de arquivo), buffer (onde os dados serão armazenados), nbytes (número de bytes a ler). Retorno: número de bytes lidos.</text:p>
        </text:list-item>
        <text:list-item>
          <text:p text:style-name="P46">write(fd, buffer, nbytes): Escreve dados em um arquivo ou dispositivo. Parâmetros: fd (descritor de arquivo), buffer (dados a escrever), nbytes (número de bytes a escrever). Retorno: número de bytes escritos.</text:p>
        </text:list-item>
      </text:list>
      <text:p text:style-name="P47"/>
      <text:list text:style-name="WWNum6" text:continue-numbering="true">
        <text:list-item>
          <text:p text:style-name="P48">Diferencie chamada de sistema (system call) de chamada de kernel (kernel call) no MINIX.</text:p>
        </text:list-item>
      </text:list>
      <text:list text:style-name="WWNum11">
        <text:list-item text:start-value="0">
          <text:p text:style-name="P49">Chamada de sistema (system call): Interface de alto nível para processos de usuário, definida pelo padrão POSIX. Exemplos: read, write, fork.</text:p>
        </text:list-item>
        <text:list-item>
          <text:p text:style-name="P50">Chamada de kernel (kernel call): Interface de baixo nível para drivers e servidores, usada para operações como leitura de portas de I/O. Exemplo: leitura direta de hardware.</text:p>
        </text:list-item>
      </text:list>
      <text:p text:style-name="P51"/>
      <text:list text:style-name="WWNum6" text:continue-numbering="true">
        <text:list-item>
          <text:p text:style-name="P52">Considere o seguinte exemplo: um arquivo no MINIX possui um proprietário com o uid = 12 e gid = 1 e tem o modo de acesso rwxr-x---. Explique o significado deste modo de acesso. Se outro usuário com o uid = 6 e gid =1 tentar executar o arquivo, o que irá acontecer?</text:p>
        </text:list-item>
      </text:list>
      <text:p text:style-name="Standard">O modo de acesso rwxr-x--- significa:</text:p>
      <text:list text:style-name="WWNum4">
        <text:list-item text:start-value="0">
          <text:p text:style-name="P53">Proprietário (uid=12): Permissão de leitura (r), escrita (w) e execução (x).</text:p>
        </text:list-item>
        <text:list-item>
          <text:p text:style-name="P54">Grupo (gid=1): Permissão de leitura (r) e execução (x).</text:p>
        </text:list-item>
        <text:list-item>
          <text:p text:style-name="P55">Outros: Nenhuma permissão.</text:p>
        </text:list-item>
      </text:list>
      <text:p text:style-name="Standard">O usuário com uid=6 e gid=1 pertence ao grupo do arquivo, portanto, herda as permissões de leitura e execução. Ele poderá ler e executar o arquivo normalmente.</text:p>
      <text:p text:style-name="P56"/>
      <text:list text:style-name="WWNum6" text:continue-numbering="true">
        <text:list-item>
          <text:p text:style-name="P57">Em vista do fato de que a mera existência de um super-usuário possa levar a todos os tipos de problemas de segurança, por que tal conceito existe?</text:p>
        </text:list-item>
      </text:list>
      <text:p text:style-name="Standard">O superusuário existe para realizar tarefas administrativas que exigem acesso total ao sistema, como gerenciamento de usuários, configuração de hardware e instalação de software. A separação de privilégios garante que apenas usuários autorizados realizem essas operações críticas. O processo init, executado como superusuário, carrega todos os demais processos e herda a prioridade para garantir a execução controlada.</text:p>
      <text:p text:style-name="P58"/>
      <text:list text:style-name="WWNum6" text:continue-numbering="true">
        <text:list-item>
          <text:p text:style-name="P59">No MINIX, se o usuário 2 cria um link para um arquivo de um usuário 1, e então o usuário 1 remove este arquivo, o que acontece quando o usuário 2 tenta ler o arquivo? Explique (Dica: simular este<text:s/>comportamento. Use para tal o comando ln).</text:p>
        </text:list-item>
      </text:list>
      <text:p text:style-name="Standard">Se o usuário 2 cria um link para um arquivo do usuário 1 e o usuário 1 remove o arquivo, o link criado pelo usuário 2 se torna um "link quebrado" (dangling link). Qualquer tentativa de acessar o arquivo resultará em um erro, pois o arquivo original foi removido.</text:p>
      <text:p text:style-name="P60"/>
      <text:list text:style-name="WWNum6" text:continue-numbering="true">
        <text:list-item>
          <text:p text:style-name="P61">Como o reincarnation server (RS) opera com relação à manutenção dos controladores de dispositivo no MINIX 3?</text:p>
        </text:list-item>
      </text:list>
      <text:p text:style-name="Standard">O RS monitora drivers e servidores periodicamente. Se um driver falhar em responder corretamente, o RS substitui automaticamente por uma nova cópia, garantindo a recuperação de falhas sem intervenção manual. Isso é especialmente útil para drivers de disco, que são espelhados em memória RAM (shadowed).</text:p>
      <text:p text:style-name="Standard"/>
      <text:list text:style-name="WWNum6" text:continue-numbering="true">
        <text:list-item>
          <text:p text:style-name="P62">Considerando os Sistemas Operacionais (SOs) tradicionais (ex. Windows, OS X, Linux etc), quais deles possuem características semelhantes ao serviço fornecido pelo RS no MINIX?</text:p>
        </text:list-item>
      </text:list>
      <text:list text:style-name="WWNum2">
        <text:list-item text:start-value="0">
          <text:p text:style-name="P63">Windows: Serviço de Recuperação de Falhas (Windows Service Recovery).</text:p>
        </text:list-item>
        <text:list-item>
          <text:p text:style-name="P64">Linux: Systemd e mecanismos de reinicialização de serviços.</text:p>
        </text:list-item>
        <text:list-item>
          <text:p text:style-name="P65">macOS: Launchd, que gerencia e reinicia serviços.</text:p>
        </text:list-item>
      </text:list>
      <text:p text:style-name="P66"/>
      <text:list text:style-name="WWNum6" text:continue-numbering="true">
        <text:list-item>
          <text:p text:style-name="P67">Por que o MINIX mantém o programa update em execução, em segundo plano, todo o tempo?</text:p>
        </text:list-item>
      </text:list>
      <text:p text:style-name="Standard">O programa update é mantido em execução em segundo plano para emitir chamadas de sistema SYNC a cada 30<text:s/>segundos. Isso garante que as modificações no sistema sejam escritas no disco, prevenindo perda de dados em caso de falha do sistema ou travamento.</text:p>
      <text:p text:style-name="P68"/>
      <text:list text:style-name="WWNum6" text:continue-numbering="true">
        <text:list-item>
          <text:p text:style-name="P69">Considere a seguinte estrutura de processos.</text:p>
        </text:list-item>
      </text:list>
      <text:p text:style-name="P70">PID TTY TIME CMD</text:p>
      <text:p text:style-name="P71">(-4) ? 0:29 idle</text:p>
      <text:p text:style-name="P72">(-3) ? 0:00 clock</text:p>
      <text:p text:style-name="P73">(-2) ? 0:00 system</text:p>
      <text:p text:style-name="P74">(-1) ? 0:00 kernel</text:p>
      <text:p text:style-name="P75">( 0) ? 0:00 pm</text:p>
      <text:p text:style-name="P76">( 1) ? 0:00 init</text:p>
      <text:p text:style-name="P77">Explique a relação entre os índices de PID do init e demais processos apresentados.</text:p>
      <text:p text:style-name="Standard">Os PIDs negativos representam tarefas do sistema:</text:p>
      <text:p text:style-name="P78">PID -4: idle</text:p>
      <text:p text:style-name="P79">PID -3: clock</text:p>
      <text:p text:style-name="P80">PID -2: system</text:p>
      <text:p text:style-name="P81">PID -1: kernel</text:p>
      <text:p text:style-name="Standard">O<text:s/>init (PID 1) é o processo pai de todos os processos de usuário. A árvore de processos no MINIX é formada por todos os processos de sistema e de usuário, com o init na raiz.</text:p>
      <text:p text:style-name="P82"/>
      <text:list text:style-name="WWNum6" text:continue-numbering="true">
        <text:list-item>
          <text:p text:style-name="P83">Considere as chamadas fork() e pthread_create(). Qual é o nível de conhecimento do kernel do MINIX para cada uma destas chamadas? No caso de threads, como se classificariam as threads implementadas no MINIX 3?</text:p>
        </text:list-item>
      </text:list>
      <text:list text:style-name="WWNum9">
        <text:list-item text:start-value="0">
          <text:p text:style-name="P84">fork(): O kernel gerencia a criação de processos, incluindo alocação de memória e cópia do espaço de endereçamento.</text:p>
        </text:list-item>
        <text:list-item>
          <text:p text:style-name="P85">pthread_create(): Implementada em espaço de usuário, sem envolvimento direto do kernel. As threads são threads de espaço de usuário.</text:p>
        </text:list-item>
      </text:list>
      <text:p text:style-name="P86"/>
      <text:list text:style-name="WWNum6" text:continue-numbering="true">
        <text:list-item>
          <text:p text:style-name="P87">Explique como um processo realiza uma chamada a um device driver.</text:p>
        </text:list-item>
      </text:list>
      <text:p text:style-name="Standard">Um processo realiza uma chamada a um device driver enviando uma mensagem ao servidor apropriado (ex: servidor de arquivos FS). O servidor envia uma mensagem ao driver, que realiza a operação de I/O e retorna os dados ao processo. Chamadas de kernel são usadas para coordenar o processo de I/O e copiar dados entre os processos.</text:p>
      <text:p text:style-name="Standard"/>
      <text:list text:style-name="WWNum6" text:continue-numbering="true">
        <text:list-item>
          <text:p text:style-name="P88">Com o conhecimento adquirido e com base no material de apoio, faça um breve comparativo entre o SO MINIX e o SO UNIX.</text:p>
        </text:list-item>
      </text:list>
      <text:soft-page-break/>
      <text:list text:style-name="WWNum8">
        <text:list-item text:start-value="0">
          <text:p text:style-name="P89">MINIX: Utiliza um kernel microkernel, modular, focado em educação e simplicidade.</text:p>
        </text:list-item>
        <text:list-item>
          <text:p text:style-name="P90">UNIX: Utiliza um kernel monolítico, focado em desempenho e escalabilidade. Ambos suportam chamadas de sistema e possuem características de sistemas de arquivos semelhantes.</text:p>
        </text:list-item>
      </text:list>
      <text:p text:style-name="P91"/>
      <text:list text:style-name="WWNum6" text:continue-numbering="true">
        <text:list-item>
          <text:p text:style-name="P92">Qual é o papel do System Event Framework (SEF) em um device driver?</text:p>
        </text:list-item>
      </text:list>
      <text:p text:style-name="Standard">O SEF permite que desenvolvedores registrem callbacks para eventos como inicialização, atualização e reinicialização de serviços. Ele mascara os detalhes de implementação do RS e facilita a interação entre o kernel e os drivers.</text:p>
      <text:p text:style-name="P93"/>
      <text:p text:style-name="P94"><text:span text:style-name="T95">Perguntas específicas envolvendo o uso do sistema operacional MINIX instalado:</text:span></text:p>
      <text:list text:style-name="WWNum6" text:continue-numbering="true">
        <text:list-item>
          <text:p text:style-name="P96">Por que<text:s/>uma instalação recente do MINIX viria com um usuário existente chamado “ast”?</text:p>
        </text:list-item>
      </text:list>
      <text:p text:style-name="Standard">O usuário "ast" é uma homenagem a Andrew S. Tanenbaum, criador do MINIX. Ele também serve como um template para diretórios de usuário criados com o comando adduser.</text:p>
      <text:p text:style-name="P97"/>
      <text:list text:style-name="WWNum6" text:continue-numbering="true">
        <text:list-item>
          <text:p text:style-name="P98">Qual é o nome da aplicação (utilitário) que você usou para instalar novos softwares no MINIX? Dê exemplos de uso.</text:p>
        </text:list-item>
      </text:list>
      <text:p text:style-name="Standard">O utilitário usado para instalar novos softwares no MINIX é o pkgin. Exemplos de uso:</text:p>
      <text:list text:style-name="WWNum10">
        <text:list-item text:start-value="0">
          <text:p text:style-name="P99">pkgin install &lt;pacote&gt;: Instala um pacote.</text:p>
        </text:list-item>
        <text:list-item>
          <text:p text:style-name="P100">pkgin update: Atualiza a lista de pacotes.</text:p>
        </text:list-item>
      </text:list>
      <text:p text:style-name="P101"/>
      <text:list text:style-name="WWNum6" text:continue-numbering="true">
        <text:list-item>
          <text:p text:style-name="P102">Qual é o comando que você deve usar para refazer o kernel (build) e instalá-lo?</text:p>
        </text:list-item>
      </text:list>
      <text:p text:style-name="Standard">O comando para refazer e instalar o kernel é make world seguido de make install no diretório /usr/src.</text:p>
      <text:p text:style-name="P103"/>
      <text:list text:style-name="WWNum6" text:continue-numbering="true">
        <text:list-item>
          <text:p text:style-name="P104">Qual é o arquivo fonte que possui a string do banner do MINIX (i.e. “MINIX 3.1.X ... Copyright ...”) que é mostrado quando o MINIX inicializa?</text:p>
        </text:list-item>
      </text:list>
      <text:p text:style-name="Standard">O arquivo fonte que contém a string do banner do MINIX é usr/src/kernel/main.c. A informação foi obtida usando o comando grep para buscar a string "Copyright" no<text:s/><text:soft-page-break/>diretório /usr/src.</text:p>
      <text:p text:style-name="Standard"/>
      <text:list text:style-name="WWNum6" text:continue-numbering="true">
        <text:list-item>
          <text:p text:style-name="P105">Qual é o nome da chamada de sistema do MINIX com o número 33 (decimal), e como você determinou esta informação?</text:p>
        </text:list-item>
      </text:list>
      <text:p text:style-name="Standard">A chamada de sistema com o número 33 é access(), que verifica permissões de arquivo. A informação foi obtida no arquivo /usr/src/servers/pm/table.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" svg:font-family="Courier" style:font-family-generic="system" style:font-pitch="variable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" style:font-name-complex="Time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52in"/>
      <style:text-properties fo:font-weight="bold" style:font-weight-asian="bold" fo:font-size="13pt" style:font-size-asian="13pt" style:font-size-complex="13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1652in" fo:margin-left="0.2291in" fo:text-indent="-0.0937in">
        <style:tab-stops/>
      </style:paragraph-properties>
      <style:text-properties fo:font-weight="bold" style:font-weight-asian="bold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1652in" fo:margin-left="0.3437in" fo:text-indent="-0.1041in">
        <style:tab-stops/>
      </style:paragraph-properties>
      <style:text-properties fo:font-weight="bold" style:font-weight-asian="bold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margin-left="0.6in" fo:text-indent="-0.6in">
        <style:tab-stops/>
      </style:paragraph-properties>
      <style:text-properties fo:font-style="italic" style:font-style-asian="italic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margin-left="0.7in" fo:text-indent="-0.7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text-align="center" fo:margin-left="0.8in" fo:text-indent="-0.8in">
        <style:tab-stops/>
      </style:paragraph-properties>
      <style:text-properties fo:font-weight="bold" style:font-weight-asian="bold" fo:font-style="italic" style:font-style-asian="italic" fo:color="#000000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 fo:margin-top="0.1652in" fo:text-indent="0.295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text-align="center" fo:margin-bottom="0.1576in"/>
      <style:text-properties fo:font-weight="bold" style:font-weight-asian="bold" fo:font-variant="small-caps" fo:font-size="18pt" style:font-size-asian="18pt" style:font-size-complex="18pt" fo:hyphenate="false"/>
    </style:style>
    <style:style style:name="Subtitle" style:display-name="Subtitle" style:family="paragraph" style:parent-style-name="Normal" style:next-style-name="Standard">
      <style:paragraph-properties fo:text-align="center" fo:margin-bottom="0.1576in"/>
      <style:text-properties fo:font-weight="bold" style:font-weight-asian="bold" fo:font-style="italic" style:font-style-asian="italic" fo:font-variant="small-caps" fo:font-size="14pt" style:font-size-asian="14pt" style:font-size-complex="1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normal" style:font-weight-asian="normal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weight="normal" style:font-weight-asian="normal" fo:font-size="13pt" style:font-size-asian="13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normal" style:font-weight-asian="norm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3pt" style:font-size-asian="13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)" style:num-list-format-name="NLF0" style:num-format="1">
        <style:list-level-properties text:space-before="0.0451in" text:min-label-width="0.25in" text:list-level-position-and-space-mode="label-alignment">
          <style:list-level-label-alignment text:label-followed-by="listtab" fo:margin-left="0.2951in" fo:text-indent="-0.25in"/>
        </style:list-level-properties>
      </text:list-level-style-number>
      <text:list-level-style-number text:level="2" text:style-name="WW_CharLFO6LVL2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)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prefix="(" style:num-suffix=")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prefix="(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prefix="(" style:num-suffix=")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in" fo:margin-left="1.1805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77in"/>
      </style:header-style>
      <style:footer-style>
        <style:header-footer-properties style:dynamic-spacing="true" fo:min-height="0.984in"/>
      </style:footer-style>
    </style:page-layout>
  </office:automatic-styles>
  <office:master-styles>
    <style:master-page style:name="MP0" style:page-layout-name="PL0">
      <style:header>
        <text:p text:style-name="Standard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stavo Borges</dc:creator>
    <meta:creation-date>2025-02-17T00:53:00Z</meta:creation-date>
    <dc:date>2025-02-17T00:53:00Z</dc:date>
    <meta:template xlink:href="Normal.dotm" xlink:type="simple"/>
    <meta:editing-cycles>2</meta:editing-cycles>
    <meta:editing-duration>PT0S</meta:editing-duration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  <meta:document-statistic meta:page-count="6" meta:paragraph-count="19" meta:word-count="1478" meta:character-count="9890" meta:row-count="70" meta:non-whitespace-character-count="8431"/>
  </office:meta>
</office:document-meta>
</file>