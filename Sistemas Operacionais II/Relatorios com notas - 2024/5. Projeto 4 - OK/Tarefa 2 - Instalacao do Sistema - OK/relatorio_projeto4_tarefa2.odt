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style:text-position="super 66.6%"/>
    </style:style>
    <style:style style:name="T4" style:parent-style-name="DefaultParagraphFont" style:family="text">
      <style:text-properties style:font-name="Times New Roman" style:text-position="super 66.6%"/>
    </style:style>
    <style:style style:name="T5" style:parent-style-name="DefaultParagraphFont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text-properties style:font-name="Times New Roman"/>
    </style:style>
    <style:style style:name="P8" style:parent-style-name="ListParagraph" style:list-style-name="LFO7" style:family="paragraph"/>
    <style:style style:name="P9" style:parent-style-name="SBCtitle1" style:list-style-name="LFO8" style:family="paragraph"/>
    <style:style style:name="P10" style:parent-style-name="SBCtitle1" style:list-style-name="LFO8" style:family="paragraph">
      <style:text-properties style:font-weight-complex="bold"/>
    </style:style>
    <style:style style:name="P11" style:parent-style-name="ListParagraph" style:list-style-name="LFO8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9pt"/>
    </style:style>
    <style:style style:name="P15" style:parent-style-name="Normal" style:family="paragraph">
      <style:paragraph-properties fo:text-align="center" fo:text-indent="0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9pt"/>
    </style:style>
    <style:style style:name="P17" style:parent-style-name="Normal" style:family="paragraph">
      <style:paragraph-properties fo:text-align="center" fo:text-indent="0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9pt"/>
    </style:style>
    <style:style style:name="P19" style:parent-style-name="Normal" style:family="paragraph">
      <style:paragraph-properties fo:text-align="center" fo:text-indent="0in"/>
    </style:style>
    <style:style style:name="T20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9pt"/>
    </style:style>
    <style:style style:name="P22" style:parent-style-name="Normal" style:family="paragraph">
      <style:paragraph-properties fo:text-align="center" fo:text-indent="0in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9pt"/>
    </style:style>
    <style:style style:name="P25" style:parent-style-name="Normal" style:family="paragraph">
      <style:paragraph-properties fo:margin-top="0in"/>
    </style:style>
    <style:style style:name="P26" style:parent-style-name="Normal" style:family="paragraph">
      <style:paragraph-properties fo:text-align="center" fo:margin-top="0in"/>
    </style:style>
    <style:style style:name="P27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9pt"/>
    </style:style>
    <style:style style:name="P28" style:parent-style-name="Normal" style:family="paragraph">
      <style:paragraph-properties fo:text-align="center" fo:margin-top="0in"/>
    </style:style>
    <style:style style:name="P29" style:parent-style-name="Normal" style:master-page-name="MP1" style:family="paragraph">
      <style:paragraph-properties fo:break-before="page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9pt"/>
    </style:style>
    <style:style style:name="T32" style:parent-style-name="DefaultParagraphFont" style:family="text">
      <style:text-properties style:font-name="Calibri"/>
    </style:style>
    <style:style style:name="T33" style:parent-style-name="DefaultParagraphFont" style:family="text">
      <style:text-properties style:font-name="Calibri" fo:color="#0070C0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9pt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9pt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4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45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46" style:parent-style-name="DefaultParagraphFont" style:family="text">
      <style:text-properties style:font-name="Calibri"/>
    </style:style>
    <style:style style:name="T47" style:parent-style-name="DefaultParagraphFont" style:family="text">
      <style:text-properties style:font-name="Calibri" fo:font-weight="bold" style:font-weight-asian="bold" style:font-weight-complex="bold"/>
    </style:style>
    <style:style style:name="T48" style:parent-style-name="DefaultParagraphFont" style:family="text">
      <style:text-properties style:font-name="Calibri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Calibri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53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54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55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56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57" style:parent-style-name="DefaultParagraphFont" style:family="text">
      <style:text-properties style:font-name="Calibri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61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62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63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6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65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Calibri"/>
    </style:style>
    <style:style style:name="P68" style:parent-style-name="Normal" style:family="paragraph">
      <style:text-properties style:font-name="Calibri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Calibri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73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74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75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text-align="center"/>
    </style:style>
    <style:style style:name="T78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7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80" style:parent-style-name="DefaultParagraphFont" style:family="text">
      <style:text-properties style:font-name="Calibri"/>
    </style:style>
    <style:style style:name="T81" style:parent-style-name="DefaultParagraphFont" style:family="text">
      <style:text-properties style:font-name="Calibri" fo:font-weight="bold" style:font-weight-asian="bold" style:font-weight-complex="bold"/>
    </style:style>
    <style:style style:name="T82" style:parent-style-name="DefaultParagraphFont" style:family="text">
      <style:text-properties style:font-name="Calibri"/>
    </style:style>
    <style:style style:name="T83" style:parent-style-name="DefaultParagraphFont" style:family="text">
      <style:text-properties style:font-name="Calibri" fo:font-weight="bold" style:font-weight-asian="bold" style:font-weight-complex="bold"/>
    </style:style>
    <style:style style:name="T84" style:parent-style-name="DefaultParagraphFont" style:family="text">
      <style:text-properties style:font-name="Calibri"/>
    </style:style>
    <style:style style:name="T85" style:parent-style-name="DefaultParagraphFont" style:family="text">
      <style:text-properties style:font-name="Calibri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8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8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90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91" style:parent-style-name="DefaultParagraphFont" style:family="text">
      <style:text-properties style:font-name="Calibri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style:font-name="Calibri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9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97" style:parent-style-name="DefaultParagraphFont" style:family="text">
      <style:text-properties style:font-name="Calibri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00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101" style:parent-style-name="DefaultParagraphFont" style:family="text">
      <style:text-properties style:font-name="Calibri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family="paragraph">
      <style:paragraph-properties fo:text-align="center"/>
    </style:style>
    <style:style style:name="T104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05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06" style:parent-style-name="Normal" style:family="paragraph">
      <style:paragraph-properties fo:text-align="center"/>
    </style:style>
    <style:style style:name="T107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0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09" style:parent-style-name="Normal" style:family="paragraph">
      <style:paragraph-properties fo:text-align="center"/>
    </style:style>
    <style:style style:name="T110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1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family="paragraph">
      <style:paragraph-properties fo:text-align="center"/>
    </style:style>
    <style:style style:name="T114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15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16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1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style:font-name="Calibri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T123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2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 fo:text-align="center"/>
    </style:style>
    <style:style style:name="T127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2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29" style:parent-style-name="ListParagraph" style:list-style-name="LFO8" style:family="paragraph"/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style:font-name="Calibri"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T137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3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39" style:parent-style-name="Normal" style:family="paragraph">
      <style:paragraph-properties fo:text-align="center"/>
    </style:style>
    <style:style style:name="P140" style:parent-style-name="Normal" style:family="paragraph">
      <style:paragraph-properties fo:text-align="center"/>
    </style:style>
    <style:style style:name="T141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4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43" style:parent-style-name="Normal" style:family="paragraph">
      <style:paragraph-properties fo:text-align="center"/>
      <style:text-properties style:font-name="Calibri" fo:font-weight="bold" style:font-weight-asian="bold" style:font-weight-complex="bold" fo:font-size="11pt" style:font-size-asian="11pt" style:font-size-complex="9pt"/>
    </style:style>
    <style:style style:name="P144" style:parent-style-name="ListParagraph" style:list-style-name="LFO8" style:family="paragraph">
      <style:text-properties fo:font-weight="bold" style:font-weight-asian="bold" style:font-weight-complex="bold"/>
    </style:style>
    <style:style style:name="T145" style:parent-style-name="DefaultParagraphFont" style:family="text">
      <style:text-properties style:font-name="Calibri"/>
    </style:style>
    <style:style style:name="T146" style:parent-style-name="DefaultParagraphFont" style:family="text">
      <style:text-properties style:font-name="Calibri"/>
    </style:style>
    <style:style style:name="T147" style:parent-style-name="DefaultParagraphFont" style:family="text">
      <style:text-properties style:font-name="Calibri"/>
    </style:style>
    <style:style style:name="P148" style:parent-style-name="Normal" style:family="paragraph">
      <style:paragraph-properties fo:text-align="center"/>
    </style:style>
    <style:style style:name="T149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50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51" style:parent-style-name="Normal" style:family="paragraph">
      <style:text-properties style:font-name="Calibri"/>
    </style:style>
    <style:style style:name="P152" style:parent-style-name="Normal" style:family="paragraph">
      <style:text-properties style:font-name="Calibri"/>
    </style:style>
    <style:style style:name="P153" style:parent-style-name="ListParagraph" style:list-style-name="LFO8" style:family="paragraph">
      <style:text-properties fo:font-weight="bold" style:font-weight-asian="bold" style:font-weight-complex="bold"/>
    </style:style>
    <style:style style:name="T154" style:parent-style-name="DefaultParagraphFont" style:family="text">
      <style:text-properties fo:color="#0070C0"/>
    </style:style>
    <style:style style:name="T155" style:parent-style-name="DefaultParagraphFont" style:family="text">
      <style:text-properties fo:color="#0070C0"/>
    </style:style>
    <style:style style:name="P156" style:parent-style-name="Normal" style:family="paragraph">
      <style:paragraph-properties fo:text-align="center" fo:text-indent="0in"/>
    </style:style>
    <style:style style:name="T157" style:parent-style-name="DefaultParagraphFont" style:family="text">
      <style:text-properties fo:language="en" fo:country="US"/>
    </style:style>
    <style:style style:name="P158" style:parent-style-name="Normal" style:family="paragraph">
      <style:paragraph-properties fo:margin-top="0in" fo:text-indent="0in"/>
      <style:text-properties fo:language="en" fo:country="US"/>
    </style:style>
    <style:style style:name="P159" style:parent-style-name="Normal" style:family="paragraph">
      <style:paragraph-properties fo:margin-top="0in" fo:text-indent="0in"/>
      <style:text-properties fo:language="en" fo:country="US"/>
    </style:style>
    <style:style style:name="P160" style:parent-style-name="Normal" style:family="paragraph">
      <style:paragraph-properties fo:margin-top="0in" fo:text-indent="0in"/>
      <style:text-properties fo:language="en" fo:country="US"/>
    </style:style>
    <style:style style:name="T161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6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163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164" style:parent-style-name="DefaultParagraphFont" style:family="text">
      <style:text-properties style:font-name="Calibri"/>
    </style:style>
    <style:style style:name="T165" style:parent-style-name="DefaultParagraphFont" style:family="text">
      <style:text-properties style:font-name="Calibri"/>
    </style:style>
    <style:style style:name="T166" style:parent-style-name="Hyperlink" style:family="text">
      <style:text-properties style:font-name="Calibri"/>
    </style:style>
    <style:style style:name="T167" style:parent-style-name="DefaultParagraphFont" style:family="text">
      <style:text-properties style:font-name="Calibri"/>
    </style:style>
    <style:style style:name="T168" style:parent-style-name="Hyperlink" style:family="text">
      <style:text-properties style:font-name="Calibri"/>
    </style:style>
    <style:style style:name="T169" style:parent-style-name="DefaultParagraphFont" style:family="text">
      <style:text-properties style:font-name="Calibri"/>
    </style:style>
    <style:style style:name="P170" style:parent-style-name="Normal" style:family="paragraph">
      <style:paragraph-properties fo:text-align="center"/>
    </style:style>
    <style:style style:name="T171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72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73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174" style:parent-style-name="DefaultParagraphFont" style:family="text">
      <style:text-properties style:font-name="Calibri"/>
    </style:style>
    <style:style style:name="P175" style:parent-style-name="Normal" style:family="paragraph">
      <style:paragraph-properties fo:text-align="center"/>
    </style:style>
    <style:style style:name="T176" style:parent-style-name="DefaultParagraphFont" style:family="text">
      <style:text-properties style:font-name="Calibri"/>
    </style:style>
    <style:style style:name="P177" style:parent-style-name="Normal" style:family="paragraph">
      <style:paragraph-properties fo:text-align="center"/>
    </style:style>
    <style:style style:name="T178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7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T180" style:parent-style-name="DefaultParagraphFont" style:family="text">
      <style:text-properties style:font-name="Calibri"/>
    </style:style>
    <style:style style:name="T181" style:parent-style-name="DefaultParagraphFont" style:family="text">
      <style:text-properties style:font-name="Calibri"/>
    </style:style>
    <style:style style:name="P182" style:parent-style-name="Normal" style:family="paragraph">
      <style:paragraph-properties fo:text-align="center"/>
    </style:style>
    <style:style style:name="T183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8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85" style:parent-style-name="Normal" style:family="paragraph">
      <style:text-properties style:font-name="Calibri"/>
    </style:style>
    <style:style style:name="T186" style:parent-style-name="DefaultParagraphFont" style:family="text">
      <style:text-properties style:font-name="Calibri"/>
    </style:style>
    <style:style style:name="P187" style:parent-style-name="Normal" style:family="paragraph">
      <style:paragraph-properties fo:text-align="center"/>
    </style:style>
    <style:style style:name="T188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8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90" style:parent-style-name="Normal" style:family="paragraph">
      <style:text-properties style:font-name="Calibri"/>
    </style:style>
    <style:style style:name="P191" style:parent-style-name="Normal" style:family="paragraph">
      <style:text-properties style:font-name="Calibri"/>
    </style:style>
    <style:style style:name="P192" style:parent-style-name="Normal" style:family="paragraph">
      <style:paragraph-properties fo:text-align="center"/>
    </style:style>
    <style:style style:name="T193" style:parent-style-name="DefaultParagraphFont" style:family="text">
      <style:text-properties style:font-name="Calibri"/>
    </style:style>
    <style:style style:name="P194" style:parent-style-name="Normal" style:family="paragraph">
      <style:paragraph-properties fo:text-align="center"/>
    </style:style>
    <style:style style:name="T195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19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97" style:parent-style-name="Normal" style:family="paragraph">
      <style:paragraph-properties fo:text-align="center"/>
    </style:style>
    <style:style style:name="T19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199" style:parent-style-name="Normal" style:family="paragraph">
      <style:paragraph-properties fo:text-align="center"/>
    </style:style>
    <style:style style:name="T200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20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202" style:parent-style-name="Normal" style:family="paragraph">
      <style:paragraph-properties fo:text-align="center" fo:text-indent="0in"/>
    </style:style>
    <style:style style:name="T203" style:parent-style-name="DefaultParagraphFont" style:family="text">
      <style:text-properties fo:language="en" fo:country="US"/>
    </style:style>
    <style:style style:name="P204" style:parent-style-name="Normal" style:family="paragraph">
      <style:paragraph-properties fo:margin-top="0in" fo:text-indent="0in"/>
    </style:style>
    <style:style style:name="T205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20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207" style:parent-style-name="Normal" style:family="paragraph">
      <style:paragraph-properties fo:text-align="center"/>
    </style:style>
    <style:style style:name="T208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T20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9pt"/>
    </style:style>
    <style:style style:name="P210" style:parent-style-name="ListParagraph" style:list-style-name="LFO8" style:family="paragraph">
      <style:text-properties fo:font-weight="bold" style:font-weight-asian="bold" style:font-weight-complex="bold"/>
    </style:style>
    <style:style style:name="P211" style:parent-style-name="ListParagraph" style:list-style-name="LFO8" style:family="paragraph">
      <style:text-properties fo:font-weight="bold" style:font-weight-asian="bold" style:font-weight-complex="bold"/>
    </style:style>
    <style:style style:name="P212" style:parent-style-name="ListParagraph" style:family="paragraph">
      <style:text-properties fo:font-weight="bold" style:font-weight-asian="bold" style:font-weight-complex="bold"/>
    </style:style>
    <style:style style:name="P213" style:parent-style-name="Normal" style:family="paragraph">
      <style:paragraph-properties fo:text-align="center"/>
    </style:style>
    <style:style style:name="T214" style:parent-style-name="DefaultParagraphFont" style:family="text">
      <style:text-properties fo:font-weight="bold" style:font-weight-asian="bold" style:font-weight-complex="bold" fo:font-size="11pt" style:font-size-asian="11pt" style:font-size-complex="9pt"/>
    </style:style>
    <style:style style:name="P215" style:parent-style-name="ListParagraph" style:master-page-name="MP2" style:list-style-name="LFO8" style:family="paragraph">
      <style:paragraph-properties fo:break-before="page"/>
      <style:text-properties fo:font-weight="bold" style:font-weight-asian="bold" style:font-weight-complex="bold"/>
    </style:style>
    <style:style style:name="P216" style:parent-style-name="SBCparagraph" style:list-style-name="LFO9" style:family="paragraph">
      <style:text-properties style:font-name="Times New Roman"/>
    </style:style>
    <style:style style:name="P217" style:parent-style-name="SBCparagraph" style:list-style-name="LFO9" style:family="paragraph"/>
    <style:style style:name="T218" style:parent-style-name="DefaultParagraphFont" style:family="text">
      <style:text-properties style:font-name="Times New Roman" fo:language="en" fo:country="US"/>
    </style:style>
    <style:style style:name="T219" style:parent-style-name="DefaultParagraphFont" style:family="text">
      <style:text-properties style:font-name="Times New Roman" fo:language="en" fo:country="US"/>
    </style:style>
    <style:style style:name="T220" style:parent-style-name="DefaultParagraphFont" style:family="text">
      <style:text-properties style:font-name="Times New Roman" fo:language="en" fo:country="US"/>
    </style:style>
    <style:style style:name="T221" style:parent-style-name="DefaultParagraphFont" style:family="text">
      <style:text-properties style:font-name="Times New Roman" fo:language="en" fo:country="US"/>
    </style:style>
    <style:style style:name="T222" style:parent-style-name="DefaultParagraphFont" style:family="text">
      <style:text-properties style:font-name="Times New Roman" fo:language="en" fo:country="US"/>
    </style:style>
    <style:style style:name="T223" style:parent-style-name="DefaultParagraphFont" style:family="text">
      <style:text-properties style:font-name="Times New Roman" fo:language="en" fo:country="US"/>
    </style:style>
    <style:style style:name="T224" style:parent-style-name="DefaultParagraphFont" style:family="text">
      <style:text-properties fo:language="en" fo:country="US"/>
    </style:style>
    <style:style style:name="T225" style:parent-style-name="Hyperlink" style:family="text">
      <style:text-properties fo:language="en" fo:country="US"/>
    </style:style>
    <style:style style:name="T226" style:parent-style-name="DefaultParagraphFont" style:family="text">
      <style:text-properties fo:language="en" fo:country="US"/>
    </style:style>
    <style:style style:name="T227" style:parent-style-name="DefaultParagraphFont" style:family="text">
      <style:text-properties style:font-name="Times New Roman" fo:language="en" fo:country="US"/>
    </style:style>
    <style:style style:name="T228" style:parent-style-name="DefaultParagraphFont" style:family="text">
      <style:text-properties style:font-name="Times New Roman"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1.78664in, 0in, 0in, 0in)"/>
    </style:style>
    <style:style style:family="graphic" style:name="a11" style:parent-style-name="Graphics">
      <style:graphic-properties fo:border="0.01042in none" fo:background-color="transparent" fo:clip="rect(3.04627in, 0in, 0in, 0in)"/>
    </style:style>
    <style:style style:family="graphic" style:name="a12" style:parent-style-name="Graphics">
      <style:graphic-properties fo:border="0.01042in none" fo:background-color="transparent" fo:clip="rect(3.09244in, 0in, 0in, 0in)"/>
    </style:style>
    <style:style style:family="graphic" style:name="a13" style:parent-style-name="Graphics">
      <style:graphic-properties fo:border="0.01042in none" fo:background-color="transparent" fo:clip="rect(1.41807in, 0in, 2.11058in, 0in)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 fo:clip="rect(0.75641in, 0in, 0in, 0in)"/>
    </style:style>
    <style:style style:family="graphic" style:name="a17" style:parent-style-name="Graphics">
      <style:graphic-properties fo:border="0.01042in none" fo:background-color="transparent" fo:clip="rect(1.38281in, 0in, 0in, 0in)"/>
    </style:style>
    <style:style style:family="graphic" style:name="a18" style:parent-style-name="Graphics">
      <style:graphic-properties fo:border="0.01042in none" fo:background-color="transparent" fo:clip="rect(3.58952in, 0in, 0in, 0in)"/>
    </style:style>
    <style:style style:family="graphic" style:name="a19" style:parent-style-name="Graphics">
      <style:graphic-properties fo:border="0.01042in none" fo:background-color="transparent" fo:clip="rect(1.77992in, 0in, 0.22608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4.18711in, 0in, 0in, 0in)"/>
    </style:style>
    <style:style style:family="graphic" style:name="a8" style:parent-style-name="Graphics">
      <style:graphic-properties fo:border="0.01042in none" fo:background-color="transparent" fo:clip="rect(2.98827in, 0in, 0in, 0in)"/>
    </style:style>
    <style:style style:family="graphic" style:name="a9" style:parent-style-name="Graphics">
      <style:graphic-properties fo:border="0.01042in none" fo:background-color="transparent" fo:clip="rect(2.76993in, 0in, 0in, 0in)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>PROJETO 4: MINIX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/>
      <text:p text:style-name="SBCtitle1">Objetivos</text:p>
      <text:list text:style-name="LFO7" text:continue-numbering="true">
        <text:list-item>
          <text:p text:style-name="P8">Familiarizar o aluno com o SO MINIX e testes em<text:s/>ambiente de máquina virtual.</text:p>
        </text:list-item>
      </text:list>
      <text:list text:style-name="LFO8" text:continue-numbering="true">
        <text:list-item>
          <text:list>
            <text:list-item>
              <text:p text:style-name="P9">Tarefa 2: INSTALAÇÃO DO SISTEMA (de 01/02/2024 a 04/02/2024)</text:p>
            </text:list-item>
            <text:list-item>
              <text:p text:style-name="P10">Máquina utilizada</text:p>
            </text:list-item>
          </text:list>
        </text:list-item>
      </text:list>
      <text:p text:style-name="Normal">Para este projeto, será utilizado a mesma máquina hospedeira Windows 10 apresentada no tópico “1.1 Descrição” do projeto 1, na qual ja possuí o VirtualBox instalado para fazermos nossa maquina virtual com MINIX <text:s/>instalado.</text:p>
      <text:list text:style-name="LFO8" text:continue-numbering="true">
        <text:list-item>
          <text:list>
            <text:list-item>
              <text:p text:style-name="P11">Instalando o MINIX</text:p>
            </text:list-item>
          </text:list>
        </text:list-item>
      </text:list>
      <text:p text:style-name="Normal">Conforme falamos anteriormente, utilizaremos o VirtualBox para instalarmos o MINIX. A versão que iremos utilizar será a R3.1.8-r8398 do MINIX.</text:p>
      <text:p text:style-name="Normal">Em relação ao processo de criação da VM, <text:s/>definiremos primeiramente o nome como SO MINIX, selecionamos a nossa ISO e manteremos as seguintes configurações de tipo e versão como<text:s/><text:span text:style-name="T12">Other</text:span>.</text:p>
      <text:p text:style-name="P13"><draw:frame draw:style-name="a0" draw:name="Picture 1" text:anchor-type="as-char" svg:x="0in" svg:y="0in" svg:width="5.65253in" svg:height="2.9705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P14">Figura 1 – Criar maquina virtual.</text:p>
      <text:p text:style-name="Normal">Em relação ao seu hardware, definimos alocar 4GB de<text:s/>espaço livre em disco e 2048MB de memória RAM e optamos por usar apenas 1 processador (CPU-cores).</text:p>
      <text:soft-page-break/>
      <text:p text:style-name="P15"><draw:frame draw:style-name="a1" draw:name="Picture 1" text:anchor-type="as-char" svg:x="0in" svg:y="0in" svg:width="5.23246in" svg:height="2.72513in" style:rel-width="scale" style:rel-height="scale"><draw:image xlink:href="media/image2.png" xlink:type="simple" xlink:show="embed" xlink:actuate="onLoad"/><svg:title/><svg:desc>A screenshot of a software

Description automatically generated</svg:desc></draw:frame></text:p>
      <text:p text:style-name="P16">Figura 2 – Hardware: definindo memoria base e processadores.</text:p>
      <text:p text:style-name="P17"><draw:frame draw:style-name="a2" draw:name="Picture 1" text:anchor-type="as-char" svg:x="0in" svg:y="0in" svg:width="5.29467in" svg:height="2.76438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18">Figura 3 – Hardware: definindo disco rigido virtual.</text:p>
      <text:p text:style-name="P19"><text:span text:style-name="T20"><draw:frame draw:style-name="a3" draw:name="Picture 1" text:anchor-type="as-char" svg:x="0in" svg:y="0in" svg:width="5.18498in" svg:height="2.68029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21">Figura 4 – Resumo geral.</text:p>
      <text:p text:style-name="Normal"/>
      <text:p text:style-name="P22"/>
      <text:p text:style-name="Normal"/>
      <text:p text:style-name="Normal">Para<text:s/>habilitarmos a conexão com a rede, optamos por deixar a nossa maquina em modo bridge conforme na Figura 5 abaixo.</text:p>
      <text:p text:style-name="P23"><draw:frame draw:style-name="a4" draw:name="Picture 1" text:anchor-type="as-char" svg:x="0in" svg:y="0in" svg:width="4.83473in" svg:height="2.82443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P24">Figura 5 – Configuração da rede VM.</text:p>
      <text:p text:style-name="Normal"/>
      <text:p text:style-name="P25">Agora que estamos com o MINIX configurado, iremos executa-lo, sendo assim, utilizaremos a tecla 1 para escolher executar o Regular MINIX 3 que será o nosso boot padrão.</text:p>
      <text:p text:style-name="P26"><text:line-break/><draw:frame draw:style-name="a5" draw:name="Picture 1" text:anchor-type="as-char" svg:x="0in" svg:y="0in" svg:width="5.05739in" svg:height="3.29884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P27">Figura 6 – Seleção do boot padrão.</text:p>
      <text:p text:style-name="P28"/>
      <text:soft-page-break/>
      <text:p text:style-name="P29">Apos selecionarmos o boot, o mesmo irá pedir algumas credencias tais como login e senha conforme na Figura 7.<text:s/></text:p>
      <text:p text:style-name="P30"><draw:frame draw:style-name="a6" draw:name="Picture 1" text:anchor-type="as-char" svg:x="0in" svg:y="0in" svg:width="5.09745in" svg:height="3.32497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P31">Figura 7 – MINIX Login.</text:p>
      <text:p text:style-name="Normal">Al<text:span text:style-name="T32">ém disso, de acordo com a documentação do MINIX 3<text:s/></text:span><text:span text:style-name="T33"><text:bookmark-ref text:ref-name="_Ref153734934" text:reference-format="text">[2]</text:bookmark-ref></text:span>, para entrarmos em modo root, basta inserimos o login<text:s/><text:span text:style-name="T34">root</text:span><text:s/>para termos o acesso<text:s/>e o mesmo não possui senha.</text:p>
      <text:p text:style-name="P35"><draw:frame draw:style-name="a7" draw:name="Picture 1" text:anchor-type="as-char" svg:x="0in" svg:y="0in" svg:width="5.28281in" svg:height="0.49887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P36">Figura 8 – MINIX<text:s/>Setup – Parte 1: acesso ao root.</text:p>
      <text:p text:style-name="Normal">Agora usaremos o comando setup para finalizar o restante da instalação do sistema.</text:p>
      <text:p text:style-name="P37"><draw:frame draw:style-name="a8" draw:name="Picture 1" text:anchor-type="as-char" svg:x="0in" svg:y="0in" svg:width="4.92356in" svg:height="1.26263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<text:p text:style-name="P38">Figura 9 – MINIX Setup – Parte 2: entrando no setup.</text:p>
      <text:p text:style-name="Normal">Para continuarmos, iremos apertar a tecla<text:s/><text:span text:style-name="T39">ENTER</text:span><text:s/>e irá pedir para selecionarmos o tipo de teclado, sendo assim, selecionaremos o teclado<text:s/><text:span text:style-name="T40">us-std</text:span><text:s/>(teclado padrão americano).</text:p>
      <text:soft-page-break/>
      <text:p text:style-name="P41"><draw:frame draw:style-name="a9" draw:name="Picture 1" text:anchor-type="as-char" svg:x="0in" svg:y="0in" svg:width="5.27068in" svg:height="1.46285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P42"><text:span text:style-name="T43">Figura 10 – MINIX Setup – Parte 3</text:span><text:span text:style-name="T44">: selecionando teclado</text:span><text:span text:style-name="T45">.</text:span></text:p>
      <text:p text:style-name="Normal">Agora vamos criar as partições por<text:span text:style-name="T46">ém o proprio sistema ja possui automatizaçao para criar tudo automatico, portanto, iremos apenas apertar<text:s/></text:span><text:span text:style-name="T47">ENTER</text:span><text:span text:style-name="T48">.</text:span></text:p>
      <text:p text:style-name="P49"><text:span text:style-name="T50"><draw:frame draw:style-name="a10" draw:name="Picture 1" text:anchor-type="as-char" svg:x="0in" svg:y="0in" svg:width="5.23597in" svg:height="2.19656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P51"><text:span text:style-name="T52">Figura 1</text:span><text:span text:style-name="T53">1</text:span><text:span text:style-name="T54"><text:s/>– MINIX Setup – Parte 4</text:span><text:span text:style-name="T55">: inciando a criação da partição</text:span><text:span text:style-name="T56">.</text:span></text:p>
      <text:p text:style-name="Normal">Agora iremos selecionar o disco onde o MINIX será instalado que no caso é<text:s/><text:span text:style-name="T57">“0”.</text:span></text:p>
      <text:p text:style-name="P58"><draw:frame draw:style-name="a11" draw:name="Picture 1" text:anchor-type="as-char" svg:x="0in" svg:y="0in" svg:width="5.01335in" svg:height="1.23657in" style:rel-width="scale" style:rel-height="scale"><draw:image xlink:href="media/image12.png" xlink:type="simple" xlink:show="embed" xlink:actuate="onLoad"/><svg:title/><svg:desc>A screenshot of a computer

Description automatically generated</svg:desc></draw:frame></text:p>
      <text:p text:style-name="P59"><text:span text:style-name="T60">Figura 1</text:span><text:span text:style-name="T61">2</text:span><text:span text:style-name="T62"><text:s/>– MINIX Setup – Parte 5</text:span><text:span text:style-name="T63">:<text:s/></text:span><text:span text:style-name="T64">selecionando disco p/ instalar MINIX</text:span><text:span text:style-name="T65">.</text:span></text:p>
      <text:p text:style-name="P66"/>
      <text:p text:style-name="Normal">Agora vamos selecionar uma regi<text:span text:style-name="T67">ão do disco que será o espaço livre do disco e temos apenas uma região livre já que se trata de um disco novo, portanto, usaremos a região “0”.</text:span></text:p>
      <text:p text:style-name="P68"/>
      <text:soft-page-break/>
      <text:p text:style-name="P69"><text:span text:style-name="T70"><draw:frame draw:style-name="a12" draw:name="Picture 1" text:anchor-type="as-char" svg:x="0in" svg:y="0in" svg:width="5.66735in" svg:height="1.36472in" style:rel-width="scale" style:rel-height="scale"><draw:image xlink:href="media/image13.png" xlink:type="simple" xlink:show="embed" xlink:actuate="onLoad"/><svg:title/><svg:desc>A screenshot of a computer

Description automatically generated</svg:desc></draw:frame></text:span></text:p>
      <text:p text:style-name="P71"><text:span text:style-name="T72">Figura 1</text:span><text:span text:style-name="T73">3</text:span><text:span text:style-name="T74"><text:s/>– MINIX Setup – Parte 6</text:span><text:span text:style-name="T75">: selecionando região de espaço livre p/ MINIX.</text:span></text:p>
      <text:p text:style-name="Normal">Nessa parte ele avisa que esse é ponto de não retorno e que todos os arquivos ser sobrescritos ou apagados caso optamos por yes, sendo assim, iremos continuar usando<text:s/><text:span text:style-name="T76">yes</text:span>.<text:s/></text:p>
      <text:p text:style-name="Normal"><draw:frame draw:style-name="a13" draw:name="Picture 1" text:anchor-type="as-char" svg:x="0in" svg:y="0in" svg:width="5.90556in" svg:height="1.09318in" style:rel-width="scale" style:rel-height="scale"><draw:image xlink:href="media/image14.png" xlink:type="simple" xlink:show="embed" xlink:actuate="onLoad"/><svg:title/><svg:desc>A screenshot of a computer

Description automatically generated</svg:desc></draw:frame></text:p>
      <text:p text:style-name="P77"><text:span text:style-name="T78">Figura 14 – MINIX Setup – Parte 7</text:span><text:span text:style-name="T79">: confirmando as escolhas.</text:span></text:p>
      <text:p text:style-name="Normal">Agora vamos escolher o tamanho da partição do endereço<text:span text:style-name="T80"><text:s/></text:span><text:span text:style-name="T81">/home</text:span><text:span text:style-name="T82">. Pois o instalador vai dividir nosso disco em<text:s/></text:span><text:span text:style-name="T83">3 sub-partições</text:span><text:span text:style-name="T84">: /root, /usr, /home.</text:span><text:span text:style-name="T85"><text:s/>E em nosso</text:span><text:s/>caso, iremos usar a quantidade recomendada que é 786mb (Figura 15).<text:s/>Apos digitar ele pede para confirmar escrevendo Y.</text:p>
      <text:p text:style-name="Normal"><draw:frame draw:style-name="a14" draw:name="Picture 1" text:anchor-type="as-char" svg:x="0in" svg:y="0in" svg:width="5.90556in" svg:height="3.87083in" style:rel-width="scale" style:rel-height="scale"><draw:image xlink:href="media/image14.png" xlink:type="simple" xlink:show="embed" xlink:actuate="onLoad"/><svg:title/><svg:desc>A screenshot of a computer

Description automatically generated</svg:desc></draw:frame></text:p>
      <text:p text:style-name="P86"><text:span text:style-name="T87">Figura 15 – MINIX Setup – Parte 8</text:span><text:span text:style-name="T88">:<text:s/></text:span><text:span text:style-name="T89">definindo o tamanho da partição /home</text:span><text:span text:style-name="T90">.</text:span></text:p>
      <text:p text:style-name="Normal">Agora nessa proxima tela iremos definir o tamanho do bloco de aloca<text:span text:style-name="T91">ção em kilobytes. E no caso o padrão é 4kb, sendo assim, iremos apenas pressionar ENTER.</text:span></text:p>
      <text:soft-page-break/>
      <text:p text:style-name="P92"><text:span text:style-name="T93"><draw:frame draw:style-name="a15" draw:name="Picture 1" text:anchor-type="as-char" svg:x="0in" svg:y="0in" svg:width="5.04767in" svg:height="0.93902in" style:rel-width="scale" style:rel-height="scale"><draw:image xlink:href="media/image15.png" xlink:type="simple" xlink:show="embed" xlink:actuate="onLoad"/><svg:title/><svg:desc>A black screen with white text

Description automatically generated</svg:desc></draw:frame></text:span></text:p>
      <text:p text:style-name="P94"><text:span text:style-name="T95">Figura 16 – MINIX Setup – Parte 9</text:span><text:span text:style-name="T96">: definindo o tamanho do bloco de alocação.</text:span></text:p>
      <text:p text:style-name="Normal">Após isso, basta aguardamos pois ele estará realizando a formatação das partições e faz a instalação do sistema (Figura 17).</text:p>
      <text:p text:style-name="Normal"><text:span text:style-name="T97"><draw:frame draw:style-name="a16" draw:name="Picture 1" text:anchor-type="as-char" svg:x="0in" svg:y="0in" svg:width="5.90556in" svg:height="3.24587in" style:rel-width="scale" style:rel-height="scale"><draw:image xlink:href="media/image16.png" xlink:type="simple" xlink:show="embed" xlink:actuate="onLoad"/><svg:title/><svg:desc>A screenshot of a computer

Description automatically generated</svg:desc></draw:frame></text:span></text:p>
      <text:p text:style-name="P98"><text:span text:style-name="T99">Figura 17 – MINIX Setup – Parte 10</text:span><text:span text:style-name="T100">: iniciando a formatação e instalação do sistema.</text:span></text:p>
      <text:p text:style-name="Normal">Nesse proximo passo, iremos selecionar a interface de rede do nosso sistema, porém como haviamos configurado como modo bridge, o mesmo já<text:s/>detectou<text:s/>que<text:s/>o nosso adaptador ser<text:span text:style-name="T101">á o<text:s/></text:span><text:span text:style-name="T102">AMD LANCE</text:span><text:s/>(emulado pela VirtualBox). Sendo assim, iremos manter essa opção<text:s/>“7”<text:s/>(Figura 18).</text:p>
      <text:p text:style-name="Normal"><draw:frame draw:style-name="a17" draw:name="Picture 1" text:anchor-type="as-char" svg:x="0in" svg:y="0in" svg:width="5.90556in" svg:height="2.74448in" style:rel-width="scale" style:rel-height="scale"><draw:image xlink:href="media/image17.png" xlink:type="simple" xlink:show="embed" xlink:actuate="onLoad"/><svg:title/><svg:desc>A screenshot of a computer

Description automatically generated</svg:desc></draw:frame></text:p>
      <text:p text:style-name="P103"><text:span text:style-name="T104">Figura 18 – MINIX Setup – Parte 11</text:span><text:span text:style-name="T105">: selecionando a interface de rede do sistema.</text:span></text:p>
      <text:p text:style-name="Normal"/>
      <text:p text:style-name="Normal">Agora<text:s/><text:s/>ele pergunta se queremos usar DHCP (Dynamic Host Configuration Protocol) ou se queremos cadastrar o endereço manualmente, sendo assim, vamos prosseguir com DHCP automatico.</text:p>
      <text:p text:style-name="Normal"><draw:frame draw:style-name="a18" draw:name="Picture 1" text:anchor-type="as-char" svg:x="0in" svg:y="0in" svg:width="5.90556in" svg:height="1.04091in" style:rel-width="scale" style:rel-height="scale"><draw:image xlink:href="media/image18.png" xlink:type="simple" xlink:show="embed" xlink:actuate="onLoad"/><svg:title/><svg:desc>A screenshot of a computer

Description automatically generated</svg:desc></draw:frame></text:p>
      <text:p text:style-name="P106"><text:span text:style-name="T107">Figura 19 – MINIX Setup – Parte 12</text:span><text:span text:style-name="T108">: interface de rede como DHCP ou manual.</text:span></text:p>
      <text:p text:style-name="Normal">Após isso, podemos concluir que o sistema foi instalado com sucesso.</text:p>
      <text:p text:style-name="Normal"><draw:frame draw:style-name="a19" draw:name="Picture 1" text:anchor-type="as-char" svg:x="0in" svg:y="0in" svg:width="5.90556in" svg:height="2.26846in" style:rel-width="scale" style:rel-height="scale"><draw:image xlink:href="media/image19.png" xlink:type="simple" xlink:show="embed" xlink:actuate="onLoad"/><svg:title/><svg:desc>A screenshot of a computer

Description automatically generated</svg:desc></draw:frame></text:p>
      <text:p text:style-name="P109"><text:span text:style-name="T110">Figura 20 – MINIX Setup – Parte 13</text:span><text:span text:style-name="T111">: sistema instalado com sucesso.</text:span></text:p>
      <text:p text:style-name="Normal">Após a finalização da instalação, o sistema pede para reiniciarmos a maquina, porém antes de reiniciar a mesma, teremos de retirar também a midia de instalação para não começar a instalação do MINIX novamente.<text:s/>Sendo assim, usaremos o comando<text:s/><text:span text:style-name="T112">poweroff</text:span><text:s/>ao inves de reboot pois estamos em uma maquina virtual e não com pendrive ou midia de CD.</text:p>
      <text:p text:style-name="Normal"><draw:frame draw:style-name="a20" draw:name="Picture 1" text:anchor-type="as-char" svg:x="0in" svg:y="0in" svg:width="5.90556in" svg:height="1.60833in" style:rel-width="scale" style:rel-height="scale"><draw:image xlink:href="media/image20.png" xlink:type="simple" xlink:show="embed" xlink:actuate="onLoad"/><svg:title/><svg:desc>A screen shot of a computer

Description automatically generated</svg:desc></draw:frame></text:p>
      <text:p text:style-name="P113"><text:span text:style-name="T114">Figura 2</text:span><text:span text:style-name="T115">1</text:span><text:span text:style-name="T116"><text:s/>– Encerrando o MINIX</text:span><text:span text:style-name="T117">.</text:span></text:p>
      <text:p text:style-name="Normal">Pronto, agora podemos<text:s/><text:span text:style-name="T118">forçar o desligamento</text:span><text:s/>do mesmo e<text:s/><text:span text:style-name="T119">removermos</text:span><text:s/>a ISO/midia de instalação<text:s/>nas configura<text:span text:style-name="T120">ções do nosso VirtualBox<text:s/></text:span>para continuarmos conforme na Figura 22.</text:p>
      <text:soft-page-break/>
      <text:p text:style-name="P121"><draw:frame draw:style-name="a21" draw:name="Picture 1" text:anchor-type="as-char" svg:x="0in" svg:y="0in" svg:width="5.22467in" svg:height="3.06083in" style:rel-width="scale" style:rel-height="scale"><draw:image xlink:href="media/image21.png" xlink:type="simple" xlink:show="embed" xlink:actuate="onLoad"/><svg:title/><svg:desc>A screenshot of a computer

Description automatically generated</svg:desc></draw:frame></text:p>
      <text:p text:style-name="P122"><text:span text:style-name="T123">Figura 22 – Removendo a midia de instalação do MINIX</text:span><text:span text:style-name="T124">.</text:span></text:p>
      <text:p text:style-name="Normal">Agora iremos executar <text:s/>o OS MINIX novamente e partiremos para alguns checks para verificar se o sistema está funcionando normalmente.</text:p>
      <text:p text:style-name="P125"><draw:frame draw:style-name="a22" draw:name="Picture 1" text:anchor-type="as-char" svg:x="0in" svg:y="0in" svg:width="5.90556in" svg:height="3.84306in" style:rel-width="scale" style:rel-height="scale"><draw:image xlink:href="media/image22.png" xlink:type="simple" xlink:show="embed" xlink:actuate="onLoad"/><svg:title/><svg:desc>A screenshot of a computer

Description automatically generated</svg:desc></draw:frame></text:p>
      <text:p text:style-name="P126"><text:span text:style-name="T127">Figura 23 – MINIX iniciado com sucesso</text:span><text:span text:style-name="T128">.</text:span></text:p>
      <text:p text:style-name="Normal"/>
      <text:list text:style-name="LFO8" text:continue-numbering="true">
        <text:list-item>
          <text:list>
            <text:list-item>
              <text:p text:style-name="P129"><text:span text:style-name="T130">Configurando contas</text:span><text:span text:style-name="T131">/usuario no</text:span><text:span text:style-name="T132"><text:s/>MINIX</text:span></text:p>
            </text:list-item>
          </text:list>
        </text:list-item>
      </text:list>
      <text:p text:style-name="Normal">Iremos verificar se conseguimos entrar no sistema, sendo assim, utilizaremos o mesmo usuario (<text:span text:style-name="T133">root</text:span>), e como podemos perceber<text:s/>na Figura 24, ele não pediu senha novamente, portanto, teremos que cadastrar uma nova senha para o nosso usuario<text:s/>que<text:s/><text:soft-page-break/>iremos verificar na Figura 25 utilizando-se o comando<text:s/><text:span text:style-name="T134">passwd</text:span>.</text:p>
      <text:p text:style-name="P135"><draw:frame draw:style-name="a23" draw:name="Picture 1" text:anchor-type="as-char" svg:x="0in" svg:y="0in" svg:width="5.71017in" svg:height="3.71389in" style:rel-width="scale" style:rel-height="scale"><draw:image xlink:href="media/image23.png" xlink:type="simple" xlink:show="embed" xlink:actuate="onLoad"/><svg:title/><svg:desc>A screenshot of a computer

Description automatically generated</svg:desc></draw:frame></text:p>
      <text:p text:style-name="P136"><text:span text:style-name="T137">Figura 24 – Login usando root</text:span><text:span text:style-name="T138">.</text:span></text:p>
      <text:p text:style-name="P139"><draw:frame draw:style-name="a24" draw:name="Picture 1" text:anchor-type="as-char" svg:x="0in" svg:y="0in" svg:width="5.63151in" svg:height="3.66075in" style:rel-width="scale" style:rel-height="scale"><draw:image xlink:href="media/image24.png" xlink:type="simple" xlink:show="embed" xlink:actuate="onLoad"/><svg:title/><svg:desc>A screenshot of a computer

Description automatically generated</svg:desc></draw:frame></text:p>
      <text:p text:style-name="P140"><text:span text:style-name="T141">Figura 25 – Alterando senha do root</text:span><text:span text:style-name="T142">.</text:span></text:p>
      <text:p text:style-name="P143"/>
      <text:list text:style-name="LFO8" text:continue-numbering="true">
        <text:list-item>
          <text:list>
            <text:list-item>
              <text:p text:style-name="P144">Testando a internet no MINIX</text:p>
            </text:list-item>
          </text:list>
        </text:list-item>
      </text:list>
      <text:p text:style-name="Normal">Com o MINIX instalado, vamos testar a nossa internet utilizando o comando ifconfig para mostrar os dados da nossa interface de rede e tamb<text:span text:style-name="T145">ém o comando ping para verificar<text:s/></text:span><text:soft-page-break/><text:span text:style-name="T146">se o mesmo conseguiu conectar com o servidor da google e resolver os nomes de endereço.</text:span></text:p>
      <text:p text:style-name="Normal"><text:span text:style-name="T147"><draw:frame draw:style-name="a25" draw:name="Picture 1" text:anchor-type="as-char" svg:x="0in" svg:y="0in" svg:width="5.90556in" svg:height="1.47222in" style:rel-width="scale" style:rel-height="scale"><draw:image xlink:href="media/image25.png" xlink:type="simple" xlink:show="embed" xlink:actuate="onLoad"/><svg:title/><svg:desc>A screenshot of a computer

Description automatically generated</svg:desc></draw:frame></text:span></text:p>
      <text:p text:style-name="P148"><text:span text:style-name="T149">Figura 26 – Testando a networking</text:span><text:span text:style-name="T150">.</text:span></text:p>
      <text:p text:style-name="P151">Conquanto, podemos observar que ambos comandos satisfazem a condição verdadeira que queriamos.</text:p>
      <text:p text:style-name="P152"/>
      <text:list text:style-name="LFO8" text:continue-numbering="true">
        <text:list-item>
          <text:list>
            <text:list-item>
              <text:p text:style-name="P153">Instalando o SSH<text:s/>e configurando<text:s/>(Cliente e Servidor)</text:p>
            </text:list-item>
          </text:list>
        </text:list-item>
      </text:list>
      <text:p text:style-name="Normal">Para esse topico, utilizaremos os recursos oferecidos pelo manual do minix3<text:s/><text:span text:style-name="T154"><text:bookmark-ref text:ref-name="_Ref153734934" text:reference-format="text">[2]</text:bookmark-ref></text:span><text:span text:style-name="T155"><text:s/></text:span>executando o comando do codigo 1 abaixo.</text:p>
      <text:p text:style-name="P156"><text:span text:style-name="T157"><draw:frame draw:id="id0" draw:style-name="a26" draw:name="Text Box 2" text:anchor-type="as-char" svg:x="0in" svg:y="0in" svg:width="5.85764in" svg:height="1.12778in" style:rel-width="scale" style:rel-height="scale"><draw:text-box><text:p text:style-name="P158">pkgin update</text:p><text:p text:style-name="P159">pkgin install openssh</text:p><text:p text:style-name="P160">/usr/pkg/etc/rc.d/sshd start</text:p></draw:text-box><svg:title/><svg:desc/></draw:frame></text:span><text:span text:style-name="T161">C</text:span><text:span text:style-name="T162">ódigo 1 – Instalando SSH</text:span><text:span text:style-name="T163">.</text:span></text:p>
      <text:p text:style-name="Normal">Porém obtivemos alguns erros ao usar o pkgin install openssh pois o mesmo não conseguiu baixar o arquivo pkg_summary.gz<text:s/>(erro -&gt;<text:s/>could not fetch ftp://ftp.minix3.org/pub/minix/packages/3.1.8/i686/All/pkg_summary.gz), sendo assim, iremos alterar o endereço para um repositorio funcional conforme a Figura 27.<text:s/>Utilizamos o comando<text:span text:style-name="T164">:</text:span></text:p>
      <text:p text:style-name="Normal">vi /usr/pkg/etc/pkgin/repositories.conf</text:p>
      <text:p text:style-name="Normal">Basicamente estamos alterando o reposit<text:span text:style-name="T165">ório antigo:<text:s/></text:span><text:a xlink:href="ftp://ftp.minix3.org/pub/minix/packages/3.1.8/i686/All" office:target-frame-name="_top" xlink:show="replace"><text:span text:style-name="T166">ftp://ftp.minix3.org/pub/minix/packages/3.1.8/i686/All</text:span></text:a><text:span text:style-name="T167"><text:s/>para o repositorio funcional que podemos encontrar os pacotes de openssh disponiveis para download que é<text:s/></text:span><text:a xlink:href="http://www.minix3.org/pkgsrc/packages/$osrelease/$arch/All" office:target-frame-name="_top" xlink:show="replace"><text:span text:style-name="T168">http://www.minix3.org/pkgsrc/packages/$osrelease/$arch/All</text:span></text:a><text:span text:style-name="T169">.</text:span></text:p>
      <text:p text:style-name="Normal"><draw:frame draw:style-name="a27" draw:name="Picture 1" text:anchor-type="as-char" svg:x="0in" svg:y="0in" svg:width="5.90556in" svg:height="1.20069in" style:rel-width="scale" style:rel-height="scale"><draw:image xlink:href="media/image26.png" xlink:type="simple" xlink:show="embed" xlink:actuate="onLoad"/><svg:title/><svg:desc>A black screen with white text

Description automatically generated</svg:desc></draw:frame></text:p>
      <text:p text:style-name="P170"><text:span text:style-name="T171">Figura 27 – Editando o arquivo<text:s/></text:span><text:span text:style-name="T172">/usr/pkg/etc/pkgin/repositories.conf</text:span><text:span text:style-name="T173">.</text:span></text:p>
      <text:p text:style-name="Normal"/>
      <text:soft-page-break/>
      <text:p text:style-name="Normal">Após a atualização e instalação do openssh iremos prosseguir com o codigo.</text:p>
      <text:p text:style-name="Normal">Para executarmos basta rodarmos<text:s/><text:span text:style-name="T174">/usr/pkg/etc/rc.d/sshd start.</text:span></text:p>
      <text:p text:style-name="P175"><text:span text:style-name="T176"><draw:frame draw:style-name="a28" draw:name="Picture 1" text:anchor-type="as-char" svg:x="0in" svg:y="0in" svg:width="5.42297in" svg:height="3.50669in" style:rel-width="scale" style:rel-height="scale"><draw:image xlink:href="media/image27.png" xlink:type="simple" xlink:show="embed" xlink:actuate="onLoad"/><svg:title/><svg:desc>A screenshot of a computer

Description automatically generated</svg:desc></draw:frame></text:span></text:p>
      <text:p text:style-name="P177"><text:span text:style-name="T178">Figura 28 – Executando o SSH no MINIX</text:span><text:span text:style-name="T179">.</text:span></text:p>
      <text:p text:style-name="Normal">Agora iremos verificar o status e pegar as informa<text:span text:style-name="T180">ções do nosso IP para acessarmos na outra maquina via SCP.</text:span></text:p>
      <text:p text:style-name="Normal"><text:span text:style-name="T181"><draw:frame draw:style-name="a29" draw:name="Picture 1" text:anchor-type="as-char" svg:x="0in" svg:y="0in" svg:width="5.90556in" svg:height="1.21181in" style:rel-width="scale" style:rel-height="scale"><draw:image xlink:href="media/image28.png" xlink:type="simple" xlink:show="embed" xlink:actuate="onLoad"/><svg:title/><svg:desc>A screen shot of a computer

Description automatically generated</svg:desc></draw:frame></text:span></text:p>
      <text:p text:style-name="P182"><text:span text:style-name="T183">Figura 29 – Processo em execucao e IP identificado</text:span><text:span text:style-name="T184">.</text:span></text:p>
      <text:p text:style-name="P185">Na maquina hospedeira iremos fazer uma conexão simples somente para testar conforme na figura 30.<text:s/>E como resultado, nos conseguimos nos conectar com a outra maquina sem problemas.</text:p>
      <text:soft-page-break/>
      <text:p text:style-name="Normal"><text:span text:style-name="T186"><draw:frame draw:style-name="a30" draw:name="Picture 1" text:anchor-type="as-char" svg:x="0in" svg:y="0in" svg:width="5.90556in" svg:height="4.13958in" style:rel-width="scale" style:rel-height="scale"><draw:image xlink:href="media/image29.png" xlink:type="simple" xlink:show="embed" xlink:actuate="onLoad"/><svg:title/><svg:desc>A screenshot of a computer

Description automatically generated</svg:desc></draw:frame></text:span></text:p>
      <text:p text:style-name="P187"><text:span text:style-name="T188">Figura 30 – OpenSSH instalado e configurado com sucesso</text:span><text:span text:style-name="T189">.</text:span></text:p>
      <text:p text:style-name="P190">Agora iremos testar a transferencia de um arquivo chamado teste.txt criado no MINIX que será transferido para a nossa maquina hospedeira via SCP.</text:p>
      <text:p text:style-name="P191">Sendo assim, usaremos o editor vi para criar o nosso arquivo (vi teste.txt) e o seu conteudo será o apresentado na Figura 31.</text:p>
      <text:p text:style-name="P192"><text:span text:style-name="T193"><draw:frame draw:style-name="a31" draw:name="Picture 1" text:anchor-type="as-char" svg:x="0in" svg:y="0in" svg:width="3.05293in" svg:height="3.52838in" style:rel-width="scale" style:rel-height="scale"><draw:image xlink:href="media/image30.png" xlink:type="simple" xlink:show="embed" xlink:actuate="onLoad"/><svg:title/><svg:desc>A screenshot of a black screen

Description automatically generated</svg:desc></draw:frame></text:span></text:p>
      <text:p text:style-name="P194"><text:span text:style-name="T195">Figura 31 – Conteudo do arquivo teste.txt</text:span><text:span text:style-name="T196">.</text:span></text:p>
      <text:soft-page-break/>
      <text:p text:style-name="P197"><text:span text:style-name="T198"><draw:frame draw:style-name="a32" draw:name="Picture 1" text:anchor-type="as-char" svg:x="0in" svg:y="0in" svg:width="5.04402in" svg:height="0.69041in" style:rel-width="scale" style:rel-height="scale"><draw:image xlink:href="media/image31.png" xlink:type="simple" xlink:show="embed" xlink:actuate="onLoad"/><svg:title/><svg:desc>A black and white screen with white text

Description automatically generated</svg:desc></draw:frame></text:span></text:p>
      <text:p text:style-name="P199"><text:span text:style-name="T200">Figura 32 – Visão geral dos arquivos e sua localização</text:span><text:span text:style-name="T201">.</text:span></text:p>
      <text:p text:style-name="Normal">Feito isso, salvaremos e na outra maquina iremos executar o comando abaixo (Codigo 2).</text:p>
      <text:p text:style-name="P202"><text:span text:style-name="T203"><draw:frame draw:id="id1" draw:style-name="a33" draw:name="Text Box 2" text:anchor-type="as-char" svg:x="0in" svg:y="0in" svg:width="5.85764in" svg:height="0.38333in" style:rel-width="scale" style:rel-height="scale"><draw:text-box><text:p text:style-name="P204">scp<text:s/>root@192.168.0.135:/root/teste.txt<text:s/>E:\Projeto_4\tarefa_2</text:p></draw:text-box><svg:title/><svg:desc/></draw:frame></text:span><text:span text:style-name="T205">Código 2 – Copiando arquivo teste.txt do MINIX para o host</text:span><text:span text:style-name="T206">.</text:span></text:p>
      <text:p text:style-name="Normal">E conforme podemos observar na Figura 33, o arquivo foi enviado com sucesso.</text:p>
      <text:p text:style-name="Normal"><draw:frame draw:style-name="a34" draw:name="Picture 1" text:anchor-type="as-char" svg:x="0in" svg:y="0in" svg:width="5.90556in" svg:height="2.20069in" style:rel-width="scale" style:rel-height="scale"><draw:image xlink:href="media/image32.png" xlink:type="simple" xlink:show="embed" xlink:actuate="onLoad"/><svg:title/><svg:desc>A screenshot of a computer program

Description automatically generated</svg:desc></draw:frame></text:p>
      <text:p text:style-name="P207"><text:span text:style-name="T208">Figura 33 – Transferencia executada com sucesso</text:span><text:span text:style-name="T209">.</text:span></text:p>
      <text:p text:style-name="Normal"/>
      <text:list text:style-name="LFO8" text:continue-numbering="true">
        <text:list-item>
          <text:list>
            <text:list-item>
              <text:p text:style-name="P210">Criando uma conta usuario pessoal</text:p>
            </text:list-item>
          </text:list>
        </text:list-item>
      </text:list>
      <text:p text:style-name="Normal">Não obtive tempo para finalizar.</text:p>
      <text:list text:style-name="LFO8" text:continue-numbering="true">
        <text:list-item>
          <text:list>
            <text:list-item>
              <text:p text:style-name="P211">Instalando e configurando Bash como shell padrao</text:p>
            </text:list-item>
          </text:list>
        </text:list-item>
      </text:list>
      <text:p text:style-name="P212"/>
      <text:p text:style-name="Normal">Para instarmos o bash, usamos o comando pkgin install bash-4.1nb1.</text:p>
      <text:p text:style-name="Normal"><draw:frame draw:style-name="a35" draw:name="Picture 1" text:anchor-type="as-char" svg:x="0in" svg:y="0in" svg:width="5.90556in" svg:height="1.42292in" style:rel-width="scale" style:rel-height="scale"><draw:image xlink:href="media/image33.png" xlink:type="simple" xlink:show="embed" xlink:actuate="onLoad"/><svg:title/><svg:desc>A screenshot of a computer

Description automatically generated</svg:desc></draw:frame></text:p>
      <text:p text:style-name="P213"><text:span text:style-name="T214">Figura 34 – Bash funcionando.</text:span></text:p>
      <text:p text:style-name="Normal"/>
      <text:p text:style-name="Normal">.... nao obtive tempo suficiente para transferir o arquivo .profile e testar. Fim da tarefa.</text:p>
      <text:soft-page-break/>
      <text:list text:style-name="LFO8" text:continue-numbering="true">
        <text:list-item>
          <text:p text:style-name="P215">Referências</text:p>
        </text:list-item>
      </text:list>
      <text:list text:style-name="LFO9" text:continue-numbering="true">
        <text:list-item>
          <text:p text:style-name="P216"><text:bookmark-start text:name="_Ref153130300"/>Dalton Matsuo Tavares, (2024) “PROJETO 4<text:s/>–<text:s/>MINIX”,<text:s/>material disponibilizado no google classroom e SIGAA,<text:s/>Janeiro.<text:bookmark-end text:name="_Ref153130300"/></text:p>
        </text:list-item>
        <text:list-item>
          <text:p text:style-name="P217"><text:bookmark-start text:name="_Ref153734934"/><text:span text:style-name="T218">MINIX 3 WIKI</text:span><text:span text:style-name="T219">, (</text:span><text:span text:style-name="T220">2014</text:span><text:span text:style-name="T221">) “</text:span><text:span text:style-name="T222">Setting the Root Password</text:span><text:span text:style-name="T223">”,</text:span><text:span text:style-name="T224"><text:s text:c="2"/></text:span><text:a xlink:href="https://wiki.minix3.org/doku.php?id=usersguide:settingrootpasword" office:target-frame-name="_top" xlink:show="replace"><text:span text:style-name="T225">https://wiki.minix3.org/doku.php?id=usersguide:settingrootpasword</text:span></text:a><text:span text:style-name="T226">,<text:s/></text:span><text:span text:style-name="T227">Novembro</text:span><text:span text:style-name="T228">.</text:span><text:bookmark-end text:name="_Ref153734934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normal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text-align="justify" fo:margin-top="0.0826in" fo:text-indent="0.2958in"/>
      <style:text-properties style:font-name="Times" style:font-name-asian="Times New Roman" style:font-name-complex="Times New Roman" fo:color="#000000" style:font-size-complex="10pt" fo:hyphenate="false"/>
    </style:style>
    <style:style style:name="DefaultParagraphFont" style:display-name="Default Paragraph Font" style:family="text"/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4.4208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19.687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PlaceholderText" style:display-name="Placeholder Text" style:family="text" style:parent-style-name="DefaultParagraphFont">
      <style:text-properties fo:color="#666666"/>
    </style:style>
    <style:style style:name="NoSpacing" style:display-name="No Spacing" style:family="paragraph">
      <style:paragraph-properties fo:text-align="justify" fo:text-indent="0.2958in"/>
      <style:text-properties style:font-name="Times" style:font-name-asian="Times New Roman" style:font-name-complex="Times New Roman" fo:color="#000000" style:font-size-complex="10pt" fo:hyphenate="false"/>
    </style:style>
    <style:style style:name="HeaderChar" style:display-name="Header Char" style:family="text" style:parent-style-name="DefaultParagraphFont">
      <style:text-properties style:font-name="Times" style:font-name-asian="Times New Roman" style:font-name-complex="Times New Roman" style:font-size-complex="10pt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2.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77in"/>
      </style:header-style>
      <style:footer-style>
        <style:header-footer-properties style:dynamic-spacing="true" fo:min-height="0.484in"/>
      </style:footer-style>
    </style:page-layout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77in"/>
      </style:header-style>
      <style:footer-style>
        <style:header-footer-properties style:dynamic-spacing="true" fo:min-height="0.484in"/>
      </style:footer-style>
    </style:page-layout>
    <style:page-layout style:name="PL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  <style:master-page style:name="MP1" style:page-layout-name="PL1">
      <style:header>
        <text:p text:style-name="Header"/>
        <text:p text:style-name="Header"/>
      </style:header>
    </style:master-page>
    <style:master-page style:name="MP2" style:page-layout-name="PL2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Gustavo Borges</meta:initial-creator>
    <dc:creator>Gustavo Borges</dc:creator>
    <meta:creation-date>2023-12-17T22:28:00Z</meta:creation-date>
    <dc:date>2024-02-05T02:58:00Z</dc:date>
    <meta:template xlink:href="Normal.dotm" xlink:type="simple"/>
    <meta:editing-cycles>665</meta:editing-cycles>
    <meta:editing-duration>PT80820S</meta:editing-duration>
    <meta:user-defined meta:name="Info 1"/>
    <meta:user-defined meta:name="Info 2"/>
    <meta:user-defined meta:name="Info 3"/>
    <meta:user-defined meta:name="Info 4"/>
    <meta:document-statistic meta:page-count="15" meta:paragraph-count="18" meta:word-count="1458" meta:character-count="9318" meta:row-count="65" meta:non-whitespace-character-count="7878"/>
  </office:meta>
</office:document-meta>
</file>